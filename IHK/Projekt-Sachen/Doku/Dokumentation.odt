
<file path=META-INF/manifest.xml><?xml version="1.0" encoding="utf-8"?>
<manifest:manifest xmlns:manifest="urn:oasis:names:tc:opendocument:xmlns:manifest:1.0">
  <manifest:file-entry manifest:full-path="Pictures/image1.png" manifest:media-type=""/>
  <manifest:file-entry manifest:full-path="Pictures/image2.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737" style:master-page-name="MasterPage2" style:family="paragraph" style:name="P46">
      <style:paragraph-properties fo:text-align="center"/>
      <style:text-properties fo:color="#000000" fo:font-family="Liberation Serif" style:font-family-complex="Liberation Serif" fo:font-size="12pt" style:font-size-complex="12pt" fo:language="de" style:language-complex="hi" fo:country="DE" style:country-complex="IN" style:text-underline-type="single" style:text-underline-style="solid" style:text-underline-width="auto" style:text-underline-color="font-color"/>
    </style:style>
    <style:style style:family="text" style:name="T243">
      <style:text-properties fo:color="#000000" fo:font-family="Liberation Serif" style:font-family-complex="Liberation Serif" fo:font-size="20pt" style:font-size-complex="20pt" fo:language="de" style:language-complex="hi" fo:country="DE" style:country-complex="IN" style:text-underline-type="single" style:text-underline-style="solid" style:text-underline-width="auto" style:text-underline-color="font-color"/>
    </style:style>
    <style:style style:family="text" style:name="T244">
      <style:text-properties fo:color="#000000" fo:font-family="Liberation Serif" style:font-family-complex="Liberation Serif" fo:font-size="12pt" style:font-size-complex="12pt" fo:language="de" style:language-complex="hi" fo:country="DE" style:country-complex="IN" style:text-underline-type="single" style:text-underline-style="solid" style:text-underline-width="auto" style:text-underline-color="font-color"/>
    </style:style>
    <style:style style:family="text" style:name="T245">
      <style:text-properties fo:color="#000000" fo:font-family="Liberation Serif" style:font-family-complex="Liberation Serif" fo:font-size="12pt" style:font-size-complex="12pt" fo:language="de" style:language-complex="hi" fo:country="DE" style:country-complex="IN" style:text-underline-type="single" style:text-underline-style="solid" style:text-underline-width="auto" style:text-underline-color="font-color"/>
    </style:style>
    <style:style style:parent-style-name="737" style:family="paragraph" style:name="P47">
      <style:paragraph-properties fo:text-align="center"/>
      <style:text-properties fo:color="#000000" fo:font-family="Liberation Serif" style:font-family-complex="Liberation Serif" fo:font-size="12pt" style:font-size-complex="12pt" fo:language="de" style:language-complex="hi" fo:country="DE" style:country-complex="IN"/>
    </style:style>
    <style:style style:family="text" style:name="T246">
      <style:text-properties fo:color="#000000" fo:font-family="Liberation Serif" style:font-family-complex="Liberation Serif" fo:font-size="12pt" style:font-size-complex="12pt" fo:language="de" style:language-complex="hi" fo:country="DE" style:country-complex="IN"/>
    </style:style>
    <style:style style:family="text" style:name="T247">
      <style:text-properties fo:color="#000000" fo:font-family="Liberation Serif" style:font-family-complex="Liberation Serif" fo:font-size="12pt" style:font-size-complex="12pt" fo:language="de" style:language-complex="hi" fo:country="DE" style:country-complex="IN"/>
    </style:style>
    <style:style style:family="text" style:name="T248">
      <style:text-properties fo:color="#000000" fo:font-family="Liberation Serif" style:font-family-complex="Liberation Serif" fo:font-size="12pt" style:font-size-complex="12pt" fo:language="de" style:language-complex="hi" fo:country="DE" style:country-complex="IN"/>
    </style:style>
    <style:style style:parent-style-name="737" style:family="paragraph" style:name="P48">
      <style:paragraph-properties fo:text-align="center"/>
      <style:text-properties fo:color="#000000" fo:font-family="Liberation Serif" style:font-family-complex="Liberation Serif" fo:font-size="12pt" style:font-size-complex="12pt" fo:language="de" style:language-complex="hi" fo:country="DE" style:country-complex="IN"/>
    </style:style>
    <style:style style:family="text" style:name="T249">
      <style:text-properties fo:color="#000000" fo:font-family="Liberation Serif" style:font-family-complex="Liberation Serif" fo:font-size="12pt" style:font-size-complex="12pt" fo:language="de" style:language-complex="hi" fo:country="DE" style:country-complex="IN"/>
    </style:style>
    <style:style style:parent-style-name="Graphics" style:family="graphic" style:name="gr3">
      <style:graphic-properties draw:image-opacity="100%" style:repeat="stretch" style:wrap="parallel" fo:margin-left="0cm" fo:margin-right="0cm" fo:margin-top="0cm" fo:margin-bottom="0cm" style:horizontal-pos="center" style:horizontal-rel="page-content" style:vertical-pos="top" style:vertical-rel="paragraph" fo:background-color="transparent"/>
    </style:style>
    <style:style style:family="text" style:name="T250">
      <style:text-properties fo:color="#000000" fo:font-family="Liberation Serif" style:font-family-complex="Liberation Serif" fo:font-size="12pt" style:font-size-complex="12pt" fo:language="de" style:language-complex="hi" fo:country="DE" style:country-complex="IN"/>
    </style:style>
    <style:style style:family="text" style:name="T251">
      <style:text-properties fo:color="#000000" fo:font-family="Liberation Serif" style:font-family-complex="Liberation Serif" fo:font-size="12pt" style:font-size-complex="12pt" fo:language="de" style:language-complex="hi" fo:country="DE" style:country-complex="IN"/>
    </style:style>
    <style:style style:parent-style-name="737" style:family="paragraph" style:name="P49">
      <style:paragraph-properties fo:text-align="center"/>
      <style:text-properties fo:color="#000000" fo:font-family="Liberation Serif" style:font-family-complex="Liberation Serif" fo:font-size="12pt" style:font-size-complex="12pt" fo:language="de" style:language-complex="hi" fo:country="DE" style:country-complex="IN"/>
    </style:style>
    <style:style style:family="text" style:name="T252">
      <style:text-properties fo:color="#000000" fo:font-family="Liberation Serif" style:font-family-complex="Liberation Serif" fo:font-size="12pt" style:font-size-complex="12pt" fo:language="de" style:language-complex="hi" fo:country="DE" style:country-complex="IN"/>
    </style:style>
    <style:style style:family="text" style:name="T253">
      <style:text-properties fo:color="#000000" fo:font-family="Liberation Serif" style:font-family-complex="Liberation Serif" fo:font-size="12pt" style:font-size-complex="12pt" fo:language="de" style:language-complex="hi" fo:country="DE" style:country-complex="IN"/>
    </style:style>
    <style:style style:family="text" style:name="T254">
      <style:text-properties fo:color="#000000" fo:font-family="Liberation Serif" style:font-family-complex="Liberation Serif" fo:font-size="12pt" style:font-size-complex="12pt" fo:language="de" style:language-complex="hi" fo:country="DE" style:country-complex="IN"/>
    </style:style>
    <style:style style:parent-style-name="737" style:family="paragraph" style:name="P50">
      <style:paragraph-properties fo:text-align="center"/>
      <style:text-properties fo:color="#000000" fo:font-family="Liberation Serif" style:font-family-complex="Liberation Serif" fo:font-size="12pt" style:font-size-complex="12pt" fo:language="de" style:language-complex="hi" fo:country="DE" style:country-complex="IN"/>
    </style:style>
    <style:style style:family="text" style:name="T255">
      <style:text-properties fo:color="#000000" fo:font-family="Liberation Serif" style:font-family-complex="Liberation Serif" fo:font-size="12pt" style:font-size-complex="12pt" fo:language="de" style:language-complex="hi" fo:country="DE" style:country-complex="IN"/>
    </style:style>
    <style:style style:family="text" style:name="T256">
      <style:text-properties fo:color="#000000" fo:font-family="Liberation Serif" style:font-family-complex="Liberation Serif" fo:font-size="12pt" style:font-size-complex="12pt" fo:language="de" style:language-complex="hi" fo:country="DE" style:country-complex="IN"/>
    </style:style>
    <style:style style:family="text" style:name="T257">
      <style:text-properties fo:color="#000000" fo:font-family="Liberation Serif" style:font-family-complex="Liberation Serif" fo:font-size="12pt" style:font-size-complex="12pt" fo:language="de" style:language-complex="hi" fo:country="DE" style:country-complex="IN"/>
    </style:style>
    <style:style style:parent-style-name="737" style:family="paragraph" style:name="P51">
      <style:paragraph-properties fo:text-align="center"/>
      <style:text-properties fo:color="#000000" fo:font-family="Liberation Serif" style:font-family-complex="Liberation Serif" fo:font-size="12pt" style:font-size-complex="12pt" fo:language="de" style:language-complex="hi" fo:country="DE" style:country-complex="IN"/>
    </style:style>
    <style:style style:family="text" style:name="T258">
      <style:text-properties fo:color="#000000" fo:font-family="Liberation Serif" style:font-family-complex="Liberation Serif" fo:font-size="12pt" style:font-size-complex="12pt" fo:language="de" style:language-complex="hi" fo:country="DE" style:country-complex="IN"/>
    </style:style>
    <style:style style:family="text" style:name="T259">
      <style:text-properties fo:color="#000000" fo:font-family="Liberation Serif" style:font-family-complex="Liberation Serif" fo:font-size="12pt" style:font-size-complex="12pt" fo:language="de" style:language-complex="hi" fo:country="DE" style:country-complex="IN"/>
    </style:style>
    <style:style style:family="text" style:name="T260">
      <style:text-properties fo:color="#000000" fo:font-family="Liberation Serif" style:font-family-complex="Liberation Serif" fo:font-size="12pt" style:font-size-complex="12pt" fo:language="de" style:language-complex="hi" fo:country="DE" style:country-complex="IN"/>
    </style:style>
    <style:style style:parent-style-name="737" style:family="paragraph" style:name="P52">
      <style:paragraph-properties fo:text-align="center"/>
      <style:text-properties fo:color="#000000" fo:font-family="Liberation Serif" style:font-family-complex="Liberation Serif" fo:font-size="12pt" style:font-size-complex="12pt" fo:language="de" style:language-complex="hi" fo:country="DE" style:country-complex="IN"/>
    </style:style>
    <style:style style:family="text" style:name="T261">
      <style:text-properties fo:color="#000000" fo:font-family="Liberation Serif" style:font-family-complex="Liberation Serif" fo:font-size="12pt" style:font-size-complex="12pt" fo:language="de" style:language-complex="hi" fo:country="DE" style:country-complex="IN"/>
    </style:style>
    <style:style style:family="text" style:name="T262">
      <style:text-properties fo:color="#000000" fo:font-family="Liberation Serif" style:font-family-complex="Liberation Serif" fo:font-size="12pt" style:font-size-complex="12pt" fo:language="de" style:language-complex="hi" fo:country="DE" style:country-complex="IN"/>
    </style:style>
    <style:style style:family="text" style:name="T263">
      <style:text-properties fo:color="#000000" fo:font-family="Liberation Serif" style:font-family-complex="Liberation Serif" fo:font-size="12pt" style:font-size-complex="12pt" fo:language="de" style:language-complex="hi" fo:country="DE" style:country-complex="IN"/>
    </style:style>
    <style:style style:parent-style-name="737" style:family="paragraph" style:name="P53">
      <style:paragraph-properties fo:text-align="center"/>
      <style:text-properties fo:color="#000000" fo:font-family="Liberation Serif" style:font-family-complex="Liberation Serif" fo:font-size="12pt" style:font-size-complex="12pt" fo:language="de" style:language-complex="hi" fo:country="DE" style:country-complex="IN"/>
    </style:style>
    <style:style style:family="text" style:name="T264">
      <style:text-properties fo:color="#000000" fo:font-family="Liberation Serif" style:font-family-complex="Liberation Serif" fo:font-size="12pt" style:font-size-complex="12pt" fo:language="de" style:language-complex="hi" fo:country="DE" style:country-complex="IN"/>
    </style:style>
    <style:style style:family="text" style:name="T265">
      <style:text-properties fo:color="#000000" fo:font-family="Liberation Serif" style:font-family-complex="Liberation Serif" fo:font-size="12pt" style:font-size-complex="12pt" fo:language="de" style:language-complex="hi" fo:country="DE" style:country-complex="IN"/>
    </style:style>
    <style:style style:family="text" style:name="T266">
      <style:text-properties fo:color="#000000" fo:font-family="Liberation Serif" style:font-family-complex="Liberation Serif" fo:font-size="12pt" style:font-size-complex="12pt" fo:language="de" style:language-complex="hi" fo:country="DE" style:country-complex="IN"/>
    </style:style>
    <style:style style:parent-style-name="737" style:family="paragraph" style:name="P54">
      <style:paragraph-properties fo:text-align="center"/>
      <style:text-properties fo:color="#000000" fo:font-family="Liberation Serif" style:font-family-complex="Liberation Serif" fo:font-size="12pt" style:font-size-complex="12pt" fo:language="de" style:language-complex="hi" fo:country="DE" style:country-complex="IN"/>
    </style:style>
    <style:style style:family="text" style:name="T267">
      <style:text-properties fo:color="#000000" fo:font-family="Liberation Serif" style:font-family-complex="Liberation Serif" fo:font-size="12pt" style:font-size-complex="12pt" fo:language="de" style:language-complex="hi" fo:country="DE" style:country-complex="IN"/>
    </style:style>
    <style:style style:family="text" style:name="T268">
      <style:text-properties fo:color="#000000" fo:font-family="Liberation Serif" style:font-family-complex="Liberation Serif" fo:font-size="12pt" style:font-size-complex="12pt" fo:language="de" style:language-complex="hi" fo:country="DE" style:country-complex="IN"/>
    </style:style>
    <style:style style:family="text" style:name="T269">
      <style:text-properties fo:color="#000000" fo:font-family="Liberation Serif" style:font-family-complex="Liberation Serif" fo:font-size="12pt" style:font-size-complex="12pt" fo:language="de" style:language-complex="hi" fo:country="DE" style:country-complex="IN"/>
    </style:style>
    <style:style style:parent-style-name="737" style:family="paragraph" style:name="P55">
      <style:paragraph-properties fo:text-align="center"/>
      <style:text-properties fo:color="#000000" fo:font-family="Liberation Serif" style:font-family-complex="Liberation Serif" fo:font-size="12pt" style:font-size-complex="12pt" fo:language="de" style:language-complex="hi" fo:country="DE" style:country-complex="IN"/>
    </style:style>
    <style:style style:family="text" style:name="T270">
      <style:text-properties fo:color="#000000" fo:font-family="Liberation Serif" style:font-family-complex="Liberation Serif" fo:font-size="12pt" style:font-size-complex="12pt" fo:language="de" style:language-complex="hi" fo:country="DE" style:country-complex="IN"/>
    </style:style>
    <style:style style:family="text" style:name="T271">
      <style:text-properties fo:color="#000000" fo:font-family="Liberation Serif" style:font-family-complex="Liberation Serif" fo:font-size="12pt" style:font-size-complex="12pt" fo:language="de" style:language-complex="hi" fo:country="DE" style:country-complex="IN"/>
    </style:style>
    <style:style style:family="text" style:name="T272">
      <style:text-properties fo:color="#000000" fo:font-family="Liberation Serif" style:font-family-complex="Liberation Serif" fo:font-size="12pt" style:font-size-complex="12pt" fo:language="de" style:language-complex="hi" fo:country="DE" style:country-complex="IN"/>
    </style:style>
    <style:style style:parent-style-name="737" style:family="paragraph" style:name="P56">
      <style:paragraph-properties fo:text-align="center"/>
      <style:text-properties fo:color="#000000" fo:font-family="Liberation Serif" style:font-family-complex="Liberation Serif" fo:font-size="12pt" style:font-size-complex="12pt" fo:language="de" style:language-complex="hi" fo:country="DE" style:country-complex="IN"/>
    </style:style>
    <style:style style:family="text" style:name="T273">
      <style:text-properties fo:color="#000000" fo:font-family="Liberation Serif" style:font-family-complex="Liberation Serif" fo:font-size="12pt" style:font-size-complex="12pt" fo:language="de" style:language-complex="hi" fo:country="DE" style:country-complex="IN"/>
    </style:style>
    <style:style style:family="text" style:name="T274">
      <style:text-properties fo:color="#000000" fo:font-family="Liberation Serif" style:font-family-complex="Liberation Serif" fo:font-size="12pt" style:font-size-complex="12pt" fo:language="de" style:language-complex="hi" fo:country="DE" style:country-complex="IN"/>
    </style:style>
    <style:style style:family="text" style:name="T275">
      <style:text-properties fo:color="#000000" fo:font-family="Liberation Serif" style:font-family-complex="Liberation Serif" fo:font-size="12pt" style:font-size-complex="12pt" fo:language="de" style:language-complex="hi" fo:country="DE" style:country-complex="IN"/>
    </style:style>
    <style:style style:parent-style-name="737" style:family="paragraph" style:name="P57">
      <style:paragraph-properties fo:text-align="center"/>
      <style:text-properties fo:color="#000000" fo:font-family="Liberation Serif" style:font-family-complex="Liberation Serif" fo:font-size="12pt" style:font-size-complex="12pt" fo:language="de" style:language-complex="hi" fo:country="DE" style:country-complex="IN"/>
    </style:style>
    <style:style style:family="text" style:name="T276">
      <style:text-properties fo:color="#000000" fo:font-family="Liberation Serif" style:font-family-complex="Liberation Serif" fo:font-size="12pt" style:font-size-complex="12pt" fo:language="de" style:language-complex="hi" fo:country="DE" style:country-complex="IN"/>
    </style:style>
    <style:style style:family="text" style:name="T277">
      <style:text-properties fo:color="#000000" fo:font-family="Liberation Serif" style:font-family-complex="Liberation Serif" fo:font-size="12pt" style:font-size-complex="12pt" fo:language="de" style:language-complex="hi" fo:country="DE" style:country-complex="IN"/>
    </style:style>
    <style:style style:family="text" style:name="T278">
      <style:text-properties fo:color="#000000" fo:font-family="Liberation Serif" style:font-family-complex="Liberation Serif" fo:font-size="12pt" style:font-size-complex="12pt" fo:language="de" style:language-complex="hi" fo:country="DE" style:country-complex="IN"/>
    </style:style>
    <style:style style:parent-style-name="737" style:family="paragraph" style:name="P58">
      <style:paragraph-properties fo:text-align="center"/>
      <style:text-properties fo:color="#000000" fo:font-family="Liberation Serif" style:font-family-complex="Liberation Serif" fo:font-size="12pt" style:font-size-complex="12pt" fo:language="de" style:language-complex="hi" fo:country="DE" style:country-complex="IN"/>
    </style:style>
    <style:style style:family="text" style:name="T279">
      <style:text-properties fo:color="#000000" fo:font-family="Liberation Serif" style:font-family-complex="Liberation Serif" fo:font-size="12pt" style:font-size-complex="12pt" fo:language="de" style:language-complex="hi" fo:country="DE" style:country-complex="IN"/>
    </style:style>
    <style:style style:family="text" style:name="T280">
      <style:text-properties fo:color="#000000" fo:font-family="Liberation Serif" style:font-family-complex="Liberation Serif" fo:font-size="12pt" style:font-size-complex="12pt" fo:language="de" style:language-complex="hi" fo:country="DE" style:country-complex="IN"/>
    </style:style>
    <style:style style:family="text" style:name="T281">
      <style:text-properties fo:color="#000000" fo:font-family="Liberation Serif" style:font-family-complex="Liberation Serif" fo:font-size="12pt" style:font-size-complex="12pt" fo:language="de" style:language-complex="hi" fo:country="DE" style:country-complex="IN"/>
    </style:style>
    <style:style style:parent-style-name="737" style:family="paragraph" style:name="P59">
      <style:paragraph-properties fo:text-align="center"/>
      <style:text-properties fo:color="#000000" fo:font-family="Liberation Serif" style:font-family-complex="Liberation Serif" fo:font-size="12pt" style:font-size-complex="12pt" fo:language="de" style:language-complex="hi" fo:country="DE" style:country-complex="IN"/>
    </style:style>
    <style:style style:family="text" style:name="T282">
      <style:text-properties fo:color="#000000" fo:font-family="Liberation Serif" style:font-family-complex="Liberation Serif" fo:font-size="12pt" style:font-size-complex="12pt" fo:language="de" style:language-complex="hi" fo:country="DE" style:country-complex="IN"/>
    </style:style>
    <style:style style:family="text" style:name="T283">
      <style:text-properties fo:color="#000000" fo:font-family="Liberation Serif" style:font-family-complex="Liberation Serif" fo:font-size="12pt" style:font-size-complex="12pt" fo:language="de" style:language-complex="hi" fo:country="DE" style:country-complex="IN"/>
    </style:style>
    <style:style style:family="text" style:name="T284">
      <style:text-properties fo:color="#000000" fo:font-family="Liberation Serif" style:font-family-complex="Liberation Serif" fo:font-size="12pt" style:font-size-complex="12pt" fo:language="de" style:language-complex="hi" fo:country="DE" style:country-complex="IN"/>
    </style:style>
    <style:style style:parent-style-name="737" style:family="paragraph" style:name="P60">
      <style:paragraph-properties fo:text-align="center"/>
      <style:text-properties fo:color="#000000" fo:font-family="Liberation Serif" style:font-family-complex="Liberation Serif" fo:font-size="12pt" style:font-size-complex="12pt" fo:language="de" style:language-complex="hi" fo:country="DE" style:country-complex="IN"/>
    </style:style>
    <style:style style:family="text" style:name="T285">
      <style:text-properties fo:color="#000000" fo:font-family="Liberation Serif" style:font-family-complex="Liberation Serif" fo:font-size="12pt" style:font-size-complex="12pt" fo:language="de" style:language-complex="hi" fo:country="DE" style:country-complex="IN"/>
    </style:style>
    <style:style style:family="text" style:name="T286">
      <style:text-properties fo:color="#000000" fo:font-family="Liberation Serif" style:font-family-complex="Liberation Serif" fo:font-size="12pt" style:font-size-complex="12pt" fo:language="de" style:language-complex="hi" fo:country="DE" style:country-complex="IN"/>
    </style:style>
    <style:style style:family="text" style:name="T287">
      <style:text-properties fo:color="#000000" fo:font-family="Liberation Serif" style:font-family-complex="Liberation Serif" fo:font-size="12pt" style:font-size-complex="12pt" fo:language="de" style:language-complex="hi" fo:country="DE" style:country-complex="IN"/>
    </style:style>
    <style:style style:parent-style-name="737" style:family="paragraph" style:name="P61">
      <style:paragraph-properties fo:text-align="center"/>
      <style:text-properties fo:color="#000000" fo:font-family="Liberation Serif" style:font-family-complex="Liberation Serif" fo:font-size="12pt" style:font-size-complex="12pt" fo:language="de" style:language-complex="hi" fo:country="DE" style:country-complex="IN"/>
    </style:style>
    <style:style style:family="text" style:name="T288">
      <style:text-properties fo:color="#000000" fo:font-family="Liberation Serif" style:font-family-complex="Liberation Serif" fo:font-size="12pt" style:font-size-complex="12pt" fo:language="de" style:language-complex="hi" fo:country="DE" style:country-complex="IN"/>
    </style:style>
    <style:style style:family="text" style:name="T289">
      <style:text-properties fo:color="#000000" fo:font-family="Liberation Serif" style:font-family-complex="Liberation Serif" fo:font-size="12pt" style:font-size-complex="12pt" fo:language="de" style:language-complex="hi" fo:country="DE" style:country-complex="IN"/>
    </style:style>
    <style:style style:family="text" style:name="T290">
      <style:text-properties fo:color="#000000" fo:font-family="Liberation Serif" style:font-family-complex="Liberation Serif" fo:font-size="12pt" style:font-size-complex="12pt" fo:language="de" style:language-complex="hi" fo:country="DE" style:country-complex="IN"/>
    </style:style>
    <style:style style:parent-style-name="737" style:family="paragraph" style:name="P62">
      <style:paragraph-properties fo:text-align="center"/>
      <style:text-properties fo:color="#000000" fo:font-family="Liberation Serif" style:font-family-complex="Liberation Serif" fo:font-size="12pt" style:font-size-complex="12pt" fo:language="de" style:language-complex="hi" fo:country="DE" style:country-complex="IN"/>
    </style:style>
    <style:style style:family="text" style:name="T291">
      <style:text-properties fo:color="#000000" fo:font-family="Liberation Serif" style:font-family-complex="Liberation Serif" fo:font-size="12pt" style:font-size-complex="12pt" fo:language="de" style:language-complex="hi" fo:country="DE" style:country-complex="IN"/>
    </style:style>
    <style:style style:family="text" style:name="T292">
      <style:text-properties fo:color="#000000" fo:font-family="Liberation Serif" style:font-family-complex="Liberation Serif" fo:font-size="12pt" style:font-size-complex="12pt" fo:language="de" style:language-complex="hi" fo:country="DE" style:country-complex="IN"/>
    </style:style>
    <style:style style:family="text" style:name="T293">
      <style:text-properties fo:color="#000000" fo:font-family="Liberation Serif" style:font-family-complex="Liberation Serif" fo:font-size="12pt" style:font-size-complex="12pt" fo:language="de" style:language-complex="hi" fo:country="DE" style:country-complex="IN"/>
    </style:style>
    <style:style style:parent-style-name="737" style:family="paragraph" style:name="P63">
      <style:paragraph-properties fo:text-align="center"/>
      <style:text-properties fo:color="#000000" fo:font-family="Liberation Serif" style:font-family-complex="Liberation Serif" fo:font-size="12pt" style:font-size-complex="12pt" fo:language="de" style:language-complex="hi" fo:country="DE" style:country-complex="IN"/>
    </style:style>
    <style:style style:family="text" style:name="T294">
      <style:text-properties fo:color="#000000" fo:font-family="Liberation Serif" style:font-family-complex="Liberation Serif" fo:font-size="12pt" style:font-size-complex="12pt" fo:language="de" style:language-complex="hi" fo:country="DE" style:country-complex="IN"/>
    </style:style>
    <style:style style:family="text" style:name="T295">
      <style:text-properties fo:color="#000000" fo:font-family="Liberation Serif" style:font-family-complex="Liberation Serif" fo:font-size="12pt" style:font-size-complex="12pt" fo:language="de" style:language-complex="hi" fo:country="DE" style:country-complex="IN"/>
    </style:style>
    <style:style style:family="text" style:name="T296">
      <style:text-properties fo:color="#000000" fo:font-family="Liberation Serif" style:font-family-complex="Liberation Serif" fo:font-size="12pt" style:font-size-complex="12pt" fo:language="de" style:language-complex="hi" fo:country="DE" style:country-complex="IN"/>
    </style:style>
    <style:style style:parent-style-name="737" style:family="paragraph" style:name="P64">
      <style:paragraph-properties fo:text-align="center"/>
      <style:text-properties fo:color="#000000" fo:font-family="Liberation Serif" style:font-family-complex="Liberation Serif" fo:font-size="12pt" style:font-size-complex="12pt" fo:language="de" style:language-complex="hi" fo:country="DE" style:country-complex="IN"/>
    </style:style>
    <style:style style:family="text" style:name="T297">
      <style:text-properties fo:color="#000000" fo:font-family="Liberation Serif" style:font-family-complex="Liberation Serif" fo:font-size="12pt" style:font-size-complex="12pt" fo:language="de" style:language-complex="hi" fo:country="DE" style:country-complex="IN"/>
    </style:style>
    <style:style style:family="text" style:name="T298">
      <style:text-properties fo:color="#000000" fo:font-family="Liberation Serif" style:font-family-complex="Liberation Serif" fo:font-size="12pt" style:font-size-complex="12pt" fo:language="de" style:language-complex="hi" fo:country="DE" style:country-complex="IN"/>
    </style:style>
    <style:style style:family="text" style:name="T299">
      <style:text-properties fo:color="#000000" fo:font-family="Liberation Serif" style:font-family-complex="Liberation Serif" fo:font-size="12pt" style:font-size-complex="12pt" fo:language="de" style:language-complex="hi" fo:country="DE" style:country-complex="IN"/>
    </style:style>
    <style:style style:parent-style-name="737" style:family="paragraph" style:name="P65">
      <style:paragraph-properties fo:text-align="center"/>
      <style:text-properties fo:color="#000000" fo:font-family="Liberation Serif" style:font-family-complex="Liberation Serif" fo:font-size="12pt" style:font-size-complex="12pt" fo:language="de" style:language-complex="hi" fo:country="DE" style:country-complex="IN"/>
    </style:style>
    <style:style style:family="text" style:name="T300">
      <style:text-properties fo:color="#000000" fo:font-family="Liberation Serif" style:font-family-complex="Liberation Serif" fo:font-size="12pt" style:font-size-complex="12pt" fo:language="de" style:language-complex="hi" fo:country="DE" style:country-complex="IN"/>
    </style:style>
    <style:style style:family="text" style:name="T301">
      <style:text-properties fo:color="#000000" fo:font-family="Liberation Serif" style:font-family-complex="Liberation Serif" fo:font-size="12pt" style:font-size-complex="12pt" fo:language="de" style:language-complex="hi" fo:country="DE" style:country-complex="IN"/>
    </style:style>
    <style:style style:family="text" style:name="T302">
      <style:text-properties fo:color="#000000" fo:font-family="Liberation Serif" style:font-family-complex="Liberation Serif" fo:font-size="12pt" style:font-size-complex="12pt" fo:language="de" style:language-complex="hi" fo:country="DE" style:country-complex="IN"/>
    </style:style>
    <style:style style:parent-style-name="737" style:family="paragraph" style:name="P66">
      <style:paragraph-properties fo:text-align="center"/>
      <style:text-properties fo:color="#000000" fo:font-family="Liberation Serif" style:font-family-complex="Liberation Serif" fo:font-size="12pt" style:font-size-complex="12pt" fo:language="de" style:language-complex="hi" fo:country="DE" style:country-complex="IN"/>
    </style:style>
    <style:style style:family="text" style:name="T303">
      <style:text-properties fo:color="#000000" fo:font-family="Liberation Serif" style:font-family-complex="Liberation Serif" fo:font-size="12pt" style:font-size-complex="12pt" fo:language="de" style:language-complex="hi" fo:country="DE" style:country-complex="IN"/>
    </style:style>
    <style:style style:family="text" style:name="T304">
      <style:text-properties fo:color="#000000" fo:font-family="Liberation Serif" style:font-family-complex="Liberation Serif" fo:font-size="12pt" style:font-size-complex="12pt" fo:language="de" style:language-complex="hi" fo:country="DE" style:country-complex="IN"/>
    </style:style>
    <style:style style:family="text" style:name="T305">
      <style:text-properties fo:color="#000000" fo:font-family="Liberation Serif" style:font-family-complex="Liberation Serif" fo:font-size="12pt" style:font-size-complex="12pt" fo:language="de" style:language-complex="hi" fo:country="DE" style:country-complex="IN"/>
    </style:style>
    <style:style style:parent-style-name="737" style:family="paragraph" style:name="P67">
      <style:paragraph-properties fo:text-align="center"/>
      <style:text-properties fo:color="#000000" fo:font-family="Liberation Serif" style:font-family-complex="Liberation Serif" fo:font-size="12pt" style:font-size-complex="12pt" fo:language="de" style:language-complex="hi" fo:country="DE" style:country-complex="IN"/>
    </style:style>
    <style:style style:family="text" style:name="T306">
      <style:text-properties fo:color="#000000" fo:font-family="Liberation Serif" style:font-family-complex="Liberation Serif" fo:font-size="12pt" style:font-size-complex="12pt" fo:language="de" style:language-complex="hi" fo:country="DE" style:country-complex="IN"/>
    </style:style>
    <style:style style:family="text" style:name="T307">
      <style:text-properties fo:color="#000000" fo:font-family="Liberation Serif" style:font-family-complex="Liberation Serif" fo:font-size="12pt" style:font-size-complex="12pt" fo:language="de" style:language-complex="hi" fo:country="DE" style:country-complex="IN"/>
    </style:style>
    <style:style style:family="text" style:name="T308">
      <style:text-properties fo:color="#000000" fo:font-family="Liberation Serif" style:font-family-complex="Liberation Serif" fo:font-size="12pt" style:font-size-complex="12pt" fo:language="de" style:language-complex="hi" fo:country="DE" style:country-complex="IN"/>
    </style:style>
    <style:style style:parent-style-name="737" style:family="paragraph" style:name="P68">
      <style:paragraph-properties fo:text-align="center"/>
      <style:text-properties fo:color="#000000" fo:font-family="Liberation Serif" style:font-family-complex="Liberation Serif" fo:font-size="12pt" style:font-size-complex="12pt" fo:language="de" style:language-complex="hi" fo:country="DE" style:country-complex="IN"/>
    </style:style>
    <style:style style:family="text" style:name="T309">
      <style:text-properties fo:color="#000000" fo:font-family="Liberation Serif" style:font-family-complex="Liberation Serif" fo:font-size="12pt" style:font-size-complex="12pt" fo:language="de" style:language-complex="hi" fo:country="DE" style:country-complex="IN"/>
    </style:style>
    <style:style style:parent-style-name="Graphics" style:family="graphic" style:name="gr4">
      <style:graphic-properties draw:image-opacity="100%" style:repeat="stretch" style:wrap="parallel" fo:margin-left="0cm" fo:margin-right="0cm" fo:margin-top="0cm" fo:margin-bottom="0cm" style:horizontal-pos="from-left" style:horizontal-rel="page-content" style:vertical-pos="from-top" style:vertical-rel="paragraph" fo:background-color="transparent"/>
    </style:style>
    <style:style style:family="text" style:name="T310">
      <style:text-properties fo:color="#000000" fo:font-family="Liberation Serif" style:font-family-complex="Liberation Serif" fo:font-size="12pt" style:font-size-complex="12pt" fo:language="de" style:language-complex="hi" fo:country="DE" style:country-complex="IN"/>
    </style:style>
    <style:style style:family="text" style:name="T311">
      <style:text-properties fo:color="#000000" fo:font-family="Liberation Serif" style:font-family-complex="Liberation Serif" fo:font-size="12pt" style:font-size-complex="12pt" fo:language="de" style:language-complex="hi" fo:country="DE" style:country-complex="IN"/>
    </style:style>
    <style:style style:parent-style-name="737" style:family="paragraph" style:name="P69">
      <style:paragraph-properties fo:text-align="center"/>
      <style:text-properties fo:color="#000000" fo:font-family="Liberation Serif" style:font-family-complex="Liberation Serif" fo:font-size="12pt" style:font-size-complex="12pt" fo:language="de" style:language-complex="hi" fo:country="DE" style:country-complex="IN"/>
    </style:style>
    <style:style style:family="text" style:name="T312">
      <style:text-properties fo:color="#000000" fo:font-family="Liberation Serif" style:font-family-complex="Liberation Serif" fo:font-size="12pt" style:font-size-complex="12pt" fo:language="de" style:language-complex="hi" fo:country="DE" style:country-complex="IN"/>
    </style:style>
    <style:style style:family="text" style:name="T313">
      <style:text-properties fo:color="#000000" fo:font-family="Liberation Serif" style:font-family-complex="Liberation Serif" fo:font-size="12pt" style:font-size-complex="12pt" fo:language="de" style:language-complex="hi" fo:country="DE" style:country-complex="IN"/>
    </style:style>
    <style:style style:family="text" style:name="T314">
      <style:text-properties fo:color="#000000" fo:font-family="Liberation Serif" style:font-family-complex="Liberation Serif" fo:font-size="12pt" style:font-size-complex="12pt" fo:language="de" style:language-complex="hi" fo:country="DE" style:country-complex="IN"/>
    </style:style>
    <style:style style:parent-style-name="737" style:family="paragraph" style:name="P70">
      <style:paragraph-properties fo:text-align="center"/>
      <style:text-properties fo:color="#000000" fo:font-family="Liberation Serif" style:font-family-complex="Liberation Serif" fo:font-size="12pt" style:font-size-complex="12pt" fo:language="de" style:language-complex="hi" fo:country="DE" style:country-complex="IN"/>
    </style:style>
    <style:style style:family="text" style:name="T315">
      <style:text-properties fo:color="#000000" fo:font-family="Liberation Serif" style:font-family-complex="Liberation Serif" fo:font-size="12pt" style:font-size-complex="12pt" fo:language="de" style:language-complex="hi" fo:country="DE" style:country-complex="IN"/>
    </style:style>
    <style:style style:family="text" style:name="T316">
      <style:text-properties fo:color="#000000" fo:font-family="Liberation Serif" style:font-family-complex="Liberation Serif" fo:font-size="12pt" style:font-size-complex="12pt" fo:language="de" style:language-complex="hi" fo:country="DE" style:country-complex="IN"/>
    </style:style>
    <style:style style:family="text" style:name="T317">
      <style:text-properties fo:color="#000000" fo:font-family="Liberation Serif" style:font-family-complex="Liberation Serif" fo:font-size="12pt" style:font-size-complex="12pt" fo:language="de" style:language-complex="hi" fo:country="DE" style:country-complex="IN"/>
    </style:style>
    <style:style style:parent-style-name="737" style:family="paragraph" style:name="P71">
      <style:paragraph-properties fo:text-align="center"/>
      <style:text-properties fo:color="#000000" fo:font-family="Liberation Serif" style:font-family-complex="Liberation Serif" fo:font-size="12pt" style:font-size-complex="12pt" fo:language="de" style:language-complex="hi" fo:country="DE" style:country-complex="IN"/>
    </style:style>
    <style:style style:family="text" style:name="T318">
      <style:text-properties fo:color="#000000" fo:font-family="Liberation Serif" style:font-family-complex="Liberation Serif" fo:font-size="12pt" style:font-size-complex="12pt" fo:language="de" style:language-complex="hi" fo:country="DE" style:country-complex="IN"/>
    </style:style>
    <style:style style:family="text" style:name="T319">
      <style:text-properties fo:color="#000000" fo:font-family="Liberation Serif" style:font-family-complex="Liberation Serif" fo:font-size="12pt" style:font-size-complex="12pt" fo:language="de" style:language-complex="hi" fo:country="DE" style:country-complex="IN"/>
    </style:style>
    <style:style style:family="text" style:name="T320">
      <style:text-properties fo:color="#000000" fo:font-family="Liberation Serif" style:font-family-complex="Liberation Serif" fo:font-size="12pt" style:font-size-complex="12pt" fo:language="de" style:language-complex="hi" fo:country="DE" style:country-complex="IN"/>
    </style:style>
    <style:style style:parent-style-name="737" style:family="paragraph" style:name="P72">
      <style:paragraph-properties fo:text-align="center"/>
      <style:text-properties fo:color="#000000" fo:font-family="Liberation Serif" style:font-family-complex="Liberation Serif" fo:font-size="12pt" style:font-size-complex="12pt" fo:language="de" style:language-complex="hi" fo:country="DE" style:country-complex="IN"/>
    </style:style>
    <style:style style:family="text" style:name="T321">
      <style:text-properties fo:color="#000000" fo:font-family="Liberation Serif" style:font-family-complex="Liberation Serif" fo:font-size="12pt" style:font-size-complex="12pt" fo:language="de" style:language-complex="hi" fo:country="DE" style:country-complex="IN"/>
    </style:style>
    <style:style style:family="text" style:name="T322">
      <style:text-properties fo:color="#000000" fo:font-family="Liberation Serif" style:font-family-complex="Liberation Serif" fo:font-size="12pt" style:font-size-complex="12pt" fo:language="de" style:language-complex="hi" fo:country="DE" style:country-complex="IN"/>
    </style:style>
    <style:style style:family="text" style:name="T323">
      <style:text-properties fo:color="#000000" fo:font-family="Liberation Serif" style:font-family-complex="Liberation Serif" fo:font-size="12pt" style:font-size-complex="12pt" fo:language="de" style:language-complex="hi" fo:country="DE" style:country-complex="IN"/>
    </style:style>
    <style:style style:parent-style-name="737" style:family="paragraph" style:name="P73">
      <style:paragraph-properties fo:text-align="center"/>
      <style:text-properties fo:color="#000000" fo:font-family="Liberation Serif" style:font-family-complex="Liberation Serif" fo:font-size="12pt" style:font-size-complex="12pt" fo:language="de" style:language-complex="hi" fo:country="DE" style:country-complex="IN"/>
    </style:style>
    <style:style style:family="text" style:name="T324">
      <style:text-properties fo:color="#000000" fo:font-family="Liberation Serif" style:font-family-complex="Liberation Serif" fo:font-size="12pt" style:font-size-complex="12pt" fo:language="de" style:language-complex="hi" fo:country="DE" style:country-complex="IN"/>
    </style:style>
    <style:style style:family="text" style:name="T325">
      <style:text-properties fo:color="#000000" fo:font-family="Liberation Serif" style:font-family-complex="Liberation Serif" fo:font-size="12pt" style:font-size-complex="12pt" fo:language="de" style:language-complex="hi" fo:country="DE" style:country-complex="IN"/>
    </style:style>
    <style:style style:family="text" style:name="T326">
      <style:text-properties fo:color="#000000" fo:font-family="Liberation Serif" style:font-family-complex="Liberation Serif" fo:font-size="12pt" style:font-size-complex="12pt" fo:language="de" style:language-complex="hi" fo:country="DE" style:country-complex="IN"/>
    </style:style>
    <style:style style:family="paragraph" style:name="P74">
      <style:paragraph-properties/>
      <style:text-properties/>
    </style:style>
    <style:style style:family="text" style:name="T327">
      <style:text-properties fo:font-weight="bold"/>
    </style:style>
    <style:style style:family="text" style:name="T328">
      <style:text-properties fo:font-weight="bold"/>
    </style:style>
    <style:style style:parent-style-name="724" style:master-page-name="MasterPage3" style:family="paragraph" style:name="P75">
      <style:paragraph-properties fo:break-before="page">
        <style:tab-stops>
          <style:tab-stop style:position="17cm" style:type="right" style:leader-type="dotted" style:leader-style="dotted"/>
        </style:tab-stops>
      </style:paragraph-properties>
      <style:text-properties/>
    </style:style>
    <style:style style:parent-style-name="724" style:master-page-name="MasterPage4" style:family="paragraph" style:name="P76">
      <style:paragraph-properties fo:break-before="page">
        <style:tab-stops>
          <style:tab-stop style:position="17cm" style:type="right" style:leader-type="dotted" style:leader-style="dotted"/>
        </style:tab-stops>
      </style:paragraph-properties>
      <style:text-properties/>
    </style:style>
    <style:style style:master-page-name="MasterPage5" style:family="paragraph" style:name="P77">
      <style:paragraph-properties/>
      <style:text-properties/>
    </style:style>
    <style:style style:family="text" style:name="T329">
      <style:text-properties fo:font-family="Liberation Sans" style:font-family-complex="Liberation Sans"/>
    </style:style>
    <style:style style:family="text" style:name="T330">
      <style:text-properties fo:font-family="Liberation Sans" style:font-family-complex="Liberation Sans"/>
    </style:style>
    <style:style style:master-page-name="MasterPage6" style:family="paragraph" style:name="P78">
      <style:paragraph-properties fo:break-before="page"/>
      <style:text-properties/>
    </style:style>
    <style:style style:parent-style-name="724" style:family="paragraph" style:name="P79">
      <style:paragraph-properties>
        <style:tab-stops>
          <style:tab-stop style:position="17cm" style:type="right" style:leader-type="dotted" style:leader-style="dotted"/>
        </style:tab-stops>
      </style:paragraph-properties>
      <style:text-properties fo:font-family="Liberation Sans" style:font-family-complex="Liberation Sans"/>
    </style:style>
    <style:style style:family="text" style:name="T331">
      <style:text-properties fo:font-family="Liberation Sans" style:font-family-complex="Liberation Sans"/>
    </style:style>
    <style:style style:family="text" style:name="T332">
      <style:text-properties fo:font-family="Liberation Sans" style:font-family-complex="Liberation Sans"/>
    </style:style>
    <style:style style:family="text" style:name="T333">
      <style:text-properties fo:font-family="Liberation Sans" style:font-family-complex="Liberation Sans"/>
    </style:style>
    <style:style style:family="paragraph" style:name="P80">
      <style:paragraph-properties/>
      <style:text-properties/>
    </style:style>
    <style:style style:family="paragraph" style:name="P81">
      <style:paragraph-properties/>
      <style:text-properties/>
    </style:style>
    <style:style style:parent-style-name="724" style:family="paragraph" style:name="P82">
      <style:paragraph-properties>
        <style:tab-stops>
          <style:tab-stop style:position="17cm" style:type="right" style:leader-type="dotted" style:leader-style="dotted"/>
        </style:tab-stops>
      </style:paragraph-properties>
      <style:text-properties fo:font-family="Liberation Sans" style:font-family-complex="Liberation Sans"/>
    </style:style>
    <style:style style:family="text" style:name="T334">
      <style:text-properties fo:font-family="Liberation Sans" style:font-family-complex="Liberation Sans"/>
    </style:style>
    <style:style style:family="text" style:name="T335">
      <style:text-properties fo:font-family="Liberation Sans" style:font-family-complex="Liberation Sans"/>
    </style:style>
    <style:style style:family="text" style:name="T336">
      <style:text-properties fo:font-family="Liberation Sans" style:font-family-complex="Liberation Sans"/>
    </style:style>
    <style:style style:parent-style-name="717" style:family="text" style:name="T337">
      <style:text-properties fo:font-family="Liberation Sans" style:font-family-complex="Liberation Sans"/>
    </style:style>
    <style:style style:parent-style-name="717" style:family="text" style:name="T338">
      <style:text-properties fo:font-family="Liberation Sans" style:font-family-complex="Liberation Sans" fo:language="de" style:language-complex="hi" fo:country="DE" style:country-complex="IN"/>
    </style:style>
    <style:style style:parent-style-name="717" style:family="text" style:name="T339">
      <style:text-properties fo:font-family="Liberation Sans" style:font-family-complex="Liberation Sans" fo:language="de" style:language-complex="hi" fo:country="DE" style:country-complex="IN"/>
    </style:style>
    <style:style style:family="text" style:name="T340">
      <style:text-properties fo:font-family="Liberation Sans" style:font-family-complex="Liberation Sans"/>
    </style:style>
    <style:style style:family="text" style:name="T341">
      <style:text-properties fo:font-family="Liberation Sans" style:font-family-complex="Liberation Sans"/>
    </style:style>
    <style:style style:family="text" style:name="T342">
      <style:text-properties fo:font-family="Liberation Sans" style:font-family-complex="Liberation Sans"/>
    </style:style>
    <style:style style:family="text" style:name="T343">
      <style:text-properties fo:font-family="Liberation Sans" style:font-family-complex="Liberation Sans"/>
    </style:style>
    <style:style style:parent-style-name="724" style:family="paragraph" style:name="P83">
      <style:paragraph-properties>
        <style:tab-stops>
          <style:tab-stop style:position="17cm" style:type="right" style:leader-type="dotted" style:leader-style="dotted"/>
        </style:tab-stops>
      </style:paragraph-properties>
      <style:text-properties/>
    </style:style>
    <style:style style:parent-style-name="717" style:family="text" style:name="T344">
      <style:text-properties/>
    </style:style>
    <style:style style:parent-style-name="717" style:family="text" style:name="T345">
      <style:text-properties fo:language="de" fo:country="DE"/>
    </style:style>
    <style:style style:parent-style-name="717" style:family="text" style:name="T346">
      <style:text-properties/>
    </style:style>
    <style:style style:parent-style-name="717" style:family="text" style:name="T347">
      <style:text-properties/>
    </style:style>
    <style:style style:parent-style-name="724" style:family="paragraph" style:name="P84">
      <style:paragraph-properties>
        <style:tab-stops>
          <style:tab-stop style:position="17cm" style:type="right" style:leader-type="dotted" style:leader-style="dotted"/>
        </style:tab-stops>
      </style:paragraph-properties>
      <style:text-properties fo:font-family="Liberation Sans" style:font-family-complex="Liberation Sans"/>
    </style:style>
    <style:style style:family="text" style:name="T348">
      <style:text-properties fo:font-family="Liberation Sans" style:font-family-complex="Liberation Sans"/>
    </style:style>
    <style:style style:family="text" style:name="T349">
      <style:text-properties fo:font-family="Liberation Sans" style:font-family-complex="Liberation Sans"/>
    </style:style>
    <style:style style:family="text" style:name="T350">
      <style:text-properties fo:font-family="Liberation Sans" style:font-family-complex="Liberation Sans"/>
    </style:style>
    <style:style style:parent-style-name="717" style:family="text" style:name="T351">
      <style:text-properties fo:font-family="Liberation Sans" style:font-family-complex="Liberation Sans"/>
    </style:style>
    <style:style style:parent-style-name="717" style:family="text" style:name="T352">
      <style:text-properties fo:font-family="Liberation Sans" style:font-family-complex="Liberation Sans" fo:language="de" style:language-complex="hi" fo:country="DE" style:country-complex="IN"/>
    </style:style>
    <style:style style:parent-style-name="717" style:family="text" style:name="T353">
      <style:text-properties fo:font-family="Liberation Sans" style:font-family-complex="Liberation Sans" fo:language="de" style:language-complex="hi" fo:country="DE" style:country-complex="IN"/>
    </style:style>
    <style:style style:family="text" style:name="T354">
      <style:text-properties fo:font-family="Liberation Sans" style:font-family-complex="Liberation Sans"/>
    </style:style>
    <style:style style:family="text" style:name="T355">
      <style:text-properties fo:font-family="Liberation Sans" style:font-family-complex="Liberation Sans"/>
    </style:style>
    <style:style style:family="text" style:name="T356">
      <style:text-properties fo:font-family="Liberation Sans" style:font-family-complex="Liberation Sans"/>
    </style:style>
    <style:style style:family="text" style:name="T357">
      <style:text-properties fo:font-family="Liberation Sans" style:font-family-complex="Liberation Sans"/>
    </style:style>
    <style:style style:parent-style-name="725" style:family="paragraph" style:name="P85">
      <style:paragraph-properties>
        <style:tab-stops>
          <style:tab-stop style:position="17cm" style:type="right" style:leader-type="dotted" style:leader-style="dotted"/>
        </style:tab-stops>
      </style:paragraph-properties>
      <style:text-properties fo:font-family="Liberation Sans" style:font-family-complex="Liberation Sans"/>
    </style:style>
    <style:style style:family="text" style:name="T358">
      <style:text-properties fo:font-family="Liberation Sans" style:font-family-complex="Liberation Sans"/>
    </style:style>
    <style:style style:family="text" style:name="T359">
      <style:text-properties fo:font-family="Liberation Sans" style:font-family-complex="Liberation Sans"/>
    </style:style>
    <style:style style:family="text" style:name="T360">
      <style:text-properties fo:font-family="Liberation Sans" style:font-family-complex="Liberation Sans"/>
    </style:style>
    <style:style style:parent-style-name="717" style:family="text" style:name="T361">
      <style:text-properties fo:font-family="Liberation Sans" style:font-family-complex="Liberation Sans"/>
    </style:style>
    <style:style style:parent-style-name="717" style:family="text" style:name="T362">
      <style:text-properties fo:font-family="Liberation Sans" style:font-family-complex="Liberation Sans" fo:language="de" style:language-complex="hi" fo:country="DE" style:country-complex="IN"/>
    </style:style>
    <style:style style:parent-style-name="717" style:family="text" style:name="T363">
      <style:text-properties fo:font-family="Liberation Sans" style:font-family-complex="Liberation Sans" fo:language="de" style:language-complex="hi" fo:country="DE" style:country-complex="IN"/>
    </style:style>
    <style:style style:family="text" style:name="T364">
      <style:text-properties fo:font-family="Liberation Sans" style:font-family-complex="Liberation Sans"/>
    </style:style>
    <style:style style:family="text" style:name="T365">
      <style:text-properties fo:font-family="Liberation Sans" style:font-family-complex="Liberation Sans"/>
    </style:style>
    <style:style style:family="text" style:name="T366">
      <style:text-properties fo:font-family="Liberation Sans" style:font-family-complex="Liberation Sans"/>
    </style:style>
    <style:style style:family="text" style:name="T367">
      <style:text-properties fo:font-family="Liberation Sans" style:font-family-complex="Liberation Sans"/>
    </style:style>
    <style:style style:parent-style-name="725" style:family="paragraph" style:name="P86">
      <style:paragraph-properties>
        <style:tab-stops>
          <style:tab-stop style:position="17cm" style:type="right" style:leader-type="dotted" style:leader-style="dotted"/>
        </style:tab-stops>
      </style:paragraph-properties>
      <style:text-properties fo:font-family="Liberation Sans" style:font-family-complex="Liberation Sans"/>
    </style:style>
    <style:style style:family="text" style:name="T368">
      <style:text-properties fo:font-family="Liberation Sans" style:font-family-complex="Liberation Sans"/>
    </style:style>
    <style:style style:family="text" style:name="T369">
      <style:text-properties fo:font-family="Liberation Sans" style:font-family-complex="Liberation Sans"/>
    </style:style>
    <style:style style:family="text" style:name="T370">
      <style:text-properties fo:font-family="Liberation Sans" style:font-family-complex="Liberation Sans"/>
    </style:style>
    <style:style style:parent-style-name="717" style:family="text" style:name="T371">
      <style:text-properties fo:font-family="Liberation Sans" style:font-family-complex="Liberation Sans"/>
    </style:style>
    <style:style style:parent-style-name="717" style:family="text" style:name="T372">
      <style:text-properties fo:font-family="Liberation Sans" style:font-family-complex="Liberation Sans" fo:language="de" style:language-complex="hi" fo:country="DE" style:country-complex="IN"/>
    </style:style>
    <style:style style:parent-style-name="717" style:family="text" style:name="T373">
      <style:text-properties fo:font-family="Liberation Sans" style:font-family-complex="Liberation Sans" fo:language="de" style:language-complex="hi" fo:country="DE" style:country-complex="IN"/>
    </style:style>
    <style:style style:family="text" style:name="T374">
      <style:text-properties fo:font-family="Liberation Sans" style:font-family-complex="Liberation Sans"/>
    </style:style>
    <style:style style:family="text" style:name="T375">
      <style:text-properties fo:font-family="Liberation Sans" style:font-family-complex="Liberation Sans"/>
    </style:style>
    <style:style style:family="text" style:name="T376">
      <style:text-properties fo:font-family="Liberation Sans" style:font-family-complex="Liberation Sans"/>
    </style:style>
    <style:style style:family="text" style:name="T377">
      <style:text-properties fo:font-family="Liberation Sans" style:font-family-complex="Liberation Sans"/>
    </style:style>
    <style:style style:parent-style-name="725" style:family="paragraph" style:name="P87">
      <style:paragraph-properties>
        <style:tab-stops>
          <style:tab-stop style:position="17cm" style:type="right" style:leader-type="dotted" style:leader-style="dotted"/>
        </style:tab-stops>
      </style:paragraph-properties>
      <style:text-properties fo:font-family="Liberation Sans" style:font-family-complex="Liberation Sans"/>
    </style:style>
    <style:style style:family="text" style:name="T378">
      <style:text-properties fo:font-family="Liberation Sans" style:font-family-complex="Liberation Sans"/>
    </style:style>
    <style:style style:family="text" style:name="T379">
      <style:text-properties fo:font-family="Liberation Sans" style:font-family-complex="Liberation Sans"/>
    </style:style>
    <style:style style:family="text" style:name="T380">
      <style:text-properties fo:font-family="Liberation Sans" style:font-family-complex="Liberation Sans"/>
    </style:style>
    <style:style style:parent-style-name="717" style:family="text" style:name="T381">
      <style:text-properties fo:font-family="Liberation Sans" style:font-family-complex="Liberation Sans"/>
    </style:style>
    <style:style style:parent-style-name="717" style:family="text" style:name="T382">
      <style:text-properties fo:font-family="Liberation Sans" style:font-family-complex="Liberation Sans" fo:language="de" style:language-complex="hi" fo:country="DE" style:country-complex="IN"/>
    </style:style>
    <style:style style:parent-style-name="717" style:family="text" style:name="T383">
      <style:text-properties fo:font-family="Liberation Sans" style:font-family-complex="Liberation Sans" fo:language="de" style:language-complex="hi" fo:country="DE" style:country-complex="IN"/>
    </style:style>
    <style:style style:parent-style-name="717" style:family="text" style:name="T384">
      <style:text-properties fo:font-family="Liberation Sans" style:font-family-complex="Liberation Sans" fo:language="de" style:language-complex="hi" fo:country="DE" style:country-complex="IN"/>
    </style:style>
    <style:style style:parent-style-name="717" style:family="text" style:name="T385">
      <style:text-properties fo:font-family="Liberation Sans" style:font-family-complex="Liberation Sans" fo:language="de" style:language-complex="hi" fo:country="DE" style:country-complex="IN"/>
    </style:style>
    <style:style style:family="text" style:name="T386">
      <style:text-properties fo:font-family="Liberation Sans" style:font-family-complex="Liberation Sans"/>
    </style:style>
    <style:style style:family="text" style:name="T387">
      <style:text-properties fo:font-family="Liberation Sans" style:font-family-complex="Liberation Sans"/>
    </style:style>
    <style:style style:family="text" style:name="T388">
      <style:text-properties fo:font-family="Liberation Sans" style:font-family-complex="Liberation Sans"/>
    </style:style>
    <style:style style:family="text" style:name="T389">
      <style:text-properties fo:font-family="Liberation Sans" style:font-family-complex="Liberation Sans"/>
    </style:style>
    <style:style style:parent-style-name="725" style:family="paragraph" style:name="P88">
      <style:paragraph-properties>
        <style:tab-stops>
          <style:tab-stop style:position="17cm" style:type="right" style:leader-type="dotted" style:leader-style="dotted"/>
        </style:tab-stops>
      </style:paragraph-properties>
      <style:text-properties fo:font-family="Liberation Sans" style:font-family-complex="Liberation Sans"/>
    </style:style>
    <style:style style:family="text" style:name="T390">
      <style:text-properties fo:font-family="Liberation Sans" style:font-family-complex="Liberation Sans"/>
    </style:style>
    <style:style style:family="text" style:name="T391">
      <style:text-properties fo:font-family="Liberation Sans" style:font-family-complex="Liberation Sans"/>
    </style:style>
    <style:style style:family="text" style:name="T392">
      <style:text-properties fo:font-family="Liberation Sans" style:font-family-complex="Liberation Sans"/>
    </style:style>
    <style:style style:parent-style-name="717" style:family="text" style:name="T393">
      <style:text-properties fo:font-family="Liberation Sans" style:font-family-complex="Liberation Sans"/>
    </style:style>
    <style:style style:parent-style-name="717" style:family="text" style:name="T394">
      <style:text-properties fo:font-family="Liberation Sans" style:font-family-complex="Liberation Sans" fo:language="de" style:language-complex="hi" fo:country="DE" style:country-complex="IN"/>
    </style:style>
    <style:style style:parent-style-name="717" style:family="text" style:name="T395">
      <style:text-properties fo:font-family="Liberation Sans" style:font-family-complex="Liberation Sans" fo:language="de" style:language-complex="hi" fo:country="DE" style:country-complex="IN"/>
    </style:style>
    <style:style style:family="text" style:name="T396">
      <style:text-properties fo:font-family="Liberation Sans" style:font-family-complex="Liberation Sans"/>
    </style:style>
    <style:style style:family="text" style:name="T397">
      <style:text-properties fo:font-family="Liberation Sans" style:font-family-complex="Liberation Sans"/>
    </style:style>
    <style:style style:family="text" style:name="T398">
      <style:text-properties fo:font-family="Liberation Sans" style:font-family-complex="Liberation Sans"/>
    </style:style>
    <style:style style:family="text" style:name="T399">
      <style:text-properties fo:font-family="Liberation Sans" style:font-family-complex="Liberation Sans"/>
    </style:style>
    <style:style style:parent-style-name="725" style:family="paragraph" style:name="P89">
      <style:paragraph-properties>
        <style:tab-stops>
          <style:tab-stop style:position="17cm" style:type="right" style:leader-type="dotted" style:leader-style="dotted"/>
        </style:tab-stops>
      </style:paragraph-properties>
      <style:text-properties fo:font-family="Liberation Sans" style:font-family-complex="Liberation Sans"/>
    </style:style>
    <style:style style:family="text" style:name="T400">
      <style:text-properties fo:font-family="Liberation Sans" style:font-family-complex="Liberation Sans"/>
    </style:style>
    <style:style style:family="text" style:name="T401">
      <style:text-properties fo:font-family="Liberation Sans" style:font-family-complex="Liberation Sans"/>
    </style:style>
    <style:style style:family="text" style:name="T402">
      <style:text-properties fo:font-family="Liberation Sans" style:font-family-complex="Liberation Sans"/>
    </style:style>
    <style:style style:parent-style-name="717" style:family="text" style:name="T403">
      <style:text-properties fo:font-family="Liberation Sans" style:font-family-complex="Liberation Sans"/>
    </style:style>
    <style:style style:parent-style-name="717" style:family="text" style:name="T404">
      <style:text-properties fo:font-family="Liberation Sans" style:font-family-complex="Liberation Sans" fo:language="de" style:language-complex="hi" fo:country="DE" style:country-complex="IN"/>
    </style:style>
    <style:style style:parent-style-name="717" style:family="text" style:name="T405">
      <style:text-properties fo:font-family="Liberation Sans" style:font-family-complex="Liberation Sans" fo:language="de" style:language-complex="hi" fo:country="DE" style:country-complex="IN"/>
    </style:style>
    <style:style style:family="text" style:name="T406">
      <style:text-properties fo:font-family="Liberation Sans" style:font-family-complex="Liberation Sans"/>
    </style:style>
    <style:style style:family="text" style:name="T407">
      <style:text-properties fo:font-family="Liberation Sans" style:font-family-complex="Liberation Sans"/>
    </style:style>
    <style:style style:family="text" style:name="T408">
      <style:text-properties fo:font-family="Liberation Sans" style:font-family-complex="Liberation Sans"/>
    </style:style>
    <style:style style:family="text" style:name="T409">
      <style:text-properties fo:font-family="Liberation Sans" style:font-family-complex="Liberation Sans"/>
    </style:style>
    <style:style style:parent-style-name="724" style:family="paragraph" style:name="P90">
      <style:paragraph-properties>
        <style:tab-stops>
          <style:tab-stop style:position="17cm" style:type="right" style:leader-type="dotted" style:leader-style="dotted"/>
        </style:tab-stops>
      </style:paragraph-properties>
      <style:text-properties fo:font-family="Liberation Sans" style:font-family-complex="Liberation Sans"/>
    </style:style>
    <style:style style:family="text" style:name="T410">
      <style:text-properties fo:font-family="Liberation Sans" style:font-family-complex="Liberation Sans"/>
    </style:style>
    <style:style style:family="text" style:name="T411">
      <style:text-properties fo:font-family="Liberation Sans" style:font-family-complex="Liberation Sans"/>
    </style:style>
    <style:style style:family="text" style:name="T412">
      <style:text-properties fo:font-family="Liberation Sans" style:font-family-complex="Liberation Sans"/>
    </style:style>
    <style:style style:parent-style-name="717" style:family="text" style:name="T413">
      <style:text-properties fo:font-family="Liberation Sans" style:font-family-complex="Liberation Sans"/>
    </style:style>
    <style:style style:parent-style-name="717" style:family="text" style:name="T414">
      <style:text-properties fo:font-family="Liberation Sans" style:font-family-complex="Liberation Sans" fo:language="de" style:language-complex="hi" fo:country="DE" style:country-complex="IN"/>
    </style:style>
    <style:style style:parent-style-name="717" style:family="text" style:name="T415">
      <style:text-properties fo:font-family="Liberation Sans" style:font-family-complex="Liberation Sans" fo:language="de" style:language-complex="hi" fo:country="DE" style:country-complex="IN"/>
    </style:style>
    <style:style style:family="text" style:name="T416">
      <style:text-properties fo:font-family="Liberation Sans" style:font-family-complex="Liberation Sans"/>
    </style:style>
    <style:style style:family="text" style:name="T417">
      <style:text-properties fo:font-family="Liberation Sans" style:font-family-complex="Liberation Sans"/>
    </style:style>
    <style:style style:family="text" style:name="T418">
      <style:text-properties fo:font-family="Liberation Sans" style:font-family-complex="Liberation Sans"/>
    </style:style>
    <style:style style:family="text" style:name="T419">
      <style:text-properties fo:font-family="Liberation Sans" style:font-family-complex="Liberation Sans"/>
    </style:style>
    <style:style style:parent-style-name="725" style:family="paragraph" style:name="P91">
      <style:paragraph-properties>
        <style:tab-stops>
          <style:tab-stop style:position="17cm" style:type="right" style:leader-type="dotted" style:leader-style="dotted"/>
        </style:tab-stops>
      </style:paragraph-properties>
      <style:text-properties fo:font-family="Liberation Sans" style:font-family-complex="Liberation Sans"/>
    </style:style>
    <style:style style:family="text" style:name="T420">
      <style:text-properties fo:font-family="Liberation Sans" style:font-family-complex="Liberation Sans"/>
    </style:style>
    <style:style style:family="text" style:name="T421">
      <style:text-properties fo:font-family="Liberation Sans" style:font-family-complex="Liberation Sans"/>
    </style:style>
    <style:style style:family="text" style:name="T422">
      <style:text-properties fo:font-family="Liberation Sans" style:font-family-complex="Liberation Sans"/>
    </style:style>
    <style:style style:parent-style-name="717" style:family="text" style:name="T423">
      <style:text-properties fo:font-family="Liberation Sans" style:font-family-complex="Liberation Sans"/>
    </style:style>
    <style:style style:parent-style-name="717" style:family="text" style:name="T424">
      <style:text-properties fo:font-family="Liberation Sans" style:font-family-complex="Liberation Sans" fo:language="de" style:language-complex="hi" fo:country="DE" style:country-complex="IN"/>
    </style:style>
    <style:style style:parent-style-name="717" style:family="text" style:name="T425">
      <style:text-properties fo:font-family="Liberation Sans" style:font-family-complex="Liberation Sans" fo:language="de" style:language-complex="hi" fo:country="DE" style:country-complex="IN"/>
    </style:style>
    <style:style style:family="text" style:name="T426">
      <style:text-properties fo:font-family="Liberation Sans" style:font-family-complex="Liberation Sans"/>
    </style:style>
    <style:style style:family="text" style:name="T427">
      <style:text-properties fo:font-family="Liberation Sans" style:font-family-complex="Liberation Sans"/>
    </style:style>
    <style:style style:family="text" style:name="T428">
      <style:text-properties fo:font-family="Liberation Sans" style:font-family-complex="Liberation Sans"/>
    </style:style>
    <style:style style:family="text" style:name="T429">
      <style:text-properties fo:font-family="Liberation Sans" style:font-family-complex="Liberation Sans"/>
    </style:style>
    <style:style style:parent-style-name="725" style:family="paragraph" style:name="P92">
      <style:paragraph-properties>
        <style:tab-stops>
          <style:tab-stop style:position="17cm" style:type="right" style:leader-type="dotted" style:leader-style="dotted"/>
        </style:tab-stops>
      </style:paragraph-properties>
      <style:text-properties fo:font-family="Liberation Sans" style:font-family-complex="Liberation Sans"/>
    </style:style>
    <style:style style:family="text" style:name="T430">
      <style:text-properties fo:font-family="Liberation Sans" style:font-family-complex="Liberation Sans"/>
    </style:style>
    <style:style style:family="text" style:name="T431">
      <style:text-properties fo:font-family="Liberation Sans" style:font-family-complex="Liberation Sans"/>
    </style:style>
    <style:style style:family="text" style:name="T432">
      <style:text-properties fo:font-family="Liberation Sans" style:font-family-complex="Liberation Sans"/>
    </style:style>
    <style:style style:parent-style-name="717" style:family="text" style:name="T433">
      <style:text-properties fo:font-family="Liberation Sans" style:font-family-complex="Liberation Sans"/>
    </style:style>
    <style:style style:parent-style-name="717" style:family="text" style:name="T434">
      <style:text-properties fo:font-family="Liberation Sans" style:font-family-complex="Liberation Sans" fo:language="de" style:language-complex="hi" fo:country="DE" style:country-complex="IN"/>
    </style:style>
    <style:style style:parent-style-name="717" style:family="text" style:name="T435">
      <style:text-properties fo:font-family="Liberation Sans" style:font-family-complex="Liberation Sans" fo:language="de" style:language-complex="hi" fo:country="DE" style:country-complex="IN"/>
    </style:style>
    <style:style style:family="text" style:name="T436">
      <style:text-properties fo:font-family="Liberation Sans" style:font-family-complex="Liberation Sans"/>
    </style:style>
    <style:style style:family="text" style:name="T437">
      <style:text-properties fo:font-family="Liberation Sans" style:font-family-complex="Liberation Sans"/>
    </style:style>
    <style:style style:family="text" style:name="T438">
      <style:text-properties fo:font-family="Liberation Sans" style:font-family-complex="Liberation Sans"/>
    </style:style>
    <style:style style:family="text" style:name="T439">
      <style:text-properties fo:font-family="Liberation Sans" style:font-family-complex="Liberation Sans"/>
    </style:style>
    <style:style style:parent-style-name="725" style:family="paragraph" style:name="P93">
      <style:paragraph-properties>
        <style:tab-stops>
          <style:tab-stop style:position="17cm" style:type="right" style:leader-type="dotted" style:leader-style="dotted"/>
        </style:tab-stops>
      </style:paragraph-properties>
      <style:text-properties fo:font-family="Liberation Sans" style:font-family-complex="Liberation Sans"/>
    </style:style>
    <style:style style:family="text" style:name="T440">
      <style:text-properties fo:font-family="Liberation Sans" style:font-family-complex="Liberation Sans"/>
    </style:style>
    <style:style style:family="text" style:name="T441">
      <style:text-properties fo:font-family="Liberation Sans" style:font-family-complex="Liberation Sans"/>
    </style:style>
    <style:style style:family="text" style:name="T442">
      <style:text-properties fo:font-family="Liberation Sans" style:font-family-complex="Liberation Sans"/>
    </style:style>
    <style:style style:parent-style-name="717" style:family="text" style:name="T443">
      <style:text-properties fo:font-family="Liberation Sans" style:font-family-complex="Liberation Sans"/>
    </style:style>
    <style:style style:parent-style-name="717" style:family="text" style:name="T444">
      <style:text-properties fo:font-family="Liberation Sans" style:font-family-complex="Liberation Sans" fo:language="de" style:language-complex="hi" fo:country="DE" style:country-complex="IN"/>
    </style:style>
    <style:style style:parent-style-name="717" style:family="text" style:name="T445">
      <style:text-properties fo:font-family="Liberation Sans" style:font-family-complex="Liberation Sans" fo:language="de" style:language-complex="hi" fo:country="DE" style:country-complex="IN"/>
    </style:style>
    <style:style style:family="text" style:name="T446">
      <style:text-properties fo:font-family="Liberation Sans" style:font-family-complex="Liberation Sans"/>
    </style:style>
    <style:style style:family="text" style:name="T447">
      <style:text-properties fo:font-family="Liberation Sans" style:font-family-complex="Liberation Sans"/>
    </style:style>
    <style:style style:family="text" style:name="T448">
      <style:text-properties fo:font-family="Liberation Sans" style:font-family-complex="Liberation Sans"/>
    </style:style>
    <style:style style:family="text" style:name="T449">
      <style:text-properties fo:font-family="Liberation Sans" style:font-family-complex="Liberation Sans"/>
    </style:style>
    <style:style style:parent-style-name="725" style:family="paragraph" style:name="P94">
      <style:paragraph-properties>
        <style:tab-stops>
          <style:tab-stop style:position="17cm" style:type="right" style:leader-type="dotted" style:leader-style="dotted"/>
        </style:tab-stops>
      </style:paragraph-properties>
      <style:text-properties fo:font-family="Liberation Sans" style:font-family-complex="Liberation Sans"/>
    </style:style>
    <style:style style:family="text" style:name="T450">
      <style:text-properties fo:font-family="Liberation Sans" style:font-family-complex="Liberation Sans"/>
    </style:style>
    <style:style style:family="text" style:name="T451">
      <style:text-properties fo:font-family="Liberation Sans" style:font-family-complex="Liberation Sans"/>
    </style:style>
    <style:style style:family="text" style:name="T452">
      <style:text-properties fo:font-family="Liberation Sans" style:font-family-complex="Liberation Sans"/>
    </style:style>
    <style:style style:parent-style-name="717" style:family="text" style:name="T453">
      <style:text-properties fo:font-family="Liberation Sans" style:font-family-complex="Liberation Sans"/>
    </style:style>
    <style:style style:parent-style-name="717" style:family="text" style:name="T454">
      <style:text-properties fo:font-family="Liberation Sans" style:font-family-complex="Liberation Sans" fo:language="de" style:language-complex="hi" fo:country="DE" style:country-complex="IN"/>
    </style:style>
    <style:style style:parent-style-name="717" style:family="text" style:name="T455">
      <style:text-properties fo:font-family="Liberation Sans" style:font-family-complex="Liberation Sans" fo:language="de" style:language-complex="hi" fo:country="DE" style:country-complex="IN"/>
    </style:style>
    <style:style style:family="text" style:name="T456">
      <style:text-properties fo:font-family="Liberation Sans" style:font-family-complex="Liberation Sans"/>
    </style:style>
    <style:style style:family="text" style:name="T457">
      <style:text-properties fo:font-family="Liberation Sans" style:font-family-complex="Liberation Sans"/>
    </style:style>
    <style:style style:family="text" style:name="T458">
      <style:text-properties fo:font-family="Liberation Sans" style:font-family-complex="Liberation Sans"/>
    </style:style>
    <style:style style:family="text" style:name="T459">
      <style:text-properties fo:font-family="Liberation Sans" style:font-family-complex="Liberation Sans"/>
    </style:style>
    <style:style style:parent-style-name="724" style:family="paragraph" style:name="P95">
      <style:paragraph-properties>
        <style:tab-stops>
          <style:tab-stop style:position="17cm" style:type="right" style:leader-type="dotted" style:leader-style="dotted"/>
        </style:tab-stops>
      </style:paragraph-properties>
      <style:text-properties fo:font-family="Liberation Sans" style:font-family-complex="Liberation Sans"/>
    </style:style>
    <style:style style:family="text" style:name="T460">
      <style:text-properties fo:font-family="Liberation Sans" style:font-family-complex="Liberation Sans"/>
    </style:style>
    <style:style style:family="text" style:name="T461">
      <style:text-properties fo:font-family="Liberation Sans" style:font-family-complex="Liberation Sans"/>
    </style:style>
    <style:style style:family="text" style:name="T462">
      <style:text-properties fo:font-family="Liberation Sans" style:font-family-complex="Liberation Sans"/>
    </style:style>
    <style:style style:parent-style-name="717" style:family="text" style:name="T463">
      <style:text-properties fo:font-family="Liberation Sans" style:font-family-complex="Liberation Sans"/>
    </style:style>
    <style:style style:parent-style-name="717" style:family="text" style:name="T464">
      <style:text-properties fo:font-family="Liberation Sans" style:font-family-complex="Liberation Sans" fo:language="de" style:language-complex="hi" fo:country="DE" style:country-complex="IN"/>
    </style:style>
    <style:style style:parent-style-name="717" style:family="text" style:name="T465">
      <style:text-properties fo:font-family="Liberation Sans" style:font-family-complex="Liberation Sans" fo:language="de" style:language-complex="hi" fo:country="DE" style:country-complex="IN"/>
    </style:style>
    <style:style style:family="text" style:name="T466">
      <style:text-properties fo:font-family="Liberation Sans" style:font-family-complex="Liberation Sans"/>
    </style:style>
    <style:style style:family="text" style:name="T467">
      <style:text-properties fo:font-family="Liberation Sans" style:font-family-complex="Liberation Sans"/>
    </style:style>
    <style:style style:family="text" style:name="T468">
      <style:text-properties fo:font-family="Liberation Sans" style:font-family-complex="Liberation Sans"/>
    </style:style>
    <style:style style:family="text" style:name="T469">
      <style:text-properties fo:font-family="Liberation Sans" style:font-family-complex="Liberation Sans"/>
    </style:style>
    <style:style style:parent-style-name="725" style:family="paragraph" style:name="P96">
      <style:paragraph-properties>
        <style:tab-stops>
          <style:tab-stop style:position="17cm" style:type="right" style:leader-type="dotted" style:leader-style="dotted"/>
        </style:tab-stops>
      </style:paragraph-properties>
      <style:text-properties fo:font-family="Liberation Sans" style:font-family-complex="Liberation Sans"/>
    </style:style>
    <style:style style:family="text" style:name="T470">
      <style:text-properties fo:font-family="Liberation Sans" style:font-family-complex="Liberation Sans"/>
    </style:style>
    <style:style style:family="text" style:name="T471">
      <style:text-properties fo:font-family="Liberation Sans" style:font-family-complex="Liberation Sans"/>
    </style:style>
    <style:style style:family="text" style:name="T472">
      <style:text-properties fo:font-family="Liberation Sans" style:font-family-complex="Liberation Sans"/>
    </style:style>
    <style:style style:parent-style-name="717" style:family="text" style:name="T473">
      <style:text-properties fo:font-family="Liberation Sans" style:font-family-complex="Liberation Sans"/>
    </style:style>
    <style:style style:parent-style-name="717" style:family="text" style:name="T474">
      <style:text-properties fo:font-family="Liberation Sans" style:font-family-complex="Liberation Sans" fo:language="de" style:language-complex="hi" fo:country="DE" style:country-complex="IN"/>
    </style:style>
    <style:style style:parent-style-name="717" style:family="text" style:name="T475">
      <style:text-properties fo:font-family="Liberation Sans" style:font-family-complex="Liberation Sans" fo:language="de" style:language-complex="hi" fo:country="DE" style:country-complex="IN"/>
    </style:style>
    <style:style style:family="text" style:name="T476">
      <style:text-properties fo:font-family="Liberation Sans" style:font-family-complex="Liberation Sans"/>
    </style:style>
    <style:style style:family="text" style:name="T477">
      <style:text-properties fo:font-family="Liberation Sans" style:font-family-complex="Liberation Sans"/>
    </style:style>
    <style:style style:family="text" style:name="T478">
      <style:text-properties fo:font-family="Liberation Sans" style:font-family-complex="Liberation Sans"/>
    </style:style>
    <style:style style:family="text" style:name="T479">
      <style:text-properties fo:font-family="Liberation Sans" style:font-family-complex="Liberation Sans"/>
    </style:style>
    <style:style style:parent-style-name="725" style:family="paragraph" style:name="P97">
      <style:paragraph-properties>
        <style:tab-stops>
          <style:tab-stop style:position="17cm" style:type="right" style:leader-type="dotted" style:leader-style="dotted"/>
        </style:tab-stops>
      </style:paragraph-properties>
      <style:text-properties fo:font-family="Liberation Sans" style:font-family-complex="Liberation Sans"/>
    </style:style>
    <style:style style:family="text" style:name="T480">
      <style:text-properties fo:font-family="Liberation Sans" style:font-family-complex="Liberation Sans"/>
    </style:style>
    <style:style style:family="text" style:name="T481">
      <style:text-properties fo:font-family="Liberation Sans" style:font-family-complex="Liberation Sans"/>
    </style:style>
    <style:style style:family="text" style:name="T482">
      <style:text-properties fo:font-family="Liberation Sans" style:font-family-complex="Liberation Sans"/>
    </style:style>
    <style:style style:parent-style-name="717" style:family="text" style:name="T483">
      <style:text-properties fo:font-family="Liberation Sans" style:font-family-complex="Liberation Sans"/>
    </style:style>
    <style:style style:parent-style-name="717" style:family="text" style:name="T484">
      <style:text-properties fo:font-family="Liberation Sans" style:font-family-complex="Liberation Sans" fo:language="de" style:language-complex="hi" fo:country="DE" style:country-complex="IN"/>
    </style:style>
    <style:style style:parent-style-name="717" style:family="text" style:name="T485">
      <style:text-properties fo:font-family="Liberation Sans" style:font-family-complex="Liberation Sans" fo:language="de" style:language-complex="hi" fo:country="DE" style:country-complex="IN"/>
    </style:style>
    <style:style style:family="text" style:name="T486">
      <style:text-properties fo:font-family="Liberation Sans" style:font-family-complex="Liberation Sans"/>
    </style:style>
    <style:style style:family="text" style:name="T487">
      <style:text-properties fo:font-family="Liberation Sans" style:font-family-complex="Liberation Sans"/>
    </style:style>
    <style:style style:family="text" style:name="T488">
      <style:text-properties fo:font-family="Liberation Sans" style:font-family-complex="Liberation Sans"/>
    </style:style>
    <style:style style:family="text" style:name="T489">
      <style:text-properties fo:font-family="Liberation Sans" style:font-family-complex="Liberation Sans"/>
    </style:style>
    <style:style style:parent-style-name="726" style:family="paragraph" style:name="P98">
      <style:paragraph-properties>
        <style:tab-stops>
          <style:tab-stop style:position="17cm" style:type="right" style:leader-type="dotted" style:leader-style="dotted"/>
        </style:tab-stops>
      </style:paragraph-properties>
      <style:text-properties fo:font-family="Liberation Sans" style:font-family-complex="Liberation Sans"/>
    </style:style>
    <style:style style:family="text" style:name="T490">
      <style:text-properties fo:font-family="Liberation Sans" style:font-family-complex="Liberation Sans"/>
    </style:style>
    <style:style style:family="text" style:name="T491">
      <style:text-properties fo:font-family="Liberation Sans" style:font-family-complex="Liberation Sans"/>
    </style:style>
    <style:style style:family="text" style:name="T492">
      <style:text-properties fo:font-family="Liberation Sans" style:font-family-complex="Liberation Sans"/>
    </style:style>
    <style:style style:parent-style-name="717" style:family="text" style:name="T493">
      <style:text-properties fo:font-family="Liberation Sans" style:font-family-complex="Liberation Sans"/>
    </style:style>
    <style:style style:parent-style-name="717" style:family="text" style:name="T494">
      <style:text-properties fo:font-family="Liberation Sans" style:font-family-complex="Liberation Sans" fo:language="de" style:language-complex="hi" fo:country="DE" style:country-complex="IN"/>
    </style:style>
    <style:style style:parent-style-name="717" style:family="text" style:name="T495">
      <style:text-properties fo:font-family="Liberation Sans" style:font-family-complex="Liberation Sans" fo:language="de" style:language-complex="hi" fo:country="DE" style:country-complex="IN"/>
    </style:style>
    <style:style style:family="text" style:name="T496">
      <style:text-properties fo:font-family="Liberation Sans" style:font-family-complex="Liberation Sans"/>
    </style:style>
    <style:style style:family="text" style:name="T497">
      <style:text-properties fo:font-family="Liberation Sans" style:font-family-complex="Liberation Sans"/>
    </style:style>
    <style:style style:family="text" style:name="T498">
      <style:text-properties fo:font-family="Liberation Sans" style:font-family-complex="Liberation Sans"/>
    </style:style>
    <style:style style:family="text" style:name="T499">
      <style:text-properties fo:font-family="Liberation Sans" style:font-family-complex="Liberation Sans"/>
    </style:style>
    <style:style style:parent-style-name="726" style:family="paragraph" style:name="P99">
      <style:paragraph-properties>
        <style:tab-stops>
          <style:tab-stop style:position="17cm" style:type="right" style:leader-type="dotted" style:leader-style="dotted"/>
        </style:tab-stops>
      </style:paragraph-properties>
      <style:text-properties fo:font-family="Liberation Sans" style:font-family-complex="Liberation Sans"/>
    </style:style>
    <style:style style:family="text" style:name="T500">
      <style:text-properties fo:font-family="Liberation Sans" style:font-family-complex="Liberation Sans"/>
    </style:style>
    <style:style style:family="text" style:name="T501">
      <style:text-properties fo:font-family="Liberation Sans" style:font-family-complex="Liberation Sans"/>
    </style:style>
    <style:style style:family="text" style:name="T502">
      <style:text-properties fo:font-family="Liberation Sans" style:font-family-complex="Liberation Sans"/>
    </style:style>
    <style:style style:parent-style-name="717" style:family="text" style:name="T503">
      <style:text-properties fo:font-family="Liberation Sans" style:font-family-complex="Liberation Sans"/>
    </style:style>
    <style:style style:parent-style-name="717" style:family="text" style:name="T504">
      <style:text-properties fo:font-family="Liberation Sans" style:font-family-complex="Liberation Sans" fo:language="de" style:language-complex="hi" fo:country="DE" style:country-complex="IN"/>
    </style:style>
    <style:style style:parent-style-name="717" style:family="text" style:name="T505">
      <style:text-properties fo:font-family="Liberation Sans" style:font-family-complex="Liberation Sans" fo:language="de" style:language-complex="hi" fo:country="DE" style:country-complex="IN"/>
    </style:style>
    <style:style style:family="text" style:name="T506">
      <style:text-properties fo:font-family="Liberation Sans" style:font-family-complex="Liberation Sans"/>
    </style:style>
    <style:style style:family="text" style:name="T507">
      <style:text-properties fo:font-family="Liberation Sans" style:font-family-complex="Liberation Sans"/>
    </style:style>
    <style:style style:family="text" style:name="T508">
      <style:text-properties fo:font-family="Liberation Sans" style:font-family-complex="Liberation Sans"/>
    </style:style>
    <style:style style:family="text" style:name="T509">
      <style:text-properties fo:font-family="Liberation Sans" style:font-family-complex="Liberation Sans"/>
    </style:style>
    <style:style style:parent-style-name="726" style:family="paragraph" style:name="P100">
      <style:paragraph-properties>
        <style:tab-stops>
          <style:tab-stop style:position="17cm" style:type="right" style:leader-type="dotted" style:leader-style="dotted"/>
        </style:tab-stops>
      </style:paragraph-properties>
      <style:text-properties fo:font-family="Liberation Sans" style:font-family-complex="Liberation Sans"/>
    </style:style>
    <style:style style:family="text" style:name="T510">
      <style:text-properties fo:font-family="Liberation Sans" style:font-family-complex="Liberation Sans"/>
    </style:style>
    <style:style style:family="text" style:name="T511">
      <style:text-properties fo:font-family="Liberation Sans" style:font-family-complex="Liberation Sans"/>
    </style:style>
    <style:style style:family="text" style:name="T512">
      <style:text-properties fo:font-family="Liberation Sans" style:font-family-complex="Liberation Sans"/>
    </style:style>
    <style:style style:parent-style-name="717" style:family="text" style:name="T513">
      <style:text-properties fo:font-family="Liberation Sans" style:font-family-complex="Liberation Sans"/>
    </style:style>
    <style:style style:parent-style-name="717" style:family="text" style:name="T514">
      <style:text-properties fo:font-family="Liberation Sans" style:font-family-complex="Liberation Sans" fo:language="de" style:language-complex="hi" fo:country="DE" style:country-complex="IN"/>
    </style:style>
    <style:style style:parent-style-name="717" style:family="text" style:name="T515">
      <style:text-properties fo:font-family="Liberation Sans" style:font-family-complex="Liberation Sans" fo:language="de" style:language-complex="hi" fo:country="DE" style:country-complex="IN"/>
    </style:style>
    <style:style style:family="text" style:name="T516">
      <style:text-properties fo:font-family="Liberation Sans" style:font-family-complex="Liberation Sans"/>
    </style:style>
    <style:style style:family="text" style:name="T517">
      <style:text-properties fo:font-family="Liberation Sans" style:font-family-complex="Liberation Sans"/>
    </style:style>
    <style:style style:family="text" style:name="T518">
      <style:text-properties fo:font-family="Liberation Sans" style:font-family-complex="Liberation Sans"/>
    </style:style>
    <style:style style:family="text" style:name="T519">
      <style:text-properties fo:font-family="Liberation Sans" style:font-family-complex="Liberation Sans"/>
    </style:style>
    <style:style style:parent-style-name="725" style:family="paragraph" style:name="P101">
      <style:paragraph-properties>
        <style:tab-stops>
          <style:tab-stop style:position="17cm" style:type="right" style:leader-type="dotted" style:leader-style="dotted"/>
        </style:tab-stops>
      </style:paragraph-properties>
      <style:text-properties fo:font-family="Liberation Sans" style:font-family-complex="Liberation Sans"/>
    </style:style>
    <style:style style:family="text" style:name="T520">
      <style:text-properties fo:font-family="Liberation Sans" style:font-family-complex="Liberation Sans"/>
    </style:style>
    <style:style style:family="text" style:name="T521">
      <style:text-properties fo:font-family="Liberation Sans" style:font-family-complex="Liberation Sans"/>
    </style:style>
    <style:style style:family="text" style:name="T522">
      <style:text-properties fo:font-family="Liberation Sans" style:font-family-complex="Liberation Sans"/>
    </style:style>
    <style:style style:parent-style-name="717" style:family="text" style:name="T523">
      <style:text-properties fo:font-family="Liberation Sans" style:font-family-complex="Liberation Sans"/>
    </style:style>
    <style:style style:parent-style-name="717" style:family="text" style:name="T524">
      <style:text-properties fo:font-family="Liberation Sans" style:font-family-complex="Liberation Sans" fo:language="de" style:language-complex="hi" fo:country="DE" style:country-complex="IN"/>
    </style:style>
    <style:style style:parent-style-name="717" style:family="text" style:name="T525">
      <style:text-properties fo:font-family="Liberation Sans" style:font-family-complex="Liberation Sans" fo:language="de" style:language-complex="hi" fo:country="DE" style:country-complex="IN"/>
    </style:style>
    <style:style style:family="text" style:name="T526">
      <style:text-properties fo:font-family="Liberation Sans" style:font-family-complex="Liberation Sans"/>
    </style:style>
    <style:style style:family="text" style:name="T527">
      <style:text-properties fo:font-family="Liberation Sans" style:font-family-complex="Liberation Sans"/>
    </style:style>
    <style:style style:family="text" style:name="T528">
      <style:text-properties fo:font-family="Liberation Sans" style:font-family-complex="Liberation Sans"/>
    </style:style>
    <style:style style:family="text" style:name="T529">
      <style:text-properties fo:font-family="Liberation Sans" style:font-family-complex="Liberation Sans"/>
    </style:style>
    <style:style style:parent-style-name="725" style:family="paragraph" style:name="P102">
      <style:paragraph-properties>
        <style:tab-stops>
          <style:tab-stop style:position="17cm" style:type="right" style:leader-type="dotted" style:leader-style="dotted"/>
        </style:tab-stops>
      </style:paragraph-properties>
      <style:text-properties fo:font-family="Liberation Sans" style:font-family-complex="Liberation Sans"/>
    </style:style>
    <style:style style:family="text" style:name="T530">
      <style:text-properties fo:font-family="Liberation Sans" style:font-family-complex="Liberation Sans"/>
    </style:style>
    <style:style style:family="text" style:name="T531">
      <style:text-properties fo:font-family="Liberation Sans" style:font-family-complex="Liberation Sans"/>
    </style:style>
    <style:style style:family="text" style:name="T532">
      <style:text-properties fo:font-family="Liberation Sans" style:font-family-complex="Liberation Sans"/>
    </style:style>
    <style:style style:parent-style-name="717" style:family="text" style:name="T533">
      <style:text-properties fo:font-family="Liberation Sans" style:font-family-complex="Liberation Sans"/>
    </style:style>
    <style:style style:parent-style-name="717" style:family="text" style:name="T534">
      <style:text-properties fo:font-family="Liberation Sans" style:font-family-complex="Liberation Sans" fo:language="de" style:language-complex="hi" fo:country="DE" style:country-complex="IN"/>
    </style:style>
    <style:style style:parent-style-name="717" style:family="text" style:name="T535">
      <style:text-properties fo:font-family="Liberation Sans" style:font-family-complex="Liberation Sans" fo:language="de" style:language-complex="hi" fo:country="DE" style:country-complex="IN"/>
    </style:style>
    <style:style style:family="text" style:name="T536">
      <style:text-properties fo:font-family="Liberation Sans" style:font-family-complex="Liberation Sans"/>
    </style:style>
    <style:style style:family="text" style:name="T537">
      <style:text-properties fo:font-family="Liberation Sans" style:font-family-complex="Liberation Sans"/>
    </style:style>
    <style:style style:family="text" style:name="T538">
      <style:text-properties fo:font-family="Liberation Sans" style:font-family-complex="Liberation Sans"/>
    </style:style>
    <style:style style:family="text" style:name="T539">
      <style:text-properties fo:font-family="Liberation Sans" style:font-family-complex="Liberation Sans"/>
    </style:style>
    <style:style style:parent-style-name="724" style:family="paragraph" style:name="P103">
      <style:paragraph-properties>
        <style:tab-stops>
          <style:tab-stop style:position="17cm" style:type="right" style:leader-type="dotted" style:leader-style="dotted"/>
        </style:tab-stops>
      </style:paragraph-properties>
      <style:text-properties fo:font-family="Liberation Sans" style:font-family-complex="Liberation Sans"/>
    </style:style>
    <style:style style:family="text" style:name="T540">
      <style:text-properties fo:font-family="Liberation Sans" style:font-family-complex="Liberation Sans"/>
    </style:style>
    <style:style style:family="text" style:name="T541">
      <style:text-properties fo:font-family="Liberation Sans" style:font-family-complex="Liberation Sans"/>
    </style:style>
    <style:style style:family="text" style:name="T542">
      <style:text-properties fo:font-family="Liberation Sans" style:font-family-complex="Liberation Sans"/>
    </style:style>
    <style:style style:parent-style-name="717" style:family="text" style:name="T543">
      <style:text-properties fo:font-family="Liberation Sans" style:font-family-complex="Liberation Sans"/>
    </style:style>
    <style:style style:parent-style-name="717" style:family="text" style:name="T544">
      <style:text-properties fo:font-family="Liberation Sans" style:font-family-complex="Liberation Sans" fo:language="de" style:language-complex="hi" fo:country="DE" style:country-complex="IN"/>
    </style:style>
    <style:style style:parent-style-name="717" style:family="text" style:name="T545">
      <style:text-properties fo:font-family="Liberation Sans" style:font-family-complex="Liberation Sans" fo:language="de" style:language-complex="hi" fo:country="DE" style:country-complex="IN"/>
    </style:style>
    <style:style style:family="text" style:name="T546">
      <style:text-properties fo:font-family="Liberation Sans" style:font-family-complex="Liberation Sans"/>
    </style:style>
    <style:style style:family="text" style:name="T547">
      <style:text-properties fo:font-family="Liberation Sans" style:font-family-complex="Liberation Sans"/>
    </style:style>
    <style:style style:family="text" style:name="T548">
      <style:text-properties fo:font-family="Liberation Sans" style:font-family-complex="Liberation Sans"/>
    </style:style>
    <style:style style:family="text" style:name="T549">
      <style:text-properties fo:font-family="Liberation Sans" style:font-family-complex="Liberation Sans"/>
    </style:style>
    <style:style style:parent-style-name="725" style:family="paragraph" style:name="P104">
      <style:paragraph-properties>
        <style:tab-stops>
          <style:tab-stop style:position="17cm" style:type="right" style:leader-type="dotted" style:leader-style="dotted"/>
        </style:tab-stops>
      </style:paragraph-properties>
      <style:text-properties fo:font-family="Liberation Sans" style:font-family-complex="Liberation Sans"/>
    </style:style>
    <style:style style:family="text" style:name="T550">
      <style:text-properties fo:font-family="Liberation Sans" style:font-family-complex="Liberation Sans"/>
    </style:style>
    <style:style style:family="text" style:name="T551">
      <style:text-properties fo:font-family="Liberation Sans" style:font-family-complex="Liberation Sans"/>
    </style:style>
    <style:style style:family="text" style:name="T552">
      <style:text-properties fo:font-family="Liberation Sans" style:font-family-complex="Liberation Sans"/>
    </style:style>
    <style:style style:parent-style-name="717" style:family="text" style:name="T553">
      <style:text-properties fo:font-family="Liberation Sans" style:font-family-complex="Liberation Sans"/>
    </style:style>
    <style:style style:parent-style-name="717" style:family="text" style:name="T554">
      <style:text-properties fo:font-family="Liberation Sans" style:font-family-complex="Liberation Sans" fo:language="de" style:language-complex="hi" fo:country="DE" style:country-complex="IN"/>
    </style:style>
    <style:style style:parent-style-name="717" style:family="text" style:name="T555">
      <style:text-properties fo:font-family="Liberation Sans" style:font-family-complex="Liberation Sans" fo:language="de" style:language-complex="hi" fo:country="DE" style:country-complex="IN"/>
    </style:style>
    <style:style style:family="text" style:name="T556">
      <style:text-properties fo:font-family="Liberation Sans" style:font-family-complex="Liberation Sans"/>
    </style:style>
    <style:style style:family="text" style:name="T557">
      <style:text-properties fo:font-family="Liberation Sans" style:font-family-complex="Liberation Sans"/>
    </style:style>
    <style:style style:family="text" style:name="T558">
      <style:text-properties fo:font-family="Liberation Sans" style:font-family-complex="Liberation Sans"/>
    </style:style>
    <style:style style:family="text" style:name="T559">
      <style:text-properties fo:font-family="Liberation Sans" style:font-family-complex="Liberation Sans"/>
    </style:style>
    <style:style style:parent-style-name="725" style:family="paragraph" style:name="P105">
      <style:paragraph-properties>
        <style:tab-stops>
          <style:tab-stop style:position="17cm" style:type="right" style:leader-type="dotted" style:leader-style="dotted"/>
        </style:tab-stops>
      </style:paragraph-properties>
      <style:text-properties fo:font-family="Liberation Sans" style:font-family-complex="Liberation Sans"/>
    </style:style>
    <style:style style:family="text" style:name="T560">
      <style:text-properties fo:font-family="Liberation Sans" style:font-family-complex="Liberation Sans"/>
    </style:style>
    <style:style style:family="text" style:name="T561">
      <style:text-properties fo:font-family="Liberation Sans" style:font-family-complex="Liberation Sans"/>
    </style:style>
    <style:style style:family="text" style:name="T562">
      <style:text-properties fo:font-family="Liberation Sans" style:font-family-complex="Liberation Sans"/>
    </style:style>
    <style:style style:parent-style-name="717" style:family="text" style:name="T563">
      <style:text-properties fo:font-family="Liberation Sans" style:font-family-complex="Liberation Sans"/>
    </style:style>
    <style:style style:parent-style-name="717" style:family="text" style:name="T564">
      <style:text-properties fo:font-family="Liberation Sans" style:font-family-complex="Liberation Sans" fo:language="de" style:language-complex="hi" fo:country="DE" style:country-complex="IN"/>
    </style:style>
    <style:style style:parent-style-name="717" style:family="text" style:name="T565">
      <style:text-properties fo:font-family="Liberation Sans" style:font-family-complex="Liberation Sans" fo:language="de" style:language-complex="hi" fo:country="DE" style:country-complex="IN"/>
    </style:style>
    <style:style style:family="text" style:name="T566">
      <style:text-properties fo:font-family="Liberation Sans" style:font-family-complex="Liberation Sans"/>
    </style:style>
    <style:style style:family="text" style:name="T567">
      <style:text-properties fo:font-family="Liberation Sans" style:font-family-complex="Liberation Sans"/>
    </style:style>
    <style:style style:family="text" style:name="T568">
      <style:text-properties fo:font-family="Liberation Sans" style:font-family-complex="Liberation Sans"/>
    </style:style>
    <style:style style:family="text" style:name="T569">
      <style:text-properties fo:font-family="Liberation Sans" style:font-family-complex="Liberation Sans"/>
    </style:style>
    <style:style style:parent-style-name="725" style:family="paragraph" style:name="P106">
      <style:paragraph-properties>
        <style:tab-stops>
          <style:tab-stop style:position="17cm" style:type="right" style:leader-type="dotted" style:leader-style="dotted"/>
        </style:tab-stops>
      </style:paragraph-properties>
      <style:text-properties fo:font-family="Liberation Sans" style:font-family-complex="Liberation Sans"/>
    </style:style>
    <style:style style:family="text" style:name="T570">
      <style:text-properties fo:font-family="Liberation Sans" style:font-family-complex="Liberation Sans"/>
    </style:style>
    <style:style style:family="text" style:name="T571">
      <style:text-properties fo:font-family="Liberation Sans" style:font-family-complex="Liberation Sans"/>
    </style:style>
    <style:style style:family="text" style:name="T572">
      <style:text-properties fo:font-family="Liberation Sans" style:font-family-complex="Liberation Sans"/>
    </style:style>
    <style:style style:parent-style-name="717" style:family="text" style:name="T573">
      <style:text-properties fo:font-family="Liberation Sans" style:font-family-complex="Liberation Sans"/>
    </style:style>
    <style:style style:parent-style-name="717" style:family="text" style:name="T574">
      <style:text-properties fo:font-family="Liberation Sans" style:font-family-complex="Liberation Sans" fo:language="de" style:language-complex="hi" fo:country="DE" style:country-complex="IN"/>
    </style:style>
    <style:style style:parent-style-name="717" style:family="text" style:name="T575">
      <style:text-properties fo:font-family="Liberation Sans" style:font-family-complex="Liberation Sans" fo:language="de" style:language-complex="hi" fo:country="DE" style:country-complex="IN"/>
    </style:style>
    <style:style style:family="text" style:name="T576">
      <style:text-properties fo:font-family="Liberation Sans" style:font-family-complex="Liberation Sans"/>
    </style:style>
    <style:style style:family="text" style:name="T577">
      <style:text-properties fo:font-family="Liberation Sans" style:font-family-complex="Liberation Sans"/>
    </style:style>
    <style:style style:family="text" style:name="T578">
      <style:text-properties fo:font-family="Liberation Sans" style:font-family-complex="Liberation Sans"/>
    </style:style>
    <style:style style:family="text" style:name="T579">
      <style:text-properties fo:font-family="Liberation Sans" style:font-family-complex="Liberation Sans"/>
    </style:style>
    <style:style style:parent-style-name="725" style:family="paragraph" style:name="P107">
      <style:paragraph-properties>
        <style:tab-stops>
          <style:tab-stop style:position="17cm" style:type="right" style:leader-type="dotted" style:leader-style="dotted"/>
        </style:tab-stops>
      </style:paragraph-properties>
      <style:text-properties fo:font-family="Liberation Sans" style:font-family-complex="Liberation Sans"/>
    </style:style>
    <style:style style:family="text" style:name="T580">
      <style:text-properties fo:font-family="Liberation Sans" style:font-family-complex="Liberation Sans"/>
    </style:style>
    <style:style style:family="text" style:name="T581">
      <style:text-properties fo:font-family="Liberation Sans" style:font-family-complex="Liberation Sans"/>
    </style:style>
    <style:style style:family="text" style:name="T582">
      <style:text-properties fo:font-family="Liberation Sans" style:font-family-complex="Liberation Sans"/>
    </style:style>
    <style:style style:parent-style-name="717" style:family="text" style:name="T583">
      <style:text-properties fo:font-family="Liberation Sans" style:font-family-complex="Liberation Sans"/>
    </style:style>
    <style:style style:parent-style-name="717" style:family="text" style:name="T584">
      <style:text-properties fo:font-family="Liberation Sans" style:font-family-complex="Liberation Sans" fo:language="de" style:language-complex="hi" fo:country="DE" style:country-complex="IN"/>
    </style:style>
    <style:style style:parent-style-name="717" style:family="text" style:name="T585">
      <style:text-properties fo:font-family="Liberation Sans" style:font-family-complex="Liberation Sans" fo:language="de" style:language-complex="hi" fo:country="DE" style:country-complex="IN"/>
    </style:style>
    <style:style style:family="text" style:name="T586">
      <style:text-properties fo:font-family="Liberation Sans" style:font-family-complex="Liberation Sans"/>
    </style:style>
    <style:style style:family="text" style:name="T587">
      <style:text-properties fo:font-family="Liberation Sans" style:font-family-complex="Liberation Sans"/>
    </style:style>
    <style:style style:family="text" style:name="T588">
      <style:text-properties fo:font-family="Liberation Sans" style:font-family-complex="Liberation Sans"/>
    </style:style>
    <style:style style:family="text" style:name="T589">
      <style:text-properties fo:font-family="Liberation Sans" style:font-family-complex="Liberation Sans"/>
    </style:style>
    <style:style style:parent-style-name="724" style:family="paragraph" style:name="P108">
      <style:paragraph-properties>
        <style:tab-stops>
          <style:tab-stop style:position="17cm" style:type="right" style:leader-type="dotted" style:leader-style="dotted"/>
        </style:tab-stops>
      </style:paragraph-properties>
      <style:text-properties fo:font-family="Liberation Sans" style:font-family-complex="Liberation Sans"/>
    </style:style>
    <style:style style:family="text" style:name="T590">
      <style:text-properties fo:font-family="Liberation Sans" style:font-family-complex="Liberation Sans"/>
    </style:style>
    <style:style style:family="text" style:name="T591">
      <style:text-properties fo:font-family="Liberation Sans" style:font-family-complex="Liberation Sans"/>
    </style:style>
    <style:style style:family="text" style:name="T592">
      <style:text-properties fo:font-family="Liberation Sans" style:font-family-complex="Liberation Sans"/>
    </style:style>
    <style:style style:parent-style-name="717" style:family="text" style:name="T593">
      <style:text-properties fo:font-family="Liberation Sans" style:font-family-complex="Liberation Sans"/>
    </style:style>
    <style:style style:parent-style-name="717" style:family="text" style:name="T594">
      <style:text-properties fo:font-family="Liberation Sans" style:font-family-complex="Liberation Sans" fo:language="de" style:language-complex="hi" fo:country="DE" style:country-complex="IN"/>
    </style:style>
    <style:style style:parent-style-name="717" style:family="text" style:name="T595">
      <style:text-properties fo:font-family="Liberation Sans" style:font-family-complex="Liberation Sans" fo:language="de" style:language-complex="hi" fo:country="DE" style:country-complex="IN"/>
    </style:style>
    <style:style style:family="text" style:name="T596">
      <style:text-properties fo:font-family="Liberation Sans" style:font-family-complex="Liberation Sans"/>
    </style:style>
    <style:style style:family="text" style:name="T597">
      <style:text-properties fo:font-family="Liberation Sans" style:font-family-complex="Liberation Sans"/>
    </style:style>
    <style:style style:family="text" style:name="T598">
      <style:text-properties fo:font-family="Liberation Sans" style:font-family-complex="Liberation Sans"/>
    </style:style>
    <style:style style:family="text" style:name="T599">
      <style:text-properties fo:font-family="Liberation Sans" style:font-family-complex="Liberation Sans"/>
    </style:style>
    <style:style style:parent-style-name="725" style:family="paragraph" style:name="P109">
      <style:paragraph-properties>
        <style:tab-stops>
          <style:tab-stop style:position="17cm" style:type="right" style:leader-type="dotted" style:leader-style="dotted"/>
        </style:tab-stops>
      </style:paragraph-properties>
      <style:text-properties fo:font-family="Liberation Sans" style:font-family-complex="Liberation Sans"/>
    </style:style>
    <style:style style:family="text" style:name="T600">
      <style:text-properties fo:font-family="Liberation Sans" style:font-family-complex="Liberation Sans"/>
    </style:style>
    <style:style style:family="text" style:name="T601">
      <style:text-properties fo:font-family="Liberation Sans" style:font-family-complex="Liberation Sans"/>
    </style:style>
    <style:style style:family="text" style:name="T602">
      <style:text-properties fo:font-family="Liberation Sans" style:font-family-complex="Liberation Sans"/>
    </style:style>
    <style:style style:parent-style-name="717" style:family="text" style:name="T603">
      <style:text-properties fo:font-family="Liberation Sans" style:font-family-complex="Liberation Sans"/>
    </style:style>
    <style:style style:parent-style-name="717" style:family="text" style:name="T604">
      <style:text-properties fo:font-family="Liberation Sans" style:font-family-complex="Liberation Sans" fo:language="de" style:language-complex="hi" fo:country="DE" style:country-complex="IN"/>
    </style:style>
    <style:style style:parent-style-name="717" style:family="text" style:name="T605">
      <style:text-properties fo:font-family="Liberation Sans" style:font-family-complex="Liberation Sans" fo:language="de" style:language-complex="hi" fo:country="DE" style:country-complex="IN"/>
    </style:style>
    <style:style style:family="text" style:name="T606">
      <style:text-properties fo:font-family="Liberation Sans" style:font-family-complex="Liberation Sans"/>
    </style:style>
    <style:style style:family="text" style:name="T607">
      <style:text-properties fo:font-family="Liberation Sans" style:font-family-complex="Liberation Sans"/>
    </style:style>
    <style:style style:family="text" style:name="T608">
      <style:text-properties fo:font-family="Liberation Sans" style:font-family-complex="Liberation Sans"/>
    </style:style>
    <style:style style:family="text" style:name="T609">
      <style:text-properties fo:font-family="Liberation Sans" style:font-family-complex="Liberation Sans"/>
    </style:style>
    <style:style style:parent-style-name="725" style:family="paragraph" style:name="P110">
      <style:paragraph-properties>
        <style:tab-stops>
          <style:tab-stop style:position="17cm" style:type="right" style:leader-type="dotted" style:leader-style="dotted"/>
        </style:tab-stops>
      </style:paragraph-properties>
      <style:text-properties fo:font-family="Liberation Sans" style:font-family-complex="Liberation Sans"/>
    </style:style>
    <style:style style:family="text" style:name="T610">
      <style:text-properties fo:font-family="Liberation Sans" style:font-family-complex="Liberation Sans"/>
    </style:style>
    <style:style style:family="text" style:name="T611">
      <style:text-properties fo:font-family="Liberation Sans" style:font-family-complex="Liberation Sans"/>
    </style:style>
    <style:style style:family="text" style:name="T612">
      <style:text-properties fo:font-family="Liberation Sans" style:font-family-complex="Liberation Sans"/>
    </style:style>
    <style:style style:parent-style-name="717" style:family="text" style:name="T613">
      <style:text-properties fo:font-family="Liberation Sans" style:font-family-complex="Liberation Sans"/>
    </style:style>
    <style:style style:parent-style-name="717" style:family="text" style:name="T614">
      <style:text-properties fo:font-family="Liberation Sans" style:font-family-complex="Liberation Sans" fo:language="de" style:language-complex="hi" fo:country="DE" style:country-complex="IN"/>
    </style:style>
    <style:style style:parent-style-name="717" style:family="text" style:name="T615">
      <style:text-properties fo:font-family="Liberation Sans" style:font-family-complex="Liberation Sans" fo:language="de" style:language-complex="hi" fo:country="DE" style:country-complex="IN"/>
    </style:style>
    <style:style style:family="text" style:name="T616">
      <style:text-properties fo:font-family="Liberation Sans" style:font-family-complex="Liberation Sans"/>
    </style:style>
    <style:style style:family="text" style:name="T617">
      <style:text-properties fo:font-family="Liberation Sans" style:font-family-complex="Liberation Sans"/>
    </style:style>
    <style:style style:family="text" style:name="T618">
      <style:text-properties fo:font-family="Liberation Sans" style:font-family-complex="Liberation Sans"/>
    </style:style>
    <style:style style:family="text" style:name="T619">
      <style:text-properties fo:font-family="Liberation Sans" style:font-family-complex="Liberation Sans"/>
    </style:style>
    <style:style style:parent-style-name="725" style:family="paragraph" style:name="P111">
      <style:paragraph-properties>
        <style:tab-stops>
          <style:tab-stop style:position="17cm" style:type="right" style:leader-type="dotted" style:leader-style="dotted"/>
        </style:tab-stops>
      </style:paragraph-properties>
      <style:text-properties fo:font-family="Liberation Sans" style:font-family-complex="Liberation Sans"/>
    </style:style>
    <style:style style:family="text" style:name="T620">
      <style:text-properties fo:font-family="Liberation Sans" style:font-family-complex="Liberation Sans"/>
    </style:style>
    <style:style style:family="text" style:name="T621">
      <style:text-properties fo:font-family="Liberation Sans" style:font-family-complex="Liberation Sans"/>
    </style:style>
    <style:style style:family="text" style:name="T622">
      <style:text-properties fo:font-family="Liberation Sans" style:font-family-complex="Liberation Sans"/>
    </style:style>
    <style:style style:parent-style-name="717" style:family="text" style:name="T623">
      <style:text-properties fo:font-family="Liberation Sans" style:font-family-complex="Liberation Sans"/>
    </style:style>
    <style:style style:parent-style-name="717" style:family="text" style:name="T624">
      <style:text-properties fo:font-family="Liberation Sans" style:font-family-complex="Liberation Sans" fo:language="de" style:language-complex="hi" fo:country="DE" style:country-complex="IN"/>
    </style:style>
    <style:style style:parent-style-name="717" style:family="text" style:name="T625">
      <style:text-properties fo:font-family="Liberation Sans" style:font-family-complex="Liberation Sans" fo:language="de" style:language-complex="hi" fo:country="DE" style:country-complex="IN"/>
    </style:style>
    <style:style style:family="text" style:name="T626">
      <style:text-properties fo:font-family="Liberation Sans" style:font-family-complex="Liberation Sans"/>
    </style:style>
    <style:style style:family="text" style:name="T627">
      <style:text-properties fo:font-family="Liberation Sans" style:font-family-complex="Liberation Sans"/>
    </style:style>
    <style:style style:family="text" style:name="T628">
      <style:text-properties fo:font-family="Liberation Sans" style:font-family-complex="Liberation Sans"/>
    </style:style>
    <style:style style:family="text" style:name="T629">
      <style:text-properties fo:font-family="Liberation Sans" style:font-family-complex="Liberation Sans"/>
    </style:style>
    <style:style style:parent-style-name="725" style:family="paragraph" style:name="P112">
      <style:paragraph-properties>
        <style:tab-stops>
          <style:tab-stop style:position="17cm" style:type="right" style:leader-type="dotted" style:leader-style="dotted"/>
        </style:tab-stops>
      </style:paragraph-properties>
      <style:text-properties fo:font-family="Liberation Sans" style:font-family-complex="Liberation Sans"/>
    </style:style>
    <style:style style:family="text" style:name="T630">
      <style:text-properties fo:font-family="Liberation Sans" style:font-family-complex="Liberation Sans"/>
    </style:style>
    <style:style style:family="text" style:name="T631">
      <style:text-properties fo:font-family="Liberation Sans" style:font-family-complex="Liberation Sans"/>
    </style:style>
    <style:style style:family="text" style:name="T632">
      <style:text-properties fo:font-family="Liberation Sans" style:font-family-complex="Liberation Sans"/>
    </style:style>
    <style:style style:parent-style-name="717" style:family="text" style:name="T633">
      <style:text-properties fo:font-family="Liberation Sans" style:font-family-complex="Liberation Sans"/>
    </style:style>
    <style:style style:parent-style-name="717" style:family="text" style:name="T634">
      <style:text-properties fo:font-family="Liberation Sans" style:font-family-complex="Liberation Sans" fo:language="de" style:language-complex="hi" fo:country="DE" style:country-complex="IN"/>
    </style:style>
    <style:style style:parent-style-name="717" style:family="text" style:name="T635">
      <style:text-properties fo:font-family="Liberation Sans" style:font-family-complex="Liberation Sans" fo:language="de" style:language-complex="hi" fo:country="DE" style:country-complex="IN"/>
    </style:style>
    <style:style style:family="text" style:name="T636">
      <style:text-properties fo:font-family="Liberation Sans" style:font-family-complex="Liberation Sans"/>
    </style:style>
    <style:style style:family="text" style:name="T637">
      <style:text-properties fo:font-family="Liberation Sans" style:font-family-complex="Liberation Sans"/>
    </style:style>
    <style:style style:family="text" style:name="T638">
      <style:text-properties fo:font-family="Liberation Sans" style:font-family-complex="Liberation Sans"/>
    </style:style>
    <style:style style:family="text" style:name="T639">
      <style:text-properties fo:font-family="Liberation Sans" style:font-family-complex="Liberation Sans"/>
    </style:style>
    <style:style style:parent-style-name="725" style:family="paragraph" style:name="P113">
      <style:paragraph-properties>
        <style:tab-stops>
          <style:tab-stop style:position="17cm" style:type="right" style:leader-type="dotted" style:leader-style="dotted"/>
        </style:tab-stops>
      </style:paragraph-properties>
      <style:text-properties fo:font-family="Liberation Sans" style:font-family-complex="Liberation Sans"/>
    </style:style>
    <style:style style:family="text" style:name="T640">
      <style:text-properties fo:font-family="Liberation Sans" style:font-family-complex="Liberation Sans"/>
    </style:style>
    <style:style style:family="text" style:name="T641">
      <style:text-properties fo:font-family="Liberation Sans" style:font-family-complex="Liberation Sans"/>
    </style:style>
    <style:style style:family="text" style:name="T642">
      <style:text-properties fo:font-family="Liberation Sans" style:font-family-complex="Liberation Sans"/>
    </style:style>
    <style:style style:parent-style-name="717" style:family="text" style:name="T643">
      <style:text-properties fo:font-family="Liberation Sans" style:font-family-complex="Liberation Sans"/>
    </style:style>
    <style:style style:parent-style-name="717" style:family="text" style:name="T644">
      <style:text-properties fo:font-family="Liberation Sans" style:font-family-complex="Liberation Sans" fo:language="de" style:language-complex="hi" fo:country="DE" style:country-complex="IN"/>
    </style:style>
    <style:style style:parent-style-name="717" style:family="text" style:name="T645">
      <style:text-properties fo:font-family="Liberation Sans" style:font-family-complex="Liberation Sans" fo:language="de" style:language-complex="hi" fo:country="DE" style:country-complex="IN"/>
    </style:style>
    <style:style style:family="text" style:name="T646">
      <style:text-properties fo:font-family="Liberation Sans" style:font-family-complex="Liberation Sans"/>
    </style:style>
    <style:style style:family="text" style:name="T647">
      <style:text-properties fo:font-family="Liberation Sans" style:font-family-complex="Liberation Sans"/>
    </style:style>
    <style:style style:family="text" style:name="T648">
      <style:text-properties fo:font-family="Liberation Sans" style:font-family-complex="Liberation Sans"/>
    </style:style>
    <style:style style:family="text" style:name="T649">
      <style:text-properties fo:font-family="Liberation Sans" style:font-family-complex="Liberation Sans"/>
    </style:style>
    <style:style style:parent-style-name="724" style:family="paragraph" style:name="P114">
      <style:paragraph-properties>
        <style:tab-stops>
          <style:tab-stop style:position="17cm" style:type="right" style:leader-type="dotted" style:leader-style="dotted"/>
        </style:tab-stops>
      </style:paragraph-properties>
      <style:text-properties fo:font-family="Liberation Sans" style:font-family-complex="Liberation Sans"/>
    </style:style>
    <style:style style:family="text" style:name="T650">
      <style:text-properties fo:font-family="Liberation Sans" style:font-family-complex="Liberation Sans"/>
    </style:style>
    <style:style style:family="text" style:name="T651">
      <style:text-properties fo:font-family="Liberation Sans" style:font-family-complex="Liberation Sans"/>
    </style:style>
    <style:style style:family="text" style:name="T652">
      <style:text-properties fo:font-family="Liberation Sans" style:font-family-complex="Liberation Sans"/>
    </style:style>
    <style:style style:parent-style-name="717" style:family="text" style:name="T653">
      <style:text-properties fo:font-family="Liberation Sans" style:font-family-complex="Liberation Sans"/>
    </style:style>
    <style:style style:parent-style-name="717" style:family="text" style:name="T654">
      <style:text-properties fo:font-family="Liberation Sans" style:font-family-complex="Liberation Sans" fo:language="de" style:language-complex="hi" fo:country="DE" style:country-complex="IN"/>
    </style:style>
    <style:style style:parent-style-name="717" style:family="text" style:name="T655">
      <style:text-properties fo:font-family="Liberation Sans" style:font-family-complex="Liberation Sans" fo:language="de" style:language-complex="hi" fo:country="DE" style:country-complex="IN"/>
    </style:style>
    <style:style style:family="text" style:name="T656">
      <style:text-properties fo:font-family="Liberation Sans" style:font-family-complex="Liberation Sans"/>
    </style:style>
    <style:style style:family="text" style:name="T657">
      <style:text-properties fo:font-family="Liberation Sans" style:font-family-complex="Liberation Sans"/>
    </style:style>
    <style:style style:family="text" style:name="T658">
      <style:text-properties fo:font-family="Liberation Sans" style:font-family-complex="Liberation Sans"/>
    </style:style>
    <style:style style:family="text" style:name="T659">
      <style:text-properties fo:font-family="Liberation Sans" style:font-family-complex="Liberation Sans"/>
    </style:style>
    <style:style style:parent-style-name="725" style:family="paragraph" style:name="P115">
      <style:paragraph-properties>
        <style:tab-stops>
          <style:tab-stop style:position="17cm" style:type="right" style:leader-type="dotted" style:leader-style="dotted"/>
        </style:tab-stops>
      </style:paragraph-properties>
      <style:text-properties fo:font-family="Liberation Sans" style:font-family-complex="Liberation Sans"/>
    </style:style>
    <style:style style:family="text" style:name="T660">
      <style:text-properties fo:font-family="Liberation Sans" style:font-family-complex="Liberation Sans"/>
    </style:style>
    <style:style style:family="text" style:name="T661">
      <style:text-properties fo:font-family="Liberation Sans" style:font-family-complex="Liberation Sans"/>
    </style:style>
    <style:style style:family="text" style:name="T662">
      <style:text-properties fo:font-family="Liberation Sans" style:font-family-complex="Liberation Sans"/>
    </style:style>
    <style:style style:parent-style-name="717" style:family="text" style:name="T663">
      <style:text-properties fo:font-family="Liberation Sans" style:font-family-complex="Liberation Sans"/>
    </style:style>
    <style:style style:parent-style-name="717" style:family="text" style:name="T664">
      <style:text-properties fo:font-family="Liberation Sans" style:font-family-complex="Liberation Sans" fo:language="de" style:language-complex="hi" fo:country="DE" style:country-complex="IN"/>
    </style:style>
    <style:style style:parent-style-name="717" style:family="text" style:name="T665">
      <style:text-properties fo:font-family="Liberation Sans" style:font-family-complex="Liberation Sans" fo:language="de" style:language-complex="hi" fo:country="DE" style:country-complex="IN"/>
    </style:style>
    <style:style style:family="text" style:name="T666">
      <style:text-properties fo:font-family="Liberation Sans" style:font-family-complex="Liberation Sans"/>
    </style:style>
    <style:style style:family="text" style:name="T667">
      <style:text-properties fo:font-family="Liberation Sans" style:font-family-complex="Liberation Sans"/>
    </style:style>
    <style:style style:family="text" style:name="T668">
      <style:text-properties fo:font-family="Liberation Sans" style:font-family-complex="Liberation Sans"/>
    </style:style>
    <style:style style:family="text" style:name="T669">
      <style:text-properties fo:font-family="Liberation Sans" style:font-family-complex="Liberation Sans"/>
    </style:style>
    <style:style style:parent-style-name="725" style:family="paragraph" style:name="P116">
      <style:paragraph-properties>
        <style:tab-stops>
          <style:tab-stop style:position="17cm" style:type="right" style:leader-type="dotted" style:leader-style="dotted"/>
        </style:tab-stops>
      </style:paragraph-properties>
      <style:text-properties fo:font-family="Liberation Sans" style:font-family-complex="Liberation Sans"/>
    </style:style>
    <style:style style:family="text" style:name="T670">
      <style:text-properties fo:font-family="Liberation Sans" style:font-family-complex="Liberation Sans"/>
    </style:style>
    <style:style style:family="text" style:name="T671">
      <style:text-properties fo:font-family="Liberation Sans" style:font-family-complex="Liberation Sans"/>
    </style:style>
    <style:style style:family="text" style:name="T672">
      <style:text-properties fo:font-family="Liberation Sans" style:font-family-complex="Liberation Sans"/>
    </style:style>
    <style:style style:parent-style-name="717" style:family="text" style:name="T673">
      <style:text-properties fo:font-family="Liberation Sans" style:font-family-complex="Liberation Sans"/>
    </style:style>
    <style:style style:parent-style-name="717" style:family="text" style:name="T674">
      <style:text-properties fo:font-family="Liberation Sans" style:font-family-complex="Liberation Sans" fo:language="de" style:language-complex="hi" fo:country="DE" style:country-complex="IN"/>
    </style:style>
    <style:style style:parent-style-name="717" style:family="text" style:name="T675">
      <style:text-properties fo:font-family="Liberation Sans" style:font-family-complex="Liberation Sans" fo:language="de" style:language-complex="hi" fo:country="DE" style:country-complex="IN"/>
    </style:style>
    <style:style style:family="text" style:name="T676">
      <style:text-properties fo:font-family="Liberation Sans" style:font-family-complex="Liberation Sans"/>
    </style:style>
    <style:style style:family="text" style:name="T677">
      <style:text-properties fo:font-family="Liberation Sans" style:font-family-complex="Liberation Sans"/>
    </style:style>
    <style:style style:family="text" style:name="T678">
      <style:text-properties fo:font-family="Liberation Sans" style:font-family-complex="Liberation Sans"/>
    </style:style>
    <style:style style:family="text" style:name="T679">
      <style:text-properties fo:font-family="Liberation Sans" style:font-family-complex="Liberation Sans"/>
    </style:style>
    <style:style style:parent-style-name="724" style:family="paragraph" style:name="P117">
      <style:paragraph-properties>
        <style:tab-stops>
          <style:tab-stop style:position="17cm" style:type="right" style:leader-type="dotted" style:leader-style="dotted"/>
        </style:tab-stops>
      </style:paragraph-properties>
      <style:text-properties fo:font-family="Liberation Sans" style:font-family-complex="Liberation Sans"/>
    </style:style>
    <style:style style:family="text" style:name="T680">
      <style:text-properties fo:font-family="Liberation Sans" style:font-family-complex="Liberation Sans"/>
    </style:style>
    <style:style style:family="text" style:name="T681">
      <style:text-properties fo:font-family="Liberation Sans" style:font-family-complex="Liberation Sans"/>
    </style:style>
    <style:style style:family="text" style:name="T682">
      <style:text-properties fo:font-family="Liberation Sans" style:font-family-complex="Liberation Sans"/>
    </style:style>
    <style:style style:parent-style-name="717" style:family="text" style:name="T683">
      <style:text-properties fo:font-family="Liberation Sans" style:font-family-complex="Liberation Sans"/>
    </style:style>
    <style:style style:parent-style-name="717" style:family="text" style:name="T684">
      <style:text-properties fo:font-family="Liberation Sans" style:font-family-complex="Liberation Sans" fo:language="de" style:language-complex="hi" fo:country="DE" style:country-complex="IN"/>
    </style:style>
    <style:style style:parent-style-name="717" style:family="text" style:name="T685">
      <style:text-properties fo:font-family="Liberation Sans" style:font-family-complex="Liberation Sans" fo:language="de" style:language-complex="hi" fo:country="DE" style:country-complex="IN"/>
    </style:style>
    <style:style style:family="text" style:name="T686">
      <style:text-properties fo:font-family="Liberation Sans" style:font-family-complex="Liberation Sans"/>
    </style:style>
    <style:style style:family="text" style:name="T687">
      <style:text-properties fo:font-family="Liberation Sans" style:font-family-complex="Liberation Sans"/>
    </style:style>
    <style:style style:family="text" style:name="T688">
      <style:text-properties fo:font-family="Liberation Sans" style:font-family-complex="Liberation Sans"/>
    </style:style>
    <style:style style:family="text" style:name="T689">
      <style:text-properties fo:font-family="Liberation Sans" style:font-family-complex="Liberation Sans"/>
    </style:style>
    <style:style style:parent-style-name="724" style:family="paragraph" style:name="P118">
      <style:paragraph-properties>
        <style:tab-stops>
          <style:tab-stop style:position="17cm" style:type="right" style:leader-type="dotted" style:leader-style="dotted"/>
        </style:tab-stops>
      </style:paragraph-properties>
      <style:text-properties fo:font-family="Liberation Sans" style:font-family-complex="Liberation Sans"/>
    </style:style>
    <style:style style:family="text" style:name="T690">
      <style:text-properties fo:font-family="Liberation Sans" style:font-family-complex="Liberation Sans"/>
    </style:style>
    <style:style style:family="text" style:name="T691">
      <style:text-properties fo:font-family="Liberation Sans" style:font-family-complex="Liberation Sans"/>
    </style:style>
    <style:style style:family="text" style:name="T692">
      <style:text-properties fo:font-family="Liberation Sans" style:font-family-complex="Liberation Sans"/>
    </style:style>
    <style:style style:parent-style-name="717" style:family="text" style:name="T693">
      <style:text-properties fo:font-family="Liberation Sans" style:font-family-complex="Liberation Sans"/>
    </style:style>
    <style:style style:parent-style-name="717" style:family="text" style:name="T694">
      <style:text-properties fo:font-family="Liberation Sans" style:font-family-complex="Liberation Sans" fo:language="de" style:language-complex="hi" fo:country="DE" style:country-complex="IN"/>
    </style:style>
    <style:style style:parent-style-name="717" style:family="text" style:name="T695">
      <style:text-properties fo:font-family="Liberation Sans" style:font-family-complex="Liberation Sans" fo:language="de" style:language-complex="hi" fo:country="DE" style:country-complex="IN"/>
    </style:style>
    <style:style style:family="text" style:name="T696">
      <style:text-properties fo:font-family="Liberation Sans" style:font-family-complex="Liberation Sans"/>
    </style:style>
    <style:style style:family="text" style:name="T697">
      <style:text-properties fo:font-family="Liberation Sans" style:font-family-complex="Liberation Sans"/>
    </style:style>
    <style:style style:family="text" style:name="T698">
      <style:text-properties fo:font-family="Liberation Sans" style:font-family-complex="Liberation Sans"/>
    </style:style>
    <style:style style:family="text" style:name="T699">
      <style:text-properties fo:font-family="Liberation Sans" style:font-family-complex="Liberation Sans"/>
    </style:style>
    <style:style style:parent-style-name="725" style:family="paragraph" style:name="P119">
      <style:paragraph-properties>
        <style:tab-stops>
          <style:tab-stop style:position="17cm" style:type="right" style:leader-type="dotted" style:leader-style="dotted"/>
        </style:tab-stops>
      </style:paragraph-properties>
      <style:text-properties fo:font-family="Liberation Sans" style:font-family-complex="Liberation Sans"/>
    </style:style>
    <style:style style:family="text" style:name="T700">
      <style:text-properties fo:font-family="Liberation Sans" style:font-family-complex="Liberation Sans"/>
    </style:style>
    <style:style style:family="text" style:name="T701">
      <style:text-properties fo:font-family="Liberation Sans" style:font-family-complex="Liberation Sans"/>
    </style:style>
    <style:style style:family="text" style:name="T702">
      <style:text-properties fo:font-family="Liberation Sans" style:font-family-complex="Liberation Sans"/>
    </style:style>
    <style:style style:parent-style-name="717" style:family="text" style:name="T703">
      <style:text-properties fo:font-family="Liberation Sans" style:font-family-complex="Liberation Sans"/>
    </style:style>
    <style:style style:parent-style-name="717" style:family="text" style:name="T704">
      <style:text-properties fo:font-family="Liberation Sans" style:font-family-complex="Liberation Sans" fo:language="de" style:language-complex="hi" fo:country="DE" style:country-complex="IN"/>
    </style:style>
    <style:style style:parent-style-name="717" style:family="text" style:name="T705">
      <style:text-properties fo:font-family="Liberation Sans" style:font-family-complex="Liberation Sans" fo:language="de" style:language-complex="hi" fo:country="DE" style:country-complex="IN"/>
    </style:style>
    <style:style style:family="text" style:name="T706">
      <style:text-properties fo:font-family="Liberation Sans" style:font-family-complex="Liberation Sans"/>
    </style:style>
    <style:style style:family="text" style:name="T707">
      <style:text-properties fo:font-family="Liberation Sans" style:font-family-complex="Liberation Sans"/>
    </style:style>
    <style:style style:family="text" style:name="T708">
      <style:text-properties fo:font-family="Liberation Sans" style:font-family-complex="Liberation Sans"/>
    </style:style>
    <style:style style:family="text" style:name="T709">
      <style:text-properties fo:font-family="Liberation Sans" style:font-family-complex="Liberation Sans"/>
    </style:style>
    <style:style style:parent-style-name="725" style:family="paragraph" style:name="P120">
      <style:paragraph-properties>
        <style:tab-stops>
          <style:tab-stop style:position="17cm" style:type="right" style:leader-type="dotted" style:leader-style="dotted"/>
        </style:tab-stops>
      </style:paragraph-properties>
      <style:text-properties fo:font-family="Liberation Sans" style:font-family-complex="Liberation Sans"/>
    </style:style>
    <style:style style:family="text" style:name="T710">
      <style:text-properties fo:font-family="Liberation Sans" style:font-family-complex="Liberation Sans"/>
    </style:style>
    <style:style style:family="text" style:name="T711">
      <style:text-properties fo:font-family="Liberation Sans" style:font-family-complex="Liberation Sans"/>
    </style:style>
    <style:style style:family="text" style:name="T712">
      <style:text-properties fo:font-family="Liberation Sans" style:font-family-complex="Liberation Sans"/>
    </style:style>
    <style:style style:parent-style-name="717" style:family="text" style:name="T713">
      <style:text-properties fo:font-family="Liberation Sans" style:font-family-complex="Liberation Sans"/>
    </style:style>
    <style:style style:parent-style-name="717" style:family="text" style:name="T714">
      <style:text-properties fo:font-family="Liberation Sans" style:font-family-complex="Liberation Sans" fo:language="de" style:language-complex="hi" fo:country="DE" style:country-complex="IN"/>
    </style:style>
    <style:style style:parent-style-name="717" style:family="text" style:name="T715">
      <style:text-properties fo:font-family="Liberation Sans" style:font-family-complex="Liberation Sans" fo:language="de" style:language-complex="hi" fo:country="DE" style:country-complex="IN"/>
    </style:style>
    <style:style style:family="text" style:name="T716">
      <style:text-properties fo:font-family="Liberation Sans" style:font-family-complex="Liberation Sans"/>
    </style:style>
    <style:style style:family="text" style:name="T717">
      <style:text-properties fo:font-family="Liberation Sans" style:font-family-complex="Liberation Sans"/>
    </style:style>
    <style:style style:family="text" style:name="T718">
      <style:text-properties fo:font-family="Liberation Sans" style:font-family-complex="Liberation Sans"/>
    </style:style>
    <style:style style:family="text" style:name="T719">
      <style:text-properties fo:font-family="Liberation Sans" style:font-family-complex="Liberation Sans"/>
    </style:style>
    <style:style style:parent-style-name="725" style:family="paragraph" style:name="P121">
      <style:paragraph-properties>
        <style:tab-stops>
          <style:tab-stop style:position="17cm" style:type="right" style:leader-type="dotted" style:leader-style="dotted"/>
        </style:tab-stops>
      </style:paragraph-properties>
      <style:text-properties fo:font-family="Liberation Sans" style:font-family-complex="Liberation Sans"/>
    </style:style>
    <style:style style:family="text" style:name="T720">
      <style:text-properties fo:font-family="Liberation Sans" style:font-family-complex="Liberation Sans"/>
    </style:style>
    <style:style style:family="text" style:name="T721">
      <style:text-properties fo:font-family="Liberation Sans" style:font-family-complex="Liberation Sans"/>
    </style:style>
    <style:style style:family="text" style:name="T722">
      <style:text-properties fo:font-family="Liberation Sans" style:font-family-complex="Liberation Sans"/>
    </style:style>
    <style:style style:parent-style-name="717" style:family="text" style:name="T723">
      <style:text-properties fo:font-family="Liberation Sans" style:font-family-complex="Liberation Sans"/>
    </style:style>
    <style:style style:parent-style-name="717" style:family="text" style:name="T724">
      <style:text-properties fo:font-family="Liberation Sans" style:font-family-complex="Liberation Sans" fo:language="de" style:language-complex="hi" fo:country="DE" style:country-complex="IN"/>
    </style:style>
    <style:style style:parent-style-name="717" style:family="text" style:name="T725">
      <style:text-properties fo:font-family="Liberation Sans" style:font-family-complex="Liberation Sans" fo:language="de" style:language-complex="hi" fo:country="DE" style:country-complex="IN"/>
    </style:style>
    <style:style style:family="text" style:name="T726">
      <style:text-properties fo:font-family="Liberation Sans" style:font-family-complex="Liberation Sans"/>
    </style:style>
    <style:style style:family="text" style:name="T727">
      <style:text-properties fo:font-family="Liberation Sans" style:font-family-complex="Liberation Sans"/>
    </style:style>
    <style:style style:family="text" style:name="T728">
      <style:text-properties fo:font-family="Liberation Sans" style:font-family-complex="Liberation Sans"/>
    </style:style>
    <style:style style:family="text" style:name="T729">
      <style:text-properties fo:font-family="Liberation Sans" style:font-family-complex="Liberation Sans"/>
    </style:style>
    <style:style style:parent-style-name="725" style:family="paragraph" style:name="P122">
      <style:paragraph-properties>
        <style:tab-stops>
          <style:tab-stop style:position="17cm" style:type="right" style:leader-type="dotted" style:leader-style="dotted"/>
        </style:tab-stops>
      </style:paragraph-properties>
      <style:text-properties fo:font-family="Liberation Sans" style:font-family-complex="Liberation Sans"/>
    </style:style>
    <style:style style:family="text" style:name="T730">
      <style:text-properties fo:font-family="Liberation Sans" style:font-family-complex="Liberation Sans"/>
    </style:style>
    <style:style style:family="text" style:name="T731">
      <style:text-properties fo:font-family="Liberation Sans" style:font-family-complex="Liberation Sans"/>
    </style:style>
    <style:style style:family="text" style:name="T732">
      <style:text-properties fo:font-family="Liberation Sans" style:font-family-complex="Liberation Sans"/>
    </style:style>
    <style:style style:parent-style-name="717" style:family="text" style:name="T733">
      <style:text-properties fo:font-family="Liberation Sans" style:font-family-complex="Liberation Sans"/>
    </style:style>
    <style:style style:parent-style-name="717" style:family="text" style:name="T734">
      <style:text-properties fo:font-family="Liberation Sans" style:font-family-complex="Liberation Sans" fo:language="de" style:language-complex="hi" fo:country="DE" style:country-complex="IN"/>
    </style:style>
    <style:style style:parent-style-name="717" style:family="text" style:name="T735">
      <style:text-properties fo:font-family="Liberation Sans" style:font-family-complex="Liberation Sans" fo:language="de" style:language-complex="hi" fo:country="DE" style:country-complex="IN"/>
    </style:style>
    <style:style style:family="text" style:name="T736">
      <style:text-properties fo:font-family="Liberation Sans" style:font-family-complex="Liberation Sans"/>
    </style:style>
    <style:style style:family="text" style:name="T737">
      <style:text-properties fo:font-family="Liberation Sans" style:font-family-complex="Liberation Sans"/>
    </style:style>
    <style:style style:family="text" style:name="T738">
      <style:text-properties fo:font-family="Liberation Sans" style:font-family-complex="Liberation Sans"/>
    </style:style>
    <style:style style:family="text" style:name="T739">
      <style:text-properties fo:font-family="Liberation Sans" style:font-family-complex="Liberation Sans"/>
    </style:style>
    <style:style style:parent-style-name="724" style:family="paragraph" style:name="P123">
      <style:paragraph-properties>
        <style:tab-stops>
          <style:tab-stop style:position="17cm" style:type="right" style:leader-type="dotted" style:leader-style="dotted"/>
        </style:tab-stops>
      </style:paragraph-properties>
      <style:text-properties fo:font-family="Liberation Sans" style:font-family-complex="Liberation Sans"/>
    </style:style>
    <style:style style:family="text" style:name="T740">
      <style:text-properties fo:font-family="Liberation Sans" style:font-family-complex="Liberation Sans"/>
    </style:style>
    <style:style style:family="text" style:name="T741">
      <style:text-properties fo:font-family="Liberation Sans" style:font-family-complex="Liberation Sans"/>
    </style:style>
    <style:style style:family="text" style:name="T742">
      <style:text-properties fo:font-family="Liberation Sans" style:font-family-complex="Liberation Sans"/>
    </style:style>
    <style:style style:parent-style-name="717" style:family="text" style:name="T743">
      <style:text-properties fo:font-family="Liberation Sans" style:font-family-complex="Liberation Sans"/>
    </style:style>
    <style:style style:parent-style-name="717" style:family="text" style:name="T744">
      <style:text-properties fo:font-family="Liberation Sans" style:font-family-complex="Liberation Sans" fo:language="de" style:language-complex="hi" fo:country="DE" style:country-complex="IN"/>
    </style:style>
    <style:style style:parent-style-name="717" style:family="text" style:name="T745">
      <style:text-properties fo:font-family="Liberation Sans" style:font-family-complex="Liberation Sans" fo:language="de" style:language-complex="hi" fo:country="DE" style:country-complex="IN"/>
    </style:style>
    <style:style style:family="text" style:name="T746">
      <style:text-properties fo:font-family="Liberation Sans" style:font-family-complex="Liberation Sans"/>
    </style:style>
    <style:style style:family="text" style:name="T747">
      <style:text-properties fo:font-family="Liberation Sans" style:font-family-complex="Liberation Sans"/>
    </style:style>
    <style:style style:family="text" style:name="T748">
      <style:text-properties fo:font-family="Liberation Sans" style:font-family-complex="Liberation Sans"/>
    </style:style>
    <style:style style:family="text" style:name="T749">
      <style:text-properties fo:font-family="Liberation Sans" style:font-family-complex="Liberation Sans"/>
    </style:style>
    <style:style style:family="paragraph" style:name="P124">
      <style:paragraph-properties/>
      <style:text-properties/>
    </style:style>
    <style:style style:family="paragraph" style:name="P125">
      <style:paragraph-properties/>
      <style:text-properties/>
    </style:style>
    <style:style style:family="paragraph" style:name="P126">
      <style:paragraph-properties/>
      <style:text-properties/>
    </style:style>
    <style:style style:family="paragraph" style:name="P127">
      <style:paragraph-properties/>
      <style:text-properties/>
    </style:style>
    <style:style style:family="text" style:name="T750">
      <style:text-properties fo:language="de" fo:country="DE" fo:font-weight="bold"/>
    </style:style>
    <style:style style:family="text" style:name="T751">
      <style:text-properties fo:language="de" fo:country="DE" fo:font-weight="bold"/>
    </style:style>
    <style:style style:parent-style-name="749" style:family="paragraph" style:name="P128">
      <style:paragraph-properties/>
      <style:text-properties fo:color="#000000" fo:font-family="Liberation Sans" style:font-family-complex="Liberation Sans" fo:font-size="18pt" style:font-size-complex="18pt" fo:language="de" style:language-complex="hi" fo:country="DE" style:country-complex="IN" fo:font-weight="bold"/>
    </style:style>
    <style:style style:family="text" style:name="T752">
      <style:text-properties fo:color="#000000" fo:font-family="Liberation Sans" style:font-family-complex="Liberation Sans" fo:font-size="18pt" style:font-size-complex="18pt" fo:language="de" style:language-complex="hi" fo:country="DE" style:country-complex="IN" fo:font-weight="bold"/>
    </style:style>
    <style:style style:family="text" style:name="T753">
      <style:text-properties fo:color="#000000" fo:font-family="Liberation Sans" style:font-family-complex="Liberation Sans" fo:font-size="18pt" style:font-size-complex="18pt" fo:language="de" style:language-complex="hi" fo:country="DE" style:country-complex="IN" fo:font-weight="bold"/>
    </style:style>
    <style:style style:family="text" style:name="T754">
      <style:text-properties fo:color="#000000" fo:font-family="Liberation Sans" style:font-family-complex="Liberation Sans" fo:font-size="18pt" style:font-size-complex="18pt" fo:language="de" style:language-complex="hi" fo:country="DE" style:country-complex="IN" fo:font-weight="bold"/>
    </style:style>
    <style:style style:family="text" style:name="T755">
      <style:text-properties fo:color="#000000" fo:font-family="Liberation Sans" style:font-family-complex="Liberation Sans" fo:font-size="18pt" style:font-size-complex="18pt" fo:language="de" style:language-complex="hi" fo:country="DE" style:country-complex="IN" fo:font-weight="bold"/>
    </style:style>
    <style:style style:family="text" style:name="T756">
      <style:text-properties fo:color="#000000" fo:font-family="Liberation Sans" style:font-family-complex="Liberation Sans" fo:font-size="18pt" style:font-size-complex="18pt" fo:language="de" style:language-complex="hi" fo:country="DE" style:country-complex="IN" fo:font-weight="bold"/>
    </style:style>
    <style:style style:family="paragraph" style:name="P129">
      <style:paragraph-properties/>
      <style:text-properties/>
    </style:style>
    <style:style style:family="text" style:name="T757">
      <style:text-properties fo:font-weight="bold"/>
    </style:style>
    <style:style style:family="text" style:name="T758">
      <style:text-properties fo:font-weight="bold"/>
    </style:style>
    <style:style style:family="paragraph" style:name="P130">
      <style:paragraph-properties/>
      <style:text-properties/>
    </style:style>
    <style:style style:family="text" style:name="T759">
      <style:text-properties fo:language="de" fo:country="DE" fo:font-weight="bold"/>
    </style:style>
    <style:style style:family="text" style:name="T760">
      <style:text-properties fo:language="de" fo:country="DE" fo:font-weight="bold"/>
    </style:style>
    <style:style style:family="text" style:name="T761">
      <style:text-properties fo:font-weight="normal"/>
    </style:style>
    <style:style style:family="text" style:name="T762">
      <style:text-properties fo:font-weight="normal"/>
    </style:style>
    <style:style style:family="paragraph" style:name="P131">
      <style:paragraph-properties/>
      <style:text-properties/>
    </style:style>
    <style:style style:family="text" style:name="T763">
      <style:text-properties fo:language="de" fo:country="DE" fo:font-weight="bold"/>
    </style:style>
    <style:style style:family="text" style:name="T764">
      <style:text-properties fo:language="de" fo:country="DE" fo:font-weight="bold"/>
    </style:style>
    <style:style style:family="text" style:name="T765">
      <style:text-properties fo:font-weight="normal"/>
    </style:style>
    <style:style style:family="text" style:name="T766">
      <style:text-properties fo:font-weight="normal"/>
    </style:style>
    <style:style style:family="paragraph" style:name="P132">
      <style:paragraph-properties/>
      <style:text-properties/>
    </style:style>
    <style:style style:family="text" style:name="T767">
      <style:text-properties fo:language="de" fo:country="DE" fo:font-weight="bold"/>
    </style:style>
    <style:style style:family="text" style:name="T768">
      <style:text-properties fo:language="de" fo:country="DE" fo:font-weight="normal"/>
    </style:style>
    <style:style style:family="text" style:name="T769">
      <style:text-properties fo:font-weight="bold"/>
    </style:style>
    <style:style style:family="paragraph" style:name="P133">
      <style:paragraph-properties/>
      <style:text-properties/>
    </style:style>
    <style:style style:family="text" style:name="T770">
      <style:text-properties fo:language="de" fo:country="DE" fo:font-weight="bold"/>
    </style:style>
    <style:style style:family="text" style:name="T771">
      <style:text-properties fo:font-weight="normal"/>
    </style:style>
    <style:style style:family="text" style:name="T772">
      <style:text-properties fo:language="de" fo:country="DE" fo:font-weight="normal"/>
    </style:style>
    <style:style style:family="text" style:name="T773">
      <style:text-properties fo:language="de" fo:country="DE" fo:font-weight="normal"/>
    </style:style>
    <style:style style:family="text" style:name="T774">
      <style:text-properties fo:language="de" fo:country="DE" fo:font-weight="bold"/>
    </style:style>
    <style:style style:family="text" style:name="T775">
      <style:text-properties fo:language="de" fo:country="DE" fo:font-weight="normal"/>
    </style:style>
    <style:style style:family="text" style:name="T776">
      <style:text-properties fo:font-weight="bold"/>
    </style:style>
    <style:style style:family="paragraph" style:name="P134">
      <style:paragraph-properties/>
      <style:text-properties/>
    </style:style>
    <style:style style:family="text" style:name="T777">
      <style:text-properties fo:language="de" fo:country="DE" fo:font-weight="bold"/>
    </style:style>
    <style:style style:family="text" style:name="T778">
      <style:text-properties fo:language="de" fo:country="DE" fo:font-weight="normal"/>
    </style:style>
    <style:style style:family="text" style:name="T779">
      <style:text-properties fo:font-weight="normal"/>
    </style:style>
    <style:style style:family="paragraph" style:name="P135">
      <style:paragraph-properties/>
      <style:text-properties/>
    </style:style>
    <style:style style:family="text" style:name="T780">
      <style:text-properties fo:language="de" fo:country="DE" fo:font-weight="bold"/>
    </style:style>
    <style:style style:family="text" style:name="T781">
      <style:text-properties fo:language="de" fo:country="DE" fo:font-weight="normal"/>
    </style:style>
    <style:style style:family="text" style:name="T782">
      <style:text-properties fo:language="de" fo:country="DE" fo:font-weight="normal"/>
    </style:style>
    <style:style style:family="text" style:name="T783">
      <style:text-properties fo:language="de" fo:country="DE" fo:font-weight="normal"/>
    </style:style>
    <style:style style:family="paragraph" style:name="P136">
      <style:paragraph-properties/>
      <style:text-properties/>
    </style:style>
    <style:style style:family="text" style:name="T784">
      <style:text-properties fo:language="de" fo:country="DE" fo:font-weight="bold"/>
    </style:style>
    <style:style style:family="text" style:name="T785">
      <style:text-properties fo:language="de" fo:country="DE" fo:font-weight="normal"/>
    </style:style>
    <style:style style:family="text" style:name="T786">
      <style:text-properties fo:language="de" fo:country="DE" fo:font-weight="bold"/>
    </style:style>
    <style:style style:family="paragraph" style:name="P137">
      <style:paragraph-properties/>
      <style:text-properties/>
    </style:style>
    <style:style style:family="text" style:name="T787">
      <style:text-properties fo:language="de" fo:country="DE" fo:font-weight="bold"/>
    </style:style>
    <style:style style:family="text" style:name="T788">
      <style:text-properties fo:language="de" fo:country="DE" fo:font-weight="normal"/>
    </style:style>
    <style:style style:family="text" style:name="T789">
      <style:text-properties fo:font-weight="normal"/>
    </style:style>
    <style:style style:family="text" style:name="T790">
      <style:text-properties fo:font-weight="bold"/>
    </style:style>
    <style:style style:family="paragraph" style:name="P138">
      <style:paragraph-properties/>
      <style:text-properties/>
    </style:style>
    <style:style style:family="text" style:name="T791">
      <style:text-properties fo:language="de" fo:country="DE" fo:font-weight="bold"/>
    </style:style>
    <style:style style:family="text" style:name="T792">
      <style:text-properties fo:language="de" fo:country="DE" fo:font-weight="normal"/>
    </style:style>
    <style:style style:family="text" style:name="T793">
      <style:text-properties fo:font-weight="bold"/>
    </style:style>
    <style:style style:family="paragraph" style:name="P139">
      <style:paragraph-properties/>
      <style:text-properties/>
    </style:style>
    <style:style style:family="text" style:name="T794">
      <style:text-properties fo:language="de" fo:country="DE" fo:font-weight="bold"/>
    </style:style>
    <style:style style:family="text" style:name="T795">
      <style:text-properties fo:language="de" fo:country="DE" fo:font-weight="normal"/>
    </style:style>
    <style:style style:family="text" style:name="T796">
      <style:text-properties fo:language="de" fo:country="DE" fo:font-weight="bold"/>
    </style:style>
    <style:style style:family="paragraph" style:name="P140">
      <style:paragraph-properties/>
      <style:text-properties/>
    </style:style>
    <style:style style:family="text" style:name="T797">
      <style:text-properties fo:language="de" fo:country="DE" fo:font-weight="bold"/>
    </style:style>
    <style:style style:family="text" style:name="T798">
      <style:text-properties fo:font-weight="normal"/>
    </style:style>
    <style:style style:family="text" style:name="T799">
      <style:text-properties fo:language="de" fo:country="DE" fo:font-weight="normal"/>
    </style:style>
    <style:style style:family="paragraph" style:name="P141">
      <style:paragraph-properties/>
      <style:text-properties/>
    </style:style>
    <style:style style:family="text" style:name="T800">
      <style:text-properties fo:language="de" fo:country="DE" fo:font-weight="bold"/>
    </style:style>
    <style:style style:family="text" style:name="T801">
      <style:text-properties fo:font-weight="bold"/>
    </style:style>
    <style:style style:family="text" style:name="T802">
      <style:text-properties fo:font-weight="normal"/>
    </style:style>
    <style:style style:family="text" style:name="T803">
      <style:text-properties fo:font-weight="normal"/>
    </style:style>
    <style:style style:family="paragraph" style:name="P142">
      <style:paragraph-properties/>
      <style:text-properties/>
    </style:style>
    <style:style style:family="text" style:name="T804">
      <style:text-properties fo:font-weight="normal"/>
    </style:style>
    <style:style style:family="text" style:name="T805">
      <style:text-properties fo:font-weight="normal"/>
    </style:style>
    <style:style style:family="paragraph" style:name="P143">
      <style:paragraph-properties/>
      <style:text-properties/>
    </style:style>
    <style:style style:family="text" style:name="T806">
      <style:text-properties fo:font-weight="normal"/>
    </style:style>
    <style:style style:family="text" style:name="T807">
      <style:text-properties fo:font-weight="normal"/>
    </style:style>
    <style:style style:parent-style-name="749" style:master-page-name="MasterPage7" style:family="paragraph" style:name="P144">
      <style:paragraph-properties fo:break-before="page"/>
      <style:text-properties fo:color="#000000" fo:font-family="Liberation Sans" style:font-family-complex="Liberation Sans" fo:font-size="18pt" style:font-size-complex="18pt" fo:language="de" style:language-complex="hi" fo:country="DE" style:country-complex="IN" fo:font-weight="bold"/>
    </style:style>
    <style:style style:family="text" style:name="T808">
      <style:text-properties fo:color="#000000" fo:font-family="Liberation Sans" style:font-family-complex="Liberation Sans" fo:font-size="18pt" style:font-size-complex="18pt" fo:language="de" style:language-complex="hi" fo:country="DE" style:country-complex="IN" fo:font-weight="bold"/>
    </style:style>
    <style:style style:family="text" style:name="T809">
      <style:text-properties fo:color="#000000" fo:font-family="Liberation Sans" style:font-family-complex="Liberation Sans" fo:font-size="18pt" style:font-size-complex="18pt" fo:language="de" style:language-complex="hi" fo:country="DE" style:country-complex="IN" fo:font-weight="bold"/>
    </style:style>
    <style:style style:family="text" style:name="T810">
      <style:text-properties fo:color="#000000" fo:font-family="Liberation Sans" style:font-family-complex="Liberation Sans" fo:font-size="18pt" style:font-size-complex="18pt" fo:language="de" style:language-complex="hi" fo:country="DE" style:country-complex="IN" fo:font-weight="bold"/>
    </style:style>
    <style:style style:family="text" style:name="T811">
      <style:text-properties fo:color="#000000" fo:font-family="Liberation Sans" style:font-family-complex="Liberation Sans" fo:font-size="18pt" style:font-size-complex="18pt" fo:language="de" style:language-complex="hi" fo:country="DE" style:country-complex="IN" fo:font-weight="bold"/>
    </style:style>
    <style:style style:family="paragraph" style:name="P145">
      <style:paragraph-properties/>
      <style:text-properties/>
    </style:style>
    <style:style style:family="text" style:name="T812">
      <style:text-properties fo:font-weight="normal"/>
    </style:style>
    <style:style style:family="text" style:name="T813">
      <style:text-properties fo:language="en" fo:country="US" fo:font-weight="normal"/>
    </style:style>
    <style:style style:family="text" style:name="T814">
      <style:text-properties fo:language="de" fo:country="DE" fo:font-weight="normal"/>
    </style:style>
    <style:style style:family="text" style:name="T815">
      <style:text-properties fo:font-weight="normal"/>
    </style:style>
    <style:style style:family="paragraph" style:name="P146">
      <style:paragraph-properties/>
      <style:text-properties/>
    </style:style>
    <style:style style:family="text" style:name="T816">
      <style:text-properties fo:language="de" fo:country="DE" fo:font-weight="normal"/>
    </style:style>
    <style:style style:family="text" style:name="T817">
      <style:text-properties fo:language="de" fo:country="DE" fo:font-weight="normal"/>
    </style:style>
    <style:style style:family="paragraph" style:name="P147">
      <style:paragraph-properties/>
      <style:text-properties/>
    </style:style>
    <style:style style:family="text" style:name="T818">
      <style:text-properties fo:language="de" fo:country="DE" fo:font-weight="normal"/>
    </style:style>
    <style:style style:family="text" style:name="T819">
      <style:text-properties fo:language="de" fo:country="DE" fo:font-weight="normal"/>
    </style:style>
    <style:style style:family="text" style:name="T820">
      <style:text-properties fo:font-weight="normal"/>
    </style:style>
    <style:style style:family="paragraph" style:name="P148">
      <style:paragraph-properties/>
      <style:text-properties/>
    </style:style>
    <style:style style:family="text" style:name="T821">
      <style:text-properties fo:language="de" fo:country="DE" fo:font-weight="normal"/>
    </style:style>
    <style:style style:family="text" style:name="T822">
      <style:text-properties fo:language="de" fo:country="DE" fo:font-weight="normal"/>
    </style:style>
    <style:style style:family="paragraph" style:name="P149">
      <style:paragraph-properties/>
      <style:text-properties/>
    </style:style>
    <style:style style:family="text" style:name="T823">
      <style:text-properties fo:language="de" fo:country="DE" fo:font-weight="normal"/>
    </style:style>
    <style:style style:family="text" style:name="T824">
      <style:text-properties fo:language="de" fo:country="DE" fo:font-weight="normal"/>
    </style:style>
    <style:style style:family="paragraph" style:name="P150">
      <style:paragraph-properties/>
      <style:text-properties/>
    </style:style>
    <style:style style:family="text" style:name="T825">
      <style:text-properties fo:language="de" fo:country="DE" fo:font-weight="normal"/>
    </style:style>
    <style:style style:family="text" style:name="T826">
      <style:text-properties fo:language="de" fo:country="DE" fo:font-weight="normal"/>
    </style:style>
    <style:style style:family="paragraph" style:name="P151">
      <style:paragraph-properties/>
      <style:text-properties/>
    </style:style>
    <style:style style:family="text" style:name="T827">
      <style:text-properties fo:language="de" fo:country="DE" fo:font-weight="normal"/>
    </style:style>
    <style:style style:family="text" style:name="T828">
      <style:text-properties fo:language="de" fo:country="DE" fo:font-weight="normal"/>
    </style:style>
    <style:style style:family="text" style:name="T829">
      <style:text-properties fo:font-weight="normal"/>
    </style:style>
    <style:style style:family="paragraph" style:name="P152">
      <style:paragraph-properties/>
      <style:text-properties/>
    </style:style>
    <style:style style:family="text" style:name="T830">
      <style:text-properties fo:language="de" style:language-complex="hi" fo:country="DE" style:country-complex="IN"/>
    </style:style>
    <style:style style:family="text" style:name="T831">
      <style:text-properties fo:language="de" style:language-complex="hi" fo:country="DE" style:country-complex="IN"/>
    </style:style>
    <style:style style:family="text" style:name="T832">
      <style:text-properties fo:language="de" style:language-complex="hi" fo:country="DE" style:country-complex="IN"/>
    </style:style>
    <style:style style:family="paragraph" style:name="P153">
      <style:paragraph-properties/>
      <style:text-properties/>
    </style:style>
    <style:style style:family="text" style:name="T833">
      <style:text-properties fo:language="de" style:language-complex="de" fo:country="DE" style:country-complex="DE"/>
    </style:style>
    <style:style style:family="text" style:name="T834">
      <style:text-properties fo:language="de" style:language-complex="de" fo:country="DE" style:country-complex="DE"/>
    </style:style>
    <style:style style:family="text" style:name="T835">
      <style:text-properties fo:language="de" style:language-complex="de" fo:country="DE" style:country-complex="DE"/>
    </style:style>
    <style:style style:family="text" style:name="T836">
      <style:text-properties fo:language="de" style:language-complex="hi" fo:country="DE" style:country-complex="IN"/>
    </style:style>
    <style:style style:family="paragraph" style:name="P154">
      <style:paragraph-properties/>
      <style:text-properties/>
    </style:style>
    <style:style style:family="text" style:name="T837">
      <style:text-properties fo:language="de" style:language-complex="de" fo:country="DE" style:country-complex="DE" fo:font-weight="normal"/>
    </style:style>
    <style:style style:family="text" style:name="T838">
      <style:text-properties fo:language="de" fo:country="DE" fo:font-weight="normal"/>
    </style:style>
    <style:style style:family="paragraph" style:name="P155">
      <style:paragraph-properties/>
      <style:text-properties/>
    </style:style>
    <style:style style:family="text" style:name="T839">
      <style:text-properties fo:language="de" fo:country="DE" fo:font-weight="normal"/>
    </style:style>
    <style:style style:family="text" style:name="T840">
      <style:text-properties fo:font-weight="normal"/>
    </style:style>
    <style:style style:family="text" style:name="T841">
      <style:text-properties fo:font-weight="normal"/>
    </style:style>
    <style:style style:master-page-name="MasterPage8" style:family="paragraph" style:name="P156">
      <style:paragraph-properties fo:break-before="page"/>
      <style:text-properties fo:font-weight="normal"/>
    </style:style>
    <style:style style:family="text" style:name="T842">
      <style:text-properties fo:font-weight="normal"/>
    </style:style>
    <style:style style:family="text" style:name="T843">
      <style:text-properties fo:font-weight="normal"/>
    </style:style>
    <style:style style:family="text" style:name="T844">
      <style:text-properties fo:font-weight="normal"/>
    </style:style>
    <style:style style:parent-style-name="749" style:master-page-name="MasterPage9" style:family="paragraph" style:name="P157">
      <style:paragraph-properties fo:break-before="page"/>
      <style:text-properties fo:color="#000000" fo:font-family="Liberation Sans" style:font-family-complex="Liberation Sans" fo:font-size="18pt" style:font-size-complex="18pt" fo:language="de" style:language-complex="hi" fo:country="DE" style:country-complex="IN" fo:font-weight="bold"/>
    </style:style>
    <style:style style:family="text" style:name="T845">
      <style:text-properties fo:color="#000000" fo:font-family="Liberation Sans" style:font-family-complex="Liberation Sans" fo:font-size="18pt" style:font-size-complex="18pt" fo:language="de" style:language-complex="hi" fo:country="DE" style:country-complex="IN" fo:font-weight="bold"/>
    </style:style>
    <style:style style:family="text" style:name="T846">
      <style:text-properties fo:color="#000000" fo:font-family="Liberation Sans" style:font-family-complex="Liberation Sans" fo:font-size="18pt" style:font-size-complex="18pt" fo:language="de" style:language-complex="hi" fo:country="DE" style:country-complex="IN" fo:font-weight="bold"/>
    </style:style>
    <style:style style:family="text" style:name="T847">
      <style:text-properties fo:color="#000000" fo:font-family="Liberation Sans" style:font-family-complex="Liberation Sans" fo:font-size="18pt" style:font-size-complex="18pt" fo:language="de" style:language-complex="hi" fo:country="DE" style:country-complex="IN" fo:font-weight="bold"/>
    </style:style>
    <style:style style:family="text" style:name="T848">
      <style:text-properties fo:color="#000000" fo:font-family="Liberation Sans" style:font-family-complex="Liberation Sans" fo:font-size="18pt" style:font-size-complex="18pt" fo:language="de" style:language-complex="hi" fo:country="DE" style:country-complex="IN" fo:font-weight="bold"/>
    </style:style>
    <style:style style:family="text" style:name="T849">
      <style:text-properties fo:color="#000000" fo:font-family="Liberation Sans" style:font-family-complex="Liberation Sans" fo:font-size="18pt" style:font-size-complex="18pt" fo:language="de" style:language-complex="hi" fo:country="DE" style:country-complex="IN" fo:font-weight="bold"/>
    </style:style>
    <style:style style:parent-style-name="737" style:family="paragraph" style:name="P158">
      <style:paragraph-properties fo:text-align="left"/>
      <style:text-properties fo:color="#000000" fo:font-family="Liberation Serif" style:font-family-complex="Liberation Serif" fo:font-size="12pt" style:font-size-complex="12pt" fo:language="de" style:language-complex="hi" fo:country="DE" style:country-complex="IN"/>
    </style:style>
    <style:style style:family="text" style:name="T850">
      <style:text-properties fo:color="#000000" fo:font-family="Liberation Serif" style:font-family-complex="Liberation Serif" fo:font-size="12pt" style:font-size-complex="12pt" fo:language="de" style:language-complex="hi" fo:country="DE" style:country-complex="IN"/>
    </style:style>
    <style:style style:family="text" style:name="T851">
      <style:text-properties fo:color="#000000" fo:font-family="Liberation Serif" style:font-family-complex="Liberation Serif" fo:font-size="12pt" style:font-size-complex="12pt" fo:language="de" style:language-complex="hi" fo:country="DE" style:country-complex="IN"/>
    </style:style>
    <style:style style:family="text" style:name="T852">
      <style:text-properties fo:color="#000000" fo:font-family="Liberation Serif" style:font-family-complex="Liberation Serif" fo:font-size="12pt" style:font-size-complex="12pt" fo:language="de" style:language-complex="hi" fo:country="DE" style:country-complex="IN"/>
    </style:style>
    <style:style style:parent-style-name="747" style:family="paragraph" style:name="P159">
      <style:paragraph-properties/>
      <style:text-properties fo:color="#000000" fo:font-family="Liberation Sans" style:font-family-complex="Liberation Sans" fo:font-size="16pt" style:font-size-complex="16pt" fo:language="de" style:language-complex="hi" fo:country="DE" style:country-complex="IN" fo:font-weight="bold"/>
    </style:style>
    <style:style style:family="text" style:name="T853">
      <style:text-properties fo:color="#000000" fo:font-family="Liberation Sans" style:font-family-complex="Liberation Sans" fo:font-size="16pt" style:font-size-complex="16pt" fo:language="de" style:language-complex="hi" fo:country="DE" style:country-complex="IN" fo:font-weight="bold"/>
    </style:style>
    <style:style style:family="text" style:name="T854">
      <style:text-properties fo:color="#000000" fo:font-family="Liberation Sans" style:font-family-complex="Liberation Sans" fo:font-size="16pt" style:font-size-complex="16pt" fo:language="de" style:language-complex="hi" fo:country="DE" style:country-complex="IN" fo:font-weight="bold"/>
    </style:style>
    <style:style style:family="text" style:name="T855">
      <style:text-properties fo:color="#000000" fo:font-family="Liberation Sans" style:font-family-complex="Liberation Sans" fo:font-size="16pt" style:font-size-complex="16pt" fo:language="de" style:language-complex="hi" fo:country="DE" style:country-complex="IN" fo:font-weight="bold"/>
    </style:style>
    <style:style style:family="text" style:name="T856">
      <style:text-properties fo:color="#000000" fo:font-family="Liberation Sans" style:font-family-complex="Liberation Sans" fo:font-size="16pt" style:font-size-complex="16pt" fo:language="de" style:language-complex="hi" fo:country="DE" style:country-complex="IN" fo:font-weight="bold"/>
    </style:style>
    <style:style style:family="text" style:name="T857">
      <style:text-properties fo:color="#000000" fo:font-family="Liberation Sans" style:font-family-complex="Liberation Sans" fo:font-size="16pt" style:font-size-complex="16pt" fo:language="de" style:language-complex="hi" fo:country="DE" style:country-complex="IN" fo:font-weight="bold"/>
    </style:style>
    <style:style style:parent-style-name="737" style:family="paragraph" style:name="P160">
      <style:paragraph-properties fo:margin-left="0cm" fo:margin-right="0cm" fo:text-indent="0cm" fo:margin-top="3pt" fo:margin-bottom="3pt"/>
      <style:text-properties fo:color="#000000" fo:font-family="Liberation Serif" style:font-family-complex="Liberation Serif" fo:font-size="12pt" style:font-size-complex="12pt" fo:language="de" style:language-complex="hi" fo:country="DE" style:country-complex="IN"/>
    </style:style>
    <style:style style:family="text" style:name="T858">
      <style:text-properties fo:color="#000000" fo:font-family="Liberation Serif" style:font-family-complex="Liberation Serif" fo:font-size="12pt" style:font-size-complex="12pt" fo:language="de" style:language-complex="hi" fo:country="DE" style:country-complex="IN"/>
    </style:style>
    <style:style style:family="text" style:name="T859">
      <style:text-properties fo:color="#000000" fo:font-family="Liberation Serif" style:font-family-complex="Liberation Serif" fo:font-size="12pt" style:font-size-complex="12pt" fo:language="de" style:language-complex="hi" fo:country="DE" style:country-complex="IN"/>
    </style:style>
    <style:style style:family="text" style:name="T860">
      <style:text-properties fo:color="#000000" fo:font-family="Liberation Serif" style:font-family-complex="Liberation Serif" fo:font-size="12pt" style:font-size-complex="12pt" fo:language="de" style:language-complex="hi" fo:country="DE" style:country-complex="IN"/>
    </style:style>
    <style:style style:family="text" style:name="T861">
      <style:text-properties fo:color="#000000" fo:font-family="Liberation Serif" style:font-family-complex="Liberation Serif" fo:font-size="12pt" style:font-size-complex="12pt" fo:language="de" style:language-complex="hi" fo:country="DE" style:country-complex="IN"/>
    </style:style>
    <style:style style:family="text" style:name="T862">
      <style:text-properties fo:color="#000000" fo:font-family="Liberation Serif" style:font-family-complex="Liberation Serif" fo:font-size="12pt" style:font-size-complex="12pt" fo:language="de" style:language-complex="hi" fo:country="DE" style:country-complex="IN"/>
    </style:style>
    <style:style style:family="text" style:name="T863">
      <style:text-properties fo:color="#000000" fo:font-family="Liberation Serif" style:font-family-complex="Liberation Serif" fo:font-size="12pt" style:font-size-complex="12pt" fo:language="de" style:language-complex="hi" fo:country="DE" style:country-complex="IN"/>
    </style:style>
    <style:style style:family="text" style:name="T864">
      <style:text-properties fo:color="#000000" fo:font-family="Liberation Serif" style:font-family-complex="Liberation Serif" fo:font-size="12pt" style:font-size-complex="12pt" fo:language="de" style:language-complex="hi" fo:country="DE" style:country-complex="IN"/>
    </style:style>
    <style:style style:family="text" style:name="T865">
      <style:text-properties fo:color="#000000" fo:font-family="Liberation Serif" style:font-family-complex="Liberation Serif" fo:font-size="12pt" style:font-size-complex="12pt" fo:language="de" style:language-complex="hi" fo:country="DE" style:country-complex="IN"/>
    </style:style>
    <style:style style:parent-style-name="737" style:family="paragraph" style:name="P161">
      <style:paragraph-properties fo:margin-left="0cm" fo:margin-right="0cm" fo:text-indent="0cm" fo:margin-top="3pt" fo:margin-bottom="3pt"/>
      <style:text-properties fo:color="#000000" fo:font-family="Liberation Serif" style:font-family-complex="Liberation Serif" fo:font-size="12pt" style:font-size-complex="12pt" fo:language="de" style:language-complex="hi" fo:country="DE" style:country-complex="IN"/>
    </style:style>
    <style:style style:family="text" style:name="T866">
      <style:text-properties fo:color="#000000" fo:font-family="Liberation Serif" style:font-family-complex="Liberation Serif" fo:font-size="12pt" style:font-size-complex="12pt" fo:language="de" style:language-complex="hi" fo:country="DE" style:country-complex="IN"/>
    </style:style>
    <style:style style:family="text" style:name="T867">
      <style:text-properties fo:color="#000000" fo:font-family="Liberation Serif" style:font-family-complex="Liberation Serif" fo:font-size="12pt" style:font-size-complex="12pt" fo:language="de" style:language-complex="hi" fo:country="DE" style:country-complex="IN"/>
    </style:style>
    <style:style style:family="text" style:name="T868">
      <style:text-properties fo:color="#000000" fo:font-family="Liberation Serif" style:font-family-complex="Liberation Serif" fo:font-size="12pt" style:font-size-complex="12pt" fo:language="de" style:language-complex="hi" fo:country="DE" style:country-complex="IN"/>
    </style:style>
    <style:style style:parent-style-name="737" style:family="paragraph" style:name="P162">
      <style:paragraph-properties fo:margin-left="0cm" fo:margin-right="0cm" fo:text-indent="0cm" fo:margin-top="3pt" fo:margin-bottom="3pt"/>
      <style:text-properties fo:color="#000000" fo:font-family="Liberation Serif" style:font-family-complex="Liberation Serif" fo:font-size="12pt" style:font-size-complex="12pt" fo:language="de" style:language-complex="hi" fo:country="DE" style:country-complex="IN"/>
    </style:style>
    <style:style style:family="text" style:name="T869">
      <style:text-properties fo:color="#000000" fo:font-family="Liberation Serif" style:font-family-complex="Liberation Serif" fo:font-size="12pt" style:font-size-complex="12pt" fo:language="de" style:language-complex="hi" fo:country="DE" style:country-complex="IN"/>
    </style:style>
    <style:style style:family="text" style:name="T870">
      <style:text-properties fo:color="#000000" fo:font-family="Liberation Serif" style:font-family-complex="Liberation Serif" fo:font-size="12pt" style:font-size-complex="12pt" fo:language="de" style:language-complex="hi" fo:country="DE" style:country-complex="IN"/>
    </style:style>
    <style:style style:family="text" style:name="T871">
      <style:text-properties fo:color="#000000" fo:font-family="Liberation Serif" style:font-family-complex="Liberation Serif" fo:font-size="12pt" style:font-size-complex="12pt" fo:language="de" style:language-complex="hi" fo:country="DE" style:country-complex="IN"/>
    </style:style>
    <style:style style:family="text" style:name="T872">
      <style:text-properties fo:color="#000000" fo:font-family="Liberation Serif" style:font-family-complex="Liberation Serif" fo:font-size="12pt" style:font-size-complex="12pt" fo:language="de" style:language-complex="hi" fo:country="DE" style:country-complex="IN"/>
    </style:style>
    <style:style style:family="text" style:name="T873">
      <style:text-properties fo:color="#000000" fo:font-family="Liberation Serif" style:font-family-complex="Liberation Serif" fo:font-size="12pt" style:font-size-complex="12pt" fo:language="de" style:language-complex="hi" fo:country="DE" style:country-complex="IN"/>
    </style:style>
    <style:style style:family="text" style:name="T874">
      <style:text-properties fo:color="#000000" fo:font-family="Liberation Serif" style:font-family-complex="Liberation Serif" fo:font-size="12pt" style:font-size-complex="12pt" fo:language="de" style:language-complex="hi" fo:country="DE" style:country-complex="IN"/>
    </style:style>
    <style:style style:parent-style-name="737" style:family="paragraph" style:name="P163">
      <style:paragraph-properties fo:text-align="left"/>
      <style:text-properties fo:color="#000000" fo:font-family="Liberation Serif" style:font-family-complex="Liberation Serif" fo:font-size="12pt" style:font-size-complex="12pt" fo:language="de" style:language-complex="hi" fo:country="DE" style:country-complex="IN"/>
    </style:style>
    <style:style style:family="text" style:name="T875">
      <style:text-properties fo:color="#000000" fo:font-family="Liberation Serif" style:font-family-complex="Liberation Serif" fo:font-size="12pt" style:font-size-complex="12pt" fo:language="de" style:language-complex="hi" fo:country="DE" style:country-complex="IN"/>
    </style:style>
    <style:style style:family="text" style:name="T876">
      <style:text-properties fo:color="#000000" fo:font-family="Liberation Serif" style:font-family-complex="Liberation Serif" fo:font-size="12pt" style:font-size-complex="12pt" fo:language="de" style:language-complex="hi" fo:country="DE" style:country-complex="IN"/>
    </style:style>
    <style:style style:family="text" style:name="T877">
      <style:text-properties fo:color="#000000" fo:font-family="Liberation Serif" style:font-family-complex="Liberation Serif" fo:font-size="12pt" style:font-size-complex="12pt" fo:language="de" style:language-complex="hi" fo:country="DE" style:country-complex="IN"/>
    </style:style>
    <style:style style:parent-style-name="747" style:family="paragraph" style:name="P164">
      <style:paragraph-properties/>
      <style:text-properties fo:color="#000000" fo:font-family="Liberation Sans" style:font-family-complex="Liberation Sans" fo:font-size="16pt" style:font-size-complex="16pt" fo:language="de" style:language-complex="hi" fo:country="DE" style:country-complex="IN" fo:font-weight="bold"/>
    </style:style>
    <style:style style:family="text" style:name="T878">
      <style:text-properties fo:color="#000000" fo:font-family="Liberation Sans" style:font-family-complex="Liberation Sans" fo:font-size="16pt" style:font-size-complex="16pt" fo:language="de" style:language-complex="hi" fo:country="DE" style:country-complex="IN" fo:font-weight="bold"/>
    </style:style>
    <style:style style:family="text" style:name="T879">
      <style:text-properties fo:color="#000000" fo:font-family="Liberation Sans" style:font-family-complex="Liberation Sans" fo:font-size="16pt" style:font-size-complex="16pt" fo:language="de" style:language-complex="hi" fo:country="DE" style:country-complex="IN" fo:font-weight="bold"/>
    </style:style>
    <style:style style:family="text" style:name="T880">
      <style:text-properties fo:color="#000000" fo:font-family="Liberation Sans" style:font-family-complex="Liberation Sans" fo:font-size="16pt" style:font-size-complex="16pt" fo:language="de" style:language-complex="hi" fo:country="DE" style:country-complex="IN" fo:font-weight="bold"/>
    </style:style>
    <style:style style:family="text" style:name="T881">
      <style:text-properties fo:color="#000000" fo:font-family="Liberation Sans" style:font-family-complex="Liberation Sans" fo:font-size="16pt" style:font-size-complex="16pt" fo:language="de" style:language-complex="hi" fo:country="DE" style:country-complex="IN" fo:font-weight="bold"/>
    </style:style>
    <style:style style:family="text" style:name="T882">
      <style:text-properties fo:color="#000000" fo:font-family="Liberation Sans" style:font-family-complex="Liberation Sans" fo:font-size="16pt" style:font-size-complex="16pt" fo:language="de" style:language-complex="hi" fo:country="DE" style:country-complex="IN" fo:font-weight="bold"/>
    </style:style>
    <style:style style:parent-style-name="737" style:family="paragraph" style:name="P165">
      <style:paragraph-properties fo:text-align="left"/>
      <style:text-properties fo:color="#000000" fo:font-family="Liberation Serif" style:font-family-complex="Liberation Serif" fo:font-size="12pt" style:font-size-complex="12pt" fo:language="de" style:language-complex="hi" fo:country="DE" style:country-complex="IN"/>
    </style:style>
    <style:style style:family="text" style:name="T883">
      <style:text-properties fo:color="#000000" fo:font-family="Liberation Serif" style:font-family-complex="Liberation Serif" fo:font-size="12pt" style:font-size-complex="12pt" fo:language="de" style:language-complex="hi" fo:country="DE" style:country-complex="IN"/>
    </style:style>
    <style:style style:family="text" style:name="T884">
      <style:text-properties fo:color="#000000" fo:font-family="Liberation Serif" style:font-family-complex="Liberation Serif" fo:font-size="12pt" style:font-size-complex="12pt" fo:language="de" style:language-complex="hi" fo:country="DE" style:country-complex="IN"/>
    </style:style>
    <style:style style:family="text" style:name="T885">
      <style:text-properties fo:color="#000000" fo:font-family="Liberation Serif" style:font-family-complex="Liberation Serif" fo:font-size="12pt" style:font-size-complex="12pt" fo:language="de" style:language-complex="hi" fo:country="DE" style:country-complex="IN"/>
    </style:style>
    <style:style style:family="text" style:name="T886">
      <style:text-properties fo:color="#000000" fo:font-family="Liberation Serif" style:font-family-complex="Liberation Serif" fo:font-size="12pt" style:font-size-complex="12pt" fo:language="de" style:language-complex="hi" fo:country="DE" style:country-complex="IN"/>
    </style:style>
    <style:style style:family="text" style:name="T887">
      <style:text-properties fo:color="#000000" fo:font-family="Liberation Serif" style:font-family-complex="Liberation Serif" fo:font-size="12pt" style:font-size-complex="12pt" fo:language="de" style:language-complex="hi" fo:country="DE" style:country-complex="IN"/>
    </style:style>
    <style:style style:parent-style-name="737" style:family="paragraph" style:name="P166">
      <style:paragraph-properties fo:text-align="left"/>
      <style:text-properties fo:color="#000000" fo:font-family="Liberation Serif" style:font-family-complex="Liberation Serif" fo:font-size="12pt" style:font-size-complex="12pt" fo:language="de" style:language-complex="hi" fo:country="DE" style:country-complex="IN"/>
    </style:style>
    <style:style style:family="text" style:name="T888">
      <style:text-properties fo:color="#000000" fo:font-family="Liberation Serif" style:font-family-complex="Liberation Serif" fo:font-size="12pt" style:font-size-complex="12pt" fo:language="de" style:language-complex="hi" fo:country="DE" style:country-complex="IN"/>
    </style:style>
    <style:style style:family="text" style:name="T889">
      <style:text-properties fo:color="#000000" fo:font-family="Liberation Serif" style:font-family-complex="Liberation Serif" fo:font-size="12pt" style:font-size-complex="12pt" fo:language="de" style:language-complex="hi" fo:country="DE" style:country-complex="IN"/>
    </style:style>
    <style:style style:family="text" style:name="T890">
      <style:text-properties fo:color="#000000" fo:font-family="Liberation Serif" style:font-family-complex="Liberation Serif" fo:font-size="12pt" style:font-size-complex="12pt" fo:language="de" style:language-complex="hi" fo:country="DE" style:country-complex="IN"/>
    </style:style>
    <style:style style:family="text" style:name="T891">
      <style:text-properties fo:color="#000000" fo:font-family="Liberation Serif" style:font-family-complex="Liberation Serif" fo:font-size="12pt" style:font-size-complex="12pt" fo:language="de" style:language-complex="hi" fo:country="DE" style:country-complex="IN"/>
    </style:style>
    <style:style style:family="text" style:name="T892">
      <style:text-properties fo:color="#000000" fo:font-family="Liberation Serif" style:font-family-complex="Liberation Serif" fo:font-size="12pt" style:font-size-complex="12pt" fo:language="de" style:language-complex="hi" fo:country="DE" style:country-complex="IN"/>
    </style:style>
    <style:style style:parent-style-name="737" style:family="paragraph" style:name="P167">
      <style:paragraph-properties fo:text-align="left"/>
      <style:text-properties fo:color="#000000" fo:font-family="Liberation Serif" style:font-family-complex="Liberation Serif" fo:font-size="12pt" style:font-size-complex="12pt" fo:language="de" style:language-complex="hi" fo:country="DE" style:country-complex="IN"/>
    </style:style>
    <style:style style:family="text" style:name="T893">
      <style:text-properties fo:color="#000000" fo:font-family="Liberation Serif" style:font-family-complex="Liberation Serif" fo:font-size="12pt" style:font-size-complex="12pt" fo:language="de" style:language-complex="hi" fo:country="DE" style:country-complex="IN"/>
    </style:style>
    <style:style style:family="text" style:name="T894">
      <style:text-properties fo:color="#000000" fo:font-family="Liberation Serif" style:font-family-complex="Liberation Serif" fo:font-size="12pt" style:font-size-complex="12pt" fo:language="de" style:language-complex="hi" fo:country="DE" style:country-complex="IN"/>
    </style:style>
    <style:style style:family="text" style:name="T895">
      <style:text-properties fo:color="#000000" fo:font-family="Liberation Serif" style:font-family-complex="Liberation Serif" fo:font-size="12pt" style:font-size-complex="12pt" fo:language="de" style:language-complex="hi" fo:country="DE" style:country-complex="IN"/>
    </style:style>
    <style:style style:family="text" style:name="T896">
      <style:text-properties fo:color="#000000" fo:font-family="Liberation Serif" style:font-family-complex="Liberation Serif" fo:font-size="12pt" style:font-size-complex="12pt" fo:language="de" style:language-complex="hi" fo:country="DE" style:country-complex="IN"/>
    </style:style>
    <style:style style:family="text" style:name="T897">
      <style:text-properties fo:color="#000000" fo:font-family="Liberation Serif" style:font-family-complex="Liberation Serif" fo:font-size="12pt" style:font-size-complex="12pt" fo:language="de" style:language-complex="hi" fo:country="DE" style:country-complex="IN"/>
    </style:style>
    <style:style style:parent-style-name="737" style:family="paragraph" style:name="P168">
      <style:paragraph-properties fo:text-align="left"/>
      <style:text-properties fo:color="#000000" fo:font-family="Liberation Serif" style:font-family-complex="Liberation Serif" fo:font-size="12pt" style:font-size-complex="12pt" fo:language="de" style:language-complex="hi" fo:country="DE" style:country-complex="IN"/>
    </style:style>
    <style:style style:family="text" style:name="T898">
      <style:text-properties fo:color="#000000" fo:font-family="Liberation Serif" style:font-family-complex="Liberation Serif" fo:font-size="12pt" style:font-size-complex="12pt" fo:language="de" style:language-complex="hi" fo:country="DE" style:country-complex="IN"/>
    </style:style>
    <style:style style:family="text" style:name="T899">
      <style:text-properties fo:color="#000000" fo:font-family="Liberation Serif" style:font-family-complex="Liberation Serif" fo:font-size="12pt" style:font-size-complex="12pt" fo:language="de" style:language-complex="hi" fo:country="DE" style:country-complex="IN"/>
    </style:style>
    <style:style style:family="text" style:name="T900">
      <style:text-properties fo:color="#000000" fo:font-family="Liberation Serif" style:font-family-complex="Liberation Serif" fo:font-size="12pt" style:font-size-complex="12pt" fo:language="de" style:language-complex="hi" fo:country="DE" style:country-complex="IN"/>
    </style:style>
    <style:style style:parent-style-name="747" style:family="paragraph" style:name="P169">
      <style:paragraph-properties/>
      <style:text-properties fo:color="#000000" fo:font-family="Liberation Sans" style:font-family-complex="Liberation Sans" fo:font-size="16pt" style:font-size-complex="16pt" fo:language="de" style:language-complex="hi" fo:country="DE" style:country-complex="IN" fo:font-weight="bold"/>
    </style:style>
    <style:style style:family="text" style:name="T901">
      <style:text-properties fo:color="#000000" fo:font-family="Liberation Sans" style:font-family-complex="Liberation Sans" fo:font-size="16pt" style:font-size-complex="16pt" fo:language="de" style:language-complex="hi" fo:country="DE" style:country-complex="IN" fo:font-weight="bold"/>
    </style:style>
    <style:style style:family="text" style:name="T902">
      <style:text-properties fo:language="de" style:language-complex="hi" fo:country="DE" style:country-complex="IN"/>
    </style:style>
    <style:style style:family="text" style:name="T903">
      <style:text-properties fo:language="de" style:language-complex="hi" fo:country="DE" style:country-complex="IN"/>
    </style:style>
    <style:style style:family="text" style:name="T904">
      <style:text-properties fo:language="de" style:language-complex="hi" fo:country="DE" style:country-complex="IN"/>
    </style:style>
    <style:style style:family="text" style:name="T905">
      <style:text-properties fo:language="de" style:language-complex="hi" fo:country="DE" style:country-complex="IN"/>
    </style:style>
    <style:style style:family="text" style:name="T906">
      <style:text-properties fo:language="de" style:language-complex="hi" fo:country="DE" style:country-complex="IN"/>
    </style:style>
    <style:style style:family="text" style:name="T907">
      <style:text-properties fo:language="de" style:language-complex="hi" fo:country="DE" style:country-complex="IN"/>
    </style:style>
    <style:style style:parent-style-name="737" style:family="paragraph" style:name="P170">
      <style:paragraph-properties fo:text-align="left"/>
      <style:text-properties fo:color="#000000" fo:font-family="Liberation Serif" style:font-family-complex="Liberation Serif" fo:font-size="12pt" style:font-size-complex="12pt" fo:language="de" style:language-complex="hi" fo:country="DE" style:country-complex="IN"/>
    </style:style>
    <style:style style:family="text" style:name="T908">
      <style:text-properties fo:color="#000000" fo:font-family="Liberation Serif" style:font-family-complex="Liberation Serif" fo:font-size="12pt" style:font-size-complex="12pt" fo:language="de" style:language-complex="hi" fo:country="DE" style:country-complex="IN"/>
    </style:style>
    <style:style style:family="text" style:name="T909">
      <style:text-properties fo:color="#000000" fo:font-family="Liberation Serif" style:font-family-complex="Liberation Serif" fo:font-size="12pt" style:font-size-complex="12pt" fo:language="de" style:language-complex="hi" fo:country="DE" style:country-complex="IN"/>
    </style:style>
    <style:style style:family="text" style:name="T910">
      <style:text-properties fo:color="#000000" fo:font-family="Liberation Serif" style:font-family-complex="Liberation Serif" fo:font-size="12pt" style:font-size-complex="12pt" fo:language="de" style:language-complex="hi" fo:country="DE" style:country-complex="IN"/>
    </style:style>
    <style:style style:family="text" style:name="T911">
      <style:text-properties fo:color="#000000" fo:font-family="Liberation Serif" style:font-family-complex="Liberation Serif" fo:font-size="12pt" style:font-size-complex="12pt" fo:language="de" style:language-complex="hi" fo:country="DE" style:country-complex="IN"/>
    </style:style>
    <style:style style:parent-style-name="737" style:family="paragraph" style:name="P171">
      <style:paragraph-properties fo:text-align="left"/>
      <style:text-properties fo:color="#000000" fo:font-family="Liberation Serif" style:font-family-complex="Liberation Serif" fo:font-size="12pt" style:font-size-complex="12pt" fo:language="de" style:language-complex="hi" fo:country="DE" style:country-complex="IN"/>
    </style:style>
    <style:style style:family="text" style:name="T912">
      <style:text-properties fo:color="#000000" fo:font-family="Liberation Serif" style:font-family-complex="Liberation Serif" fo:font-size="12pt" style:font-size-complex="12pt" fo:language="de" style:language-complex="hi" fo:country="DE" style:country-complex="IN"/>
    </style:style>
    <style:style style:family="text" style:name="T913">
      <style:text-properties fo:color="#000000" fo:font-family="Liberation Serif" style:font-family-complex="Liberation Serif" fo:font-size="12pt" style:font-size-complex="12pt" fo:language="de" style:language-complex="hi" fo:country="DE" style:country-complex="IN"/>
    </style:style>
    <style:style style:family="text" style:name="T914">
      <style:text-properties fo:color="#000000" fo:font-family="Liberation Serif" style:font-family-complex="Liberation Serif" fo:font-size="12pt" style:font-size-complex="12pt" fo:language="de" style:language-complex="hi" fo:country="DE" style:country-complex="IN"/>
    </style:style>
    <style:style style:parent-style-name="737" style:family="paragraph" style:name="P172">
      <style:paragraph-properties fo:text-align="left"/>
      <style:text-properties fo:color="#000000" fo:font-family="Liberation Serif" style:font-family-complex="Liberation Serif" fo:font-size="12pt" style:font-size-complex="12pt" fo:language="de" style:language-complex="hi" fo:country="DE" style:country-complex="IN"/>
    </style:style>
    <style:style style:family="text" style:name="T915">
      <style:text-properties fo:color="#000000" fo:font-family="Liberation Serif" style:font-family-complex="Liberation Serif" fo:font-size="12pt" style:font-size-complex="12pt" fo:language="de" style:language-complex="hi" fo:country="DE" style:country-complex="IN"/>
    </style:style>
    <style:style style:family="text" style:name="T916">
      <style:text-properties fo:color="#000000" fo:font-family="Liberation Serif" style:font-family-complex="Liberation Serif" fo:font-size="12pt" style:font-size-complex="12pt" fo:language="de" style:language-complex="hi" fo:country="DE" style:country-complex="IN"/>
    </style:style>
    <style:style style:family="text" style:name="T917">
      <style:text-properties fo:color="#000000" fo:font-family="Liberation Serif" style:font-family-complex="Liberation Serif" fo:font-size="12pt" style:font-size-complex="12pt" fo:language="de" style:language-complex="hi" fo:country="DE" style:country-complex="IN"/>
    </style:style>
    <style:style style:family="text" style:name="T918">
      <style:text-properties fo:color="#000000" fo:font-family="Liberation Serif" style:font-family-complex="Liberation Serif" fo:font-size="12pt" style:font-size-complex="12pt" fo:language="de" style:language-complex="hi" fo:country="DE" style:country-complex="IN"/>
    </style:style>
    <style:style style:family="text" style:name="T919">
      <style:text-properties fo:color="#000000" fo:font-family="Liberation Serif" style:font-family-complex="Liberation Serif" fo:font-size="12pt" style:font-size-complex="12pt" fo:language="de" style:language-complex="hi" fo:country="DE" style:country-complex="IN"/>
    </style:style>
    <style:style style:parent-style-name="737" style:family="paragraph" style:name="P173">
      <style:paragraph-properties fo:text-align="left"/>
      <style:text-properties fo:color="#000000" fo:font-family="Liberation Serif" style:font-family-complex="Liberation Serif" fo:font-size="12pt" style:font-size-complex="12pt" fo:language="de" style:language-complex="hi" fo:country="DE" style:country-complex="IN"/>
    </style:style>
    <style:style style:family="text" style:name="T920">
      <style:text-properties fo:color="#000000" fo:font-family="Liberation Serif" style:font-family-complex="Liberation Serif" fo:font-size="12pt" style:font-size-complex="12pt" fo:language="de" style:language-complex="hi" fo:country="DE" style:country-complex="IN"/>
    </style:style>
    <style:style style:family="text" style:name="T921">
      <style:text-properties fo:color="#000000" fo:font-family="Liberation Serif" style:font-family-complex="Liberation Serif" fo:font-size="12pt" style:font-size-complex="12pt" fo:language="de" style:language-complex="hi" fo:country="DE" style:country-complex="IN"/>
    </style:style>
    <style:style style:family="text" style:name="T922">
      <style:text-properties fo:color="#000000" fo:font-family="Liberation Serif" style:font-family-complex="Liberation Serif" fo:font-size="12pt" style:font-size-complex="12pt" fo:language="de" style:language-complex="hi" fo:country="DE" style:country-complex="IN"/>
    </style:style>
    <style:style style:parent-style-name="747" style:family="paragraph" style:name="P174">
      <style:paragraph-properties/>
      <style:text-properties fo:color="#000000" fo:font-family="Liberation Sans" style:font-family-complex="Liberation Sans" fo:font-size="16pt" style:font-size-complex="16pt" fo:language="de" style:language-complex="hi" fo:country="DE" style:country-complex="IN" fo:font-weight="bold"/>
    </style:style>
    <style:style style:family="text" style:name="T923">
      <style:text-properties fo:color="#000000" fo:font-family="Liberation Sans" style:font-family-complex="Liberation Sans" fo:font-size="16pt" style:font-size-complex="16pt" fo:language="de" style:language-complex="hi" fo:country="DE" style:country-complex="IN" fo:font-weight="bold"/>
    </style:style>
    <style:style style:family="text" style:name="T924">
      <style:text-properties fo:color="#000000" fo:font-family="Liberation Sans" style:font-family-complex="Liberation Sans" fo:font-size="16pt" style:font-size-complex="16pt" fo:language="de" style:language-complex="hi" fo:country="DE" style:country-complex="IN" fo:font-weight="bold"/>
    </style:style>
    <style:style style:family="text" style:name="T925">
      <style:text-properties fo:color="#000000" fo:font-family="Liberation Sans" style:font-family-complex="Liberation Sans" fo:font-size="16pt" style:font-size-complex="16pt" fo:language="de" style:language-complex="hi" fo:country="DE" style:country-complex="IN" fo:font-weight="bold"/>
    </style:style>
    <style:style style:family="text" style:name="T926">
      <style:text-properties fo:color="#000000" fo:font-family="Liberation Sans" style:font-family-complex="Liberation Sans" fo:font-size="16pt" style:font-size-complex="16pt" fo:language="de" style:language-complex="hi" fo:country="DE" style:country-complex="IN" fo:font-weight="bold"/>
    </style:style>
    <style:style style:family="text" style:name="T927">
      <style:text-properties fo:color="#000000" fo:font-family="Liberation Sans" style:font-family-complex="Liberation Sans" fo:font-size="16pt" style:font-size-complex="16pt" fo:language="de" style:language-complex="hi" fo:country="DE" style:country-complex="IN" fo:font-weight="bold"/>
    </style:style>
    <style:style style:parent-style-name="737" style:family="paragraph" style:name="P175">
      <style:paragraph-properties fo:text-align="left"/>
      <style:text-properties fo:color="#000000" fo:font-family="Liberation Serif" style:font-family-complex="Liberation Serif" fo:font-size="12pt" style:font-size-complex="12pt" fo:language="de" style:language-complex="hi" fo:country="DE" style:country-complex="IN" fo:font-weight="normal"/>
    </style:style>
    <style:style style:family="text" style:name="T928">
      <style:text-properties fo:color="#000000" fo:font-family="Liberation Serif" style:font-family-complex="Liberation Serif" fo:font-size="12pt" style:font-size-complex="12pt" fo:language="de" style:language-complex="hi" fo:country="DE" style:country-complex="IN" fo:font-weight="normal"/>
    </style:style>
    <style:style style:family="text" style:name="T929">
      <style:text-properties fo:color="#000000" fo:font-family="Liberation Serif" style:font-family-complex="Liberation Serif" fo:font-size="12pt" style:font-size-complex="12pt" fo:language="de" style:language-complex="hi" fo:country="DE" style:country-complex="IN" fo:font-weight="normal"/>
    </style:style>
    <style:style style:family="text" style:name="T930">
      <style:text-properties fo:color="#000000" fo:font-family="Liberation Serif" style:font-family-complex="Liberation Serif" fo:font-size="12pt" style:font-size-complex="12pt" fo:language="de" style:language-complex="hi" fo:country="DE" style:country-complex="IN" fo:font-weight="normal"/>
    </style:style>
    <style:style style:parent-style-name="737" style:family="paragraph" style:name="P176">
      <style:paragraph-properties fo:text-align="left"/>
      <style:text-properties fo:color="#000000" fo:font-family="Liberation Serif" style:font-family-complex="Liberation Serif" fo:font-size="12pt" style:font-size-complex="12pt" fo:language="de" style:language-complex="hi" fo:country="DE" style:country-complex="IN" fo:font-weight="normal"/>
    </style:style>
    <style:style style:family="text" style:name="T931">
      <style:text-properties fo:color="#000000" fo:font-family="Liberation Serif" style:font-family-complex="Liberation Serif" fo:font-size="12pt" style:font-size-complex="12pt" fo:language="de" style:language-complex="hi" fo:country="DE" style:country-complex="IN" fo:font-weight="normal"/>
    </style:style>
    <style:style style:family="text" style:name="T932">
      <style:text-properties fo:color="#000000" fo:font-family="Liberation Serif" style:font-family-complex="Liberation Serif" fo:font-size="12pt" style:font-size-complex="12pt" fo:language="de" style:language-complex="hi" fo:country="DE" style:country-complex="IN" fo:font-weight="normal"/>
    </style:style>
    <style:style style:family="text" style:name="T933">
      <style:text-properties fo:color="#000000" fo:font-family="Liberation Serif" style:font-family-complex="Liberation Serif" fo:font-size="12pt" style:font-size-complex="12pt" fo:language="de" style:language-complex="hi" fo:country="DE" style:country-complex="IN" fo:font-weight="normal"/>
    </style:style>
    <style:style style:parent-style-name="737" style:family="paragraph" style:name="P177">
      <style:paragraph-properties fo:text-align="left"/>
      <style:text-properties fo:color="#000000" fo:font-family="Liberation Serif" style:font-family-complex="Liberation Serif" fo:font-size="12pt" style:font-size-complex="12pt" fo:language="de" style:language-complex="hi" fo:country="DE" style:country-complex="IN" fo:font-weight="normal"/>
    </style:style>
    <style:style style:family="text" style:name="T934">
      <style:text-properties fo:color="#000000" fo:font-family="Liberation Serif" style:font-family-complex="Liberation Serif" fo:font-size="12pt" style:font-size-complex="12pt" fo:language="de" style:language-complex="hi" fo:country="DE" style:country-complex="IN" fo:font-weight="normal"/>
    </style:style>
    <style:style style:family="text" style:name="T935">
      <style:text-properties fo:color="#000000" fo:font-family="Liberation Serif" style:font-family-complex="Liberation Serif" fo:font-size="12pt" style:font-size-complex="12pt" fo:language="de" style:language-complex="hi" fo:country="DE" style:country-complex="IN" fo:font-weight="normal"/>
    </style:style>
    <style:style style:family="text" style:name="T936">
      <style:text-properties fo:color="#000000" fo:font-family="Liberation Serif" style:font-family-complex="Liberation Serif" fo:font-size="12pt" style:font-size-complex="12pt" fo:language="de" style:language-complex="hi" fo:country="DE" style:country-complex="IN" fo:font-weight="normal"/>
    </style:style>
    <style:style style:parent-style-name="737" style:family="paragraph" style:name="P178">
      <style:paragraph-properties fo:text-align="left"/>
      <style:text-properties fo:color="#000000" fo:font-family="Liberation Serif" style:font-family-complex="Liberation Serif" fo:font-size="12pt" style:font-size-complex="12pt" fo:language="de" style:language-complex="hi" fo:country="DE" style:country-complex="IN" fo:font-weight="normal"/>
    </style:style>
    <style:style style:family="text" style:name="T937">
      <style:text-properties fo:color="#000000" fo:font-family="Liberation Serif" style:font-family-complex="Liberation Serif" fo:font-size="12pt" style:font-size-complex="12pt" fo:language="de" style:language-complex="hi" fo:country="DE" style:country-complex="IN" fo:font-weight="normal"/>
    </style:style>
    <style:style style:family="text" style:name="T938">
      <style:text-properties fo:color="#000000" fo:font-family="Liberation Serif" style:font-family-complex="Liberation Serif" fo:font-size="12pt" style:font-size-complex="12pt" fo:language="de" style:language-complex="hi" fo:country="DE" style:country-complex="IN" fo:font-weight="normal"/>
    </style:style>
    <style:style style:family="text" style:name="T939">
      <style:text-properties fo:color="#000000" fo:font-family="Liberation Serif" style:font-family-complex="Liberation Serif" fo:font-size="12pt" style:font-size-complex="12pt" fo:language="de" style:language-complex="hi" fo:country="DE" style:country-complex="IN" fo:font-weight="normal"/>
    </style:style>
    <style:style style:parent-style-name="737" style:family="paragraph" style:name="P179">
      <style:paragraph-properties fo:text-align="left"/>
      <style:text-properties fo:color="#000000" fo:font-family="Liberation Serif" style:font-family-complex="Liberation Serif" fo:font-size="12pt" style:font-size-complex="12pt" fo:language="de" style:language-complex="hi" fo:country="DE" style:country-complex="IN" fo:font-weight="normal"/>
    </style:style>
    <style:style style:family="text" style:name="T940">
      <style:text-properties fo:color="#000000" fo:font-family="Liberation Serif" style:font-family-complex="Liberation Serif" fo:font-size="12pt" style:font-size-complex="12pt" fo:language="de" style:language-complex="hi" fo:country="DE" style:country-complex="IN" fo:font-weight="normal"/>
    </style:style>
    <style:style style:family="text" style:name="T941">
      <style:text-properties fo:color="#000000" fo:font-family="Liberation Serif" style:font-family-complex="Liberation Serif" fo:font-size="12pt" style:font-size-complex="12pt" fo:language="de" style:language-complex="hi" fo:country="DE" style:country-complex="IN" fo:font-weight="normal"/>
    </style:style>
    <style:style style:family="text" style:name="T942">
      <style:text-properties fo:color="#000000" fo:font-family="Liberation Serif" style:font-family-complex="Liberation Serif" fo:font-size="12pt" style:font-size-complex="12pt" fo:language="de" style:language-complex="hi" fo:country="DE" style:country-complex="IN" fo:font-weight="normal"/>
    </style:style>
    <style:style style:parent-style-name="737" style:family="paragraph" style:name="P180">
      <style:paragraph-properties fo:text-align="left"/>
      <style:text-properties fo:color="#000000" fo:font-family="Liberation Serif" style:font-family-complex="Liberation Serif" fo:font-size="12pt" style:font-size-complex="12pt" fo:language="de" style:language-complex="hi" fo:country="DE" style:country-complex="IN" fo:font-weight="normal"/>
    </style:style>
    <style:style style:family="text" style:name="T943">
      <style:text-properties fo:color="#000000" fo:font-family="Liberation Serif" style:font-family-complex="Liberation Serif" fo:font-size="12pt" style:font-size-complex="12pt" fo:language="de" style:language-complex="hi" fo:country="DE" style:country-complex="IN" fo:font-weight="normal"/>
    </style:style>
    <style:style style:family="text" style:name="T944">
      <style:text-properties fo:color="#000000" fo:font-family="Liberation Serif" style:font-family-complex="Liberation Serif" fo:font-size="12pt" style:font-size-complex="12pt" fo:language="de" style:language-complex="hi" fo:country="DE" style:country-complex="IN" fo:font-weight="normal"/>
    </style:style>
    <style:style style:family="text" style:name="T945">
      <style:text-properties fo:color="#000000" fo:font-family="Liberation Serif" style:font-family-complex="Liberation Serif" fo:font-size="12pt" style:font-size-complex="12pt" fo:language="de" style:language-complex="hi" fo:country="DE" style:country-complex="IN" fo:font-weight="normal"/>
    </style:style>
    <style:style style:parent-style-name="737" style:family="paragraph" style:name="P181">
      <style:paragraph-properties fo:text-align="left"/>
      <style:text-properties fo:color="#000000" fo:font-family="Liberation Serif" style:font-family-complex="Liberation Serif" fo:font-size="12pt" style:font-size-complex="12pt" fo:language="de" style:language-complex="hi" fo:country="DE" style:country-complex="IN" fo:font-weight="normal"/>
    </style:style>
    <style:style style:family="text" style:name="T946">
      <style:text-properties fo:color="#000000" fo:font-family="Liberation Serif" style:font-family-complex="Liberation Serif" fo:font-size="12pt" style:font-size-complex="12pt" fo:language="de" style:language-complex="hi" fo:country="DE" style:country-complex="IN" fo:font-weight="normal"/>
    </style:style>
    <style:style style:family="text" style:name="T947">
      <style:text-properties fo:color="#000000" fo:font-family="Liberation Serif" style:font-family-complex="Liberation Serif" fo:font-size="12pt" style:font-size-complex="12pt" fo:language="de" style:language-complex="hi" fo:country="DE" style:country-complex="IN" fo:font-weight="normal"/>
    </style:style>
    <style:style style:family="text" style:name="T948">
      <style:text-properties fo:color="#000000" fo:font-family="Liberation Serif" style:font-family-complex="Liberation Serif" fo:font-size="12pt" style:font-size-complex="12pt" fo:language="de" style:language-complex="hi" fo:country="DE" style:country-complex="IN" fo:font-weight="normal"/>
    </style:style>
    <style:style style:parent-style-name="737" style:family="paragraph" style:name="P182">
      <style:paragraph-properties fo:text-align="left"/>
      <style:text-properties fo:color="#000000" fo:font-family="Liberation Serif" style:font-family-complex="Liberation Serif" fo:font-size="12pt" style:font-size-complex="12pt" fo:language="de" style:language-complex="hi" fo:country="DE" style:country-complex="IN" fo:font-weight="normal"/>
    </style:style>
    <style:style style:family="text" style:name="T949">
      <style:text-properties fo:color="#000000" fo:font-family="Liberation Serif" style:font-family-complex="Liberation Serif" fo:font-size="12pt" style:font-size-complex="12pt" fo:language="de" style:language-complex="hi" fo:country="DE" style:country-complex="IN" fo:font-weight="normal"/>
    </style:style>
    <style:style style:family="text" style:name="T950">
      <style:text-properties fo:color="#000000" fo:font-family="Liberation Serif" style:font-family-complex="Liberation Serif" fo:font-size="12pt" style:font-size-complex="12pt" fo:language="de" style:language-complex="hi" fo:country="DE" style:country-complex="IN" fo:font-weight="normal"/>
    </style:style>
    <style:style style:family="text" style:name="T951">
      <style:text-properties fo:color="#000000" fo:font-family="Liberation Serif" style:font-family-complex="Liberation Serif" fo:font-size="12pt" style:font-size-complex="12pt" fo:language="de" style:language-complex="hi" fo:country="DE" style:country-complex="IN" fo:font-weight="normal"/>
    </style:style>
    <style:style style:parent-style-name="737" style:family="paragraph" style:name="P183">
      <style:paragraph-properties fo:text-align="left"/>
      <style:text-properties fo:color="#000000" fo:font-family="Liberation Serif" style:font-family-complex="Liberation Serif" fo:font-size="12pt" style:font-size-complex="12pt" fo:language="de" style:language-complex="hi" fo:country="DE" style:country-complex="IN" fo:font-weight="normal"/>
    </style:style>
    <style:style style:family="text" style:name="T952">
      <style:text-properties fo:color="#000000" fo:font-family="Liberation Serif" style:font-family-complex="Liberation Serif" fo:font-size="12pt" style:font-size-complex="12pt" fo:language="de" style:language-complex="hi" fo:country="DE" style:country-complex="IN" fo:font-weight="normal"/>
    </style:style>
    <style:style style:family="text" style:name="T953">
      <style:text-properties fo:color="#000000" fo:font-family="Liberation Serif" style:font-family-complex="Liberation Serif" fo:font-size="12pt" style:font-size-complex="12pt" fo:language="de" style:language-complex="hi" fo:country="DE" style:country-complex="IN" fo:font-weight="normal"/>
    </style:style>
    <style:style style:family="text" style:name="T954">
      <style:text-properties fo:color="#000000" fo:font-family="Liberation Serif" style:font-family-complex="Liberation Serif" fo:font-size="12pt" style:font-size-complex="12pt" fo:language="de" style:language-complex="hi" fo:country="DE" style:country-complex="IN" fo:font-weight="normal"/>
    </style:style>
    <style:style style:family="text" style:name="T955">
      <style:text-properties fo:color="#000000" fo:font-family="Liberation Serif" style:font-family-complex="Liberation Serif" fo:font-size="12pt" style:font-size-complex="12pt" fo:language="de" style:language-complex="hi" fo:country="DE" style:country-complex="IN" fo:font-weight="normal"/>
    </style:style>
    <style:style style:family="text" style:name="T956">
      <style:text-properties fo:color="#000000" fo:font-family="Liberation Serif" style:font-family-complex="Liberation Serif" fo:font-size="12pt" style:font-size-complex="12pt" fo:language="de" style:language-complex="hi" fo:country="DE" style:country-complex="IN" fo:font-weight="normal"/>
    </style:style>
    <style:style style:parent-style-name="737" style:family="paragraph" style:name="P184">
      <style:paragraph-properties fo:text-align="left"/>
      <style:text-properties fo:color="#000000" fo:font-family="Liberation Serif" style:font-family-complex="Liberation Serif" fo:font-size="12pt" style:font-size-complex="12pt" fo:language="de" style:language-complex="hi" fo:country="DE" style:country-complex="IN" fo:font-weight="normal"/>
    </style:style>
    <style:style style:family="text" style:name="T957">
      <style:text-properties fo:color="#000000" fo:font-family="Liberation Serif" style:font-family-complex="Liberation Serif" fo:font-size="12pt" style:font-size-complex="12pt" fo:language="de" style:language-complex="hi" fo:country="DE" style:country-complex="IN" fo:font-weight="normal"/>
    </style:style>
    <style:style style:family="text" style:name="T958">
      <style:text-properties fo:color="#000000" fo:font-family="Liberation Serif" style:font-family-complex="Liberation Serif" fo:font-size="12pt" style:font-size-complex="12pt" fo:language="de" style:language-complex="hi" fo:country="DE" style:country-complex="IN" fo:font-weight="normal"/>
    </style:style>
    <style:style style:family="text" style:name="T959">
      <style:text-properties fo:color="#000000" fo:font-family="Liberation Serif" style:font-family-complex="Liberation Serif" fo:font-size="12pt" style:font-size-complex="12pt" fo:language="de" style:language-complex="hi" fo:country="DE" style:country-complex="IN" fo:font-weight="normal"/>
    </style:style>
    <style:style style:parent-style-name="747" style:family="paragraph" style:name="P185">
      <style:paragraph-properties/>
      <style:text-properties fo:color="#000000" fo:font-family="Liberation Sans" style:font-family-complex="Liberation Sans" fo:font-size="16pt" style:font-size-complex="16pt" fo:language="de" style:language-complex="hi" fo:country="DE" style:country-complex="IN" fo:font-weight="bold"/>
    </style:style>
    <style:style style:family="text" style:name="T960">
      <style:text-properties fo:color="#000000" fo:font-family="Liberation Sans" style:font-family-complex="Liberation Sans" fo:font-size="16pt" style:font-size-complex="16pt" fo:language="de" style:language-complex="hi" fo:country="DE" style:country-complex="IN" fo:font-weight="bold"/>
    </style:style>
    <style:style style:family="text" style:name="T961">
      <style:text-properties fo:color="#000000" fo:font-family="Liberation Sans" style:font-family-complex="Liberation Sans" fo:font-size="16pt" style:font-size-complex="16pt" fo:language="de" style:language-complex="hi" fo:country="DE" style:country-complex="IN" fo:font-weight="bold"/>
    </style:style>
    <style:style style:family="text" style:name="T962">
      <style:text-properties fo:color="#000000" fo:font-family="Liberation Sans" style:font-family-complex="Liberation Sans" fo:font-size="16pt" style:font-size-complex="16pt" fo:language="de" style:language-complex="hi" fo:country="DE" style:country-complex="IN" fo:font-weight="bold"/>
    </style:style>
    <style:style style:family="text" style:name="T963">
      <style:text-properties fo:color="#000000" fo:font-family="Liberation Sans" style:font-family-complex="Liberation Sans" fo:font-size="16pt" style:font-size-complex="16pt" fo:language="de" style:language-complex="hi" fo:country="DE" style:country-complex="IN" fo:font-weight="bold"/>
    </style:style>
    <style:style style:family="text" style:name="T964">
      <style:text-properties fo:color="#000000" fo:font-family="Liberation Sans" style:font-family-complex="Liberation Sans" fo:font-size="16pt" style:font-size-complex="16pt" fo:language="de" style:language-complex="hi" fo:country="DE" style:country-complex="IN" fo:font-weight="bold"/>
    </style:style>
    <style:style style:parent-style-name="737" style:family="paragraph" style:name="P186">
      <style:paragraph-properties fo:text-align="left"/>
      <style:text-properties fo:color="#000000" fo:font-family="Liberation Serif" style:font-family-complex="Liberation Serif" fo:font-size="12pt" style:font-size-complex="12pt" fo:language="de" style:language-complex="hi" fo:country="DE" style:country-complex="IN" fo:font-weight="normal"/>
    </style:style>
    <style:style style:family="text" style:name="T965">
      <style:text-properties fo:color="#000000" fo:font-family="Liberation Serif" style:font-family-complex="Liberation Serif" fo:font-size="12pt" style:font-size-complex="12pt" fo:language="de" style:language-complex="hi" fo:country="DE" style:country-complex="IN" fo:font-weight="normal"/>
    </style:style>
    <style:style style:family="text" style:name="T966">
      <style:text-properties fo:color="#000000" fo:font-family="Liberation Serif" style:font-family-complex="Liberation Serif" fo:font-size="12pt" style:font-size-complex="12pt" fo:language="de" style:language-complex="hi" fo:country="DE" style:country-complex="IN" fo:font-weight="normal"/>
    </style:style>
    <style:style style:family="text" style:name="T967">
      <style:text-properties fo:color="#000000" fo:font-family="Liberation Serif" style:font-family-complex="Liberation Serif" fo:font-size="12pt" style:font-size-complex="12pt" fo:language="de" style:language-complex="hi" fo:country="DE" style:country-complex="IN" fo:font-weight="normal"/>
    </style:style>
    <style:style style:family="text" style:name="T968">
      <style:text-properties fo:color="#000000" fo:font-family="Liberation Serif" style:font-family-complex="Liberation Serif" fo:font-size="12pt" style:font-size-complex="12pt" fo:language="de" style:language-complex="hi" fo:country="DE" style:country-complex="IN" fo:font-weight="normal"/>
    </style:style>
    <style:style style:family="text" style:name="T969">
      <style:text-properties fo:color="#000000" fo:font-family="Liberation Serif" style:font-family-complex="Liberation Serif" fo:font-size="12pt" style:font-size-complex="12pt" fo:language="de" style:language-complex="hi" fo:country="DE" style:country-complex="IN" fo:font-weight="normal"/>
    </style:style>
    <style:style style:parent-style-name="749" style:family="paragraph" style:name="P187">
      <style:paragraph-properties/>
      <style:text-properties fo:color="#000000" fo:font-family="Liberation Sans" style:font-family-complex="Liberation Sans" fo:font-size="18pt" style:font-size-complex="18pt" fo:language="de" style:language-complex="hi" fo:country="DE" style:country-complex="IN" fo:font-weight="bold"/>
    </style:style>
    <style:style style:family="text" style:name="T970">
      <style:text-properties fo:color="#000000" fo:font-family="Liberation Sans" style:font-family-complex="Liberation Sans" fo:font-size="18pt" style:font-size-complex="18pt" fo:language="de" style:language-complex="hi" fo:country="DE" style:country-complex="IN" fo:font-weight="bold"/>
    </style:style>
    <style:style style:family="text" style:name="T971">
      <style:text-properties fo:color="#000000" fo:font-family="Liberation Sans" style:font-family-complex="Liberation Sans" fo:font-size="18pt" style:font-size-complex="18pt" fo:language="de" style:language-complex="hi" fo:country="DE" style:country-complex="IN" fo:font-weight="bold"/>
    </style:style>
    <style:style style:family="text" style:name="T972">
      <style:text-properties fo:color="#000000" fo:font-family="Liberation Sans" style:font-family-complex="Liberation Sans" fo:font-size="18pt" style:font-size-complex="18pt" fo:language="de" style:language-complex="hi" fo:country="DE" style:country-complex="IN" fo:font-weight="bold"/>
    </style:style>
    <style:style style:family="text" style:name="T973">
      <style:text-properties fo:color="#000000" fo:font-family="Liberation Sans" style:font-family-complex="Liberation Sans" fo:font-size="18pt" style:font-size-complex="18pt" fo:language="de" style:language-complex="hi" fo:country="DE" style:country-complex="IN" fo:font-weight="bold"/>
    </style:style>
    <style:style style:family="text" style:name="T974">
      <style:text-properties fo:color="#000000" fo:font-family="Liberation Sans" style:font-family-complex="Liberation Sans" fo:font-size="18pt" style:font-size-complex="18pt" fo:language="de" style:language-complex="hi" fo:country="DE" style:country-complex="IN" fo:font-weight="bold"/>
    </style:style>
    <style:style style:parent-style-name="737" style:family="paragraph" style:name="P188">
      <style:paragraph-properties fo:text-align="left"/>
      <style:text-properties fo:color="#000000" fo:font-family="Liberation Serif" style:font-family-complex="Liberation Serif" fo:font-size="12pt" style:font-size-complex="12pt" fo:language="de" style:language-complex="hi" fo:country="DE" style:country-complex="IN" fo:font-weight="normal"/>
    </style:style>
    <style:style style:family="text" style:name="T975">
      <style:text-properties fo:color="#000000" fo:font-family="Liberation Serif" style:font-family-complex="Liberation Serif" fo:font-size="12pt" style:font-size-complex="12pt" fo:language="de" style:language-complex="hi" fo:country="DE" style:country-complex="IN" fo:font-weight="normal"/>
    </style:style>
    <style:style style:family="text" style:name="T976">
      <style:text-properties fo:color="#000000" fo:font-family="Liberation Serif" style:font-family-complex="Liberation Serif" fo:font-size="12pt" style:font-size-complex="12pt" fo:language="de" style:language-complex="hi" fo:country="DE" style:country-complex="IN" fo:font-weight="normal"/>
    </style:style>
    <style:style style:family="text" style:name="T977">
      <style:text-properties fo:color="#000000" fo:font-family="Liberation Serif" style:font-family-complex="Liberation Serif" fo:font-size="12pt" style:font-size-complex="12pt" fo:language="de" style:language-complex="hi" fo:country="DE" style:country-complex="IN" fo:font-weight="normal"/>
    </style:style>
    <style:style style:parent-style-name="747" style:family="paragraph" style:name="P189">
      <style:paragraph-properties/>
      <style:text-properties fo:color="#000000" fo:font-family="Liberation Sans" style:font-family-complex="Liberation Sans" fo:font-size="16pt" style:font-size-complex="16pt" fo:language="de" style:language-complex="hi" fo:country="DE" style:country-complex="IN" fo:font-weight="bold"/>
    </style:style>
    <style:style style:family="text" style:name="T978">
      <style:text-properties fo:color="#000000" fo:font-family="Liberation Sans" style:font-family-complex="Liberation Sans" fo:font-size="16pt" style:font-size-complex="16pt" fo:language="de" style:language-complex="hi" fo:country="DE" style:country-complex="IN" fo:font-weight="bold"/>
    </style:style>
    <style:style style:family="text" style:name="T979">
      <style:text-properties fo:color="#000000" fo:font-family="Liberation Sans" style:font-family-complex="Liberation Sans" fo:font-size="16pt" style:font-size-complex="16pt" fo:language="de" style:language-complex="hi" fo:country="DE" style:country-complex="IN" fo:font-weight="bold"/>
    </style:style>
    <style:style style:family="text" style:name="T980">
      <style:text-properties fo:color="#000000" fo:font-family="Liberation Sans" style:font-family-complex="Liberation Sans" fo:font-size="16pt" style:font-size-complex="16pt" fo:language="de" style:language-complex="hi" fo:country="DE" style:country-complex="IN" fo:font-weight="bold"/>
    </style:style>
    <style:style style:family="text" style:name="T981">
      <style:text-properties fo:color="#000000" fo:font-family="Liberation Sans" style:font-family-complex="Liberation Sans" fo:font-size="16pt" style:font-size-complex="16pt" fo:language="de" style:language-complex="hi" fo:country="DE" style:country-complex="IN" fo:font-weight="bold"/>
    </style:style>
    <style:style style:family="text" style:name="T982">
      <style:text-properties fo:color="#000000" fo:font-family="Liberation Sans" style:font-family-complex="Liberation Sans" fo:font-size="16pt" style:font-size-complex="16pt" fo:language="de" style:language-complex="hi" fo:country="DE" style:country-complex="IN" fo:font-weight="bold"/>
    </style:style>
    <style:style style:parent-style-name="737" style:family="paragraph" style:name="P190">
      <style:paragraph-properties fo:margin-left="0cm" fo:margin-right="0cm" fo:text-indent="0cm" fo:margin-top="3pt" fo:margin-bottom="3pt"/>
      <style:text-properties fo:color="#000000" fo:font-family="Liberation Serif" style:font-family-complex="Liberation Serif" fo:font-size="12pt" style:font-size-complex="12pt" fo:language="de" style:language-complex="hi" fo:country="DE" style:country-complex="IN"/>
    </style:style>
    <style:style style:family="text" style:name="T983">
      <style:text-properties fo:color="#000000" fo:font-family="Liberation Serif" style:font-family-complex="Liberation Serif" fo:font-size="12pt" style:font-size-complex="12pt" fo:language="de" style:language-complex="hi" fo:country="DE" style:country-complex="IN"/>
    </style:style>
    <style:style style:family="text" style:name="T984">
      <style:text-properties fo:color="#000000" fo:font-family="Liberation Serif" style:font-family-complex="Liberation Serif" fo:font-size="12pt" style:font-size-complex="12pt" fo:language="de" style:language-complex="hi" fo:country="DE" style:country-complex="IN"/>
    </style:style>
    <style:style style:family="text" style:name="T985">
      <style:text-properties fo:color="#000000" fo:font-family="Liberation Serif" style:font-family-complex="Liberation Serif" fo:font-size="12pt" style:font-size-complex="12pt" fo:language="de" style:language-complex="hi" fo:country="DE" style:country-complex="IN"/>
    </style:style>
    <style:style style:parent-style-name="737" style:family="paragraph" style:name="P191">
      <style:paragraph-properties fo:text-align="left"/>
      <style:text-properties fo:color="#000000" fo:font-family="Liberation Serif" style:font-family-complex="Liberation Serif" fo:font-size="12pt" style:font-size-complex="12pt" fo:language="de" style:language-complex="hi" fo:country="DE" style:country-complex="IN" fo:font-weight="normal"/>
    </style:style>
    <style:style style:family="text" style:name="T986">
      <style:text-properties fo:color="#000000" fo:font-family="Liberation Serif" style:font-family-complex="Liberation Serif" fo:font-size="12pt" style:font-size-complex="12pt" fo:language="de" style:language-complex="hi" fo:country="DE" style:country-complex="IN" fo:font-weight="normal"/>
    </style:style>
    <style:style style:family="text" style:name="T987">
      <style:text-properties fo:color="#000000" fo:font-family="Liberation Serif" style:font-family-complex="Liberation Serif" fo:font-size="12pt" style:font-size-complex="12pt" fo:language="de" style:language-complex="hi" fo:country="DE" style:country-complex="IN" fo:font-weight="normal"/>
    </style:style>
    <style:style style:family="text" style:name="T988">
      <style:text-properties fo:color="#000000" fo:font-family="Liberation Serif" style:font-family-complex="Liberation Serif" fo:font-size="12pt" style:font-size-complex="12pt" fo:language="de" style:language-complex="hi" fo:country="DE" style:country-complex="IN" fo:font-weight="normal"/>
    </style:style>
    <style:style style:family="table" style:name="ta1">
      <style:table-properties style:width="16.3cm" fo:margin-left="-0.01588cm" table:align="left"/>
    </style:style>
    <style:style style:family="table-column" style:name="co1">
      <style:table-column-properties style:column-width="12.34cm"/>
    </style:style>
    <style:style style:family="table-column" style:name="co2">
      <style:table-column-properties style:column-width="3.965cm"/>
    </style:style>
    <style:style style:family="table-row" style:name="ro1">
      <style:table-row-properties/>
    </style:style>
    <style:style style:family="table-cell" style:name="ce2">
      <style:table-cell-properties style:vertical-align="top" style:direction="ltr" fo:background-color="#1f4e79" fo:border="0.00882cm solid #CCCCCC" loext:writing-mode="lr-tb" fo:padding-top="0.1411cm" fo:padding-bottom="0.1411cm" fo:padding-left="0.2117cm" fo:padding-right="0.2117cm"/>
    </style:style>
    <style:style style:parent-style-name="737" style:family="paragraph" style:name="P192">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989">
      <style:text-properties fo:color="#ffffff" fo:font-family="Liberation Serif" style:font-family-complex="Liberation Serif" fo:font-size="10pt" style:font-size-complex="10pt" fo:language="de" style:language-complex="hi" fo:country="DE" style:country-complex="IN" fo:font-weight="bold"/>
    </style:style>
    <style:style style:family="text" style:name="T990">
      <style:text-properties fo:color="#000000" fo:font-family="Liberation Serif" style:font-family-complex="Liberation Serif" fo:font-size="12pt" style:font-size-complex="12pt" fo:language="de" style:language-complex="hi" fo:country="DE" style:country-complex="IN"/>
    </style:style>
    <style:style style:family="text" style:name="T991">
      <style:text-properties fo:color="#000000" fo:font-family="Liberation Serif" style:font-family-complex="Liberation Serif" fo:font-size="12pt" style:font-size-complex="12pt" fo:language="de" style:language-complex="hi" fo:country="DE" style:country-complex="IN"/>
    </style:style>
    <style:style style:family="table-cell" style:name="ce3">
      <style:table-cell-properties style:vertical-align="top" style:direction="ltr" fo:background-color="#1f4e79" fo:border="0.00882cm solid #CCCCCC" loext:writing-mode="lr-tb" fo:padding-top="0.1411cm" fo:padding-bottom="0.1411cm" fo:padding-left="0.2117cm" fo:padding-right="0.2117cm"/>
    </style:style>
    <style:style style:parent-style-name="737" style:family="paragraph" style:name="P193">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992">
      <style:text-properties fo:color="#ffffff" fo:font-family="Liberation Serif" style:font-family-complex="Liberation Serif" fo:font-size="10pt" style:font-size-complex="10pt" fo:language="de" style:language-complex="hi" fo:country="DE" style:country-complex="IN" fo:font-weight="bold"/>
    </style:style>
    <style:style style:family="text" style:name="T993">
      <style:text-properties fo:color="#000000" fo:font-family="Liberation Serif" style:font-family-complex="Liberation Serif" fo:font-size="12pt" style:font-size-complex="12pt" fo:language="de" style:language-complex="hi" fo:country="DE" style:country-complex="IN"/>
    </style:style>
    <style:style style:family="text" style:name="T994">
      <style:text-properties fo:color="#000000" fo:font-family="Liberation Serif" style:font-family-complex="Liberation Serif" fo:font-size="12pt" style:font-size-complex="12pt" fo:language="de" style:language-complex="hi" fo:country="DE" style:country-complex="IN"/>
    </style:style>
    <style:style style:family="table-row" style:name="ro2">
      <style:table-row-properties/>
    </style:style>
    <style:style style:family="table-cell" style:name="ce4">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194">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995">
      <style:text-properties fo:color="#000000" fo:font-family="Liberation Serif" style:font-family-complex="Liberation Serif" fo:font-size="10pt" style:font-size-complex="10pt" fo:language="de" style:language-complex="hi" fo:country="DE" style:country-complex="IN"/>
    </style:style>
    <style:style style:family="text" style:name="T996">
      <style:text-properties fo:color="#000000" fo:font-family="Liberation Serif" style:font-family-complex="Liberation Serif" fo:font-size="12pt" style:font-size-complex="12pt" fo:language="de" style:language-complex="hi" fo:country="DE" style:country-complex="IN"/>
    </style:style>
    <style:style style:family="text" style:name="T997">
      <style:text-properties fo:color="#000000" fo:font-family="Liberation Serif" style:font-family-complex="Liberation Serif" fo:font-size="12pt" style:font-size-complex="12pt" fo:language="de" style:language-complex="hi" fo:country="DE" style:country-complex="IN"/>
    </style:style>
    <style:style style:family="table-cell" style:name="ce5">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195">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998">
      <style:text-properties fo:color="#000000" fo:font-family="Liberation Serif" style:font-family-complex="Liberation Serif" fo:font-size="10pt" style:font-size-complex="10pt" fo:language="de" style:language-complex="hi" fo:country="DE" style:country-complex="IN"/>
    </style:style>
    <style:style style:family="text" style:name="T999">
      <style:text-properties fo:color="#000000" fo:font-family="Liberation Serif" style:font-family-complex="Liberation Serif" fo:font-size="12pt" style:font-size-complex="12pt" fo:language="de" style:language-complex="hi" fo:country="DE" style:country-complex="IN"/>
    </style:style>
    <style:style style:family="text" style:name="T1000">
      <style:text-properties fo:color="#000000" fo:font-family="Liberation Serif" style:font-family-complex="Liberation Serif" fo:font-size="12pt" style:font-size-complex="12pt" fo:language="de" style:language-complex="hi" fo:country="DE" style:country-complex="IN"/>
    </style:style>
    <style:style style:family="table-row" style:name="ro3">
      <style:table-row-properties/>
    </style:style>
    <style:style style:family="table-cell" style:name="ce6">
      <style:table-cell-properties style:vertical-align="top" style:direction="ltr" fo:background-color="#f2f2f2" fo:border="0.00882cm solid #CCCCCC" loext:writing-mode="lr-tb" fo:padding-top="0.1411cm" fo:padding-bottom="0.1411cm" fo:padding-left="0.2117cm" fo:padding-right="0.2117cm"/>
    </style:style>
    <style:style style:parent-style-name="737" style:family="paragraph" style:name="P196">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001">
      <style:text-properties fo:color="#000000" fo:font-family="Liberation Serif" style:font-family-complex="Liberation Serif" fo:font-size="10pt" style:font-size-complex="10pt" fo:language="de" style:language-complex="hi" fo:country="DE" style:country-complex="IN"/>
    </style:style>
    <style:style style:family="text" style:name="T1002">
      <style:text-properties fo:color="#000000" fo:font-family="Liberation Serif" style:font-family-complex="Liberation Serif" fo:font-size="12pt" style:font-size-complex="12pt" fo:language="de" style:language-complex="hi" fo:country="DE" style:country-complex="IN"/>
    </style:style>
    <style:style style:family="text" style:name="T1003">
      <style:text-properties fo:color="#000000" fo:font-family="Liberation Serif" style:font-family-complex="Liberation Serif" fo:font-size="12pt" style:font-size-complex="12pt" fo:language="de" style:language-complex="hi" fo:country="DE" style:country-complex="IN"/>
    </style:style>
    <style:style style:family="table-cell" style:name="ce7">
      <style:table-cell-properties style:vertical-align="top" style:direction="ltr" fo:background-color="#f2f2f2" fo:border="0.00882cm solid #CCCCCC" loext:writing-mode="lr-tb" fo:padding-top="0.1411cm" fo:padding-bottom="0.1411cm" fo:padding-left="0.2117cm" fo:padding-right="0.2117cm"/>
    </style:style>
    <style:style style:parent-style-name="737" style:family="paragraph" style:name="P197">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004">
      <style:text-properties fo:color="#000000" fo:font-family="Liberation Serif" style:font-family-complex="Liberation Serif" fo:font-size="10pt" style:font-size-complex="10pt" fo:language="de" style:language-complex="hi" fo:country="DE" style:country-complex="IN"/>
    </style:style>
    <style:style style:family="text" style:name="T1005">
      <style:text-properties fo:color="#000000" fo:font-family="Liberation Serif" style:font-family-complex="Liberation Serif" fo:font-size="12pt" style:font-size-complex="12pt" fo:language="de" style:language-complex="hi" fo:country="DE" style:country-complex="IN"/>
    </style:style>
    <style:style style:family="text" style:name="T1006">
      <style:text-properties fo:color="#000000" fo:font-family="Liberation Serif" style:font-family-complex="Liberation Serif" fo:font-size="12pt" style:font-size-complex="12pt" fo:language="de" style:language-complex="hi" fo:country="DE" style:country-complex="IN"/>
    </style:style>
    <style:style style:family="table-row" style:name="ro4">
      <style:table-row-properties/>
    </style:style>
    <style:style style:family="table-cell" style:name="ce8">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198">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007">
      <style:text-properties fo:color="#000000" fo:font-family="Liberation Serif" style:font-family-complex="Liberation Serif" fo:font-size="10pt" style:font-size-complex="10pt" fo:language="de" style:language-complex="hi" fo:country="DE" style:country-complex="IN"/>
    </style:style>
    <style:style style:family="text" style:name="T1008">
      <style:text-properties fo:color="#000000" fo:font-family="Liberation Serif" style:font-family-complex="Liberation Serif" fo:font-size="12pt" style:font-size-complex="12pt" fo:language="de" style:language-complex="hi" fo:country="DE" style:country-complex="IN"/>
    </style:style>
    <style:style style:family="text" style:name="T1009">
      <style:text-properties fo:color="#000000" fo:font-family="Liberation Serif" style:font-family-complex="Liberation Serif" fo:font-size="12pt" style:font-size-complex="12pt" fo:language="de" style:language-complex="hi" fo:country="DE" style:country-complex="IN"/>
    </style:style>
    <style:style style:family="table-cell" style:name="ce9">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199">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010">
      <style:text-properties fo:color="#000000" fo:font-family="Liberation Serif" style:font-family-complex="Liberation Serif" fo:font-size="10pt" style:font-size-complex="10pt" fo:language="de" style:language-complex="hi" fo:country="DE" style:country-complex="IN"/>
    </style:style>
    <style:style style:family="text" style:name="T1011">
      <style:text-properties fo:color="#000000" fo:font-family="Liberation Serif" style:font-family-complex="Liberation Serif" fo:font-size="12pt" style:font-size-complex="12pt" fo:language="de" style:language-complex="hi" fo:country="DE" style:country-complex="IN"/>
    </style:style>
    <style:style style:family="text" style:name="T1012">
      <style:text-properties fo:color="#000000" fo:font-family="Liberation Serif" style:font-family-complex="Liberation Serif" fo:font-size="12pt" style:font-size-complex="12pt" fo:language="de" style:language-complex="hi" fo:country="DE" style:country-complex="IN"/>
    </style:style>
    <style:style style:family="table-row" style:name="ro5">
      <style:table-row-properties/>
    </style:style>
    <style:style style:family="table-cell" style:name="ce10">
      <style:table-cell-properties style:vertical-align="top" style:direction="ltr" fo:background-color="#f2f2f2" fo:border="0.00882cm solid #CCCCCC" loext:writing-mode="lr-tb" fo:padding-top="0.1411cm" fo:padding-bottom="0.1411cm" fo:padding-left="0.2117cm" fo:padding-right="0.2117cm"/>
    </style:style>
    <style:style style:parent-style-name="737" style:family="paragraph" style:name="P200">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013">
      <style:text-properties fo:color="#000000" fo:font-family="Liberation Serif" style:font-family-complex="Liberation Serif" fo:font-size="10pt" style:font-size-complex="10pt" fo:language="de" style:language-complex="hi" fo:country="DE" style:country-complex="IN"/>
    </style:style>
    <style:style style:family="text" style:name="T1014">
      <style:text-properties fo:color="#000000" fo:font-family="Liberation Serif" style:font-family-complex="Liberation Serif" fo:font-size="12pt" style:font-size-complex="12pt" fo:language="de" style:language-complex="hi" fo:country="DE" style:country-complex="IN"/>
    </style:style>
    <style:style style:family="text" style:name="T1015">
      <style:text-properties fo:color="#000000" fo:font-family="Liberation Serif" style:font-family-complex="Liberation Serif" fo:font-size="12pt" style:font-size-complex="12pt" fo:language="de" style:language-complex="hi" fo:country="DE" style:country-complex="IN"/>
    </style:style>
    <style:style style:family="table-cell" style:name="ce11">
      <style:table-cell-properties style:vertical-align="top" style:direction="ltr" fo:background-color="#f2f2f2" fo:border="0.00882cm solid #CCCCCC" loext:writing-mode="lr-tb" fo:padding-top="0.1411cm" fo:padding-bottom="0.1411cm" fo:padding-left="0.2117cm" fo:padding-right="0.2117cm"/>
    </style:style>
    <style:style style:parent-style-name="737" style:family="paragraph" style:name="P201">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016">
      <style:text-properties fo:color="#000000" fo:font-family="Liberation Serif" style:font-family-complex="Liberation Serif" fo:font-size="10pt" style:font-size-complex="10pt" fo:language="de" style:language-complex="hi" fo:country="DE" style:country-complex="IN"/>
    </style:style>
    <style:style style:family="text" style:name="T1017">
      <style:text-properties fo:color="#000000" fo:font-family="Liberation Serif" style:font-family-complex="Liberation Serif" fo:font-size="12pt" style:font-size-complex="12pt" fo:language="de" style:language-complex="hi" fo:country="DE" style:country-complex="IN"/>
    </style:style>
    <style:style style:family="text" style:name="T1018">
      <style:text-properties fo:color="#000000" fo:font-family="Liberation Serif" style:font-family-complex="Liberation Serif" fo:font-size="12pt" style:font-size-complex="12pt" fo:language="de" style:language-complex="hi" fo:country="DE" style:country-complex="IN"/>
    </style:style>
    <style:style style:family="table-row" style:name="ro6">
      <style:table-row-properties/>
    </style:style>
    <style:style style:family="table-cell" style:name="ce12">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202">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019">
      <style:text-properties fo:color="#000000" fo:font-family="Liberation Serif" style:font-family-complex="Liberation Serif" fo:font-size="10pt" style:font-size-complex="10pt" fo:language="de" style:language-complex="hi" fo:country="DE" style:country-complex="IN"/>
    </style:style>
    <style:style style:family="text" style:name="T1020">
      <style:text-properties fo:color="#000000" fo:font-family="Liberation Serif" style:font-family-complex="Liberation Serif" fo:font-size="12pt" style:font-size-complex="12pt" fo:language="de" style:language-complex="hi" fo:country="DE" style:country-complex="IN"/>
    </style:style>
    <style:style style:family="text" style:name="T1021">
      <style:text-properties fo:color="#000000" fo:font-family="Liberation Serif" style:font-family-complex="Liberation Serif" fo:font-size="12pt" style:font-size-complex="12pt" fo:language="de" style:language-complex="hi" fo:country="DE" style:country-complex="IN"/>
    </style:style>
    <style:style style:family="table-cell" style:name="ce13">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203">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022">
      <style:text-properties fo:color="#000000" fo:font-family="Liberation Serif" style:font-family-complex="Liberation Serif" fo:font-size="10pt" style:font-size-complex="10pt" fo:language="de" style:language-complex="hi" fo:country="DE" style:country-complex="IN"/>
    </style:style>
    <style:style style:family="text" style:name="T1023">
      <style:text-properties fo:color="#000000" fo:font-family="Liberation Serif" style:font-family-complex="Liberation Serif" fo:font-size="12pt" style:font-size-complex="12pt" fo:language="de" style:language-complex="hi" fo:country="DE" style:country-complex="IN"/>
    </style:style>
    <style:style style:family="text" style:name="T1024">
      <style:text-properties fo:color="#000000" fo:font-family="Liberation Serif" style:font-family-complex="Liberation Serif" fo:font-size="12pt" style:font-size-complex="12pt" fo:language="de" style:language-complex="hi" fo:country="DE" style:country-complex="IN"/>
    </style:style>
    <style:style style:family="table-row" style:name="ro7">
      <style:table-row-properties/>
    </style:style>
    <style:style style:family="table-cell" style:name="ce14">
      <style:table-cell-properties style:vertical-align="top" style:direction="ltr" fo:background-color="#f2f2f2" fo:border="0.00882cm solid #CCCCCC" loext:writing-mode="lr-tb" fo:padding-top="0.1411cm" fo:padding-bottom="0.1411cm" fo:padding-left="0.2117cm" fo:padding-right="0.2117cm"/>
    </style:style>
    <style:style style:parent-style-name="737" style:family="paragraph" style:name="P204">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025">
      <style:text-properties fo:color="#000000" fo:font-family="Liberation Serif" style:font-family-complex="Liberation Serif" fo:font-size="10pt" style:font-size-complex="10pt" fo:language="de" style:language-complex="hi" fo:country="DE" style:country-complex="IN"/>
    </style:style>
    <style:style style:family="text" style:name="T1026">
      <style:text-properties fo:color="#000000" fo:font-family="Liberation Serif" style:font-family-complex="Liberation Serif" fo:font-size="12pt" style:font-size-complex="12pt" fo:language="de" style:language-complex="hi" fo:country="DE" style:country-complex="IN"/>
    </style:style>
    <style:style style:family="text" style:name="T1027">
      <style:text-properties fo:color="#000000" fo:font-family="Liberation Serif" style:font-family-complex="Liberation Serif" fo:font-size="12pt" style:font-size-complex="12pt" fo:language="de" style:language-complex="hi" fo:country="DE" style:country-complex="IN"/>
    </style:style>
    <style:style style:family="table-cell" style:name="ce15">
      <style:table-cell-properties style:vertical-align="top" style:direction="ltr" fo:background-color="#f2f2f2" fo:border="0.00882cm solid #CCCCCC" loext:writing-mode="lr-tb" fo:padding-top="0.1411cm" fo:padding-bottom="0.1411cm" fo:padding-left="0.2117cm" fo:padding-right="0.2117cm"/>
    </style:style>
    <style:style style:parent-style-name="737" style:family="paragraph" style:name="P205">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028">
      <style:text-properties fo:color="#000000" fo:font-family="Liberation Serif" style:font-family-complex="Liberation Serif" fo:font-size="10pt" style:font-size-complex="10pt" fo:language="de" style:language-complex="hi" fo:country="DE" style:country-complex="IN"/>
    </style:style>
    <style:style style:family="text" style:name="T1029">
      <style:text-properties fo:color="#000000" fo:font-family="Liberation Serif" style:font-family-complex="Liberation Serif" fo:font-size="12pt" style:font-size-complex="12pt" fo:language="de" style:language-complex="hi" fo:country="DE" style:country-complex="IN"/>
    </style:style>
    <style:style style:family="text" style:name="T1030">
      <style:text-properties fo:color="#000000" fo:font-family="Liberation Serif" style:font-family-complex="Liberation Serif" fo:font-size="12pt" style:font-size-complex="12pt" fo:language="de" style:language-complex="hi" fo:country="DE" style:country-complex="IN"/>
    </style:style>
    <style:style style:family="table-row" style:name="ro8">
      <style:table-row-properties/>
    </style:style>
    <style:style style:family="table-cell" style:name="ce16">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206">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031">
      <style:text-properties fo:color="#000000" fo:font-family="Liberation Serif" style:font-family-complex="Liberation Serif" fo:font-size="10pt" style:font-size-complex="10pt" fo:language="de" style:language-complex="hi" fo:country="DE" style:country-complex="IN"/>
    </style:style>
    <style:style style:family="text" style:name="T1032">
      <style:text-properties fo:color="#000000" fo:font-family="Liberation Serif" style:font-family-complex="Liberation Serif" fo:font-size="12pt" style:font-size-complex="12pt" fo:language="de" style:language-complex="hi" fo:country="DE" style:country-complex="IN"/>
    </style:style>
    <style:style style:family="text" style:name="T1033">
      <style:text-properties fo:color="#000000" fo:font-family="Liberation Serif" style:font-family-complex="Liberation Serif" fo:font-size="12pt" style:font-size-complex="12pt" fo:language="de" style:language-complex="hi" fo:country="DE" style:country-complex="IN"/>
    </style:style>
    <style:style style:family="table-cell" style:name="ce17">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207">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034">
      <style:text-properties fo:color="#000000" fo:font-family="Liberation Serif" style:font-family-complex="Liberation Serif" fo:font-size="10pt" style:font-size-complex="10pt" fo:language="de" style:language-complex="hi" fo:country="DE" style:country-complex="IN"/>
    </style:style>
    <style:style style:family="text" style:name="T1035">
      <style:text-properties fo:color="#000000" fo:font-family="Liberation Serif" style:font-family-complex="Liberation Serif" fo:font-size="12pt" style:font-size-complex="12pt" fo:language="de" style:language-complex="hi" fo:country="DE" style:country-complex="IN"/>
    </style:style>
    <style:style style:family="text" style:name="T1036">
      <style:text-properties fo:color="#000000" fo:font-family="Liberation Serif" style:font-family-complex="Liberation Serif" fo:font-size="12pt" style:font-size-complex="12pt" fo:language="de" style:language-complex="hi" fo:country="DE" style:country-complex="IN"/>
    </style:style>
    <style:style style:family="table-row" style:name="ro9">
      <style:table-row-properties/>
    </style:style>
    <style:style style:family="table-cell" style:name="ce18">
      <style:table-cell-properties style:vertical-align="top" style:direction="ltr" fo:background-color="#f2f2f2" fo:border="0.00882cm solid #CCCCCC" loext:writing-mode="lr-tb" fo:padding-top="0.1411cm" fo:padding-bottom="0.1411cm" fo:padding-left="0.2117cm" fo:padding-right="0.2117cm"/>
    </style:style>
    <style:style style:parent-style-name="737" style:family="paragraph" style:name="P208">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037">
      <style:text-properties fo:color="#000000" fo:font-family="Liberation Serif" style:font-family-complex="Liberation Serif" fo:font-size="10pt" style:font-size-complex="10pt" fo:language="de" style:language-complex="hi" fo:country="DE" style:country-complex="IN"/>
    </style:style>
    <style:style style:family="text" style:name="T1038">
      <style:text-properties fo:color="#000000" fo:font-family="Liberation Serif" style:font-family-complex="Liberation Serif" fo:font-size="12pt" style:font-size-complex="12pt" fo:language="de" style:language-complex="hi" fo:country="DE" style:country-complex="IN"/>
    </style:style>
    <style:style style:family="text" style:name="T1039">
      <style:text-properties fo:color="#000000" fo:font-family="Liberation Serif" style:font-family-complex="Liberation Serif" fo:font-size="12pt" style:font-size-complex="12pt" fo:language="de" style:language-complex="hi" fo:country="DE" style:country-complex="IN"/>
    </style:style>
    <style:style style:family="table-cell" style:name="ce19">
      <style:table-cell-properties style:vertical-align="top" style:direction="ltr" fo:background-color="#f2f2f2" fo:border="0.00882cm solid #CCCCCC" loext:writing-mode="lr-tb" fo:padding-top="0.1411cm" fo:padding-bottom="0.1411cm" fo:padding-left="0.2117cm" fo:padding-right="0.2117cm"/>
    </style:style>
    <style:style style:parent-style-name="737" style:family="paragraph" style:name="P209">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040">
      <style:text-properties fo:color="#000000" fo:font-family="Liberation Serif" style:font-family-complex="Liberation Serif" fo:font-size="10pt" style:font-size-complex="10pt" fo:language="de" style:language-complex="hi" fo:country="DE" style:country-complex="IN"/>
    </style:style>
    <style:style style:family="text" style:name="T1041">
      <style:text-properties fo:color="#000000" fo:font-family="Liberation Serif" style:font-family-complex="Liberation Serif" fo:font-size="12pt" style:font-size-complex="12pt" fo:language="de" style:language-complex="hi" fo:country="DE" style:country-complex="IN"/>
    </style:style>
    <style:style style:family="text" style:name="T1042">
      <style:text-properties fo:color="#000000" fo:font-family="Liberation Serif" style:font-family-complex="Liberation Serif" fo:font-size="12pt" style:font-size-complex="12pt" fo:language="de" style:language-complex="hi" fo:country="DE" style:country-complex="IN"/>
    </style:style>
    <style:style style:family="table-row" style:name="ro10">
      <style:table-row-properties/>
    </style:style>
    <style:style style:family="table-cell" style:name="ce20">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210">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043">
      <style:text-properties fo:color="#000000" fo:font-family="Liberation Serif" style:font-family-complex="Liberation Serif" fo:font-size="10pt" style:font-size-complex="10pt" fo:language="de" style:language-complex="hi" fo:country="DE" style:country-complex="IN"/>
    </style:style>
    <style:style style:family="text" style:name="T1044">
      <style:text-properties fo:color="#000000" fo:font-family="Liberation Serif" style:font-family-complex="Liberation Serif" fo:font-size="12pt" style:font-size-complex="12pt" fo:language="de" style:language-complex="hi" fo:country="DE" style:country-complex="IN"/>
    </style:style>
    <style:style style:family="text" style:name="T1045">
      <style:text-properties fo:color="#000000" fo:font-family="Liberation Serif" style:font-family-complex="Liberation Serif" fo:font-size="12pt" style:font-size-complex="12pt" fo:language="de" style:language-complex="hi" fo:country="DE" style:country-complex="IN"/>
    </style:style>
    <style:style style:family="table-cell" style:name="ce21">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211">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046">
      <style:text-properties fo:color="#000000" fo:font-family="Liberation Serif" style:font-family-complex="Liberation Serif" fo:font-size="10pt" style:font-size-complex="10pt" fo:language="de" style:language-complex="hi" fo:country="DE" style:country-complex="IN"/>
    </style:style>
    <style:style style:family="text" style:name="T1047">
      <style:text-properties fo:color="#000000" fo:font-family="Liberation Serif" style:font-family-complex="Liberation Serif" fo:font-size="12pt" style:font-size-complex="12pt" fo:language="de" style:language-complex="hi" fo:country="DE" style:country-complex="IN"/>
    </style:style>
    <style:style style:family="text" style:name="T1048">
      <style:text-properties fo:color="#000000" fo:font-family="Liberation Serif" style:font-family-complex="Liberation Serif" fo:font-size="12pt" style:font-size-complex="12pt" fo:language="de" style:language-complex="hi" fo:country="DE" style:country-complex="IN"/>
    </style:style>
    <style:style style:family="table-row" style:name="ro11">
      <style:table-row-properties/>
    </style:style>
    <style:style style:family="table-cell" style:name="ce22">
      <style:table-cell-properties style:vertical-align="top" style:direction="ltr" fo:background-color="#f2f2f2" fo:border="0.00882cm solid #CCCCCC" loext:writing-mode="lr-tb" fo:padding-top="0.1411cm" fo:padding-bottom="0.1411cm" fo:padding-left="0.2117cm" fo:padding-right="0.2117cm"/>
    </style:style>
    <style:style style:parent-style-name="737" style:family="paragraph" style:name="P212">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049">
      <style:text-properties fo:color="#000000" fo:font-family="Liberation Serif" style:font-family-complex="Liberation Serif" fo:font-size="10pt" style:font-size-complex="10pt" fo:language="de" style:language-complex="hi" fo:country="DE" style:country-complex="IN"/>
    </style:style>
    <style:style style:family="text" style:name="T1050">
      <style:text-properties fo:color="#000000" fo:font-family="Liberation Serif" style:font-family-complex="Liberation Serif" fo:font-size="12pt" style:font-size-complex="12pt" fo:language="de" style:language-complex="hi" fo:country="DE" style:country-complex="IN"/>
    </style:style>
    <style:style style:family="text" style:name="T1051">
      <style:text-properties fo:color="#000000" fo:font-family="Liberation Serif" style:font-family-complex="Liberation Serif" fo:font-size="12pt" style:font-size-complex="12pt" fo:language="de" style:language-complex="hi" fo:country="DE" style:country-complex="IN"/>
    </style:style>
    <style:style style:family="table-cell" style:name="ce23">
      <style:table-cell-properties style:vertical-align="top" style:direction="ltr" fo:background-color="#f2f2f2" fo:border="0.00882cm solid #CCCCCC" loext:writing-mode="lr-tb" fo:padding-top="0.1411cm" fo:padding-bottom="0.1411cm" fo:padding-left="0.2117cm" fo:padding-right="0.2117cm"/>
    </style:style>
    <style:style style:parent-style-name="737" style:family="paragraph" style:name="P213">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052">
      <style:text-properties fo:color="#000000" fo:font-family="Liberation Serif" style:font-family-complex="Liberation Serif" fo:font-size="10pt" style:font-size-complex="10pt" fo:language="de" style:language-complex="hi" fo:country="DE" style:country-complex="IN"/>
    </style:style>
    <style:style style:family="text" style:name="T1053">
      <style:text-properties fo:color="#000000" fo:font-family="Liberation Serif" style:font-family-complex="Liberation Serif" fo:font-size="12pt" style:font-size-complex="12pt" fo:language="de" style:language-complex="hi" fo:country="DE" style:country-complex="IN"/>
    </style:style>
    <style:style style:family="text" style:name="T1054">
      <style:text-properties fo:color="#000000" fo:font-family="Liberation Serif" style:font-family-complex="Liberation Serif" fo:font-size="12pt" style:font-size-complex="12pt" fo:language="de" style:language-complex="hi" fo:country="DE" style:country-complex="IN"/>
    </style:style>
    <style:style style:family="table-row" style:name="ro12">
      <style:table-row-properties/>
    </style:style>
    <style:style style:family="table-cell" style:name="ce24">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214">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055">
      <style:text-properties fo:color="#000000" fo:font-family="Liberation Serif" style:font-family-complex="Liberation Serif" fo:font-size="10pt" style:font-size-complex="10pt" fo:language="de" style:language-complex="hi" fo:country="DE" style:country-complex="IN"/>
    </style:style>
    <style:style style:family="text" style:name="T1056">
      <style:text-properties fo:color="#000000" fo:font-family="Liberation Serif" style:font-family-complex="Liberation Serif" fo:font-size="12pt" style:font-size-complex="12pt" fo:language="de" style:language-complex="hi" fo:country="DE" style:country-complex="IN"/>
    </style:style>
    <style:style style:family="text" style:name="T1057">
      <style:text-properties fo:color="#000000" fo:font-family="Liberation Serif" style:font-family-complex="Liberation Serif" fo:font-size="12pt" style:font-size-complex="12pt" fo:language="de" style:language-complex="hi" fo:country="DE" style:country-complex="IN"/>
    </style:style>
    <style:style style:family="table-cell" style:name="ce25">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215">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058">
      <style:text-properties fo:color="#000000" fo:font-family="Liberation Serif" style:font-family-complex="Liberation Serif" fo:font-size="10pt" style:font-size-complex="10pt" fo:language="de" style:language-complex="hi" fo:country="DE" style:country-complex="IN"/>
    </style:style>
    <style:style style:family="text" style:name="T1059">
      <style:text-properties fo:color="#000000" fo:font-family="Liberation Serif" style:font-family-complex="Liberation Serif" fo:font-size="12pt" style:font-size-complex="12pt" fo:language="de" style:language-complex="hi" fo:country="DE" style:country-complex="IN"/>
    </style:style>
    <style:style style:family="text" style:name="T1060">
      <style:text-properties fo:color="#000000" fo:font-family="Liberation Serif" style:font-family-complex="Liberation Serif" fo:font-size="12pt" style:font-size-complex="12pt" fo:language="de" style:language-complex="hi" fo:country="DE" style:country-complex="IN"/>
    </style:style>
    <style:style style:family="table-row" style:name="ro13">
      <style:table-row-properties/>
    </style:style>
    <style:style style:family="table-cell" style:name="ce26">
      <style:table-cell-properties style:vertical-align="top" style:direction="ltr" fo:background-color="#f2f2f2" fo:border="0.00882cm solid #CCCCCC" loext:writing-mode="lr-tb" fo:padding-top="0.1411cm" fo:padding-bottom="0.1411cm" fo:padding-left="0.2117cm" fo:padding-right="0.2117cm"/>
    </style:style>
    <style:style style:parent-style-name="737" style:family="paragraph" style:name="P216">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061">
      <style:text-properties fo:color="#000000" fo:font-family="Liberation Serif" style:font-family-complex="Liberation Serif" fo:font-size="10pt" style:font-size-complex="10pt" fo:language="de" style:language-complex="hi" fo:country="DE" style:country-complex="IN"/>
    </style:style>
    <style:style style:family="text" style:name="T1062">
      <style:text-properties fo:color="#000000" fo:font-family="Liberation Serif" style:font-family-complex="Liberation Serif" fo:font-size="12pt" style:font-size-complex="12pt" fo:language="de" style:language-complex="hi" fo:country="DE" style:country-complex="IN"/>
    </style:style>
    <style:style style:family="text" style:name="T1063">
      <style:text-properties fo:color="#000000" fo:font-family="Liberation Serif" style:font-family-complex="Liberation Serif" fo:font-size="12pt" style:font-size-complex="12pt" fo:language="de" style:language-complex="hi" fo:country="DE" style:country-complex="IN"/>
    </style:style>
    <style:style style:family="table-cell" style:name="ce27">
      <style:table-cell-properties style:vertical-align="top" style:direction="ltr" fo:background-color="#f2f2f2" fo:border="0.00882cm solid #CCCCCC" loext:writing-mode="lr-tb" fo:padding-top="0.1411cm" fo:padding-bottom="0.1411cm" fo:padding-left="0.2117cm" fo:padding-right="0.2117cm"/>
    </style:style>
    <style:style style:parent-style-name="737" style:family="paragraph" style:name="P217">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064">
      <style:text-properties fo:color="#000000" fo:font-family="Liberation Serif" style:font-family-complex="Liberation Serif" fo:font-size="10pt" style:font-size-complex="10pt" fo:language="de" style:language-complex="hi" fo:country="DE" style:country-complex="IN"/>
    </style:style>
    <style:style style:family="text" style:name="T1065">
      <style:text-properties fo:color="#000000" fo:font-family="Liberation Serif" style:font-family-complex="Liberation Serif" fo:font-size="12pt" style:font-size-complex="12pt" fo:language="de" style:language-complex="hi" fo:country="DE" style:country-complex="IN"/>
    </style:style>
    <style:style style:family="text" style:name="T1066">
      <style:text-properties fo:color="#000000" fo:font-family="Liberation Serif" style:font-family-complex="Liberation Serif" fo:font-size="12pt" style:font-size-complex="12pt" fo:language="de" style:language-complex="hi" fo:country="DE" style:country-complex="IN"/>
    </style:style>
    <style:style style:family="table-row" style:name="ro14">
      <style:table-row-properties/>
    </style:style>
    <style:style style:family="table-cell" style:name="ce28">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218">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067">
      <style:text-properties fo:color="#000000" fo:font-family="Liberation Serif" style:font-family-complex="Liberation Serif" fo:font-size="10pt" style:font-size-complex="10pt" fo:language="de" style:language-complex="hi" fo:country="DE" style:country-complex="IN"/>
    </style:style>
    <style:style style:family="text" style:name="T1068">
      <style:text-properties fo:color="#000000" fo:font-family="Liberation Serif" style:font-family-complex="Liberation Serif" fo:font-size="12pt" style:font-size-complex="12pt" fo:language="de" style:language-complex="hi" fo:country="DE" style:country-complex="IN"/>
    </style:style>
    <style:style style:family="text" style:name="T1069">
      <style:text-properties fo:color="#000000" fo:font-family="Liberation Serif" style:font-family-complex="Liberation Serif" fo:font-size="12pt" style:font-size-complex="12pt" fo:language="de" style:language-complex="hi" fo:country="DE" style:country-complex="IN"/>
    </style:style>
    <style:style style:family="table-cell" style:name="ce29">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219">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070">
      <style:text-properties fo:color="#000000" fo:font-family="Liberation Serif" style:font-family-complex="Liberation Serif" fo:font-size="10pt" style:font-size-complex="10pt" fo:language="de" style:language-complex="hi" fo:country="DE" style:country-complex="IN"/>
    </style:style>
    <style:style style:family="text" style:name="T1071">
      <style:text-properties fo:color="#000000" fo:font-family="Liberation Serif" style:font-family-complex="Liberation Serif" fo:font-size="12pt" style:font-size-complex="12pt" fo:language="de" style:language-complex="hi" fo:country="DE" style:country-complex="IN"/>
    </style:style>
    <style:style style:family="text" style:name="T1072">
      <style:text-properties fo:color="#000000" fo:font-family="Liberation Serif" style:font-family-complex="Liberation Serif" fo:font-size="12pt" style:font-size-complex="12pt" fo:language="de" style:language-complex="hi" fo:country="DE" style:country-complex="IN"/>
    </style:style>
    <style:style style:family="table-row" style:name="ro15">
      <style:table-row-properties/>
    </style:style>
    <style:style style:family="table-cell" style:name="ce30">
      <style:table-cell-properties style:vertical-align="top" style:direction="ltr" fo:background-color="#f2f2f2" fo:border="0.00882cm solid #CCCCCC" loext:writing-mode="lr-tb" fo:padding-top="0.1411cm" fo:padding-bottom="0.1411cm" fo:padding-left="0.2117cm" fo:padding-right="0.2117cm"/>
    </style:style>
    <style:style style:parent-style-name="737" style:family="paragraph" style:name="P220">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073">
      <style:text-properties fo:color="#000000" fo:font-family="Liberation Serif" style:font-family-complex="Liberation Serif" fo:font-size="10pt" style:font-size-complex="10pt" fo:language="de" style:language-complex="hi" fo:country="DE" style:country-complex="IN"/>
    </style:style>
    <style:style style:family="text" style:name="T1074">
      <style:text-properties fo:color="#000000" fo:font-family="Liberation Serif" style:font-family-complex="Liberation Serif" fo:font-size="12pt" style:font-size-complex="12pt" fo:language="de" style:language-complex="hi" fo:country="DE" style:country-complex="IN"/>
    </style:style>
    <style:style style:family="text" style:name="T1075">
      <style:text-properties fo:color="#000000" fo:font-family="Liberation Serif" style:font-family-complex="Liberation Serif" fo:font-size="12pt" style:font-size-complex="12pt" fo:language="de" style:language-complex="hi" fo:country="DE" style:country-complex="IN"/>
    </style:style>
    <style:style style:family="table-cell" style:name="ce31">
      <style:table-cell-properties style:vertical-align="top" style:direction="ltr" fo:background-color="#f2f2f2" fo:border="0.00882cm solid #CCCCCC" loext:writing-mode="lr-tb" fo:padding-top="0.1411cm" fo:padding-bottom="0.1411cm" fo:padding-left="0.2117cm" fo:padding-right="0.2117cm"/>
    </style:style>
    <style:style style:parent-style-name="737" style:family="paragraph" style:name="P221">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076">
      <style:text-properties fo:color="#000000" fo:font-family="Liberation Serif" style:font-family-complex="Liberation Serif" fo:font-size="10pt" style:font-size-complex="10pt" fo:language="de" style:language-complex="hi" fo:country="DE" style:country-complex="IN"/>
    </style:style>
    <style:style style:family="text" style:name="T1077">
      <style:text-properties fo:color="#000000" fo:font-family="Liberation Serif" style:font-family-complex="Liberation Serif" fo:font-size="12pt" style:font-size-complex="12pt" fo:language="de" style:language-complex="hi" fo:country="DE" style:country-complex="IN"/>
    </style:style>
    <style:style style:family="text" style:name="T1078">
      <style:text-properties fo:color="#000000" fo:font-family="Liberation Serif" style:font-family-complex="Liberation Serif" fo:font-size="12pt" style:font-size-complex="12pt" fo:language="de" style:language-complex="hi" fo:country="DE" style:country-complex="IN"/>
    </style:style>
    <style:style style:family="table-row" style:name="ro16">
      <style:table-row-properties/>
    </style:style>
    <style:style style:family="table-cell" style:name="ce32">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222">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079">
      <style:text-properties fo:color="#000000" fo:font-family="Liberation Serif" style:font-family-complex="Liberation Serif" fo:font-size="10pt" style:font-size-complex="10pt" fo:language="de" style:language-complex="hi" fo:country="DE" style:country-complex="IN"/>
    </style:style>
    <style:style style:family="text" style:name="T1080">
      <style:text-properties fo:color="#000000" fo:font-family="Liberation Serif" style:font-family-complex="Liberation Serif" fo:font-size="12pt" style:font-size-complex="12pt" fo:language="de" style:language-complex="hi" fo:country="DE" style:country-complex="IN"/>
    </style:style>
    <style:style style:family="text" style:name="T1081">
      <style:text-properties fo:color="#000000" fo:font-family="Liberation Serif" style:font-family-complex="Liberation Serif" fo:font-size="12pt" style:font-size-complex="12pt" fo:language="de" style:language-complex="hi" fo:country="DE" style:country-complex="IN"/>
    </style:style>
    <style:style style:family="table-cell" style:name="ce33">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223">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082">
      <style:text-properties fo:color="#000000" fo:font-family="Liberation Serif" style:font-family-complex="Liberation Serif" fo:font-size="10pt" style:font-size-complex="10pt" fo:language="de" style:language-complex="hi" fo:country="DE" style:country-complex="IN"/>
    </style:style>
    <style:style style:family="text" style:name="T1083">
      <style:text-properties fo:color="#000000" fo:font-family="Liberation Serif" style:font-family-complex="Liberation Serif" fo:font-size="12pt" style:font-size-complex="12pt" fo:language="de" style:language-complex="hi" fo:country="DE" style:country-complex="IN"/>
    </style:style>
    <style:style style:family="text" style:name="T1084">
      <style:text-properties fo:color="#000000" fo:font-family="Liberation Serif" style:font-family-complex="Liberation Serif" fo:font-size="12pt" style:font-size-complex="12pt" fo:language="de" style:language-complex="hi" fo:country="DE" style:country-complex="IN"/>
    </style:style>
    <style:style style:family="table-row" style:name="ro17">
      <style:table-row-properties/>
    </style:style>
    <style:style style:family="table-cell" style:name="ce34">
      <style:table-cell-properties style:vertical-align="top" style:direction="ltr" fo:background-color="#f2f2f2" fo:border="0.00882cm solid #CCCCCC" loext:writing-mode="lr-tb" fo:padding-top="0.1411cm" fo:padding-bottom="0.1411cm" fo:padding-left="0.2117cm" fo:padding-right="0.2117cm"/>
    </style:style>
    <style:style style:parent-style-name="737" style:family="paragraph" style:name="P224">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085">
      <style:text-properties fo:color="#000000" fo:font-family="Liberation Serif" style:font-family-complex="Liberation Serif" fo:font-size="10pt" style:font-size-complex="10pt" fo:language="de" style:language-complex="hi" fo:country="DE" style:country-complex="IN"/>
    </style:style>
    <style:style style:family="text" style:name="T1086">
      <style:text-properties fo:color="#000000" fo:font-family="Liberation Serif" style:font-family-complex="Liberation Serif" fo:font-size="12pt" style:font-size-complex="12pt" fo:language="de" style:language-complex="hi" fo:country="DE" style:country-complex="IN"/>
    </style:style>
    <style:style style:family="text" style:name="T1087">
      <style:text-properties fo:color="#000000" fo:font-family="Liberation Serif" style:font-family-complex="Liberation Serif" fo:font-size="12pt" style:font-size-complex="12pt" fo:language="de" style:language-complex="hi" fo:country="DE" style:country-complex="IN"/>
    </style:style>
    <style:style style:family="table-cell" style:name="ce35">
      <style:table-cell-properties style:vertical-align="top" style:direction="ltr" fo:background-color="#f2f2f2" fo:border="0.00882cm solid #CCCCCC" loext:writing-mode="lr-tb" fo:padding-top="0.1411cm" fo:padding-bottom="0.1411cm" fo:padding-left="0.2117cm" fo:padding-right="0.2117cm"/>
    </style:style>
    <style:style style:parent-style-name="737" style:family="paragraph" style:name="P225">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088">
      <style:text-properties fo:color="#000000" fo:font-family="Liberation Serif" style:font-family-complex="Liberation Serif" fo:font-size="10pt" style:font-size-complex="10pt" fo:language="de" style:language-complex="hi" fo:country="DE" style:country-complex="IN"/>
    </style:style>
    <style:style style:family="text" style:name="T1089">
      <style:text-properties fo:color="#000000" fo:font-family="Liberation Serif" style:font-family-complex="Liberation Serif" fo:font-size="12pt" style:font-size-complex="12pt" fo:language="de" style:language-complex="hi" fo:country="DE" style:country-complex="IN"/>
    </style:style>
    <style:style style:family="text" style:name="T1090">
      <style:text-properties fo:color="#000000" fo:font-family="Liberation Serif" style:font-family-complex="Liberation Serif" fo:font-size="12pt" style:font-size-complex="12pt" fo:language="de" style:language-complex="hi" fo:country="DE" style:country-complex="IN"/>
    </style:style>
    <style:style style:family="table-row" style:name="ro18">
      <style:table-row-properties/>
    </style:style>
    <style:style style:family="table-cell" style:name="ce36">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226">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091">
      <style:text-properties fo:color="#000000" fo:font-family="Liberation Serif" style:font-family-complex="Liberation Serif" fo:font-size="10pt" style:font-size-complex="10pt" fo:language="de" style:language-complex="hi" fo:country="DE" style:country-complex="IN"/>
    </style:style>
    <style:style style:family="text" style:name="T1092">
      <style:text-properties fo:color="#000000" fo:font-family="Liberation Serif" style:font-family-complex="Liberation Serif" fo:font-size="12pt" style:font-size-complex="12pt" fo:language="de" style:language-complex="hi" fo:country="DE" style:country-complex="IN"/>
    </style:style>
    <style:style style:family="text" style:name="T1093">
      <style:text-properties fo:color="#000000" fo:font-family="Liberation Serif" style:font-family-complex="Liberation Serif" fo:font-size="12pt" style:font-size-complex="12pt" fo:language="de" style:language-complex="hi" fo:country="DE" style:country-complex="IN"/>
    </style:style>
    <style:style style:family="table-cell" style:name="ce37">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227">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094">
      <style:text-properties fo:color="#000000" fo:font-family="Liberation Serif" style:font-family-complex="Liberation Serif" fo:font-size="10pt" style:font-size-complex="10pt" fo:language="de" style:language-complex="hi" fo:country="DE" style:country-complex="IN"/>
    </style:style>
    <style:style style:family="text" style:name="T1095">
      <style:text-properties fo:color="#000000" fo:font-family="Liberation Serif" style:font-family-complex="Liberation Serif" fo:font-size="12pt" style:font-size-complex="12pt" fo:language="de" style:language-complex="hi" fo:country="DE" style:country-complex="IN"/>
    </style:style>
    <style:style style:family="text" style:name="T1096">
      <style:text-properties fo:color="#000000" fo:font-family="Liberation Serif" style:font-family-complex="Liberation Serif" fo:font-size="12pt" style:font-size-complex="12pt" fo:language="de" style:language-complex="hi" fo:country="DE" style:country-complex="IN"/>
    </style:style>
    <style:style style:family="table-row" style:name="ro19">
      <style:table-row-properties/>
    </style:style>
    <style:style style:family="table-cell" style:name="ce38">
      <style:table-cell-properties style:vertical-align="top" style:direction="ltr" fo:background-color="#f2f2f2" fo:border="0.00882cm solid #CCCCCC" loext:writing-mode="lr-tb" fo:padding-top="0.1411cm" fo:padding-bottom="0.1411cm" fo:padding-left="0.2117cm" fo:padding-right="0.2117cm"/>
    </style:style>
    <style:style style:parent-style-name="737" style:family="paragraph" style:name="P228">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097">
      <style:text-properties fo:color="#000000" fo:font-family="Liberation Serif" style:font-family-complex="Liberation Serif" fo:font-size="10pt" style:font-size-complex="10pt" fo:language="de" style:language-complex="hi" fo:country="DE" style:country-complex="IN"/>
    </style:style>
    <style:style style:family="text" style:name="T1098">
      <style:text-properties fo:color="#000000" fo:font-family="Liberation Serif" style:font-family-complex="Liberation Serif" fo:font-size="12pt" style:font-size-complex="12pt" fo:language="de" style:language-complex="hi" fo:country="DE" style:country-complex="IN"/>
    </style:style>
    <style:style style:family="text" style:name="T1099">
      <style:text-properties fo:color="#000000" fo:font-family="Liberation Serif" style:font-family-complex="Liberation Serif" fo:font-size="12pt" style:font-size-complex="12pt" fo:language="de" style:language-complex="hi" fo:country="DE" style:country-complex="IN"/>
    </style:style>
    <style:style style:family="table-cell" style:name="ce39">
      <style:table-cell-properties style:vertical-align="top" style:direction="ltr" fo:background-color="#f2f2f2" fo:border="0.00882cm solid #CCCCCC" loext:writing-mode="lr-tb" fo:padding-top="0.1411cm" fo:padding-bottom="0.1411cm" fo:padding-left="0.2117cm" fo:padding-right="0.2117cm"/>
    </style:style>
    <style:style style:parent-style-name="737" style:family="paragraph" style:name="P229">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100">
      <style:text-properties fo:color="#000000" fo:font-family="Liberation Serif" style:font-family-complex="Liberation Serif" fo:font-size="10pt" style:font-size-complex="10pt" fo:language="de" style:language-complex="hi" fo:country="DE" style:country-complex="IN"/>
    </style:style>
    <style:style style:family="text" style:name="T1101">
      <style:text-properties fo:color="#000000" fo:font-family="Liberation Serif" style:font-family-complex="Liberation Serif" fo:font-size="12pt" style:font-size-complex="12pt" fo:language="de" style:language-complex="hi" fo:country="DE" style:country-complex="IN"/>
    </style:style>
    <style:style style:family="text" style:name="T1102">
      <style:text-properties fo:color="#000000" fo:font-family="Liberation Serif" style:font-family-complex="Liberation Serif" fo:font-size="12pt" style:font-size-complex="12pt" fo:language="de" style:language-complex="hi" fo:country="DE" style:country-complex="IN"/>
    </style:style>
    <style:style style:family="table-row" style:name="ro20">
      <style:table-row-properties/>
    </style:style>
    <style:style style:family="table-cell" style:name="ce40">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230">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103">
      <style:text-properties fo:color="#000000" fo:font-family="Liberation Serif" style:font-family-complex="Liberation Serif" fo:font-size="10pt" style:font-size-complex="10pt" fo:language="de" style:language-complex="hi" fo:country="DE" style:country-complex="IN"/>
    </style:style>
    <style:style style:family="text" style:name="T1104">
      <style:text-properties fo:color="#000000" fo:font-family="Liberation Serif" style:font-family-complex="Liberation Serif" fo:font-size="12pt" style:font-size-complex="12pt" fo:language="de" style:language-complex="hi" fo:country="DE" style:country-complex="IN"/>
    </style:style>
    <style:style style:family="text" style:name="T1105">
      <style:text-properties fo:color="#000000" fo:font-family="Liberation Serif" style:font-family-complex="Liberation Serif" fo:font-size="12pt" style:font-size-complex="12pt" fo:language="de" style:language-complex="hi" fo:country="DE" style:country-complex="IN"/>
    </style:style>
    <style:style style:family="table-cell" style:name="ce41">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231">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106">
      <style:text-properties fo:color="#000000" fo:font-family="Liberation Serif" style:font-family-complex="Liberation Serif" fo:font-size="10pt" style:font-size-complex="10pt" fo:language="de" style:language-complex="hi" fo:country="DE" style:country-complex="IN"/>
    </style:style>
    <style:style style:family="text" style:name="T1107">
      <style:text-properties fo:color="#000000" fo:font-family="Liberation Serif" style:font-family-complex="Liberation Serif" fo:font-size="12pt" style:font-size-complex="12pt" fo:language="de" style:language-complex="hi" fo:country="DE" style:country-complex="IN"/>
    </style:style>
    <style:style style:family="text" style:name="T1108">
      <style:text-properties fo:color="#000000" fo:font-family="Liberation Serif" style:font-family-complex="Liberation Serif" fo:font-size="12pt" style:font-size-complex="12pt" fo:language="de" style:language-complex="hi" fo:country="DE" style:country-complex="IN"/>
    </style:style>
    <style:style style:family="table-row" style:name="ro21">
      <style:table-row-properties/>
    </style:style>
    <style:style style:family="table-cell" style:name="ce42">
      <style:table-cell-properties style:vertical-align="top" style:direction="ltr" fo:background-color="#f2f2f2" fo:border="0.00882cm solid #CCCCCC" loext:writing-mode="lr-tb" fo:padding-top="0.1411cm" fo:padding-bottom="0.1411cm" fo:padding-left="0.2117cm" fo:padding-right="0.2117cm"/>
    </style:style>
    <style:style style:parent-style-name="737" style:family="paragraph" style:name="P232">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109">
      <style:text-properties fo:color="#000000" fo:font-family="Liberation Serif" style:font-family-complex="Liberation Serif" fo:font-size="10pt" style:font-size-complex="10pt" fo:language="de" style:language-complex="hi" fo:country="DE" style:country-complex="IN"/>
    </style:style>
    <style:style style:family="text" style:name="T1110">
      <style:text-properties fo:color="#000000" fo:font-family="Liberation Serif" style:font-family-complex="Liberation Serif" fo:font-size="12pt" style:font-size-complex="12pt" fo:language="de" style:language-complex="hi" fo:country="DE" style:country-complex="IN"/>
    </style:style>
    <style:style style:family="text" style:name="T1111">
      <style:text-properties fo:color="#000000" fo:font-family="Liberation Serif" style:font-family-complex="Liberation Serif" fo:font-size="12pt" style:font-size-complex="12pt" fo:language="de" style:language-complex="hi" fo:country="DE" style:country-complex="IN"/>
    </style:style>
    <style:style style:family="table-cell" style:name="ce43">
      <style:table-cell-properties style:vertical-align="top" style:direction="ltr" fo:background-color="#f2f2f2" fo:border="0.00882cm solid #CCCCCC" loext:writing-mode="lr-tb" fo:padding-top="0.1411cm" fo:padding-bottom="0.1411cm" fo:padding-left="0.2117cm" fo:padding-right="0.2117cm"/>
    </style:style>
    <style:style style:parent-style-name="737" style:family="paragraph" style:name="P233">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112">
      <style:text-properties fo:color="#000000" fo:font-family="Liberation Serif" style:font-family-complex="Liberation Serif" fo:font-size="10pt" style:font-size-complex="10pt" fo:language="de" style:language-complex="hi" fo:country="DE" style:country-complex="IN"/>
    </style:style>
    <style:style style:family="text" style:name="T1113">
      <style:text-properties fo:color="#000000" fo:font-family="Liberation Serif" style:font-family-complex="Liberation Serif" fo:font-size="12pt" style:font-size-complex="12pt" fo:language="de" style:language-complex="hi" fo:country="DE" style:country-complex="IN"/>
    </style:style>
    <style:style style:family="text" style:name="T1114">
      <style:text-properties fo:color="#000000" fo:font-family="Liberation Serif" style:font-family-complex="Liberation Serif" fo:font-size="12pt" style:font-size-complex="12pt" fo:language="de" style:language-complex="hi" fo:country="DE" style:country-complex="IN"/>
    </style:style>
    <style:style style:family="table-row" style:name="ro22">
      <style:table-row-properties/>
    </style:style>
    <style:style style:family="table-cell" style:name="ce44">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234">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115">
      <style:text-properties fo:color="#000000" fo:font-family="Liberation Serif" style:font-family-complex="Liberation Serif" fo:font-size="10pt" style:font-size-complex="10pt" fo:language="de" style:language-complex="hi" fo:country="DE" style:country-complex="IN"/>
    </style:style>
    <style:style style:family="text" style:name="T1116">
      <style:text-properties fo:color="#000000" fo:font-family="Liberation Serif" style:font-family-complex="Liberation Serif" fo:font-size="12pt" style:font-size-complex="12pt" fo:language="de" style:language-complex="hi" fo:country="DE" style:country-complex="IN"/>
    </style:style>
    <style:style style:family="text" style:name="T1117">
      <style:text-properties fo:color="#000000" fo:font-family="Liberation Serif" style:font-family-complex="Liberation Serif" fo:font-size="12pt" style:font-size-complex="12pt" fo:language="de" style:language-complex="hi" fo:country="DE" style:country-complex="IN"/>
    </style:style>
    <style:style style:family="table-cell" style:name="ce45">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235">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118">
      <style:text-properties fo:color="#000000" fo:font-family="Liberation Serif" style:font-family-complex="Liberation Serif" fo:font-size="10pt" style:font-size-complex="10pt" fo:language="de" style:language-complex="hi" fo:country="DE" style:country-complex="IN"/>
    </style:style>
    <style:style style:family="text" style:name="T1119">
      <style:text-properties fo:color="#000000" fo:font-family="Liberation Serif" style:font-family-complex="Liberation Serif" fo:font-size="12pt" style:font-size-complex="12pt" fo:language="de" style:language-complex="hi" fo:country="DE" style:country-complex="IN"/>
    </style:style>
    <style:style style:family="text" style:name="T1120">
      <style:text-properties fo:color="#000000" fo:font-family="Liberation Serif" style:font-family-complex="Liberation Serif" fo:font-size="12pt" style:font-size-complex="12pt" fo:language="de" style:language-complex="hi" fo:country="DE" style:country-complex="IN"/>
    </style:style>
    <style:style style:parent-style-name="737" style:family="paragraph" style:name="P236">
      <style:paragraph-properties fo:text-align="left"/>
      <style:text-properties fo:color="#000000" fo:font-family="Liberation Serif" style:font-family-complex="Liberation Serif" fo:font-size="12pt" style:font-size-complex="12pt" fo:language="de" style:language-complex="hi" fo:country="DE" style:country-complex="IN"/>
    </style:style>
    <style:style style:family="text" style:name="T1121">
      <style:text-properties fo:color="#000000" fo:font-family="Liberation Serif" style:font-family-complex="Liberation Serif" fo:font-size="12pt" style:font-size-complex="12pt" fo:language="de" style:language-complex="hi" fo:country="DE" style:country-complex="IN"/>
    </style:style>
    <style:style style:family="text" style:name="T1122">
      <style:text-properties fo:color="#000000" fo:font-family="Liberation Serif" style:font-family-complex="Liberation Serif" fo:font-size="12pt" style:font-size-complex="12pt" fo:language="de" style:language-complex="hi" fo:country="DE" style:country-complex="IN"/>
    </style:style>
    <style:style style:family="text" style:name="T1123">
      <style:text-properties fo:color="#000000" fo:font-family="Liberation Serif" style:font-family-complex="Liberation Serif" fo:font-size="12pt" style:font-size-complex="12pt" fo:language="de" style:language-complex="hi" fo:country="DE" style:country-complex="IN"/>
    </style:style>
    <style:style style:parent-style-name="747" style:family="paragraph" style:name="P237">
      <style:paragraph-properties/>
      <style:text-properties fo:color="#000000" fo:font-family="Liberation Sans" style:font-family-complex="Liberation Sans" fo:font-size="16pt" style:font-size-complex="16pt" fo:language="de" style:language-complex="hi" fo:country="DE" style:country-complex="IN" fo:font-weight="bold"/>
    </style:style>
    <style:style style:family="text" style:name="T1124">
      <style:text-properties fo:color="#000000" fo:font-family="Liberation Sans" style:font-family-complex="Liberation Sans" fo:font-size="16pt" style:font-size-complex="16pt" fo:language="de" style:language-complex="hi" fo:country="DE" style:country-complex="IN" fo:font-weight="bold"/>
    </style:style>
    <style:style style:family="text" style:name="T1125">
      <style:text-properties fo:color="#000000" fo:font-family="Liberation Sans" style:font-family-complex="Liberation Sans" fo:font-size="16pt" style:font-size-complex="16pt" fo:language="de" style:language-complex="hi" fo:country="DE" style:country-complex="IN" fo:font-weight="bold"/>
    </style:style>
    <style:style style:family="text" style:name="T1126">
      <style:text-properties fo:color="#000000" fo:font-family="Liberation Sans" style:font-family-complex="Liberation Sans" fo:font-size="16pt" style:font-size-complex="16pt" fo:language="de" style:language-complex="hi" fo:country="DE" style:country-complex="IN" fo:font-weight="bold"/>
    </style:style>
    <style:style style:family="text" style:name="T1127">
      <style:text-properties fo:color="#000000" fo:font-family="Liberation Sans" style:font-family-complex="Liberation Sans" fo:font-size="16pt" style:font-size-complex="16pt" fo:language="de" style:language-complex="hi" fo:country="DE" style:country-complex="IN" fo:font-weight="bold"/>
    </style:style>
    <style:style style:family="text" style:name="T1128">
      <style:text-properties fo:color="#000000" fo:font-family="Liberation Sans" style:font-family-complex="Liberation Sans" fo:font-size="16pt" style:font-size-complex="16pt" fo:language="de" style:language-complex="hi" fo:country="DE" style:country-complex="IN" fo:font-weight="bold"/>
    </style:style>
    <style:style style:family="paragraph" style:name="P238">
      <style:paragraph-properties fo:margin-left="0cm" fo:margin-right="0cm" fo:text-indent="0cm" fo:border="none"/>
      <style:text-properties fo:color="#000000" fo:font-family="Times New Roman" style:font-family-complex="Times New Roman" fo:font-size="12pt" style:font-size-complex="12pt" fo:language="de" fo:country="DE"/>
    </style:style>
    <style:style style:family="text" style:name="T1129">
      <style:text-properties fo:color="#000000" fo:font-family="Times New Roman" style:font-family-complex="Times New Roman" fo:font-size="12pt" style:font-size-complex="12pt" fo:language="de" fo:country="DE"/>
    </style:style>
    <style:style style:family="text" style:name="T1130">
      <style:text-properties fo:color="#000000" fo:font-family="Times New Roman" style:font-family-complex="Times New Roman" fo:font-size="12pt" style:font-size-complex="12pt" fo:language="de" fo:country="DE"/>
    </style:style>
    <style:style style:family="text" style:name="T1131">
      <style:text-properties fo:color="#000000" fo:font-family="Times New Roman" style:font-family-complex="Times New Roman" fo:font-size="12pt" style:font-size-complex="12pt" fo:language="de" fo:country="DE"/>
    </style:style>
    <style:style style:family="paragraph" style:name="P239">
      <style:paragraph-properties fo:margin-left="0cm" fo:margin-right="0cm" fo:text-indent="0cm" fo:border="none"/>
      <style:text-properties fo:color="#000000" fo:font-family="Times New Roman" style:font-family-complex="Times New Roman" fo:font-size="12pt" style:font-size-complex="12pt" fo:language="de" fo:country="DE"/>
    </style:style>
    <style:style style:family="text" style:name="T1132">
      <style:text-properties fo:color="#000000" fo:font-family="Times New Roman" style:font-family-complex="Times New Roman" fo:font-size="12pt" style:font-size-complex="12pt" fo:language="de" fo:country="DE"/>
    </style:style>
    <style:style style:family="text" style:name="T1133">
      <style:text-properties fo:color="#000000" fo:font-family="Times New Roman" style:font-family-complex="Times New Roman" fo:font-size="12pt" style:font-size-complex="12pt" fo:language="de" fo:country="DE"/>
    </style:style>
    <style:style style:family="text" style:name="T1134">
      <style:text-properties fo:color="#000000" fo:font-family="Times New Roman" style:font-family-complex="Times New Roman" fo:font-size="12pt" style:font-size-complex="12pt" fo:language="de" fo:country="DE"/>
    </style:style>
    <style:style style:family="paragraph" style:name="P240">
      <style:paragraph-properties fo:margin-left="0cm" fo:margin-right="0cm" fo:text-indent="0cm" fo:border="none"/>
      <style:text-properties fo:color="#000000" fo:font-family="Times New Roman" style:font-family-complex="Times New Roman" fo:font-size="12pt" style:font-size-complex="12pt" fo:language="de" fo:country="DE"/>
    </style:style>
    <style:style style:family="text" style:name="T1135">
      <style:text-properties fo:color="#000000" fo:font-family="Times New Roman" style:font-family-complex="Times New Roman" fo:font-size="12pt" style:font-size-complex="12pt" fo:language="de" fo:country="DE" fo:font-weight="bold"/>
    </style:style>
    <style:style style:family="text" style:name="T1136">
      <style:text-properties fo:color="#000000" fo:font-family="Times New Roman" style:font-family-complex="Times New Roman" fo:font-size="12pt" style:font-size-complex="12pt" fo:language="de" fo:country="DE"/>
    </style:style>
    <style:style style:family="text" style:name="T1137">
      <style:text-properties fo:color="#000000" fo:font-family="Times New Roman" style:font-family-complex="Times New Roman" fo:font-size="12pt" style:font-size-complex="12pt" fo:language="de" fo:country="DE"/>
    </style:style>
    <style:style style:family="text" style:name="T1138">
      <style:text-properties fo:color="#000000" fo:font-family="Times New Roman" style:font-family-complex="Times New Roman" fo:font-size="12pt" style:font-size-complex="12pt" fo:language="de" fo:country="DE"/>
    </style:style>
    <style:style style:family="paragraph" style:name="P241">
      <style:paragraph-properties fo:margin-left="0cm" fo:margin-right="0cm" fo:text-indent="0cm" fo:border="none"/>
      <style:text-properties fo:font-family="Times New Roman" style:font-family-complex="Times New Roman" fo:font-size="12pt" style:font-size-complex="12pt" fo:language="de" fo:country="DE"/>
    </style:style>
    <style:style style:family="text" style:name="T1139">
      <style:text-properties fo:color="#000000" fo:font-family="Times New Roman" style:font-family-complex="Times New Roman" fo:font-size="12pt" style:font-size-complex="12pt" fo:language="de" style:language-complex="de" fo:country="DE" style:country-complex="DE"/>
    </style:style>
    <style:style style:family="text" style:name="T1140">
      <style:text-properties fo:font-family="Times New Roman" style:font-family-complex="Times New Roman" fo:font-size="12pt" style:font-size-complex="12pt" fo:language="de" fo:country="DE"/>
    </style:style>
    <style:style style:family="text" style:name="T1141">
      <style:text-properties fo:font-family="Times New Roman" style:font-family-complex="Times New Roman" fo:font-size="12pt" style:font-size-complex="12pt" fo:language="de" fo:country="DE"/>
    </style:style>
    <style:style style:family="paragraph" style:name="P242">
      <style:paragraph-properties fo:margin-left="0cm" fo:margin-right="0cm" fo:text-indent="0cm" fo:border="none"/>
      <style:text-properties fo:color="#000000" fo:font-family="Times New Roman" style:font-family-complex="Times New Roman" fo:font-size="12pt" style:font-size-complex="12pt" fo:language="de" fo:country="DE"/>
    </style:style>
    <style:style style:family="text" style:name="T1142">
      <style:text-properties fo:color="#000000" fo:font-family="Times New Roman" style:font-family-complex="Times New Roman" fo:font-size="12pt" style:font-size-complex="12pt" fo:language="de" fo:country="DE" fo:font-weight="bold"/>
    </style:style>
    <style:style style:family="text" style:name="T1143">
      <style:text-properties fo:color="#000000" fo:font-family="Times New Roman" style:font-family-complex="Times New Roman" fo:font-size="12pt" style:font-size-complex="12pt" fo:language="de" fo:country="DE"/>
    </style:style>
    <style:style style:family="text" style:name="T1144">
      <style:text-properties fo:color="#000000" fo:font-family="Times New Roman" style:font-family-complex="Times New Roman" fo:font-size="12pt" style:font-size-complex="12pt" fo:language="de" fo:country="DE"/>
    </style:style>
    <style:style style:family="text" style:name="T1145">
      <style:text-properties fo:color="#000000" fo:font-family="Times New Roman" style:font-family-complex="Times New Roman" fo:font-size="12pt" style:font-size-complex="12pt" fo:language="de" fo:country="DE"/>
    </style:style>
    <style:style style:family="paragraph" style:name="P243">
      <style:paragraph-properties fo:margin-left="0cm" fo:margin-right="0cm" fo:text-indent="0cm" fo:border="none"/>
      <style:text-properties fo:font-family="Times New Roman" style:font-family-complex="Times New Roman" fo:font-size="12pt" style:font-size-complex="12pt" fo:language="de" fo:country="DE"/>
    </style:style>
    <style:style style:family="text" style:name="T1146">
      <style:text-properties fo:color="#000000" fo:font-family="Times New Roman" style:font-family-complex="Times New Roman" fo:font-size="12pt" style:font-size-complex="12pt" fo:language="de" style:language-complex="de" fo:country="DE" style:country-complex="DE"/>
    </style:style>
    <style:style style:family="text" style:name="T1147">
      <style:text-properties fo:font-family="Times New Roman" style:font-family-complex="Times New Roman" fo:font-size="12pt" style:font-size-complex="12pt" fo:language="de" fo:country="DE"/>
    </style:style>
    <style:style style:family="text" style:name="T1148">
      <style:text-properties fo:font-family="Times New Roman" style:font-family-complex="Times New Roman" fo:font-size="12pt" style:font-size-complex="12pt" fo:language="de" fo:country="DE"/>
    </style:style>
    <style:style style:family="paragraph" style:name="P244">
      <style:paragraph-properties fo:margin-left="0cm" fo:margin-right="0cm" fo:text-indent="0cm" fo:border="none"/>
      <style:text-properties fo:color="#000000" fo:font-family="Times New Roman" style:font-family-complex="Times New Roman" fo:font-size="12pt" style:font-size-complex="12pt" fo:language="de" fo:country="DE"/>
    </style:style>
    <style:style style:family="text" style:name="T1149">
      <style:text-properties fo:color="#000000" fo:font-family="Times New Roman" style:font-family-complex="Times New Roman" fo:font-size="12pt" style:font-size-complex="12pt" fo:language="de" fo:country="DE" fo:font-weight="bold"/>
    </style:style>
    <style:style style:family="text" style:name="T1150">
      <style:text-properties fo:color="#000000" fo:font-family="Times New Roman" style:font-family-complex="Times New Roman" fo:font-size="12pt" style:font-size-complex="12pt" fo:language="de" fo:country="DE"/>
    </style:style>
    <style:style style:family="text" style:name="T1151">
      <style:text-properties fo:color="#000000" fo:font-family="Times New Roman" style:font-family-complex="Times New Roman" fo:font-size="12pt" style:font-size-complex="12pt" fo:language="de" fo:country="DE"/>
    </style:style>
    <style:style style:family="text" style:name="T1152">
      <style:text-properties fo:color="#000000" fo:font-family="Times New Roman" style:font-family-complex="Times New Roman" fo:font-size="12pt" style:font-size-complex="12pt" fo:language="de" fo:country="DE"/>
    </style:style>
    <style:style style:family="text" style:name="T1153">
      <style:text-properties fo:color="#000000" fo:font-family="Times New Roman" style:font-family-complex="Times New Roman" fo:font-size="12pt" style:font-size-complex="12pt" fo:language="de" fo:country="DE"/>
    </style:style>
    <style:style style:family="paragraph" style:name="P245">
      <style:paragraph-properties fo:margin-left="0cm" fo:margin-right="0cm" fo:text-indent="0cm" fo:border="none"/>
      <style:text-properties fo:font-family="Times New Roman" style:font-family-complex="Times New Roman" fo:font-size="12pt" style:font-size-complex="12pt" fo:language="de" fo:country="DE"/>
    </style:style>
    <style:style style:family="text" style:name="T1154">
      <style:text-properties fo:color="#000000" fo:font-family="Times New Roman" style:font-family-complex="Times New Roman" fo:font-size="12pt" style:font-size-complex="12pt" fo:language="de" style:language-complex="de" fo:country="DE" style:country-complex="DE"/>
    </style:style>
    <style:style style:family="text" style:name="T1155">
      <style:text-properties fo:font-family="Times New Roman" style:font-family-complex="Times New Roman" fo:font-size="12pt" style:font-size-complex="12pt" fo:language="de" fo:country="DE"/>
    </style:style>
    <style:style style:family="text" style:name="T1156">
      <style:text-properties fo:font-family="Times New Roman" style:font-family-complex="Times New Roman" fo:font-size="12pt" style:font-size-complex="12pt" fo:language="de" fo:country="DE"/>
    </style:style>
    <style:style style:family="paragraph" style:name="P246">
      <style:paragraph-properties fo:margin-left="0cm" fo:margin-right="0cm" fo:text-indent="0cm" fo:border="none"/>
      <style:text-properties fo:color="#000000" fo:font-family="Times New Roman" style:font-family-complex="Times New Roman" fo:font-size="12pt" style:font-size-complex="12pt" fo:language="de" fo:country="DE"/>
    </style:style>
    <style:style style:family="text" style:name="T1157">
      <style:text-properties fo:color="#000000" fo:font-family="Times New Roman" style:font-family-complex="Times New Roman" fo:font-size="12pt" style:font-size-complex="12pt" fo:language="de" fo:country="DE" fo:font-weight="bold"/>
    </style:style>
    <style:style style:family="text" style:name="T1158">
      <style:text-properties fo:color="#000000" fo:font-family="Times New Roman" style:font-family-complex="Times New Roman" fo:font-size="12pt" style:font-size-complex="12pt" fo:language="de" fo:country="DE"/>
    </style:style>
    <style:style style:family="text" style:name="T1159">
      <style:text-properties fo:color="#000000" fo:font-family="Times New Roman" style:font-family-complex="Times New Roman" fo:font-size="12pt" style:font-size-complex="12pt" fo:language="de" fo:country="DE"/>
    </style:style>
    <style:style style:family="text" style:name="T1160">
      <style:text-properties fo:color="#000000" fo:font-family="Times New Roman" style:font-family-complex="Times New Roman" fo:font-size="12pt" style:font-size-complex="12pt" fo:language="de" fo:country="DE"/>
    </style:style>
    <style:style style:family="paragraph" style:name="P247">
      <style:paragraph-properties/>
      <style:text-properties/>
    </style:style>
    <style:style style:family="text" style:name="T1161">
      <style:text-properties fo:color="#000000" fo:font-family="Liberation Serif" style:font-family-complex="Liberation Serif" fo:font-size="12pt" style:font-size-complex="12pt" fo:language="de" style:language-complex="de" fo:country="DE" style:country-complex="DE"/>
    </style:style>
    <style:style style:family="text" style:name="T1162">
      <style:text-properties fo:color="#000000" fo:font-family="Liberation Serif" style:font-family-complex="Liberation Serif" fo:font-size="12pt" style:font-size-complex="12pt" fo:language="de" style:language-complex="de" fo:country="DE" style:country-complex="DE"/>
    </style:style>
    <style:style style:family="paragraph" style:name="P248">
      <style:paragraph-properties/>
      <style:text-properties/>
    </style:style>
    <style:style style:family="text" style:name="T1163">
      <style:text-properties fo:color="#000000" fo:font-family="Liberation Serif" style:font-family-complex="Liberation Serif" fo:font-size="12pt" style:font-size-complex="12pt" fo:language="de" style:language-complex="de" fo:country="DE" style:country-complex="DE"/>
    </style:style>
    <style:style style:family="text" style:name="T1164">
      <style:text-properties fo:color="#000000" fo:font-family="Liberation Serif" style:font-family-complex="Liberation Serif" fo:font-size="12pt" style:font-size-complex="12pt" fo:language="de" style:language-complex="de" fo:country="DE" style:country-complex="DE"/>
    </style:style>
    <style:style style:parent-style-name="747" style:family="paragraph" style:name="P249">
      <style:paragraph-properties/>
      <style:text-properties fo:color="#000000" fo:font-family="Liberation Sans" style:font-family-complex="Liberation Sans" fo:font-size="16pt" style:font-size-complex="16pt" fo:language="de" style:language-complex="hi" fo:country="DE" style:country-complex="IN" fo:font-weight="bold"/>
    </style:style>
    <style:style style:family="text" style:name="T1165">
      <style:text-properties fo:color="#000000" fo:font-family="Liberation Sans" style:font-family-complex="Liberation Sans" fo:font-size="16pt" style:font-size-complex="16pt" fo:language="de" style:language-complex="hi" fo:country="DE" style:country-complex="IN" fo:font-weight="bold"/>
    </style:style>
    <style:style style:family="text" style:name="T1166">
      <style:text-properties fo:color="#000000" fo:font-family="Liberation Sans" style:font-family-complex="Liberation Sans" fo:font-size="16pt" style:font-size-complex="16pt" fo:language="de" style:language-complex="hi" fo:country="DE" style:country-complex="IN" fo:font-weight="bold"/>
    </style:style>
    <style:style style:family="text" style:name="T1167">
      <style:text-properties fo:color="#000000" fo:font-family="Liberation Sans" style:font-family-complex="Liberation Sans" fo:font-size="16pt" style:font-size-complex="16pt" fo:language="de" style:language-complex="hi" fo:country="DE" style:country-complex="IN" fo:font-weight="bold"/>
    </style:style>
    <style:style style:family="text" style:name="T1168">
      <style:text-properties fo:color="#000000" fo:font-family="Liberation Sans" style:font-family-complex="Liberation Sans" fo:font-size="16pt" style:font-size-complex="16pt" fo:language="de" style:language-complex="hi" fo:country="DE" style:country-complex="IN" fo:font-weight="bold"/>
    </style:style>
    <style:style style:family="text" style:name="T1169">
      <style:text-properties fo:color="#000000" fo:font-family="Liberation Sans" style:font-family-complex="Liberation Sans" fo:font-size="16pt" style:font-size-complex="16pt" fo:language="de" style:language-complex="hi" fo:country="DE" style:country-complex="IN" fo:font-weight="bold"/>
    </style:style>
    <style:style style:parent-style-name="737" style:family="paragraph" style:name="P250">
      <style:paragraph-properties fo:text-align="left"/>
      <style:text-properties fo:color="#000000" fo:font-family="Liberation Serif" style:font-family-complex="Liberation Serif" fo:font-size="12pt" style:font-size-complex="12pt" fo:language="de" style:language-complex="hi" fo:country="DE" style:country-complex="IN" fo:font-weight="normal"/>
    </style:style>
    <style:style style:family="text" style:name="T1170">
      <style:text-properties fo:color="#000000" fo:font-family="Liberation Serif" style:font-family-complex="Liberation Serif" fo:font-size="12pt" style:font-size-complex="12pt" fo:language="de" style:language-complex="hi" fo:country="DE" style:country-complex="IN" fo:font-weight="normal"/>
    </style:style>
    <style:style style:family="text" style:name="T1171">
      <style:text-properties fo:color="#000000" fo:font-family="Liberation Serif" style:font-family-complex="Liberation Serif" fo:font-size="12pt" style:font-size-complex="12pt" fo:language="de" style:language-complex="hi" fo:country="DE" style:country-complex="IN" fo:font-weight="normal"/>
    </style:style>
    <style:style style:family="text" style:name="T1172">
      <style:text-properties fo:color="#000000" fo:font-family="Liberation Serif" style:font-family-complex="Liberation Serif" fo:font-size="12pt" style:font-size-complex="12pt" fo:language="de" style:language-complex="hi" fo:country="DE" style:country-complex="IN" fo:font-weight="normal"/>
    </style:style>
    <style:style style:parent-style-name="737" style:family="paragraph" style:name="P251">
      <style:paragraph-properties fo:text-align="left"/>
      <style:text-properties fo:color="#000000" fo:font-family="Liberation Serif" style:font-family-complex="Liberation Serif" fo:font-size="12pt" style:font-size-complex="12pt" fo:language="de" style:language-complex="hi" fo:country="DE" style:country-complex="IN" fo:font-weight="normal"/>
    </style:style>
    <style:style style:family="text" style:name="T1173">
      <style:text-properties fo:color="#000000" fo:font-family="Liberation Serif" style:font-family-complex="Liberation Serif" fo:font-size="12pt" style:font-size-complex="12pt" fo:language="de" style:language-complex="hi" fo:country="DE" style:country-complex="IN" fo:font-weight="normal"/>
    </style:style>
    <style:style style:family="text" style:name="T1174">
      <style:text-properties fo:color="#000000" fo:font-family="Liberation Serif" style:font-family-complex="Liberation Serif" fo:font-size="12pt" style:font-size-complex="12pt" fo:language="de" style:language-complex="hi" fo:country="DE" style:country-complex="IN" fo:font-weight="normal"/>
    </style:style>
    <style:style style:family="text" style:name="T1175">
      <style:text-properties fo:color="#000000" fo:font-family="Liberation Serif" style:font-family-complex="Liberation Serif" fo:font-size="12pt" style:font-size-complex="12pt" fo:language="de" style:language-complex="hi" fo:country="DE" style:country-complex="IN" fo:font-weight="normal"/>
    </style:style>
    <style:style style:parent-style-name="737" style:family="paragraph" style:name="P252">
      <style:paragraph-properties fo:text-align="left"/>
      <style:text-properties fo:color="#000000" fo:font-family="Liberation Serif" style:font-family-complex="Liberation Serif" fo:font-size="12pt" style:font-size-complex="12pt" fo:language="de" style:language-complex="hi" fo:country="DE" style:country-complex="IN" fo:font-weight="normal"/>
    </style:style>
    <style:style style:family="text" style:name="T1176">
      <style:text-properties fo:color="#000000" fo:font-family="Liberation Serif" style:font-family-complex="Liberation Serif" fo:font-size="12pt" style:font-size-complex="12pt" fo:language="de" style:language-complex="hi" fo:country="DE" style:country-complex="IN" fo:font-weight="normal"/>
    </style:style>
    <style:style style:family="text" style:name="T1177">
      <style:text-properties fo:color="#000000" fo:font-family="Liberation Serif" style:font-family-complex="Liberation Serif" fo:font-size="12pt" style:font-size-complex="12pt" fo:language="de" style:language-complex="hi" fo:country="DE" style:country-complex="IN" fo:font-weight="normal"/>
    </style:style>
    <style:style style:family="text" style:name="T1178">
      <style:text-properties fo:color="#000000" fo:font-family="Liberation Serif" style:font-family-complex="Liberation Serif" fo:font-size="12pt" style:font-size-complex="12pt" fo:language="de" style:language-complex="hi" fo:country="DE" style:country-complex="IN" fo:font-weight="normal"/>
    </style:style>
    <style:style style:parent-style-name="737" style:family="paragraph" style:name="P253">
      <style:paragraph-properties fo:text-align="left"/>
      <style:text-properties fo:color="#000000" fo:font-family="Liberation Serif" style:font-family-complex="Liberation Serif" fo:font-size="12pt" style:font-size-complex="12pt" fo:language="de" style:language-complex="hi" fo:country="DE" style:country-complex="IN" fo:font-weight="normal"/>
    </style:style>
    <style:style style:family="text" style:name="T1179">
      <style:text-properties fo:color="#000000" fo:font-family="Liberation Serif" style:font-family-complex="Liberation Serif" fo:font-size="12pt" style:font-size-complex="12pt" fo:language="de" style:language-complex="hi" fo:country="DE" style:country-complex="IN" fo:font-weight="normal"/>
    </style:style>
    <style:style style:family="text" style:name="T1180">
      <style:text-properties fo:color="#000000" fo:font-family="Liberation Serif" style:font-family-complex="Liberation Serif" fo:font-size="12pt" style:font-size-complex="12pt" fo:language="de" style:language-complex="hi" fo:country="DE" style:country-complex="IN" fo:font-weight="normal"/>
    </style:style>
    <style:style style:family="text" style:name="T1181">
      <style:text-properties fo:color="#000000" fo:font-family="Liberation Serif" style:font-family-complex="Liberation Serif" fo:font-size="12pt" style:font-size-complex="12pt" fo:language="de" style:language-complex="hi" fo:country="DE" style:country-complex="IN" fo:font-weight="normal"/>
    </style:style>
    <style:style style:parent-style-name="737" style:family="paragraph" style:name="P254">
      <style:paragraph-properties fo:text-align="left"/>
      <style:text-properties fo:color="#000000" fo:font-family="Liberation Serif" style:font-family-complex="Liberation Serif" fo:font-size="12pt" style:font-size-complex="12pt" fo:language="de" style:language-complex="hi" fo:country="DE" style:country-complex="IN" fo:font-weight="normal"/>
    </style:style>
    <style:style style:family="text" style:name="T1182">
      <style:text-properties fo:color="#000000" fo:font-family="Liberation Serif" style:font-family-complex="Liberation Serif" fo:font-size="12pt" style:font-size-complex="12pt" fo:language="de" style:language-complex="hi" fo:country="DE" style:country-complex="IN" fo:font-weight="normal"/>
    </style:style>
    <style:style style:family="text" style:name="T1183">
      <style:text-properties fo:color="#000000" fo:font-family="Liberation Serif" style:font-family-complex="Liberation Serif" fo:font-size="12pt" style:font-size-complex="12pt" fo:language="de" style:language-complex="hi" fo:country="DE" style:country-complex="IN" fo:font-weight="normal"/>
    </style:style>
    <style:style style:family="text" style:name="T1184">
      <style:text-properties fo:color="#000000" fo:font-family="Liberation Serif" style:font-family-complex="Liberation Serif" fo:font-size="12pt" style:font-size-complex="12pt" fo:language="de" style:language-complex="hi" fo:country="DE" style:country-complex="IN" fo:font-weight="normal"/>
    </style:style>
    <style:style style:parent-style-name="737" style:family="paragraph" style:name="P255">
      <style:paragraph-properties fo:text-align="left"/>
      <style:text-properties fo:color="#000000" fo:font-family="Liberation Serif" style:font-family-complex="Liberation Serif" fo:font-size="12pt" style:font-size-complex="12pt" fo:language="de" style:language-complex="hi" fo:country="DE" style:country-complex="IN" fo:font-weight="normal"/>
    </style:style>
    <style:style style:family="text" style:name="T1185">
      <style:text-properties fo:color="#000000" fo:font-family="Liberation Serif" style:font-family-complex="Liberation Serif" fo:font-size="12pt" style:font-size-complex="12pt" fo:language="de" style:language-complex="hi" fo:country="DE" style:country-complex="IN" fo:font-weight="normal"/>
    </style:style>
    <style:style style:family="text" style:name="T1186">
      <style:text-properties fo:color="#000000" fo:font-family="Liberation Serif" style:font-family-complex="Liberation Serif" fo:font-size="12pt" style:font-size-complex="12pt" fo:language="de" style:language-complex="hi" fo:country="DE" style:country-complex="IN" fo:font-weight="normal"/>
    </style:style>
    <style:style style:family="text" style:name="T1187">
      <style:text-properties fo:color="#000000" fo:font-family="Liberation Serif" style:font-family-complex="Liberation Serif" fo:font-size="12pt" style:font-size-complex="12pt" fo:language="de" style:language-complex="hi" fo:country="DE" style:country-complex="IN" fo:font-weight="normal"/>
    </style:style>
    <style:style style:parent-style-name="737" style:family="paragraph" style:name="P256">
      <style:paragraph-properties fo:text-align="left"/>
      <style:text-properties fo:color="#000000" fo:font-family="Liberation Serif" style:font-family-complex="Liberation Serif" fo:font-size="12pt" style:font-size-complex="12pt" fo:language="de" style:language-complex="hi" fo:country="DE" style:country-complex="IN" fo:font-weight="normal"/>
    </style:style>
    <style:style style:family="text" style:name="T1188">
      <style:text-properties fo:color="#000000" fo:font-family="Liberation Serif" style:font-family-complex="Liberation Serif" fo:font-size="12pt" style:font-size-complex="12pt" fo:language="de" style:language-complex="hi" fo:country="DE" style:country-complex="IN" fo:font-weight="normal"/>
    </style:style>
    <style:style style:family="text" style:name="T1189">
      <style:text-properties fo:color="#000000" fo:font-family="Liberation Serif" style:font-family-complex="Liberation Serif" fo:font-size="12pt" style:font-size-complex="12pt" fo:language="de" style:language-complex="hi" fo:country="DE" style:country-complex="IN" fo:font-weight="normal"/>
    </style:style>
    <style:style style:family="text" style:name="T1190">
      <style:text-properties fo:color="#000000" fo:font-family="Liberation Serif" style:font-family-complex="Liberation Serif" fo:font-size="12pt" style:font-size-complex="12pt" fo:language="de" style:language-complex="hi" fo:country="DE" style:country-complex="IN" fo:font-weight="normal"/>
    </style:style>
    <style:style style:parent-style-name="737" style:family="paragraph" style:name="P257">
      <style:paragraph-properties fo:text-align="left"/>
      <style:text-properties fo:color="#000000" fo:font-family="Liberation Serif" style:font-family-complex="Liberation Serif" fo:font-size="12pt" style:font-size-complex="12pt" fo:language="de" style:language-complex="hi" fo:country="DE" style:country-complex="IN" fo:font-weight="normal"/>
    </style:style>
    <style:style style:family="text" style:name="T1191">
      <style:text-properties fo:color="#000000" fo:font-family="Liberation Serif" style:font-family-complex="Liberation Serif" fo:font-size="12pt" style:font-size-complex="12pt" fo:language="de" style:language-complex="hi" fo:country="DE" style:country-complex="IN" fo:font-weight="normal"/>
    </style:style>
    <style:style style:family="text" style:name="T1192">
      <style:text-properties fo:color="#000000" fo:font-family="Liberation Serif" style:font-family-complex="Liberation Serif" fo:font-size="12pt" style:font-size-complex="12pt" fo:language="de" style:language-complex="hi" fo:country="DE" style:country-complex="IN" fo:font-weight="normal"/>
    </style:style>
    <style:style style:family="text" style:name="T1193">
      <style:text-properties fo:color="#000000" fo:font-family="Liberation Serif" style:font-family-complex="Liberation Serif" fo:font-size="12pt" style:font-size-complex="12pt" fo:language="de" style:language-complex="hi" fo:country="DE" style:country-complex="IN" fo:font-weight="normal"/>
    </style:style>
    <style:style style:parent-style-name="747" style:family="paragraph" style:name="P258">
      <style:paragraph-properties/>
      <style:text-properties fo:color="#000000" fo:font-family="Liberation Sans" style:font-family-complex="Liberation Sans" fo:font-size="16pt" style:font-size-complex="16pt" fo:language="de" style:language-complex="hi" fo:country="DE" style:country-complex="IN" fo:font-weight="bold"/>
    </style:style>
    <style:style style:family="text" style:name="T1194">
      <style:text-properties fo:color="#000000" fo:font-family="Liberation Sans" style:font-family-complex="Liberation Sans" fo:font-size="16pt" style:font-size-complex="16pt" fo:language="de" style:language-complex="hi" fo:country="DE" style:country-complex="IN" fo:font-weight="bold"/>
    </style:style>
    <style:style style:family="text" style:name="T1195">
      <style:text-properties fo:color="#000000" fo:font-family="Liberation Sans" style:font-family-complex="Liberation Sans" fo:font-size="16pt" style:font-size-complex="16pt" fo:language="de" style:language-complex="hi" fo:country="DE" style:country-complex="IN" fo:font-weight="bold"/>
    </style:style>
    <style:style style:family="text" style:name="T1196">
      <style:text-properties fo:color="#000000" fo:font-family="Liberation Sans" style:font-family-complex="Liberation Sans" fo:font-size="16pt" style:font-size-complex="16pt" fo:language="de" style:language-complex="hi" fo:country="DE" style:country-complex="IN" fo:font-weight="bold"/>
    </style:style>
    <style:style style:family="text" style:name="T1197">
      <style:text-properties fo:color="#000000" fo:font-family="Liberation Sans" style:font-family-complex="Liberation Sans" fo:font-size="16pt" style:font-size-complex="16pt" fo:language="de" style:language-complex="hi" fo:country="DE" style:country-complex="IN" fo:font-weight="bold"/>
    </style:style>
    <style:style style:family="text" style:name="T1198">
      <style:text-properties fo:color="#000000" fo:font-family="Liberation Sans" style:font-family-complex="Liberation Sans" fo:font-size="16pt" style:font-size-complex="16pt" fo:language="de" style:language-complex="hi" fo:country="DE" style:country-complex="IN" fo:font-weight="bold"/>
    </style:style>
    <style:style style:parent-style-name="737" style:family="paragraph" style:name="P259">
      <style:paragraph-properties fo:text-align="left"/>
      <style:text-properties fo:color="#000000" fo:font-family="Liberation Serif" style:font-family-complex="Liberation Serif" fo:font-size="12pt" style:font-size-complex="12pt" fo:language="de" style:language-complex="hi" fo:country="DE" style:country-complex="IN" fo:font-weight="normal"/>
    </style:style>
    <style:style style:family="text" style:name="T1199">
      <style:text-properties fo:color="#000000" fo:font-family="Liberation Serif" style:font-family-complex="Liberation Serif" fo:font-size="12pt" style:font-size-complex="12pt" fo:language="de" style:language-complex="hi" fo:country="DE" style:country-complex="IN" fo:font-weight="normal"/>
    </style:style>
    <style:style style:family="text" style:name="T1200">
      <style:text-properties fo:color="#000000" fo:font-family="Liberation Serif" style:font-family-complex="Liberation Serif" fo:font-size="12pt" style:font-size-complex="12pt" fo:language="de" style:language-complex="hi" fo:country="DE" style:country-complex="IN" fo:font-weight="normal"/>
    </style:style>
    <style:style style:family="text" style:name="T1201">
      <style:text-properties fo:color="#000000" fo:font-family="Liberation Serif" style:font-family-complex="Liberation Serif" fo:font-size="12pt" style:font-size-complex="12pt" fo:language="de" style:language-complex="hi" fo:country="DE" style:country-complex="IN" fo:font-weight="normal"/>
    </style:style>
    <style:style style:family="text" style:name="T1202">
      <style:text-properties fo:color="#000000" fo:font-family="Liberation Serif" style:font-family-complex="Liberation Serif" fo:font-size="12pt" style:font-size-complex="12pt" fo:language="de" style:language-complex="hi" fo:country="DE" style:country-complex="IN" fo:font-weight="normal"/>
    </style:style>
    <style:style style:family="text" style:name="T1203">
      <style:text-properties fo:color="#000000" fo:font-family="Liberation Serif" style:font-family-complex="Liberation Serif" fo:font-size="12pt" style:font-size-complex="12pt" fo:language="de" style:language-complex="hi" fo:country="DE" style:country-complex="IN" fo:font-weight="normal"/>
    </style:style>
    <style:style style:family="text" style:name="T1204">
      <style:text-properties fo:color="#000000" fo:font-family="Liberation Serif" style:font-family-complex="Liberation Serif" fo:font-size="12pt" style:font-size-complex="12pt" fo:language="de" style:language-complex="hi" fo:country="DE" style:country-complex="IN" fo:font-weight="normal"/>
    </style:style>
    <style:style style:parent-style-name="749" style:family="paragraph" style:name="P260">
      <style:paragraph-properties/>
      <style:text-properties fo:color="#000000" fo:font-family="Liberation Sans" style:font-family-complex="Liberation Sans" fo:font-size="18pt" style:font-size-complex="18pt" fo:language="de" style:language-complex="hi" fo:country="DE" style:country-complex="IN" fo:font-weight="bold"/>
    </style:style>
    <style:style style:family="text" style:name="T1205">
      <style:text-properties fo:color="#000000" fo:font-family="Liberation Sans" style:font-family-complex="Liberation Sans" fo:font-size="18pt" style:font-size-complex="18pt" fo:language="de" style:language-complex="hi" fo:country="DE" style:country-complex="IN" fo:font-weight="bold"/>
    </style:style>
    <style:style style:family="text" style:name="T1206">
      <style:text-properties fo:color="#000000" fo:font-family="Liberation Sans" style:font-family-complex="Liberation Sans" fo:font-size="18pt" style:font-size-complex="18pt" fo:language="de" style:language-complex="hi" fo:country="DE" style:country-complex="IN" fo:font-weight="bold"/>
    </style:style>
    <style:style style:family="text" style:name="T1207">
      <style:text-properties fo:color="#000000" fo:font-family="Liberation Sans" style:font-family-complex="Liberation Sans" fo:font-size="18pt" style:font-size-complex="18pt" fo:language="de" style:language-complex="hi" fo:country="DE" style:country-complex="IN" fo:font-weight="bold"/>
    </style:style>
    <style:style style:family="text" style:name="T1208">
      <style:text-properties fo:color="#000000" fo:font-family="Liberation Sans" style:font-family-complex="Liberation Sans" fo:font-size="18pt" style:font-size-complex="18pt" fo:language="de" style:language-complex="hi" fo:country="DE" style:country-complex="IN" fo:font-weight="bold"/>
    </style:style>
    <style:style style:family="text" style:name="T1209">
      <style:text-properties fo:color="#000000" fo:font-family="Liberation Sans" style:font-family-complex="Liberation Sans" fo:font-size="18pt" style:font-size-complex="18pt" fo:language="de" style:language-complex="hi" fo:country="DE" style:country-complex="IN" fo:font-weight="bold"/>
    </style:style>
    <style:style style:parent-style-name="747" style:family="paragraph" style:name="P261">
      <style:paragraph-properties/>
      <style:text-properties fo:color="#000000" fo:font-family="Liberation Sans" style:font-family-complex="Liberation Sans" fo:font-size="16pt" style:font-size-complex="16pt" fo:language="de" style:language-complex="hi" fo:country="DE" style:country-complex="IN" fo:font-weight="bold"/>
    </style:style>
    <style:style style:family="text" style:name="T1210">
      <style:text-properties fo:color="#000000" fo:font-family="Liberation Sans" style:font-family-complex="Liberation Sans" fo:font-size="16pt" style:font-size-complex="16pt" fo:language="de" style:language-complex="hi" fo:country="DE" style:country-complex="IN" fo:font-weight="bold"/>
    </style:style>
    <style:style style:family="text" style:name="T1211">
      <style:text-properties fo:color="#000000" fo:font-family="Liberation Sans" style:font-family-complex="Liberation Sans" fo:font-size="16pt" style:font-size-complex="16pt" fo:language="de" style:language-complex="hi" fo:country="DE" style:country-complex="IN" fo:font-weight="bold"/>
    </style:style>
    <style:style style:family="text" style:name="T1212">
      <style:text-properties fo:color="#000000" fo:font-family="Liberation Sans" style:font-family-complex="Liberation Sans" fo:font-size="16pt" style:font-size-complex="16pt" fo:language="de" style:language-complex="hi" fo:country="DE" style:country-complex="IN" fo:font-weight="bold"/>
    </style:style>
    <style:style style:family="text" style:name="T1213">
      <style:text-properties fo:color="#000000" fo:font-family="Liberation Sans" style:font-family-complex="Liberation Sans" fo:font-size="16pt" style:font-size-complex="16pt" fo:language="de" style:language-complex="hi" fo:country="DE" style:country-complex="IN" fo:font-weight="bold"/>
    </style:style>
    <style:style style:family="text" style:name="T1214">
      <style:text-properties fo:color="#000000" fo:font-family="Liberation Sans" style:font-family-complex="Liberation Sans" fo:font-size="16pt" style:font-size-complex="16pt" fo:language="de" style:language-complex="hi" fo:country="DE" style:country-complex="IN" fo:font-weight="bold"/>
    </style:style>
    <style:style style:parent-style-name="737" style:family="paragraph" style:name="P262">
      <style:paragraph-properties fo:margin-left="0cm" fo:margin-right="0cm" fo:text-indent="0cm" fo:margin-top="3pt" fo:margin-bottom="3pt"/>
      <style:text-properties fo:color="#000000" fo:font-family="Liberation Serif" style:font-family-complex="Liberation Serif" fo:font-size="12pt" style:font-size-complex="12pt" fo:language="de" style:language-complex="hi" fo:country="DE" style:country-complex="IN"/>
    </style:style>
    <style:style style:family="text" style:name="T1215">
      <style:text-properties fo:color="#000000" fo:font-family="Liberation Serif" style:font-family-complex="Liberation Serif" fo:font-size="12pt" style:font-size-complex="12pt" fo:language="de" style:language-complex="hi" fo:country="DE" style:country-complex="IN"/>
    </style:style>
    <style:style style:family="text" style:name="T1216">
      <style:text-properties fo:color="#000000" fo:font-family="Liberation Serif" style:font-family-complex="Liberation Serif" fo:font-size="12pt" style:font-size-complex="12pt" fo:language="de" style:language-complex="hi" fo:country="DE" style:country-complex="IN"/>
    </style:style>
    <style:style style:family="text" style:name="T1217">
      <style:text-properties fo:color="#000000" fo:font-family="Liberation Serif" style:font-family-complex="Liberation Serif" fo:font-size="12pt" style:font-size-complex="12pt" fo:language="de" style:language-complex="hi" fo:country="DE" style:country-complex="IN"/>
    </style:style>
    <style:style style:family="text" style:name="T1218">
      <style:text-properties fo:color="#000000" fo:font-family="Liberation Serif" style:font-family-complex="Liberation Serif" fo:font-size="12pt" style:font-size-complex="12pt" fo:language="de" style:language-complex="hi" fo:country="DE" style:country-complex="IN"/>
    </style:style>
    <style:style style:family="text" style:name="T1219">
      <style:text-properties fo:color="#000000" fo:font-family="Liberation Serif" style:font-family-complex="Liberation Serif" fo:font-size="12pt" style:font-size-complex="12pt" fo:language="de" style:language-complex="hi" fo:country="DE" style:country-complex="IN"/>
    </style:style>
    <style:style style:parent-style-name="737" style:family="paragraph" style:name="P263">
      <style:paragraph-properties fo:margin-left="0cm" fo:margin-right="0cm" fo:text-indent="0cm" fo:margin-top="3pt" fo:margin-bottom="3pt"/>
      <style:text-properties fo:color="#000000" fo:font-family="Liberation Serif" style:font-family-complex="Liberation Serif" fo:font-size="12pt" style:font-size-complex="12pt" fo:language="de" style:language-complex="hi" fo:country="DE" style:country-complex="IN"/>
    </style:style>
    <style:style style:family="text" style:name="T1220">
      <style:text-properties fo:color="#000000" fo:font-family="Liberation Serif" style:font-family-complex="Liberation Serif" fo:font-size="12pt" style:font-size-complex="12pt" fo:language="de" style:language-complex="hi" fo:country="DE" style:country-complex="IN"/>
    </style:style>
    <style:style style:family="text" style:name="T1221">
      <style:text-properties fo:color="#000000" fo:font-family="Liberation Serif" style:font-family-complex="Liberation Serif" fo:font-size="12pt" style:font-size-complex="12pt" fo:language="de" style:language-complex="hi" fo:country="DE" style:country-complex="IN"/>
    </style:style>
    <style:style style:family="text" style:name="T1222">
      <style:text-properties fo:color="#000000" fo:font-family="Liberation Serif" style:font-family-complex="Liberation Serif" fo:font-size="12pt" style:font-size-complex="12pt" fo:language="de" style:language-complex="hi" fo:country="DE" style:country-complex="IN"/>
    </style:style>
    <style:style style:family="text" style:name="T1223">
      <style:text-properties fo:color="#000000" fo:font-family="Liberation Serif" style:font-family-complex="Liberation Serif" fo:font-size="12pt" style:font-size-complex="12pt" fo:language="de" style:language-complex="hi" fo:country="DE" style:country-complex="IN"/>
    </style:style>
    <style:style style:family="text" style:name="T1224">
      <style:text-properties fo:color="#000000" fo:font-family="Liberation Serif" style:font-family-complex="Liberation Serif" fo:font-size="12pt" style:font-size-complex="12pt" fo:language="de" style:language-complex="hi" fo:country="DE" style:country-complex="IN"/>
    </style:style>
    <style:style style:family="text" style:name="T1225">
      <style:text-properties fo:color="#000000" fo:font-family="Liberation Serif" style:font-family-complex="Liberation Serif" fo:font-size="12pt" style:font-size-complex="12pt" fo:language="de" style:language-complex="hi" fo:country="DE" style:country-complex="IN"/>
    </style:style>
    <style:style style:parent-style-name="737" style:family="paragraph" style:name="P264">
      <style:paragraph-properties fo:margin-left="0cm" fo:margin-right="0cm" fo:text-indent="0cm" fo:margin-top="3pt" fo:margin-bottom="3pt"/>
      <style:text-properties fo:color="#000000" fo:font-family="Liberation Serif" style:font-family-complex="Liberation Serif" fo:font-size="12pt" style:font-size-complex="12pt" fo:language="de" style:language-complex="hi" fo:country="DE" style:country-complex="IN"/>
    </style:style>
    <style:style style:family="text" style:name="T1226">
      <style:text-properties fo:color="#000000" fo:font-family="Liberation Serif" style:font-family-complex="Liberation Serif" fo:font-size="12pt" style:font-size-complex="12pt" fo:language="de" style:language-complex="hi" fo:country="DE" style:country-complex="IN"/>
    </style:style>
    <style:style style:family="text" style:name="T1227">
      <style:text-properties fo:color="#000000" fo:font-family="Liberation Serif" style:font-family-complex="Liberation Serif" fo:font-size="12pt" style:font-size-complex="12pt" fo:language="de" style:language-complex="hi" fo:country="DE" style:country-complex="IN"/>
    </style:style>
    <style:style style:family="text" style:name="T1228">
      <style:text-properties fo:color="#000000" fo:font-family="Liberation Serif" style:font-family-complex="Liberation Serif" fo:font-size="12pt" style:font-size-complex="12pt" fo:language="de" style:language-complex="hi" fo:country="DE" style:country-complex="IN"/>
    </style:style>
    <style:style style:parent-style-name="747" style:family="paragraph" style:name="P265">
      <style:paragraph-properties fo:margin-left="0cm" fo:margin-right="0cm" fo:text-indent="0cm"/>
      <style:text-properties fo:color="#000000" fo:font-family="Liberation Sans" style:font-family-complex="Liberation Sans" fo:font-size="16pt" style:font-size-complex="16pt" fo:language="de" style:language-complex="hi" fo:country="DE" style:country-complex="IN" fo:font-weight="bold"/>
    </style:style>
    <style:style style:family="text" style:name="T1229">
      <style:text-properties fo:color="#000000" fo:font-family="Liberation Sans" style:font-family-complex="Liberation Sans" fo:font-size="16pt" style:font-size-complex="16pt" fo:language="de" style:language-complex="hi" fo:country="DE" style:country-complex="IN" fo:font-weight="bold"/>
    </style:style>
    <style:style style:family="text" style:name="T1230">
      <style:text-properties fo:color="#000000" fo:font-family="Liberation Sans" style:font-family-complex="Liberation Sans" fo:font-size="16pt" style:font-size-complex="16pt" fo:language="de" style:language-complex="hi" fo:country="DE" style:country-complex="IN" fo:font-weight="bold"/>
    </style:style>
    <style:style style:family="text" style:name="T1231">
      <style:text-properties fo:color="#000000" fo:font-family="Liberation Sans" style:font-family-complex="Liberation Sans" fo:font-size="16pt" style:font-size-complex="16pt" fo:language="de" style:language-complex="hi" fo:country="DE" style:country-complex="IN" fo:font-weight="bold"/>
    </style:style>
    <style:style style:family="text" style:name="T1232">
      <style:text-properties fo:color="#000000" fo:font-family="Liberation Sans" style:font-family-complex="Liberation Sans" fo:font-size="16pt" style:font-size-complex="16pt" fo:language="de" style:language-complex="hi" fo:country="DE" style:country-complex="IN" fo:font-weight="bold"/>
    </style:style>
    <style:style style:family="text" style:name="T1233">
      <style:text-properties fo:color="#000000" fo:font-family="Liberation Sans" style:font-family-complex="Liberation Sans" fo:font-size="16pt" style:font-size-complex="16pt" fo:language="de" style:language-complex="hi" fo:country="DE" style:country-complex="IN" fo:font-weight="bold"/>
    </style:style>
    <style:style style:parent-style-name="748" style:family="paragraph" style:name="P266">
      <style:paragraph-properties fo:margin-left="0cm" fo:margin-right="0cm" fo:text-indent="0cm"/>
      <style:text-properties fo:color="#000000" fo:font-family="Liberation Sans" style:font-family-complex="Liberation Sans" fo:font-size="14pt" style:font-size-complex="14pt" fo:language="de" style:language-complex="hi" fo:country="DE" style:country-complex="IN" fo:font-weight="bold"/>
    </style:style>
    <style:style style:family="text" style:name="T1234">
      <style:text-properties fo:color="#000000" fo:font-family="Liberation Sans" style:font-family-complex="Liberation Sans" fo:font-size="14pt" style:font-size-complex="14pt" fo:language="de" style:language-complex="hi" fo:country="DE" style:country-complex="IN" fo:font-weight="bold"/>
    </style:style>
    <style:style style:family="text" style:name="T1235">
      <style:text-properties fo:color="#000000" fo:font-family="Liberation Sans" style:font-family-complex="Liberation Sans" fo:font-size="14pt" style:font-size-complex="14pt" fo:language="de" style:language-complex="hi" fo:country="DE" style:country-complex="IN" fo:font-weight="bold"/>
    </style:style>
    <style:style style:family="text" style:name="T1236">
      <style:text-properties fo:color="#000000" fo:font-family="Liberation Sans" style:font-family-complex="Liberation Sans" fo:font-size="14pt" style:font-size-complex="14pt" fo:language="de" style:language-complex="hi" fo:country="DE" style:country-complex="IN" fo:font-weight="bold"/>
    </style:style>
    <style:style style:family="text" style:name="T1237">
      <style:text-properties fo:color="#000000" fo:font-family="Liberation Sans" style:font-family-complex="Liberation Sans" fo:font-size="14pt" style:font-size-complex="14pt" fo:language="de" style:language-complex="hi" fo:country="DE" style:country-complex="IN" fo:font-weight="bold"/>
    </style:style>
    <style:style style:family="text" style:name="T1238">
      <style:text-properties fo:color="#000000" fo:font-family="Liberation Sans" style:font-family-complex="Liberation Sans" fo:font-size="14pt" style:font-size-complex="14pt" fo:language="de" style:language-complex="hi" fo:country="DE" style:country-complex="IN" fo:font-weight="bold"/>
    </style:style>
    <style:style style:parent-style-name="737" style:family="paragraph" style:name="P267">
      <style:paragraph-properties fo:margin-left="0cm" fo:margin-right="0cm" fo:text-indent="0cm" fo:margin-top="3pt" fo:margin-bottom="3pt"/>
      <style:text-properties fo:color="#000000" fo:font-family="Liberation Serif" style:font-family-complex="Liberation Serif" fo:font-size="12pt" style:font-size-complex="12pt" fo:language="de" style:language-complex="hi" fo:country="DE" style:country-complex="IN"/>
    </style:style>
    <style:style style:family="text" style:name="T1239">
      <style:text-properties fo:color="#000000" fo:font-family="Liberation Serif" style:font-family-complex="Liberation Serif" fo:font-size="12pt" style:font-size-complex="12pt" fo:language="de" style:language-complex="hi" fo:country="DE" style:country-complex="IN"/>
    </style:style>
    <style:style style:family="text" style:name="T1240">
      <style:text-properties fo:color="#000000" fo:font-family="Liberation Serif" style:font-family-complex="Liberation Serif" fo:font-size="12pt" style:font-size-complex="12pt" fo:language="de" style:language-complex="hi" fo:country="DE" style:country-complex="IN"/>
    </style:style>
    <style:style style:family="text" style:name="T1241">
      <style:text-properties fo:color="#000000" fo:font-family="Liberation Serif" style:font-family-complex="Liberation Serif" fo:font-size="12pt" style:font-size-complex="12pt" fo:language="de" style:language-complex="hi" fo:country="DE" style:country-complex="IN"/>
    </style:style>
    <style:style style:family="text" style:name="T1242">
      <style:text-properties fo:color="#000000" fo:font-family="Liberation Serif" style:font-family-complex="Liberation Serif" fo:font-size="12pt" style:font-size-complex="12pt" fo:language="de" style:language-complex="hi" fo:country="DE" style:country-complex="IN"/>
    </style:style>
    <style:style style:family="text" style:name="T1243">
      <style:text-properties fo:color="#000000" fo:font-family="Liberation Serif" style:font-family-complex="Liberation Serif" fo:font-size="12pt" style:font-size-complex="12pt" fo:language="de" style:language-complex="hi" fo:country="DE" style:country-complex="IN"/>
    </style:style>
    <style:style style:family="text" style:name="T1244">
      <style:text-properties fo:color="#000000" fo:font-family="Liberation Serif" style:font-family-complex="Liberation Serif" fo:font-size="12pt" style:font-size-complex="12pt" fo:language="de" style:language-complex="hi" fo:country="DE" style:country-complex="IN"/>
    </style:style>
    <style:style style:family="text" style:name="T1245">
      <style:text-properties fo:color="#000000" fo:font-family="Liberation Serif" style:font-family-complex="Liberation Serif" fo:font-size="12pt" style:font-size-complex="12pt" fo:language="de" style:language-complex="hi" fo:country="DE" style:country-complex="IN"/>
    </style:style>
    <style:style style:family="text" style:name="T1246">
      <style:text-properties fo:color="#000000" fo:font-family="Liberation Serif" style:font-family-complex="Liberation Serif" fo:font-size="12pt" style:font-size-complex="12pt" fo:language="de" style:language-complex="hi" fo:country="DE" style:country-complex="IN"/>
    </style:style>
    <style:style style:parent-style-name="748" style:family="paragraph" style:name="P268">
      <style:paragraph-properties fo:margin-left="0cm" fo:margin-right="0cm" fo:text-indent="0cm"/>
      <style:text-properties fo:color="#000000" fo:font-family="Liberation Sans" style:font-family-complex="Liberation Sans" fo:font-size="14pt" style:font-size-complex="14pt" fo:language="de" style:language-complex="hi" fo:country="DE" style:country-complex="IN" fo:font-weight="bold"/>
    </style:style>
    <style:style style:family="text" style:name="T1247">
      <style:text-properties fo:color="#000000" fo:font-family="Liberation Sans" style:font-family-complex="Liberation Sans" fo:font-size="14pt" style:font-size-complex="14pt" fo:language="de" style:language-complex="hi" fo:country="DE" style:country-complex="IN" fo:font-weight="bold"/>
    </style:style>
    <style:style style:family="text" style:name="T1248">
      <style:text-properties fo:color="#000000" fo:font-family="Liberation Sans" style:font-family-complex="Liberation Sans" fo:font-size="14pt" style:font-size-complex="14pt" fo:language="de" style:language-complex="hi" fo:country="DE" style:country-complex="IN" fo:font-weight="bold"/>
    </style:style>
    <style:style style:family="text" style:name="T1249">
      <style:text-properties fo:color="#000000" fo:font-family="Liberation Sans" style:font-family-complex="Liberation Sans" fo:font-size="14pt" style:font-size-complex="14pt" fo:language="de" style:language-complex="hi" fo:country="DE" style:country-complex="IN" fo:font-weight="bold"/>
    </style:style>
    <style:style style:family="text" style:name="T1250">
      <style:text-properties fo:color="#000000" fo:font-family="Liberation Sans" style:font-family-complex="Liberation Sans" fo:font-size="14pt" style:font-size-complex="14pt" fo:language="de" style:language-complex="hi" fo:country="DE" style:country-complex="IN" fo:font-weight="bold"/>
    </style:style>
    <style:style style:family="text" style:name="T1251">
      <style:text-properties fo:color="#000000" fo:font-family="Liberation Sans" style:font-family-complex="Liberation Sans" fo:font-size="14pt" style:font-size-complex="14pt" fo:language="de" style:language-complex="hi" fo:country="DE" style:country-complex="IN" fo:font-weight="bold"/>
    </style:style>
    <style:style style:parent-style-name="737" style:family="paragraph" style:name="P269">
      <style:paragraph-properties fo:margin-left="0cm" fo:margin-right="0cm" fo:text-indent="0cm" fo:margin-top="3pt" fo:margin-bottom="3pt"/>
      <style:text-properties fo:color="#000000" fo:font-family="Liberation Serif" style:font-family-complex="Liberation Serif" fo:font-size="12pt" style:font-size-complex="12pt" fo:language="de" style:language-complex="hi" fo:country="DE" style:country-complex="IN"/>
    </style:style>
    <style:style style:family="text" style:name="T1252">
      <style:text-properties fo:color="#000000" fo:font-family="Liberation Serif" style:font-family-complex="Liberation Serif" fo:font-size="12pt" style:font-size-complex="12pt" fo:language="de" style:language-complex="hi" fo:country="DE" style:country-complex="IN"/>
    </style:style>
    <style:style style:family="text" style:name="T1253">
      <style:text-properties fo:color="#000000" fo:font-family="Liberation Serif" style:font-family-complex="Liberation Serif" fo:font-size="12pt" style:font-size-complex="12pt" fo:language="de" style:language-complex="hi" fo:country="DE" style:country-complex="IN"/>
    </style:style>
    <style:style style:family="text" style:name="T1254">
      <style:text-properties fo:color="#000000" fo:font-family="Liberation Serif" style:font-family-complex="Liberation Serif" fo:font-size="12pt" style:font-size-complex="12pt" fo:language="de" style:language-complex="hi" fo:country="DE" style:country-complex="IN"/>
    </style:style>
    <style:style style:parent-style-name="737" style:family="paragraph" style:name="P270">
      <style:paragraph-properties fo:margin-left="0cm" fo:margin-right="0cm" fo:text-indent="0cm" fo:margin-top="3pt" fo:margin-bottom="3pt"/>
      <style:text-properties fo:color="#000000" fo:font-family="Liberation Serif" style:font-family-complex="Liberation Serif" fo:font-size="12pt" style:font-size-complex="12pt" fo:language="de" style:language-complex="hi" fo:country="DE" style:country-complex="IN"/>
    </style:style>
    <style:style style:family="text" style:name="T1255">
      <style:text-properties fo:color="#000000" fo:font-family="Liberation Serif" style:font-family-complex="Liberation Serif" fo:font-size="12pt" style:font-size-complex="12pt" fo:language="de" style:language-complex="hi" fo:country="DE" style:country-complex="IN"/>
    </style:style>
    <style:style style:family="text" style:name="T1256">
      <style:text-properties fo:color="#000000" fo:font-family="Liberation Serif" style:font-family-complex="Liberation Serif" fo:font-size="12pt" style:font-size-complex="12pt" fo:language="de" style:language-complex="hi" fo:country="DE" style:country-complex="IN"/>
    </style:style>
    <style:style style:family="text" style:name="T1257">
      <style:text-properties fo:color="#000000" fo:font-family="Liberation Serif" style:font-family-complex="Liberation Serif" fo:font-size="12pt" style:font-size-complex="12pt" fo:language="de" style:language-complex="hi" fo:country="DE" style:country-complex="IN"/>
    </style:style>
    <style:style style:family="table" style:name="ta2">
      <style:table-properties style:width="17.49cm" fo:margin-left="-0.01588cm" table:align="left"/>
    </style:style>
    <style:style style:family="table-column" style:name="co3">
      <style:table-column-properties style:column-width="6.566cm"/>
    </style:style>
    <style:style style:family="table-column" style:name="co4">
      <style:table-column-properties style:column-width="3.038cm"/>
    </style:style>
    <style:style style:family="table-column" style:name="co5">
      <style:table-column-properties style:column-width="3.918cm"/>
    </style:style>
    <style:style style:family="table-column" style:name="co6">
      <style:table-column-properties style:column-width="3.965cm"/>
    </style:style>
    <style:style style:family="table-row" style:name="ro23">
      <style:table-row-properties/>
    </style:style>
    <style:style style:family="table-cell" style:name="ce47">
      <style:table-cell-properties style:vertical-align="top" style:direction="ltr" fo:background-color="#1f4e79" fo:border="0.00882cm solid #CCCCCC" loext:writing-mode="lr-tb" fo:padding-top="0.1411cm" fo:padding-bottom="0.1411cm" fo:padding-left="0.2117cm" fo:padding-right="0.2117cm"/>
    </style:style>
    <style:style style:parent-style-name="737" style:family="paragraph" style:name="P271">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258">
      <style:text-properties fo:color="#ffffff" fo:font-family="Liberation Serif" style:font-family-complex="Liberation Serif" fo:font-size="10pt" style:font-size-complex="10pt" fo:language="de" style:language-complex="hi" fo:country="DE" style:country-complex="IN" fo:font-weight="bold"/>
    </style:style>
    <style:style style:family="text" style:name="T1259">
      <style:text-properties fo:color="#000000" fo:font-family="Liberation Serif" style:font-family-complex="Liberation Serif" fo:font-size="12pt" style:font-size-complex="12pt" fo:language="de" style:language-complex="hi" fo:country="DE" style:country-complex="IN"/>
    </style:style>
    <style:style style:family="text" style:name="T1260">
      <style:text-properties fo:color="#000000" fo:font-family="Liberation Serif" style:font-family-complex="Liberation Serif" fo:font-size="12pt" style:font-size-complex="12pt" fo:language="de" style:language-complex="hi" fo:country="DE" style:country-complex="IN"/>
    </style:style>
    <style:style style:family="table-cell" style:name="ce48">
      <style:table-cell-properties style:vertical-align="top" style:direction="ltr" fo:background-color="#1f4e79" fo:border="0.00882cm solid #CCCCCC" loext:writing-mode="lr-tb" fo:padding-top="0.1411cm" fo:padding-bottom="0.1411cm" fo:padding-left="0.2117cm" fo:padding-right="0.2117cm"/>
    </style:style>
    <style:style style:parent-style-name="737" style:family="paragraph" style:name="P272">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261">
      <style:text-properties fo:color="#ffffff" fo:font-family="Liberation Serif" style:font-family-complex="Liberation Serif" fo:font-size="10pt" style:font-size-complex="10pt" fo:language="de" style:language-complex="hi" fo:country="DE" style:country-complex="IN" fo:font-weight="bold"/>
    </style:style>
    <style:style style:family="text" style:name="T1262">
      <style:text-properties fo:color="#000000" fo:font-family="Liberation Serif" style:font-family-complex="Liberation Serif" fo:font-size="12pt" style:font-size-complex="12pt" fo:language="de" style:language-complex="hi" fo:country="DE" style:country-complex="IN"/>
    </style:style>
    <style:style style:family="text" style:name="T1263">
      <style:text-properties fo:color="#000000" fo:font-family="Liberation Serif" style:font-family-complex="Liberation Serif" fo:font-size="12pt" style:font-size-complex="12pt" fo:language="de" style:language-complex="hi" fo:country="DE" style:country-complex="IN"/>
    </style:style>
    <style:style style:family="table-cell" style:name="ce49">
      <style:table-cell-properties style:vertical-align="top" style:direction="ltr" fo:background-color="#1f4e79" fo:border="0.00882cm solid #CCCCCC" loext:writing-mode="lr-tb" fo:padding-top="0.1411cm" fo:padding-bottom="0.1411cm" fo:padding-left="0.2117cm" fo:padding-right="0.2117cm"/>
    </style:style>
    <style:style style:parent-style-name="737" style:family="paragraph" style:name="P273">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264">
      <style:text-properties fo:color="#ffffff" fo:font-family="Liberation Serif" style:font-family-complex="Liberation Serif" fo:font-size="10pt" style:font-size-complex="10pt" fo:language="de" style:language-complex="hi" fo:country="DE" style:country-complex="IN" fo:font-weight="bold"/>
    </style:style>
    <style:style style:family="text" style:name="T1265">
      <style:text-properties fo:color="#000000" fo:font-family="Liberation Serif" style:font-family-complex="Liberation Serif" fo:font-size="12pt" style:font-size-complex="12pt" fo:language="de" style:language-complex="hi" fo:country="DE" style:country-complex="IN"/>
    </style:style>
    <style:style style:family="text" style:name="T1266">
      <style:text-properties fo:color="#000000" fo:font-family="Liberation Serif" style:font-family-complex="Liberation Serif" fo:font-size="12pt" style:font-size-complex="12pt" fo:language="de" style:language-complex="hi" fo:country="DE" style:country-complex="IN"/>
    </style:style>
    <style:style style:family="table-cell" style:name="ce50">
      <style:table-cell-properties style:vertical-align="top" style:direction="ltr" fo:background-color="#1f4e79" fo:border="0.00882cm solid #CCCCCC" loext:writing-mode="lr-tb" fo:padding-top="0.1411cm" fo:padding-bottom="0.1411cm" fo:padding-left="0.2117cm" fo:padding-right="0.2117cm"/>
    </style:style>
    <style:style style:parent-style-name="737" style:family="paragraph" style:name="P274">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267">
      <style:text-properties fo:color="#ffffff" fo:font-family="Liberation Serif" style:font-family-complex="Liberation Serif" fo:font-size="10pt" style:font-size-complex="10pt" fo:language="de" style:language-complex="hi" fo:country="DE" style:country-complex="IN" fo:font-weight="bold"/>
    </style:style>
    <style:style style:family="text" style:name="T1268">
      <style:text-properties fo:color="#000000" fo:font-family="Liberation Serif" style:font-family-complex="Liberation Serif" fo:font-size="12pt" style:font-size-complex="12pt" fo:language="de" style:language-complex="hi" fo:country="DE" style:country-complex="IN"/>
    </style:style>
    <style:style style:family="text" style:name="T1269">
      <style:text-properties fo:color="#000000" fo:font-family="Liberation Serif" style:font-family-complex="Liberation Serif" fo:font-size="12pt" style:font-size-complex="12pt" fo:language="de" style:language-complex="hi" fo:country="DE" style:country-complex="IN"/>
    </style:style>
    <style:style style:family="table-row" style:name="ro24">
      <style:table-row-properties/>
    </style:style>
    <style:style style:family="table-cell" style:name="ce51">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275">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270">
      <style:text-properties fo:color="#000000" fo:font-family="Liberation Serif" style:font-family-complex="Liberation Serif" fo:font-size="10pt" style:font-size-complex="10pt" fo:language="de" style:language-complex="hi" fo:country="DE" style:country-complex="IN"/>
    </style:style>
    <style:style style:family="text" style:name="T1271">
      <style:text-properties fo:color="#000000" fo:font-family="Liberation Serif" style:font-family-complex="Liberation Serif" fo:font-size="12pt" style:font-size-complex="12pt" fo:language="de" style:language-complex="hi" fo:country="DE" style:country-complex="IN"/>
    </style:style>
    <style:style style:family="text" style:name="T1272">
      <style:text-properties fo:color="#000000" fo:font-family="Liberation Serif" style:font-family-complex="Liberation Serif" fo:font-size="12pt" style:font-size-complex="12pt" fo:language="de" style:language-complex="hi" fo:country="DE" style:country-complex="IN"/>
    </style:style>
    <style:style style:family="table-cell" style:name="ce52">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276">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273">
      <style:text-properties fo:color="#000000" fo:font-family="Liberation Serif" style:font-family-complex="Liberation Serif" fo:font-size="10pt" style:font-size-complex="10pt" fo:language="de" style:language-complex="hi" fo:country="DE" style:country-complex="IN"/>
    </style:style>
    <style:style style:family="text" style:name="T1274">
      <style:text-properties fo:color="#000000" fo:font-family="Liberation Serif" style:font-family-complex="Liberation Serif" fo:font-size="12pt" style:font-size-complex="12pt" fo:language="de" style:language-complex="hi" fo:country="DE" style:country-complex="IN"/>
    </style:style>
    <style:style style:family="text" style:name="T1275">
      <style:text-properties fo:color="#000000" fo:font-family="Liberation Serif" style:font-family-complex="Liberation Serif" fo:font-size="12pt" style:font-size-complex="12pt" fo:language="de" style:language-complex="hi" fo:country="DE" style:country-complex="IN"/>
    </style:style>
    <style:style style:family="table-cell" style:name="ce53">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277">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276">
      <style:text-properties fo:color="#000000" fo:font-family="Liberation Serif" style:font-family-complex="Liberation Serif" fo:font-size="10pt" style:font-size-complex="10pt" fo:language="de" style:language-complex="hi" fo:country="DE" style:country-complex="IN"/>
    </style:style>
    <style:style style:family="text" style:name="T1277">
      <style:text-properties fo:color="#000000" fo:font-family="Liberation Serif" style:font-family-complex="Liberation Serif" fo:font-size="12pt" style:font-size-complex="12pt" fo:language="de" style:language-complex="hi" fo:country="DE" style:country-complex="IN"/>
    </style:style>
    <style:style style:family="text" style:name="T1278">
      <style:text-properties fo:color="#000000" fo:font-family="Liberation Serif" style:font-family-complex="Liberation Serif" fo:font-size="12pt" style:font-size-complex="12pt" fo:language="de" style:language-complex="hi" fo:country="DE" style:country-complex="IN"/>
    </style:style>
    <style:style style:family="table-cell" style:name="ce54">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278">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279">
      <style:text-properties fo:color="#000000" fo:font-family="Liberation Serif" style:font-family-complex="Liberation Serif" fo:font-size="10pt" style:font-size-complex="10pt" fo:language="de" style:language-complex="hi" fo:country="DE" style:country-complex="IN"/>
    </style:style>
    <style:style style:family="text" style:name="T1280">
      <style:text-properties fo:color="#000000" fo:font-family="Liberation Serif" style:font-family-complex="Liberation Serif" fo:font-size="12pt" style:font-size-complex="12pt" fo:language="de" style:language-complex="hi" fo:country="DE" style:country-complex="IN"/>
    </style:style>
    <style:style style:family="text" style:name="T1281">
      <style:text-properties fo:color="#000000" fo:font-family="Liberation Serif" style:font-family-complex="Liberation Serif" fo:font-size="12pt" style:font-size-complex="12pt" fo:language="de" style:language-complex="hi" fo:country="DE" style:country-complex="IN"/>
    </style:style>
    <style:style style:family="table-row" style:name="ro25">
      <style:table-row-properties/>
    </style:style>
    <style:style style:family="table-cell" style:name="ce55">
      <style:table-cell-properties style:vertical-align="top" style:direction="ltr" fo:background-color="#f2f2f2" fo:border="0.00882cm solid #CCCCCC" loext:writing-mode="lr-tb" fo:padding-top="0.1411cm" fo:padding-bottom="0.1411cm" fo:padding-left="0.2117cm" fo:padding-right="0.2117cm"/>
    </style:style>
    <style:style style:parent-style-name="737" style:family="paragraph" style:name="P279">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282">
      <style:text-properties fo:color="#000000" fo:font-family="Liberation Serif" style:font-family-complex="Liberation Serif" fo:font-size="10pt" style:font-size-complex="10pt" fo:language="de" style:language-complex="hi" fo:country="DE" style:country-complex="IN"/>
    </style:style>
    <style:style style:family="text" style:name="T1283">
      <style:text-properties fo:color="#000000" fo:font-family="Liberation Serif" style:font-family-complex="Liberation Serif" fo:font-size="12pt" style:font-size-complex="12pt" fo:language="de" style:language-complex="hi" fo:country="DE" style:country-complex="IN"/>
    </style:style>
    <style:style style:family="text" style:name="T1284">
      <style:text-properties fo:color="#000000" fo:font-family="Liberation Serif" style:font-family-complex="Liberation Serif" fo:font-size="12pt" style:font-size-complex="12pt" fo:language="de" style:language-complex="hi" fo:country="DE" style:country-complex="IN"/>
    </style:style>
    <style:style style:family="table-cell" style:name="ce56">
      <style:table-cell-properties style:vertical-align="top" style:direction="ltr" fo:background-color="#f2f2f2" fo:border="0.00882cm solid #CCCCCC" loext:writing-mode="lr-tb" fo:padding-top="0.1411cm" fo:padding-bottom="0.1411cm" fo:padding-left="0.2117cm" fo:padding-right="0.2117cm"/>
    </style:style>
    <style:style style:parent-style-name="737" style:family="paragraph" style:name="P280">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285">
      <style:text-properties fo:color="#000000" fo:font-family="Liberation Serif" style:font-family-complex="Liberation Serif" fo:font-size="10pt" style:font-size-complex="10pt" fo:language="de" style:language-complex="hi" fo:country="DE" style:country-complex="IN"/>
    </style:style>
    <style:style style:family="text" style:name="T1286">
      <style:text-properties fo:color="#000000" fo:font-family="Liberation Serif" style:font-family-complex="Liberation Serif" fo:font-size="12pt" style:font-size-complex="12pt" fo:language="de" style:language-complex="hi" fo:country="DE" style:country-complex="IN"/>
    </style:style>
    <style:style style:family="text" style:name="T1287">
      <style:text-properties fo:color="#000000" fo:font-family="Liberation Serif" style:font-family-complex="Liberation Serif" fo:font-size="12pt" style:font-size-complex="12pt" fo:language="de" style:language-complex="hi" fo:country="DE" style:country-complex="IN"/>
    </style:style>
    <style:style style:family="table-cell" style:name="ce57">
      <style:table-cell-properties style:vertical-align="top" style:direction="ltr" fo:background-color="#f2f2f2" fo:border="0.00882cm solid #CCCCCC" loext:writing-mode="lr-tb" fo:padding-top="0.1411cm" fo:padding-bottom="0.1411cm" fo:padding-left="0.2117cm" fo:padding-right="0.2117cm"/>
    </style:style>
    <style:style style:parent-style-name="737" style:family="paragraph" style:name="P281">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288">
      <style:text-properties fo:color="#000000" fo:font-family="Liberation Serif" style:font-family-complex="Liberation Serif" fo:font-size="10pt" style:font-size-complex="10pt" fo:language="de" style:language-complex="hi" fo:country="DE" style:country-complex="IN"/>
    </style:style>
    <style:style style:family="text" style:name="T1289">
      <style:text-properties fo:color="#000000" fo:font-family="Liberation Serif" style:font-family-complex="Liberation Serif" fo:font-size="12pt" style:font-size-complex="12pt" fo:language="de" style:language-complex="hi" fo:country="DE" style:country-complex="IN"/>
    </style:style>
    <style:style style:family="text" style:name="T1290">
      <style:text-properties fo:color="#000000" fo:font-family="Liberation Serif" style:font-family-complex="Liberation Serif" fo:font-size="12pt" style:font-size-complex="12pt" fo:language="de" style:language-complex="hi" fo:country="DE" style:country-complex="IN"/>
    </style:style>
    <style:style style:family="table-cell" style:name="ce58">
      <style:table-cell-properties style:vertical-align="top" style:direction="ltr" fo:background-color="#f2f2f2" fo:border="0.00882cm solid #CCCCCC" loext:writing-mode="lr-tb" fo:padding-top="0.1411cm" fo:padding-bottom="0.1411cm" fo:padding-left="0.2117cm" fo:padding-right="0.2117cm"/>
    </style:style>
    <style:style style:parent-style-name="737" style:family="paragraph" style:name="P282">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291">
      <style:text-properties fo:color="#000000" fo:font-family="Liberation Serif" style:font-family-complex="Liberation Serif" fo:font-size="10pt" style:font-size-complex="10pt" fo:language="de" style:language-complex="hi" fo:country="DE" style:country-complex="IN"/>
    </style:style>
    <style:style style:family="text" style:name="T1292">
      <style:text-properties fo:color="#000000" fo:font-family="Liberation Serif" style:font-family-complex="Liberation Serif" fo:font-size="12pt" style:font-size-complex="12pt" fo:language="de" style:language-complex="hi" fo:country="DE" style:country-complex="IN"/>
    </style:style>
    <style:style style:family="text" style:name="T1293">
      <style:text-properties fo:color="#000000" fo:font-family="Liberation Serif" style:font-family-complex="Liberation Serif" fo:font-size="12pt" style:font-size-complex="12pt" fo:language="de" style:language-complex="hi" fo:country="DE" style:country-complex="IN"/>
    </style:style>
    <style:style style:family="table-row" style:name="ro26">
      <style:table-row-properties/>
    </style:style>
    <style:style style:family="table-cell" style:name="ce59">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283">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294">
      <style:text-properties fo:color="#000000" fo:font-family="Liberation Serif" style:font-family-complex="Liberation Serif" fo:font-size="10pt" style:font-size-complex="10pt" fo:language="de" style:language-complex="hi" fo:country="DE" style:country-complex="IN"/>
    </style:style>
    <style:style style:family="text" style:name="T1295">
      <style:text-properties fo:color="#000000" fo:font-family="Liberation Serif" style:font-family-complex="Liberation Serif" fo:font-size="12pt" style:font-size-complex="12pt" fo:language="de" style:language-complex="hi" fo:country="DE" style:country-complex="IN"/>
    </style:style>
    <style:style style:family="text" style:name="T1296">
      <style:text-properties fo:color="#000000" fo:font-family="Liberation Serif" style:font-family-complex="Liberation Serif" fo:font-size="12pt" style:font-size-complex="12pt" fo:language="de" style:language-complex="hi" fo:country="DE" style:country-complex="IN"/>
    </style:style>
    <style:style style:family="table-cell" style:name="ce60">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284">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297">
      <style:text-properties fo:color="#000000" fo:font-family="Liberation Serif" style:font-family-complex="Liberation Serif" fo:font-size="12pt" style:font-size-complex="12pt" fo:language="de" style:language-complex="hi" fo:country="DE" style:country-complex="IN"/>
    </style:style>
    <style:style style:family="text" style:name="T1298">
      <style:text-properties fo:color="#000000" fo:font-family="Liberation Serif" style:font-family-complex="Liberation Serif" fo:font-size="12pt" style:font-size-complex="12pt" fo:language="de" style:language-complex="hi" fo:country="DE" style:country-complex="IN"/>
    </style:style>
    <style:style style:family="text" style:name="T1299">
      <style:text-properties fo:color="#000000" fo:font-family="Liberation Serif" style:font-family-complex="Liberation Serif" fo:font-size="12pt" style:font-size-complex="12pt" fo:language="de" style:language-complex="hi" fo:country="DE" style:country-complex="IN"/>
    </style:style>
    <style:style style:family="table-cell" style:name="ce61">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285">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300">
      <style:text-properties fo:color="#000000" fo:font-family="Liberation Serif" style:font-family-complex="Liberation Serif" fo:font-size="12pt" style:font-size-complex="12pt" fo:language="de" style:language-complex="hi" fo:country="DE" style:country-complex="IN"/>
    </style:style>
    <style:style style:family="text" style:name="T1301">
      <style:text-properties fo:color="#000000" fo:font-family="Liberation Serif" style:font-family-complex="Liberation Serif" fo:font-size="12pt" style:font-size-complex="12pt" fo:language="de" style:language-complex="hi" fo:country="DE" style:country-complex="IN"/>
    </style:style>
    <style:style style:family="text" style:name="T1302">
      <style:text-properties fo:color="#000000" fo:font-family="Liberation Serif" style:font-family-complex="Liberation Serif" fo:font-size="12pt" style:font-size-complex="12pt" fo:language="de" style:language-complex="hi" fo:country="DE" style:country-complex="IN"/>
    </style:style>
    <style:style style:family="table-cell" style:name="ce62">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286">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303">
      <style:text-properties fo:color="#000000" fo:font-family="Liberation Serif" style:font-family-complex="Liberation Serif" fo:font-size="10pt" style:font-size-complex="10pt" fo:language="de" style:language-complex="hi" fo:country="DE" style:country-complex="IN"/>
    </style:style>
    <style:style style:family="text" style:name="T1304">
      <style:text-properties fo:color="#000000" fo:font-family="Liberation Serif" style:font-family-complex="Liberation Serif" fo:font-size="12pt" style:font-size-complex="12pt" fo:language="de" style:language-complex="hi" fo:country="DE" style:country-complex="IN"/>
    </style:style>
    <style:style style:family="text" style:name="T1305">
      <style:text-properties fo:color="#000000" fo:font-family="Liberation Serif" style:font-family-complex="Liberation Serif" fo:font-size="12pt" style:font-size-complex="12pt" fo:language="de" style:language-complex="hi" fo:country="DE" style:country-complex="IN"/>
    </style:style>
    <style:style style:parent-style-name="748" style:family="paragraph" style:name="P287">
      <style:paragraph-properties fo:margin-left="0cm" fo:margin-right="0cm" fo:text-indent="0cm"/>
      <style:text-properties fo:color="#000000" fo:font-family="Liberation Sans" style:font-family-complex="Liberation Sans" fo:font-size="14pt" style:font-size-complex="14pt" fo:language="de" style:language-complex="hi" fo:country="DE" style:country-complex="IN" fo:font-weight="bold"/>
    </style:style>
    <style:style style:family="text" style:name="T1306">
      <style:text-properties fo:color="#000000" fo:font-family="Liberation Sans" style:font-family-complex="Liberation Sans" fo:font-size="14pt" style:font-size-complex="14pt" fo:language="de" style:language-complex="hi" fo:country="DE" style:country-complex="IN" fo:font-weight="bold"/>
    </style:style>
    <style:style style:family="text" style:name="T1307">
      <style:text-properties fo:color="#000000" fo:font-family="Liberation Sans" style:font-family-complex="Liberation Sans" fo:font-size="14pt" style:font-size-complex="14pt" fo:language="de" style:language-complex="hi" fo:country="DE" style:country-complex="IN" fo:font-weight="bold"/>
    </style:style>
    <style:style style:family="text" style:name="T1308">
      <style:text-properties fo:color="#000000" fo:font-family="Liberation Sans" style:font-family-complex="Liberation Sans" fo:font-size="14pt" style:font-size-complex="14pt" fo:language="de" style:language-complex="hi" fo:country="DE" style:country-complex="IN" fo:font-weight="bold"/>
    </style:style>
    <style:style style:family="text" style:name="T1309">
      <style:text-properties fo:color="#000000" fo:font-family="Liberation Sans" style:font-family-complex="Liberation Sans" fo:font-size="14pt" style:font-size-complex="14pt" fo:language="de" style:language-complex="hi" fo:country="DE" style:country-complex="IN" fo:font-weight="bold"/>
    </style:style>
    <style:style style:family="text" style:name="T1310">
      <style:text-properties fo:color="#000000" fo:font-family="Liberation Sans" style:font-family-complex="Liberation Sans" fo:font-size="14pt" style:font-size-complex="14pt" fo:language="de" style:language-complex="hi" fo:country="DE" style:country-complex="IN" fo:font-weight="bold"/>
    </style:style>
    <style:style style:family="paragraph" style:name="P288">
      <style:paragraph-properties fo:margin-left="0cm" fo:margin-right="0cm" fo:text-indent="0cm" fo:border="none"/>
      <style:text-properties fo:language="de" fo:country="DE"/>
    </style:style>
    <style:style style:family="text" style:name="T1311">
      <style:text-properties fo:color="#000000" fo:font-family="Times New Roman" style:font-family-complex="Times New Roman" fo:font-size="12pt" fo:language="de" fo:country="DE"/>
    </style:style>
    <style:style style:family="text" style:name="T1312">
      <style:text-properties fo:language="de" fo:country="DE"/>
    </style:style>
    <style:style style:family="text" style:name="T1313">
      <style:text-properties fo:language="de" fo:country="DE"/>
    </style:style>
    <style:style style:family="paragraph" style:name="P289">
      <style:paragraph-properties fo:margin-left="0cm" fo:margin-right="0cm" fo:text-indent="0cm" fo:border="none"/>
      <style:text-properties fo:font-family="Times New Roman" style:font-family-complex="Times New Roman" fo:font-size="12pt" style:font-size-complex="12pt" fo:language="de" fo:country="DE"/>
    </style:style>
    <style:style style:family="text" style:name="T1314">
      <style:text-properties fo:color="#000000" fo:font-family="Times New Roman" style:font-family-complex="Times New Roman" fo:font-size="12pt" style:font-size-complex="12pt" fo:language="de" fo:country="DE"/>
    </style:style>
    <style:style style:family="text" style:name="T1315">
      <style:text-properties fo:font-family="Times New Roman" style:font-family-complex="Times New Roman" fo:font-size="12pt" style:font-size-complex="12pt" fo:language="de" fo:country="DE"/>
    </style:style>
    <style:style style:family="text" style:name="T1316">
      <style:text-properties fo:font-family="Times New Roman" style:font-family-complex="Times New Roman" fo:font-size="12pt" style:font-size-complex="12pt" fo:language="de" fo:country="DE"/>
    </style:style>
    <style:style style:family="paragraph" style:name="P290">
      <style:paragraph-properties fo:margin-left="0cm" fo:margin-right="0cm" fo:text-indent="0cm" fo:border="none"/>
      <style:text-properties fo:color="#000000" fo:font-family="Times New Roman" style:font-family-complex="Times New Roman" fo:font-size="12pt" style:font-size-complex="12pt" fo:language="de" fo:country="DE"/>
    </style:style>
    <style:style style:family="text" style:name="T1317">
      <style:text-properties fo:color="#000000" fo:font-family="Times New Roman" style:font-family-complex="Times New Roman" fo:font-size="12pt" style:font-size-complex="12pt" fo:language="de" fo:country="DE"/>
    </style:style>
    <style:style style:family="text" style:name="T1318">
      <style:text-properties fo:color="#000000" fo:font-family="Times New Roman" style:font-family-complex="Times New Roman" fo:font-size="12pt" style:font-size-complex="12pt" fo:language="de" fo:country="DE"/>
    </style:style>
    <style:style style:family="text" style:name="T1319">
      <style:text-properties fo:color="#000000" fo:font-family="Times New Roman" style:font-family-complex="Times New Roman" fo:font-size="12pt" style:font-size-complex="12pt" fo:language="de" fo:country="DE"/>
    </style:style>
    <style:style style:family="text" style:name="T1320">
      <style:text-properties fo:color="#000000" fo:font-family="Times New Roman" style:font-family-complex="Times New Roman" fo:font-size="12pt" style:font-size-complex="12pt" fo:language="de" fo:country="DE"/>
    </style:style>
    <style:style style:family="paragraph" style:name="P291">
      <style:paragraph-properties fo:margin-left="0cm" fo:margin-right="0cm" fo:text-indent="0cm" fo:border="none"/>
      <style:text-properties fo:font-family="Times New Roman" style:font-family-complex="Times New Roman" fo:font-size="12pt" style:font-size-complex="12pt" fo:language="de" fo:country="DE"/>
    </style:style>
    <style:style style:family="text" style:name="T1321">
      <style:text-properties fo:color="#000000" fo:font-family="Times New Roman" style:font-family-complex="Times New Roman" fo:font-size="12pt" style:font-size-complex="12pt" fo:language="de" fo:country="DE"/>
    </style:style>
    <style:style style:family="text" style:name="T1322">
      <style:text-properties fo:font-family="Times New Roman" style:font-family-complex="Times New Roman" fo:font-size="12pt" style:font-size-complex="12pt" fo:language="de" fo:country="DE"/>
    </style:style>
    <style:style style:family="text" style:name="T1323">
      <style:text-properties fo:font-family="Times New Roman" style:font-family-complex="Times New Roman" fo:font-size="12pt" style:font-size-complex="12pt" fo:language="de" fo:country="DE"/>
    </style:style>
    <style:style style:family="paragraph" style:name="P292">
      <style:paragraph-properties fo:margin-left="0cm" fo:margin-right="0cm" fo:text-indent="0cm" fo:border="none"/>
      <style:text-properties fo:color="#000000" fo:font-family="Times New Roman" style:font-family-complex="Times New Roman" fo:font-size="12pt" style:font-size-complex="12pt" fo:language="de" fo:country="DE"/>
    </style:style>
    <style:style style:family="text" style:name="T1324">
      <style:text-properties fo:color="#000000" fo:font-family="Times New Roman" style:font-family-complex="Times New Roman" fo:font-size="12pt" style:font-size-complex="12pt" fo:language="de" fo:country="DE"/>
    </style:style>
    <style:style style:family="text" style:name="T1325">
      <style:text-properties fo:color="#000000" fo:font-family="Times New Roman" style:font-family-complex="Times New Roman" fo:font-size="12pt" style:font-size-complex="12pt" fo:language="de" fo:country="DE"/>
    </style:style>
    <style:style style:family="text" style:name="T1326">
      <style:text-properties fo:color="#000000" fo:font-family="Times New Roman" style:font-family-complex="Times New Roman" fo:font-size="12pt" style:font-size-complex="12pt" fo:language="de" fo:country="DE"/>
    </style:style>
    <style:style style:family="text" style:name="T1327">
      <style:text-properties fo:color="#000000" fo:font-family="Times New Roman" style:font-family-complex="Times New Roman" fo:font-size="12pt" style:font-size-complex="12pt" fo:language="de" fo:country="DE"/>
    </style:style>
    <style:style style:parent-style-name="737" style:family="paragraph" style:name="P293">
      <style:paragraph-properties fo:margin-left="0cm" fo:margin-right="0cm" fo:text-indent="0cm" fo:margin-top="3pt" fo:margin-bottom="3pt"/>
      <style:text-properties fo:color="#000000" fo:font-family="Liberation Serif" style:font-family-complex="Liberation Serif" fo:font-size="12pt" style:font-size-complex="12pt" fo:language="de" style:language-complex="hi" fo:country="DE" style:country-complex="IN"/>
    </style:style>
    <style:style style:family="text" style:name="T1328">
      <style:text-properties fo:color="#000000" fo:font-family="Liberation Serif" style:font-family-complex="Liberation Serif" fo:font-size="12pt" style:font-size-complex="12pt" fo:language="de" style:language-complex="hi" fo:country="DE" style:country-complex="IN"/>
    </style:style>
    <style:style style:family="text" style:name="T1329">
      <style:text-properties fo:color="#000000" fo:font-family="Liberation Serif" style:font-family-complex="Liberation Serif" fo:font-size="12pt" style:font-size-complex="12pt" fo:language="de" style:language-complex="hi" fo:country="DE" style:country-complex="IN"/>
    </style:style>
    <style:style style:family="text" style:name="T1330">
      <style:text-properties fo:color="#000000" fo:font-family="Liberation Serif" style:font-family-complex="Liberation Serif" fo:font-size="12pt" style:font-size-complex="12pt" fo:language="de" style:language-complex="hi" fo:country="DE" style:country-complex="IN"/>
    </style:style>
    <style:style style:parent-style-name="747" style:family="paragraph" style:name="P294">
      <style:paragraph-properties fo:margin-left="0cm" fo:margin-right="0cm" fo:text-indent="0cm"/>
      <style:text-properties fo:color="#000000" fo:font-family="Liberation Sans" style:font-family-complex="Liberation Sans" fo:font-size="16pt" style:font-size-complex="16pt" fo:language="de" style:language-complex="hi" fo:country="DE" style:country-complex="IN" fo:font-weight="bold"/>
    </style:style>
    <style:style style:family="text" style:name="T1331">
      <style:text-properties fo:color="#000000" fo:font-family="Liberation Sans" style:font-family-complex="Liberation Sans" fo:font-size="16pt" style:font-size-complex="16pt" fo:language="de" style:language-complex="hi" fo:country="DE" style:country-complex="IN" fo:font-weight="bold"/>
    </style:style>
    <style:style style:family="text" style:name="T1332">
      <style:text-properties fo:color="#000000" fo:font-family="Liberation Sans" style:font-family-complex="Liberation Sans" fo:font-size="16pt" style:font-size-complex="16pt" fo:language="de" style:language-complex="hi" fo:country="DE" style:country-complex="IN" fo:font-weight="bold"/>
    </style:style>
    <style:style style:family="text" style:name="T1333">
      <style:text-properties fo:color="#000000" fo:font-family="Liberation Sans" style:font-family-complex="Liberation Sans" fo:font-size="16pt" style:font-size-complex="16pt" fo:language="de" style:language-complex="hi" fo:country="DE" style:country-complex="IN" fo:font-weight="bold"/>
    </style:style>
    <style:style style:family="text" style:name="T1334">
      <style:text-properties fo:color="#000000" fo:font-family="Liberation Sans" style:font-family-complex="Liberation Sans" fo:font-size="16pt" style:font-size-complex="16pt" fo:language="de" style:language-complex="hi" fo:country="DE" style:country-complex="IN" fo:font-weight="bold"/>
    </style:style>
    <style:style style:family="text" style:name="T1335">
      <style:text-properties fo:color="#000000" fo:font-family="Liberation Sans" style:font-family-complex="Liberation Sans" fo:font-size="16pt" style:font-size-complex="16pt" fo:language="de" style:language-complex="hi" fo:country="DE" style:country-complex="IN" fo:font-weight="bold"/>
    </style:style>
    <style:style style:parent-style-name="737" style:family="paragraph" style:name="P295">
      <style:paragraph-properties fo:margin-left="0cm" fo:margin-right="0cm" fo:text-indent="0cm" fo:margin-top="3pt" fo:margin-bottom="3pt"/>
      <style:text-properties fo:color="#000000" fo:font-family="Liberation Serif" style:font-family-complex="Liberation Serif" fo:font-size="12pt" style:font-size-complex="12pt" fo:language="de" style:language-complex="hi" fo:country="DE" style:country-complex="IN"/>
    </style:style>
    <style:style style:family="text" style:name="T1336">
      <style:text-properties fo:color="#000000" fo:font-family="Liberation Serif" style:font-family-complex="Liberation Serif" fo:font-size="12pt" style:font-size-complex="12pt" fo:language="de" style:language-complex="hi" fo:country="DE" style:country-complex="IN"/>
    </style:style>
    <style:style style:family="text" style:name="T1337">
      <style:text-properties fo:color="#000000" fo:font-family="Liberation Serif" style:font-family-complex="Liberation Serif" fo:font-size="12pt" style:font-size-complex="12pt" fo:language="de" style:language-complex="hi" fo:country="DE" style:country-complex="IN"/>
    </style:style>
    <style:style style:family="text" style:name="T1338">
      <style:text-properties fo:color="#000000" fo:font-family="Liberation Serif" style:font-family-complex="Liberation Serif" fo:font-size="12pt" style:font-size-complex="12pt" fo:language="de" style:language-complex="hi" fo:country="DE" style:country-complex="IN"/>
    </style:style>
    <style:style style:parent-style-name="746" style:list-style-name="WWNum1" style:family="paragraph" style:name="P296">
      <style:paragraph-properties fo:margin-left="1.27cm" fo:margin-right="0cm" fo:text-indent="-0.635cm" fo:margin-top="2pt" fo:margin-bottom="2pt"/>
      <style:text-properties fo:color="#000000" fo:font-family="Arial" style:font-family-complex="Arial" fo:font-size="11pt" style:font-size-complex="11pt" fo:language="de" style:language-complex="ar" fo:country="DE" style:country-complex="SA"/>
    </style:style>
    <style:style style:family="text" style:name="T1339">
      <style:text-properties fo:color="#000000" fo:font-family="Arial" style:font-family-complex="Arial" fo:font-size="11pt" style:font-size-complex="11pt" fo:language="de" style:language-complex="ar" fo:country="DE" style:country-complex="SA"/>
    </style:style>
    <style:style style:family="text" style:name="T1340">
      <style:text-properties fo:color="#000000" fo:font-family="Arial" style:font-family-complex="Arial" fo:font-size="11pt" style:font-size-complex="11pt" fo:language="de" style:language-complex="ar" fo:country="DE" style:country-complex="SA"/>
    </style:style>
    <style:style style:family="text" style:name="T1341">
      <style:text-properties fo:color="#000000" fo:font-family="Arial" style:font-family-complex="Arial" fo:font-size="11pt" style:font-size-complex="11pt" fo:language="de" style:language-complex="ar" fo:country="DE" style:country-complex="SA"/>
    </style:style>
    <style:style style:parent-style-name="746" style:list-style-name="WWNum1" style:family="paragraph" style:name="P297">
      <style:paragraph-properties fo:margin-left="1.27cm" fo:margin-right="0cm" fo:text-indent="-0.635cm" fo:margin-top="2pt" fo:margin-bottom="2pt"/>
      <style:text-properties fo:color="#000000" fo:font-family="Arial" style:font-family-complex="Arial" fo:font-size="11pt" style:font-size-complex="11pt" fo:language="de" style:language-complex="ar" fo:country="DE" style:country-complex="SA"/>
    </style:style>
    <style:style style:family="text" style:name="T1342">
      <style:text-properties fo:color="#000000" fo:font-family="Arial" style:font-family-complex="Arial" fo:font-size="11pt" style:font-size-complex="11pt" fo:language="de" style:language-complex="ar" fo:country="DE" style:country-complex="SA"/>
    </style:style>
    <style:style style:family="text" style:name="T1343">
      <style:text-properties fo:color="#000000" fo:font-family="Arial" style:font-family-complex="Arial" fo:font-size="11pt" style:font-size-complex="11pt" fo:language="de" style:language-complex="ar" fo:country="DE" style:country-complex="SA"/>
    </style:style>
    <style:style style:family="text" style:name="T1344">
      <style:text-properties fo:color="#000000" fo:font-family="Arial" style:font-family-complex="Arial" fo:font-size="11pt" style:font-size-complex="11pt" fo:language="de" style:language-complex="ar" fo:country="DE" style:country-complex="SA"/>
    </style:style>
    <style:style style:parent-style-name="746" style:list-style-name="WWNum1" style:family="paragraph" style:name="P298">
      <style:paragraph-properties fo:margin-left="1.27cm" fo:margin-right="0cm" fo:text-indent="-0.635cm" fo:margin-top="2pt" fo:margin-bottom="2pt"/>
      <style:text-properties fo:color="#000000" fo:font-family="Arial" style:font-family-complex="Arial" fo:font-size="11pt" style:font-size-complex="11pt" fo:language="de" style:language-complex="ar" fo:country="DE" style:country-complex="SA"/>
    </style:style>
    <style:style style:family="text" style:name="T1345">
      <style:text-properties fo:color="#000000" fo:font-family="Arial" style:font-family-complex="Arial" fo:font-size="11pt" style:font-size-complex="11pt" fo:language="de" style:language-complex="ar" fo:country="DE" style:country-complex="SA"/>
    </style:style>
    <style:style style:family="text" style:name="T1346">
      <style:text-properties fo:color="#000000" fo:font-family="Arial" style:font-family-complex="Arial" fo:font-size="11pt" style:font-size-complex="11pt" fo:language="de" style:language-complex="ar" fo:country="DE" style:country-complex="SA"/>
    </style:style>
    <style:style style:family="text" style:name="T1347">
      <style:text-properties fo:color="#000000" fo:font-family="Arial" style:font-family-complex="Arial" fo:font-size="11pt" style:font-size-complex="11pt" fo:language="de" style:language-complex="ar" fo:country="DE" style:country-complex="SA"/>
    </style:style>
    <style:style style:parent-style-name="746" style:list-style-name="WWNum1" style:family="paragraph" style:name="P299">
      <style:paragraph-properties fo:margin-left="1.27cm" fo:margin-right="0cm" fo:text-indent="-0.635cm" fo:margin-top="2pt" fo:margin-bottom="2pt"/>
      <style:text-properties fo:color="#000000" fo:font-family="Arial" style:font-family-complex="Arial" fo:font-size="11pt" style:font-size-complex="11pt" fo:language="de" style:language-complex="ar" fo:country="DE" style:country-complex="SA"/>
    </style:style>
    <style:style style:family="text" style:name="T1348">
      <style:text-properties fo:color="#000000" fo:font-family="Arial" style:font-family-complex="Arial" fo:font-size="11pt" style:font-size-complex="11pt" fo:language="de" style:language-complex="ar" fo:country="DE" style:country-complex="SA"/>
    </style:style>
    <style:style style:family="text" style:name="T1349">
      <style:text-properties fo:color="#000000" fo:font-family="Arial" style:font-family-complex="Arial" fo:font-size="11pt" style:font-size-complex="11pt" fo:language="de" style:language-complex="ar" fo:country="DE" style:country-complex="SA"/>
    </style:style>
    <style:style style:family="text" style:name="T1350">
      <style:text-properties fo:color="#000000" fo:font-family="Arial" style:font-family-complex="Arial" fo:font-size="11pt" style:font-size-complex="11pt" fo:language="de" style:language-complex="ar" fo:country="DE" style:country-complex="SA"/>
    </style:style>
    <style:style style:parent-style-name="746" style:list-style-name="WWNum1" style:family="paragraph" style:name="P300">
      <style:paragraph-properties fo:margin-left="1.27cm" fo:margin-right="0cm" fo:text-indent="-0.635cm" fo:margin-top="2pt" fo:margin-bottom="2pt"/>
      <style:text-properties fo:color="#000000" fo:font-family="Arial" style:font-family-complex="Arial" fo:font-size="11pt" style:font-size-complex="11pt" fo:language="de" style:language-complex="ar" fo:country="DE" style:country-complex="SA"/>
    </style:style>
    <style:style style:family="text" style:name="T1351">
      <style:text-properties fo:color="#000000" fo:font-family="Arial" style:font-family-complex="Arial" fo:font-size="11pt" style:font-size-complex="11pt" fo:language="de" style:language-complex="ar" fo:country="DE" style:country-complex="SA"/>
    </style:style>
    <style:style style:family="text" style:name="T1352">
      <style:text-properties fo:color="#000000" fo:font-family="Arial" style:font-family-complex="Arial" fo:font-size="11pt" style:font-size-complex="11pt" fo:language="de" style:language-complex="ar" fo:country="DE" style:country-complex="SA"/>
    </style:style>
    <style:style style:family="text" style:name="T1353">
      <style:text-properties fo:color="#000000" fo:font-family="Arial" style:font-family-complex="Arial" fo:font-size="11pt" style:font-size-complex="11pt" fo:language="de" style:language-complex="ar" fo:country="DE" style:country-complex="SA"/>
    </style:style>
    <style:style style:parent-style-name="747" style:family="paragraph" style:name="P301">
      <style:paragraph-properties fo:margin-left="0cm" fo:margin-right="0cm" fo:text-indent="0cm"/>
      <style:text-properties fo:color="#000000" fo:font-family="Liberation Sans" style:font-family-complex="Liberation Sans" fo:font-size="16pt" style:font-size-complex="16pt" fo:language="de" style:language-complex="hi" fo:country="DE" style:country-complex="IN" fo:font-weight="bold"/>
    </style:style>
    <style:style style:family="text" style:name="T1354">
      <style:text-properties fo:color="#000000" fo:font-family="Liberation Sans" style:font-family-complex="Liberation Sans" fo:font-size="16pt" style:font-size-complex="16pt" fo:language="de" style:language-complex="hi" fo:country="DE" style:country-complex="IN" fo:font-weight="bold"/>
    </style:style>
    <style:style style:family="text" style:name="T1355">
      <style:text-properties fo:color="#000000" fo:font-family="Liberation Sans" style:font-family-complex="Liberation Sans" fo:font-size="16pt" style:font-size-complex="16pt" fo:language="de" style:language-complex="hi" fo:country="DE" style:country-complex="IN" fo:font-weight="bold"/>
    </style:style>
    <style:style style:family="text" style:name="T1356">
      <style:text-properties fo:color="#000000" fo:font-family="Liberation Sans" style:font-family-complex="Liberation Sans" fo:font-size="16pt" style:font-size-complex="16pt" fo:language="de" style:language-complex="hi" fo:country="DE" style:country-complex="IN" fo:font-weight="bold"/>
    </style:style>
    <style:style style:family="text" style:name="T1357">
      <style:text-properties fo:color="#000000" fo:font-family="Liberation Sans" style:font-family-complex="Liberation Sans" fo:font-size="16pt" style:font-size-complex="16pt" fo:language="de" style:language-complex="hi" fo:country="DE" style:country-complex="IN" fo:font-weight="bold"/>
    </style:style>
    <style:style style:family="text" style:name="T1358">
      <style:text-properties fo:color="#000000" fo:font-family="Liberation Sans" style:font-family-complex="Liberation Sans" fo:font-size="16pt" style:font-size-complex="16pt" fo:language="de" style:language-complex="hi" fo:country="DE" style:country-complex="IN" fo:font-weight="bold"/>
    </style:style>
    <style:style style:parent-style-name="737" style:family="paragraph" style:name="P302">
      <style:paragraph-properties fo:margin-left="0cm" fo:margin-right="0cm" fo:text-indent="0cm" fo:margin-top="3pt" fo:margin-bottom="3pt"/>
      <style:text-properties fo:color="#000000" fo:font-family="Liberation Serif" style:font-family-complex="Liberation Serif" fo:font-size="12pt" style:font-size-complex="12pt" fo:language="de" style:language-complex="hi" fo:country="DE" style:country-complex="IN"/>
    </style:style>
    <style:style style:family="text" style:name="T1359">
      <style:text-properties fo:color="#000000" fo:font-family="Liberation Serif" style:font-family-complex="Liberation Serif" fo:font-size="12pt" style:font-size-complex="12pt" fo:language="de" style:language-complex="hi" fo:country="DE" style:country-complex="IN"/>
    </style:style>
    <style:style style:family="text" style:name="T1360">
      <style:text-properties fo:color="#000000" fo:font-family="Liberation Serif" style:font-family-complex="Liberation Serif" fo:font-size="12pt" style:font-size-complex="12pt" fo:language="de" style:language-complex="hi" fo:country="DE" style:country-complex="IN"/>
    </style:style>
    <style:style style:family="text" style:name="T1361">
      <style:text-properties fo:color="#000000" fo:font-family="Liberation Serif" style:font-family-complex="Liberation Serif" fo:font-size="12pt" style:font-size-complex="12pt" fo:language="de" style:language-complex="hi" fo:country="DE" style:country-complex="IN"/>
    </style:style>
    <style:style style:parent-style-name="737" style:family="paragraph" style:name="P303">
      <style:paragraph-properties fo:margin-left="0cm" fo:margin-right="0cm" fo:text-indent="0cm" fo:margin-top="3pt" fo:margin-bottom="3pt"/>
      <style:text-properties fo:color="#000000" fo:font-family="Liberation Serif" style:font-family-complex="Liberation Serif" fo:font-size="12pt" style:font-size-complex="12pt" fo:language="de" style:language-complex="hi" fo:country="DE" style:country-complex="IN"/>
    </style:style>
    <style:style style:family="text" style:name="T1362">
      <style:text-properties fo:color="#000000" fo:font-family="Liberation Serif" style:font-family-complex="Liberation Serif" fo:font-size="12pt" style:font-size-complex="12pt" fo:language="de" style:language-complex="hi" fo:country="DE" style:country-complex="IN"/>
    </style:style>
    <style:style style:family="text" style:name="T1363">
      <style:text-properties fo:color="#000000" fo:font-family="Liberation Serif" style:font-family-complex="Liberation Serif" fo:font-size="12pt" style:font-size-complex="12pt" fo:language="de" style:language-complex="hi" fo:country="DE" style:country-complex="IN"/>
    </style:style>
    <style:style style:family="text" style:name="T1364">
      <style:text-properties fo:color="#000000" fo:font-family="Liberation Serif" style:font-family-complex="Liberation Serif" fo:font-size="12pt" style:font-size-complex="12pt" fo:language="de" style:language-complex="hi" fo:country="DE" style:country-complex="IN"/>
    </style:style>
    <style:style style:family="table" style:name="ta3">
      <style:table-properties style:width="16.31cm" fo:margin-left="-0.01588cm" table:align="left"/>
    </style:style>
    <style:style style:family="table-column" style:name="co7">
      <style:table-column-properties style:column-width="6.566cm"/>
    </style:style>
    <style:style style:family="table-column" style:name="co8">
      <style:table-column-properties style:column-width="9.744cm"/>
    </style:style>
    <style:style style:family="table-row" style:name="ro27">
      <style:table-row-properties/>
    </style:style>
    <style:style style:family="table-cell" style:name="ce64">
      <style:table-cell-properties style:vertical-align="top" style:direction="ltr" fo:background-color="#1f4e79" fo:border="0.00882cm solid #CCCCCC" loext:writing-mode="lr-tb" fo:padding-top="0.1411cm" fo:padding-bottom="0.1411cm" fo:padding-left="0.2117cm" fo:padding-right="0.2117cm"/>
    </style:style>
    <style:style style:parent-style-name="737" style:family="paragraph" style:name="P304">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365">
      <style:text-properties fo:color="#ffffff" fo:font-family="Liberation Serif" style:font-family-complex="Liberation Serif" fo:font-size="10pt" style:font-size-complex="10pt" fo:language="de" style:language-complex="hi" fo:country="DE" style:country-complex="IN" fo:font-weight="bold"/>
    </style:style>
    <style:style style:family="text" style:name="T1366">
      <style:text-properties fo:color="#000000" fo:font-family="Liberation Serif" style:font-family-complex="Liberation Serif" fo:font-size="12pt" style:font-size-complex="12pt" fo:language="de" style:language-complex="hi" fo:country="DE" style:country-complex="IN"/>
    </style:style>
    <style:style style:family="text" style:name="T1367">
      <style:text-properties fo:color="#000000" fo:font-family="Liberation Serif" style:font-family-complex="Liberation Serif" fo:font-size="12pt" style:font-size-complex="12pt" fo:language="de" style:language-complex="hi" fo:country="DE" style:country-complex="IN"/>
    </style:style>
    <style:style style:family="table-cell" style:name="ce65">
      <style:table-cell-properties style:vertical-align="top" style:direction="ltr" fo:background-color="#1f4e79" fo:border="0.00882cm solid #CCCCCC" loext:writing-mode="lr-tb" fo:padding-top="0.1411cm" fo:padding-bottom="0.1411cm" fo:padding-left="0.2117cm" fo:padding-right="0.2117cm"/>
    </style:style>
    <style:style style:parent-style-name="737" style:family="paragraph" style:name="P305">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368">
      <style:text-properties fo:color="#ffffff" fo:font-family="Liberation Serif" style:font-family-complex="Liberation Serif" fo:font-size="10pt" style:font-size-complex="10pt" fo:language="de" style:language-complex="hi" fo:country="DE" style:country-complex="IN" fo:font-weight="bold"/>
    </style:style>
    <style:style style:family="text" style:name="T1369">
      <style:text-properties fo:color="#000000" fo:font-family="Liberation Serif" style:font-family-complex="Liberation Serif" fo:font-size="12pt" style:font-size-complex="12pt" fo:language="de" style:language-complex="hi" fo:country="DE" style:country-complex="IN"/>
    </style:style>
    <style:style style:family="text" style:name="T1370">
      <style:text-properties fo:color="#000000" fo:font-family="Liberation Serif" style:font-family-complex="Liberation Serif" fo:font-size="12pt" style:font-size-complex="12pt" fo:language="de" style:language-complex="hi" fo:country="DE" style:country-complex="IN"/>
    </style:style>
    <style:style style:family="table-row" style:name="ro28">
      <style:table-row-properties/>
    </style:style>
    <style:style style:family="table-cell" style:name="ce66">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306">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371">
      <style:text-properties fo:color="#000000" fo:font-family="Liberation Serif" style:font-family-complex="Liberation Serif" fo:font-size="10pt" style:font-size-complex="10pt" fo:language="de" style:language-complex="hi" fo:country="DE" style:country-complex="IN"/>
    </style:style>
    <style:style style:family="text" style:name="T1372">
      <style:text-properties fo:color="#000000" fo:font-family="Liberation Serif" style:font-family-complex="Liberation Serif" fo:font-size="12pt" style:font-size-complex="12pt" fo:language="de" style:language-complex="hi" fo:country="DE" style:country-complex="IN"/>
    </style:style>
    <style:style style:family="text" style:name="T1373">
      <style:text-properties fo:color="#000000" fo:font-family="Liberation Serif" style:font-family-complex="Liberation Serif" fo:font-size="12pt" style:font-size-complex="12pt" fo:language="de" style:language-complex="hi" fo:country="DE" style:country-complex="IN"/>
    </style:style>
    <style:style style:family="table-cell" style:name="ce67">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307">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374">
      <style:text-properties fo:color="#000000" fo:font-family="Liberation Serif" style:font-family-complex="Liberation Serif" fo:font-size="10pt" style:font-size-complex="10pt" fo:language="de" style:language-complex="hi" fo:country="DE" style:country-complex="IN"/>
    </style:style>
    <style:style style:family="text" style:name="T1375">
      <style:text-properties fo:color="#000000" fo:font-family="Liberation Serif" style:font-family-complex="Liberation Serif" fo:font-size="12pt" style:font-size-complex="12pt" fo:language="de" style:language-complex="hi" fo:country="DE" style:country-complex="IN"/>
    </style:style>
    <style:style style:family="text" style:name="T1376">
      <style:text-properties fo:color="#000000" fo:font-family="Liberation Serif" style:font-family-complex="Liberation Serif" fo:font-size="12pt" style:font-size-complex="12pt" fo:language="de" style:language-complex="hi" fo:country="DE" style:country-complex="IN"/>
    </style:style>
    <style:style style:family="table-row" style:name="ro29">
      <style:table-row-properties/>
    </style:style>
    <style:style style:family="table-cell" style:name="ce68">
      <style:table-cell-properties style:vertical-align="top" style:direction="ltr" fo:background-color="#f2f2f2" fo:border="0.00882cm solid #CCCCCC" loext:writing-mode="lr-tb" fo:padding-top="0.1411cm" fo:padding-bottom="0.1411cm" fo:padding-left="0.2117cm" fo:padding-right="0.2117cm"/>
    </style:style>
    <style:style style:parent-style-name="737" style:family="paragraph" style:name="P308">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377">
      <style:text-properties fo:color="#000000" fo:font-family="Liberation Serif" style:font-family-complex="Liberation Serif" fo:font-size="10pt" style:font-size-complex="10pt" fo:language="de" style:language-complex="hi" fo:country="DE" style:country-complex="IN"/>
    </style:style>
    <style:style style:family="text" style:name="T1378">
      <style:text-properties fo:color="#000000" fo:font-family="Liberation Serif" style:font-family-complex="Liberation Serif" fo:font-size="12pt" style:font-size-complex="12pt" fo:language="de" style:language-complex="hi" fo:country="DE" style:country-complex="IN"/>
    </style:style>
    <style:style style:family="text" style:name="T1379">
      <style:text-properties fo:color="#000000" fo:font-family="Liberation Serif" style:font-family-complex="Liberation Serif" fo:font-size="12pt" style:font-size-complex="12pt" fo:language="de" style:language-complex="hi" fo:country="DE" style:country-complex="IN"/>
    </style:style>
    <style:style style:family="table-cell" style:name="ce69">
      <style:table-cell-properties style:vertical-align="top" style:direction="ltr" fo:background-color="#f2f2f2" fo:border="0.00882cm solid #CCCCCC" loext:writing-mode="lr-tb" fo:padding-top="0.1411cm" fo:padding-bottom="0.1411cm" fo:padding-left="0.2117cm" fo:padding-right="0.2117cm"/>
    </style:style>
    <style:style style:parent-style-name="737" style:family="paragraph" style:name="P309">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380">
      <style:text-properties fo:color="#000000" fo:font-family="Liberation Serif" style:font-family-complex="Liberation Serif" fo:font-size="10pt" style:font-size-complex="10pt" fo:language="de" style:language-complex="hi" fo:country="DE" style:country-complex="IN"/>
    </style:style>
    <style:style style:family="text" style:name="T1381">
      <style:text-properties fo:color="#000000" fo:font-family="Liberation Serif" style:font-family-complex="Liberation Serif" fo:font-size="12pt" style:font-size-complex="12pt" fo:language="de" style:language-complex="hi" fo:country="DE" style:country-complex="IN"/>
    </style:style>
    <style:style style:family="text" style:name="T1382">
      <style:text-properties fo:color="#000000" fo:font-family="Liberation Serif" style:font-family-complex="Liberation Serif" fo:font-size="12pt" style:font-size-complex="12pt" fo:language="de" style:language-complex="hi" fo:country="DE" style:country-complex="IN"/>
    </style:style>
    <style:style style:family="table-row" style:name="ro30">
      <style:table-row-properties/>
    </style:style>
    <style:style style:family="table-cell" style:name="ce70">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310">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383">
      <style:text-properties fo:color="#000000" fo:font-family="Liberation Serif" style:font-family-complex="Liberation Serif" fo:font-size="10pt" style:font-size-complex="10pt" fo:language="de" style:language-complex="hi" fo:country="DE" style:country-complex="IN"/>
    </style:style>
    <style:style style:family="text" style:name="T1384">
      <style:text-properties fo:color="#000000" fo:font-family="Liberation Serif" style:font-family-complex="Liberation Serif" fo:font-size="12pt" style:font-size-complex="12pt" fo:language="de" style:language-complex="hi" fo:country="DE" style:country-complex="IN"/>
    </style:style>
    <style:style style:family="text" style:name="T1385">
      <style:text-properties fo:color="#000000" fo:font-family="Liberation Serif" style:font-family-complex="Liberation Serif" fo:font-size="12pt" style:font-size-complex="12pt" fo:language="de" style:language-complex="hi" fo:country="DE" style:country-complex="IN"/>
    </style:style>
    <style:style style:family="table-cell" style:name="ce71">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311">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386">
      <style:text-properties fo:color="#000000" fo:font-family="Liberation Serif" style:font-family-complex="Liberation Serif" fo:font-size="10pt" style:font-size-complex="10pt" fo:language="de" style:language-complex="hi" fo:country="DE" style:country-complex="IN"/>
    </style:style>
    <style:style style:family="text" style:name="T1387">
      <style:text-properties fo:color="#000000" fo:font-family="Liberation Serif" style:font-family-complex="Liberation Serif" fo:font-size="12pt" style:font-size-complex="12pt" fo:language="de" style:language-complex="hi" fo:country="DE" style:country-complex="IN"/>
    </style:style>
    <style:style style:family="text" style:name="T1388">
      <style:text-properties fo:color="#000000" fo:font-family="Liberation Serif" style:font-family-complex="Liberation Serif" fo:font-size="12pt" style:font-size-complex="12pt" fo:language="de" style:language-complex="hi" fo:country="DE" style:country-complex="IN"/>
    </style:style>
    <style:style style:family="table-row" style:name="ro31">
      <style:table-row-properties/>
    </style:style>
    <style:style style:family="table-cell" style:name="ce72">
      <style:table-cell-properties style:vertical-align="top" style:direction="ltr" fo:background-color="#f2f2f2" fo:border="0.00882cm solid #CCCCCC" loext:writing-mode="lr-tb" fo:padding-top="0.1411cm" fo:padding-bottom="0.1411cm" fo:padding-left="0.2117cm" fo:padding-right="0.2117cm"/>
    </style:style>
    <style:style style:parent-style-name="737" style:family="paragraph" style:name="P312">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389">
      <style:text-properties fo:color="#000000" fo:font-family="Liberation Serif" style:font-family-complex="Liberation Serif" fo:font-size="10pt" style:font-size-complex="10pt" fo:language="de" style:language-complex="hi" fo:country="DE" style:country-complex="IN"/>
    </style:style>
    <style:style style:family="text" style:name="T1390">
      <style:text-properties fo:color="#000000" fo:font-family="Liberation Serif" style:font-family-complex="Liberation Serif" fo:font-size="12pt" style:font-size-complex="12pt" fo:language="de" style:language-complex="hi" fo:country="DE" style:country-complex="IN"/>
    </style:style>
    <style:style style:family="text" style:name="T1391">
      <style:text-properties fo:color="#000000" fo:font-family="Liberation Serif" style:font-family-complex="Liberation Serif" fo:font-size="12pt" style:font-size-complex="12pt" fo:language="de" style:language-complex="hi" fo:country="DE" style:country-complex="IN"/>
    </style:style>
    <style:style style:family="table-cell" style:name="ce73">
      <style:table-cell-properties style:vertical-align="top" style:direction="ltr" fo:background-color="#f2f2f2" fo:border="0.00882cm solid #CCCCCC" loext:writing-mode="lr-tb" fo:padding-top="0.1411cm" fo:padding-bottom="0.1411cm" fo:padding-left="0.2117cm" fo:padding-right="0.2117cm"/>
    </style:style>
    <style:style style:parent-style-name="737" style:family="paragraph" style:name="P313">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392">
      <style:text-properties fo:color="#000000" fo:font-family="Liberation Serif" style:font-family-complex="Liberation Serif" fo:font-size="10pt" style:font-size-complex="10pt" fo:language="de" style:language-complex="hi" fo:country="DE" style:country-complex="IN"/>
    </style:style>
    <style:style style:family="text" style:name="T1393">
      <style:text-properties fo:color="#000000" fo:font-family="Liberation Serif" style:font-family-complex="Liberation Serif" fo:font-size="12pt" style:font-size-complex="12pt" fo:language="de" style:language-complex="hi" fo:country="DE" style:country-complex="IN"/>
    </style:style>
    <style:style style:family="text" style:name="T1394">
      <style:text-properties fo:color="#000000" fo:font-family="Liberation Serif" style:font-family-complex="Liberation Serif" fo:font-size="12pt" style:font-size-complex="12pt" fo:language="de" style:language-complex="hi" fo:country="DE" style:country-complex="IN"/>
    </style:style>
    <style:style style:family="table-row" style:name="ro32">
      <style:table-row-properties/>
    </style:style>
    <style:style style:family="table-cell" style:name="ce74">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314">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395">
      <style:text-properties fo:color="#000000" fo:font-family="Liberation Serif" style:font-family-complex="Liberation Serif" fo:font-size="10pt" style:font-size-complex="10pt" fo:language="de" style:language-complex="hi" fo:country="DE" style:country-complex="IN"/>
    </style:style>
    <style:style style:family="text" style:name="T1396">
      <style:text-properties fo:color="#000000" fo:font-family="Liberation Serif" style:font-family-complex="Liberation Serif" fo:font-size="12pt" style:font-size-complex="12pt" fo:language="de" style:language-complex="hi" fo:country="DE" style:country-complex="IN"/>
    </style:style>
    <style:style style:family="text" style:name="T1397">
      <style:text-properties fo:color="#000000" fo:font-family="Liberation Serif" style:font-family-complex="Liberation Serif" fo:font-size="12pt" style:font-size-complex="12pt" fo:language="de" style:language-complex="hi" fo:country="DE" style:country-complex="IN"/>
    </style:style>
    <style:style style:family="table-cell" style:name="ce75">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315">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398">
      <style:text-properties fo:color="#000000" fo:font-family="Liberation Serif" style:font-family-complex="Liberation Serif" fo:font-size="10pt" style:font-size-complex="10pt" fo:language="de" style:language-complex="hi" fo:country="DE" style:country-complex="IN"/>
    </style:style>
    <style:style style:family="text" style:name="T1399">
      <style:text-properties fo:color="#000000" fo:font-family="Liberation Serif" style:font-family-complex="Liberation Serif" fo:font-size="12pt" style:font-size-complex="12pt" fo:language="de" style:language-complex="hi" fo:country="DE" style:country-complex="IN"/>
    </style:style>
    <style:style style:family="text" style:name="T1400">
      <style:text-properties fo:color="#000000" fo:font-family="Liberation Serif" style:font-family-complex="Liberation Serif" fo:font-size="12pt" style:font-size-complex="12pt" fo:language="de" style:language-complex="hi" fo:country="DE" style:country-complex="IN"/>
    </style:style>
    <style:style style:family="table-row" style:name="ro33">
      <style:table-row-properties/>
    </style:style>
    <style:style style:family="table-cell" style:name="ce76">
      <style:table-cell-properties style:vertical-align="top" style:direction="ltr" fo:background-color="#f2f2f2" fo:border="0.00882cm solid #CCCCCC" loext:writing-mode="lr-tb" fo:padding-top="0.1411cm" fo:padding-bottom="0.1411cm" fo:padding-left="0.2117cm" fo:padding-right="0.2117cm"/>
    </style:style>
    <style:style style:parent-style-name="737" style:family="paragraph" style:name="P316">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401">
      <style:text-properties fo:color="#000000" fo:font-family="Liberation Serif" style:font-family-complex="Liberation Serif" fo:font-size="10pt" style:font-size-complex="10pt" fo:language="de" style:language-complex="hi" fo:country="DE" style:country-complex="IN"/>
    </style:style>
    <style:style style:family="text" style:name="T1402">
      <style:text-properties fo:color="#000000" fo:font-family="Liberation Serif" style:font-family-complex="Liberation Serif" fo:font-size="12pt" style:font-size-complex="12pt" fo:language="de" style:language-complex="hi" fo:country="DE" style:country-complex="IN"/>
    </style:style>
    <style:style style:family="text" style:name="T1403">
      <style:text-properties fo:color="#000000" fo:font-family="Liberation Serif" style:font-family-complex="Liberation Serif" fo:font-size="12pt" style:font-size-complex="12pt" fo:language="de" style:language-complex="hi" fo:country="DE" style:country-complex="IN"/>
    </style:style>
    <style:style style:family="table-cell" style:name="ce77">
      <style:table-cell-properties style:vertical-align="top" style:direction="ltr" fo:background-color="#f2f2f2" fo:border="0.00882cm solid #CCCCCC" loext:writing-mode="lr-tb" fo:padding-top="0.1411cm" fo:padding-bottom="0.1411cm" fo:padding-left="0.2117cm" fo:padding-right="0.2117cm"/>
    </style:style>
    <style:style style:parent-style-name="737" style:family="paragraph" style:name="P317">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404">
      <style:text-properties fo:color="#000000" fo:font-family="Liberation Serif" style:font-family-complex="Liberation Serif" fo:font-size="10pt" style:font-size-complex="10pt" fo:language="de" style:language-complex="hi" fo:country="DE" style:country-complex="IN"/>
    </style:style>
    <style:style style:family="text" style:name="T1405">
      <style:text-properties fo:color="#000000" fo:font-family="Liberation Serif" style:font-family-complex="Liberation Serif" fo:font-size="12pt" style:font-size-complex="12pt" fo:language="de" style:language-complex="hi" fo:country="DE" style:country-complex="IN"/>
    </style:style>
    <style:style style:family="text" style:name="T1406">
      <style:text-properties fo:color="#000000" fo:font-family="Liberation Serif" style:font-family-complex="Liberation Serif" fo:font-size="12pt" style:font-size-complex="12pt" fo:language="de" style:language-complex="hi" fo:country="DE" style:country-complex="IN"/>
    </style:style>
    <style:style style:parent-style-name="737" style:family="paragraph" style:name="P318">
      <style:paragraph-properties fo:margin-left="0cm" fo:margin-right="0cm" fo:text-indent="0cm" fo:margin-top="3pt" fo:margin-bottom="3pt"/>
      <style:text-properties fo:color="#000000" fo:font-family="Liberation Serif" style:font-family-complex="Liberation Serif" fo:font-size="12pt" style:font-size-complex="12pt" fo:language="de" style:language-complex="hi" fo:country="DE" style:country-complex="IN"/>
    </style:style>
    <style:style style:family="text" style:name="T1407">
      <style:text-properties fo:color="#000000" fo:font-family="Liberation Serif" style:font-family-complex="Liberation Serif" fo:font-size="12pt" style:font-size-complex="12pt" fo:language="de" style:language-complex="hi" fo:country="DE" style:country-complex="IN"/>
    </style:style>
    <style:style style:family="text" style:name="T1408">
      <style:text-properties fo:color="#000000" fo:font-family="Liberation Serif" style:font-family-complex="Liberation Serif" fo:font-size="12pt" style:font-size-complex="12pt" fo:language="de" style:language-complex="hi" fo:country="DE" style:country-complex="IN"/>
    </style:style>
    <style:style style:family="text" style:name="T1409">
      <style:text-properties fo:color="#000000" fo:font-family="Liberation Serif" style:font-family-complex="Liberation Serif" fo:font-size="12pt" style:font-size-complex="12pt" fo:language="de" style:language-complex="hi" fo:country="DE" style:country-complex="IN"/>
    </style:style>
    <style:style style:parent-style-name="737" style:family="paragraph" style:name="P319">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410">
      <style:text-properties fo:color="#000000" fo:font-family="Liberation Serif" style:font-family-complex="Liberation Serif" fo:font-size="12pt" style:font-size-complex="12pt" fo:language="de" style:language-complex="hi" fo:country="DE" style:country-complex="IN"/>
    </style:style>
    <style:style style:family="text" style:name="T1411">
      <style:text-properties fo:color="#000000" fo:font-family="Liberation Serif" style:font-family-complex="Liberation Serif" fo:font-size="12pt" style:font-size-complex="12pt" fo:language="de" style:language-complex="hi" fo:country="DE" style:country-complex="IN"/>
    </style:style>
    <style:style style:family="text" style:name="T1412">
      <style:text-properties fo:color="#000000" fo:font-family="Liberation Serif" style:font-family-complex="Liberation Serif" fo:font-size="12pt" style:font-size-complex="12pt" fo:language="de" style:language-complex="hi" fo:country="DE" style:country-complex="IN"/>
    </style:style>
    <style:style style:parent-style-name="749" style:master-page-name="MasterPage10" style:family="paragraph" style:name="P320">
      <style:paragraph-properties fo:margin-left="0cm" fo:margin-right="0cm" fo:text-indent="0cm" fo:margin-top="0pt" fo:margin-bottom="6pt" fo:break-before="page"/>
      <style:text-properties fo:color="#000000" fo:font-family="Liberation Sans" style:font-family-complex="Liberation Sans" fo:font-size="18pt" style:font-size-complex="18pt" fo:language="de" style:language-complex="hi" fo:country="DE" style:country-complex="IN" fo:font-weight="bold"/>
    </style:style>
    <style:style style:family="text" style:name="T1413">
      <style:text-properties fo:color="#000000" fo:font-family="Liberation Sans" style:font-family-complex="Liberation Sans" fo:font-size="18pt" style:font-size-complex="18pt" fo:language="de" style:language-complex="hi" fo:country="DE" style:country-complex="IN" fo:font-weight="bold"/>
    </style:style>
    <style:style style:family="text" style:name="T1414">
      <style:text-properties fo:color="#000000" fo:font-family="Liberation Sans" style:font-family-complex="Liberation Sans" fo:font-size="18pt" style:font-size-complex="18pt" fo:language="de" style:language-complex="hi" fo:country="DE" style:country-complex="IN" fo:font-weight="bold"/>
    </style:style>
    <style:style style:family="text" style:name="T1415">
      <style:text-properties fo:color="#000000" fo:font-family="Liberation Sans" style:font-family-complex="Liberation Sans" fo:font-size="18pt" style:font-size-complex="18pt" fo:language="de" style:language-complex="hi" fo:country="DE" style:country-complex="IN" fo:font-weight="bold"/>
    </style:style>
    <style:style style:family="text" style:name="T1416">
      <style:text-properties fo:color="#000000" fo:font-family="Liberation Sans" style:font-family-complex="Liberation Sans" fo:font-size="18pt" style:font-size-complex="18pt" fo:language="de" style:language-complex="hi" fo:country="DE" style:country-complex="IN" fo:font-weight="bold"/>
    </style:style>
    <style:style style:family="text" style:name="T1417">
      <style:text-properties fo:color="#000000" fo:font-family="Liberation Sans" style:font-family-complex="Liberation Sans" fo:font-size="18pt" style:font-size-complex="18pt" fo:language="de" style:language-complex="hi" fo:country="DE" style:country-complex="IN" fo:font-weight="bold"/>
    </style:style>
    <style:style style:parent-style-name="747" style:family="paragraph" style:name="P321">
      <style:paragraph-properties fo:margin-left="0cm" fo:margin-right="0cm" fo:text-indent="0cm"/>
      <style:text-properties fo:color="#000000" fo:font-family="Liberation Sans" style:font-family-complex="Liberation Sans" fo:font-size="16pt" style:font-size-complex="16pt" fo:language="de" style:language-complex="hi" fo:country="DE" style:country-complex="IN" fo:font-weight="bold"/>
    </style:style>
    <style:style style:family="text" style:name="T1418">
      <style:text-properties fo:color="#000000" fo:font-family="Liberation Sans" style:font-family-complex="Liberation Sans" fo:font-size="16pt" style:font-size-complex="16pt" fo:language="de" style:language-complex="hi" fo:country="DE" style:country-complex="IN" fo:font-weight="bold"/>
    </style:style>
    <style:style style:family="text" style:name="T1419">
      <style:text-properties fo:color="#000000" fo:font-family="Liberation Sans" style:font-family-complex="Liberation Sans" fo:font-size="16pt" style:font-size-complex="16pt" fo:language="de" style:language-complex="hi" fo:country="DE" style:country-complex="IN" fo:font-weight="bold"/>
    </style:style>
    <style:style style:family="text" style:name="T1420">
      <style:text-properties fo:color="#000000" fo:font-family="Liberation Sans" style:font-family-complex="Liberation Sans" fo:font-size="16pt" style:font-size-complex="16pt" fo:language="de" style:language-complex="hi" fo:country="DE" style:country-complex="IN" fo:font-weight="bold"/>
    </style:style>
    <style:style style:family="text" style:name="T1421">
      <style:text-properties fo:color="#000000" fo:font-family="Liberation Sans" style:font-family-complex="Liberation Sans" fo:font-size="16pt" style:font-size-complex="16pt" fo:language="de" style:language-complex="hi" fo:country="DE" style:country-complex="IN" fo:font-weight="bold"/>
    </style:style>
    <style:style style:family="text" style:name="T1422">
      <style:text-properties fo:color="#000000" fo:font-family="Liberation Sans" style:font-family-complex="Liberation Sans" fo:font-size="16pt" style:font-size-complex="16pt" fo:language="de" style:language-complex="hi" fo:country="DE" style:country-complex="IN" fo:font-weight="bold"/>
    </style:style>
    <style:style style:parent-style-name="737" style:family="paragraph" style:name="P322">
      <style:paragraph-properties fo:margin-left="0cm" fo:margin-right="0cm" fo:text-indent="0cm" fo:margin-top="3pt" fo:margin-bottom="3pt"/>
      <style:text-properties fo:color="#000000" fo:font-family="Liberation Serif" style:font-family-complex="Liberation Serif" fo:font-size="12pt" style:font-size-complex="12pt" fo:language="de" style:language-complex="hi" fo:country="DE" style:country-complex="IN"/>
    </style:style>
    <style:style style:family="text" style:name="T1423">
      <style:text-properties fo:color="#000000" fo:font-family="Liberation Serif" style:font-family-complex="Liberation Serif" fo:font-size="12pt" style:font-size-complex="12pt" fo:language="de" style:language-complex="hi" fo:country="DE" style:country-complex="IN"/>
    </style:style>
    <style:style style:family="text" style:name="T1424">
      <style:text-properties fo:color="#000000" fo:font-family="Liberation Serif" style:font-family-complex="Liberation Serif" fo:font-size="12pt" style:font-size-complex="12pt" fo:language="de" style:language-complex="hi" fo:country="DE" style:country-complex="IN"/>
    </style:style>
    <style:style style:family="text" style:name="T1425">
      <style:text-properties fo:color="#000000" fo:font-family="Liberation Serif" style:font-family-complex="Liberation Serif" fo:font-size="12pt" style:font-size-complex="12pt" fo:language="de" style:language-complex="hi" fo:country="DE" style:country-complex="IN"/>
    </style:style>
    <style:style style:parent-style-name="737" style:family="paragraph" style:name="P323">
      <style:paragraph-properties fo:margin-left="0cm" fo:margin-right="0cm" fo:text-indent="0cm" fo:margin-top="3pt" fo:margin-bottom="3pt"/>
      <style:text-properties fo:color="#000000" fo:font-family="Liberation Serif" style:font-family-complex="Liberation Serif" fo:font-size="12pt" style:font-size-complex="12pt" fo:language="de" style:language-complex="hi" fo:country="DE" style:country-complex="IN"/>
    </style:style>
    <style:style style:family="text" style:name="T1426">
      <style:text-properties fo:color="#000000" fo:font-family="Liberation Serif" style:font-family-complex="Liberation Serif" fo:font-size="12pt" style:font-size-complex="12pt" fo:language="de" style:language-complex="hi" fo:country="DE" style:country-complex="IN"/>
    </style:style>
    <style:style style:family="text" style:name="T1427">
      <style:text-properties fo:color="#000000" fo:font-family="Liberation Serif" style:font-family-complex="Liberation Serif" fo:font-size="12pt" style:font-size-complex="12pt" fo:language="de" style:language-complex="hi" fo:country="DE" style:country-complex="IN"/>
    </style:style>
    <style:style style:family="text" style:name="T1428">
      <style:text-properties fo:color="#000000" fo:font-family="Liberation Serif" style:font-family-complex="Liberation Serif" fo:font-size="12pt" style:font-size-complex="12pt" fo:language="de" style:language-complex="hi" fo:country="DE" style:country-complex="IN"/>
    </style:style>
    <style:style style:family="table" style:name="ta4">
      <style:table-properties style:width="17.49cm" fo:margin-left="-0.01588cm" table:align="left"/>
    </style:style>
    <style:style style:family="table-column" style:name="co9">
      <style:table-column-properties style:column-width="4.802cm"/>
    </style:style>
    <style:style style:family="table-column" style:name="co10">
      <style:table-column-properties style:column-width="4.802cm"/>
    </style:style>
    <style:style style:family="table-column" style:name="co11">
      <style:table-column-properties style:column-width="4.8cm"/>
    </style:style>
    <style:style style:family="table-column" style:name="co12">
      <style:table-column-properties style:column-width="3.083cm"/>
    </style:style>
    <style:style style:family="table-row" style:name="ro34">
      <style:table-row-properties/>
    </style:style>
    <style:style style:family="table-cell" style:name="ce79">
      <style:table-cell-properties style:vertical-align="top" style:direction="ltr" fo:background-color="#1f4e79" fo:border="0.00882cm solid #CCCCCC" loext:writing-mode="lr-tb" fo:padding-top="0.1411cm" fo:padding-bottom="0.1411cm" fo:padding-left="0.2117cm" fo:padding-right="0.2117cm"/>
    </style:style>
    <style:style style:parent-style-name="737" style:family="paragraph" style:name="P324">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429">
      <style:text-properties fo:color="#ffffff" fo:font-family="Liberation Serif" style:font-family-complex="Liberation Serif" fo:font-size="10pt" style:font-size-complex="10pt" fo:language="de" style:language-complex="hi" fo:country="DE" style:country-complex="IN" fo:font-weight="bold"/>
    </style:style>
    <style:style style:family="text" style:name="T1430">
      <style:text-properties fo:color="#000000" fo:font-family="Liberation Serif" style:font-family-complex="Liberation Serif" fo:font-size="12pt" style:font-size-complex="12pt" fo:language="de" style:language-complex="hi" fo:country="DE" style:country-complex="IN"/>
    </style:style>
    <style:style style:family="text" style:name="T1431">
      <style:text-properties fo:color="#000000" fo:font-family="Liberation Serif" style:font-family-complex="Liberation Serif" fo:font-size="12pt" style:font-size-complex="12pt" fo:language="de" style:language-complex="hi" fo:country="DE" style:country-complex="IN"/>
    </style:style>
    <style:style style:family="table-cell" style:name="ce80">
      <style:table-cell-properties style:vertical-align="top" style:direction="ltr" fo:background-color="#1f4e79" fo:border="0.00882cm solid #CCCCCC" loext:writing-mode="lr-tb" fo:padding-top="0.1411cm" fo:padding-bottom="0.1411cm" fo:padding-left="0.2117cm" fo:padding-right="0.2117cm"/>
    </style:style>
    <style:style style:parent-style-name="737" style:family="paragraph" style:name="P325">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432">
      <style:text-properties fo:color="#ffffff" fo:font-family="Liberation Serif" style:font-family-complex="Liberation Serif" fo:font-size="10pt" style:font-size-complex="10pt" fo:language="de" style:language-complex="hi" fo:country="DE" style:country-complex="IN" fo:font-weight="bold"/>
    </style:style>
    <style:style style:family="text" style:name="T1433">
      <style:text-properties fo:color="#000000" fo:font-family="Liberation Serif" style:font-family-complex="Liberation Serif" fo:font-size="12pt" style:font-size-complex="12pt" fo:language="de" style:language-complex="hi" fo:country="DE" style:country-complex="IN"/>
    </style:style>
    <style:style style:family="text" style:name="T1434">
      <style:text-properties fo:color="#000000" fo:font-family="Liberation Serif" style:font-family-complex="Liberation Serif" fo:font-size="12pt" style:font-size-complex="12pt" fo:language="de" style:language-complex="hi" fo:country="DE" style:country-complex="IN"/>
    </style:style>
    <style:style style:family="table-cell" style:name="ce81">
      <style:table-cell-properties style:vertical-align="top" style:direction="ltr" fo:background-color="#1f4e79" fo:border="0.00882cm solid #CCCCCC" loext:writing-mode="lr-tb" fo:padding-top="0.1411cm" fo:padding-bottom="0.1411cm" fo:padding-left="0.2117cm" fo:padding-right="0.2117cm"/>
    </style:style>
    <style:style style:parent-style-name="737" style:family="paragraph" style:name="P326">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435">
      <style:text-properties fo:color="#ffffff" fo:font-family="Liberation Serif" style:font-family-complex="Liberation Serif" fo:font-size="10pt" style:font-size-complex="10pt" fo:language="de" style:language-complex="hi" fo:country="DE" style:country-complex="IN" fo:font-weight="bold"/>
    </style:style>
    <style:style style:family="text" style:name="T1436">
      <style:text-properties fo:color="#000000" fo:font-family="Liberation Serif" style:font-family-complex="Liberation Serif" fo:font-size="12pt" style:font-size-complex="12pt" fo:language="de" style:language-complex="hi" fo:country="DE" style:country-complex="IN"/>
    </style:style>
    <style:style style:family="text" style:name="T1437">
      <style:text-properties fo:color="#000000" fo:font-family="Liberation Serif" style:font-family-complex="Liberation Serif" fo:font-size="12pt" style:font-size-complex="12pt" fo:language="de" style:language-complex="hi" fo:country="DE" style:country-complex="IN"/>
    </style:style>
    <style:style style:family="table-cell" style:name="ce82">
      <style:table-cell-properties style:vertical-align="top" style:direction="ltr" fo:background-color="#1f4e79" fo:border="0.00882cm solid #CCCCCC" loext:writing-mode="lr-tb" fo:padding-top="0.1411cm" fo:padding-bottom="0.1411cm" fo:padding-left="0.2117cm" fo:padding-right="0.2117cm"/>
    </style:style>
    <style:style style:parent-style-name="737" style:family="paragraph" style:name="P327">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438">
      <style:text-properties fo:color="#ffffff" fo:font-family="Liberation Serif" style:font-family-complex="Liberation Serif" fo:font-size="10pt" style:font-size-complex="10pt" fo:language="de" style:language-complex="hi" fo:country="DE" style:country-complex="IN" fo:font-weight="bold"/>
    </style:style>
    <style:style style:family="text" style:name="T1439">
      <style:text-properties fo:color="#000000" fo:font-family="Liberation Serif" style:font-family-complex="Liberation Serif" fo:font-size="12pt" style:font-size-complex="12pt" fo:language="de" style:language-complex="hi" fo:country="DE" style:country-complex="IN"/>
    </style:style>
    <style:style style:family="text" style:name="T1440">
      <style:text-properties fo:color="#000000" fo:font-family="Liberation Serif" style:font-family-complex="Liberation Serif" fo:font-size="12pt" style:font-size-complex="12pt" fo:language="de" style:language-complex="hi" fo:country="DE" style:country-complex="IN"/>
    </style:style>
    <style:style style:family="table-row" style:name="ro35">
      <style:table-row-properties/>
    </style:style>
    <style:style style:family="table-cell" style:name="ce83">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328">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441">
      <style:text-properties fo:color="#000000" fo:font-family="Liberation Serif" style:font-family-complex="Liberation Serif" fo:font-size="10pt" style:font-size-complex="10pt" fo:language="de" style:language-complex="hi" fo:country="DE" style:country-complex="IN"/>
    </style:style>
    <style:style style:family="text" style:name="T1442">
      <style:text-properties fo:color="#000000" fo:font-family="Liberation Serif" style:font-family-complex="Liberation Serif" fo:font-size="12pt" style:font-size-complex="12pt" fo:language="de" style:language-complex="hi" fo:country="DE" style:country-complex="IN"/>
    </style:style>
    <style:style style:family="text" style:name="T1443">
      <style:text-properties fo:color="#000000" fo:font-family="Liberation Serif" style:font-family-complex="Liberation Serif" fo:font-size="12pt" style:font-size-complex="12pt" fo:language="de" style:language-complex="hi" fo:country="DE" style:country-complex="IN"/>
    </style:style>
    <style:style style:family="table-cell" style:name="ce84">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329">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444">
      <style:text-properties fo:color="#000000" fo:font-family="Liberation Serif" style:font-family-complex="Liberation Serif" fo:font-size="10pt" style:font-size-complex="10pt" fo:language="de" style:language-complex="hi" fo:country="DE" style:country-complex="IN"/>
    </style:style>
    <style:style style:family="text" style:name="T1445">
      <style:text-properties fo:color="#000000" fo:font-family="Liberation Serif" style:font-family-complex="Liberation Serif" fo:font-size="12pt" style:font-size-complex="12pt" fo:language="de" style:language-complex="hi" fo:country="DE" style:country-complex="IN"/>
    </style:style>
    <style:style style:family="text" style:name="T1446">
      <style:text-properties fo:color="#000000" fo:font-family="Liberation Serif" style:font-family-complex="Liberation Serif" fo:font-size="12pt" style:font-size-complex="12pt" fo:language="de" style:language-complex="hi" fo:country="DE" style:country-complex="IN"/>
    </style:style>
    <style:style style:family="table-cell" style:name="ce85">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330">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447">
      <style:text-properties fo:color="#000000" fo:font-family="Liberation Serif" style:font-family-complex="Liberation Serif" fo:font-size="10pt" style:font-size-complex="10pt" fo:language="de" style:language-complex="hi" fo:country="DE" style:country-complex="IN"/>
    </style:style>
    <style:style style:family="text" style:name="T1448">
      <style:text-properties fo:color="#000000" fo:font-family="Liberation Serif" style:font-family-complex="Liberation Serif" fo:font-size="12pt" style:font-size-complex="12pt" fo:language="de" style:language-complex="hi" fo:country="DE" style:country-complex="IN"/>
    </style:style>
    <style:style style:family="text" style:name="T1449">
      <style:text-properties fo:color="#000000" fo:font-family="Liberation Serif" style:font-family-complex="Liberation Serif" fo:font-size="12pt" style:font-size-complex="12pt" fo:language="de" style:language-complex="hi" fo:country="DE" style:country-complex="IN"/>
    </style:style>
    <style:style style:family="table-cell" style:name="ce86">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331">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450">
      <style:text-properties fo:color="#000000" fo:font-family="Liberation Serif" style:font-family-complex="Liberation Serif" fo:font-size="10pt" style:font-size-complex="10pt" fo:language="de" style:language-complex="hi" fo:country="DE" style:country-complex="IN"/>
    </style:style>
    <style:style style:family="text" style:name="T1451">
      <style:text-properties fo:color="#000000" fo:font-family="Liberation Serif" style:font-family-complex="Liberation Serif" fo:font-size="12pt" style:font-size-complex="12pt" fo:language="de" style:language-complex="hi" fo:country="DE" style:country-complex="IN"/>
    </style:style>
    <style:style style:family="text" style:name="T1452">
      <style:text-properties fo:color="#000000" fo:font-family="Liberation Serif" style:font-family-complex="Liberation Serif" fo:font-size="12pt" style:font-size-complex="12pt" fo:language="de" style:language-complex="hi" fo:country="DE" style:country-complex="IN"/>
    </style:style>
    <style:style style:family="table-row" style:name="ro36">
      <style:table-row-properties/>
    </style:style>
    <style:style style:family="table-cell" style:name="ce87">
      <style:table-cell-properties style:vertical-align="top" style:direction="ltr" fo:background-color="#f2f2f2" fo:border="0.00882cm solid #CCCCCC" loext:writing-mode="lr-tb" fo:padding-top="0.1411cm" fo:padding-bottom="0.1411cm" fo:padding-left="0.2117cm" fo:padding-right="0.2117cm"/>
    </style:style>
    <style:style style:parent-style-name="737" style:family="paragraph" style:name="P332">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453">
      <style:text-properties fo:color="#000000" fo:font-family="Liberation Serif" style:font-family-complex="Liberation Serif" fo:font-size="10pt" style:font-size-complex="10pt" fo:language="de" style:language-complex="hi" fo:country="DE" style:country-complex="IN"/>
    </style:style>
    <style:style style:family="text" style:name="T1454">
      <style:text-properties fo:color="#000000" fo:font-family="Liberation Serif" style:font-family-complex="Liberation Serif" fo:font-size="12pt" style:font-size-complex="12pt" fo:language="de" style:language-complex="hi" fo:country="DE" style:country-complex="IN"/>
    </style:style>
    <style:style style:family="text" style:name="T1455">
      <style:text-properties fo:color="#000000" fo:font-family="Liberation Serif" style:font-family-complex="Liberation Serif" fo:font-size="12pt" style:font-size-complex="12pt" fo:language="de" style:language-complex="hi" fo:country="DE" style:country-complex="IN"/>
    </style:style>
    <style:style style:family="table-cell" style:name="ce88">
      <style:table-cell-properties style:vertical-align="top" style:direction="ltr" fo:background-color="#f2f2f2" fo:border="0.00882cm solid #CCCCCC" loext:writing-mode="lr-tb" fo:padding-top="0.1411cm" fo:padding-bottom="0.1411cm" fo:padding-left="0.2117cm" fo:padding-right="0.2117cm"/>
    </style:style>
    <style:style style:parent-style-name="737" style:family="paragraph" style:name="P333">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456">
      <style:text-properties fo:color="#000000" fo:font-family="Liberation Serif" style:font-family-complex="Liberation Serif" fo:font-size="10pt" style:font-size-complex="10pt" fo:language="de" style:language-complex="hi" fo:country="DE" style:country-complex="IN"/>
    </style:style>
    <style:style style:family="text" style:name="T1457">
      <style:text-properties fo:color="#000000" fo:font-family="Liberation Serif" style:font-family-complex="Liberation Serif" fo:font-size="12pt" style:font-size-complex="12pt" fo:language="de" style:language-complex="hi" fo:country="DE" style:country-complex="IN"/>
    </style:style>
    <style:style style:family="text" style:name="T1458">
      <style:text-properties fo:color="#000000" fo:font-family="Liberation Serif" style:font-family-complex="Liberation Serif" fo:font-size="12pt" style:font-size-complex="12pt" fo:language="de" style:language-complex="hi" fo:country="DE" style:country-complex="IN"/>
    </style:style>
    <style:style style:family="table-cell" style:name="ce89">
      <style:table-cell-properties style:vertical-align="top" style:direction="ltr" fo:background-color="#f2f2f2" fo:border="0.00882cm solid #CCCCCC" loext:writing-mode="lr-tb" fo:padding-top="0.1411cm" fo:padding-bottom="0.1411cm" fo:padding-left="0.2117cm" fo:padding-right="0.2117cm"/>
    </style:style>
    <style:style style:parent-style-name="737" style:family="paragraph" style:name="P334">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459">
      <style:text-properties fo:color="#000000" fo:font-family="Liberation Serif" style:font-family-complex="Liberation Serif" fo:font-size="10pt" style:font-size-complex="10pt" fo:language="de" style:language-complex="hi" fo:country="DE" style:country-complex="IN"/>
    </style:style>
    <style:style style:family="text" style:name="T1460">
      <style:text-properties fo:color="#000000" fo:font-family="Liberation Serif" style:font-family-complex="Liberation Serif" fo:font-size="12pt" style:font-size-complex="12pt" fo:language="de" style:language-complex="hi" fo:country="DE" style:country-complex="IN"/>
    </style:style>
    <style:style style:family="text" style:name="T1461">
      <style:text-properties fo:color="#000000" fo:font-family="Liberation Serif" style:font-family-complex="Liberation Serif" fo:font-size="12pt" style:font-size-complex="12pt" fo:language="de" style:language-complex="hi" fo:country="DE" style:country-complex="IN"/>
    </style:style>
    <style:style style:family="table-cell" style:name="ce90">
      <style:table-cell-properties style:vertical-align="top" style:direction="ltr" fo:background-color="#f2f2f2" fo:border="0.00882cm solid #CCCCCC" loext:writing-mode="lr-tb" fo:padding-top="0.1411cm" fo:padding-bottom="0.1411cm" fo:padding-left="0.2117cm" fo:padding-right="0.2117cm"/>
    </style:style>
    <style:style style:parent-style-name="737" style:family="paragraph" style:name="P335">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462">
      <style:text-properties fo:color="#000000" fo:font-family="Liberation Serif" style:font-family-complex="Liberation Serif" fo:font-size="10pt" style:font-size-complex="10pt" fo:language="de" style:language-complex="hi" fo:country="DE" style:country-complex="IN"/>
    </style:style>
    <style:style style:family="text" style:name="T1463">
      <style:text-properties fo:color="#000000" fo:font-family="Liberation Serif" style:font-family-complex="Liberation Serif" fo:font-size="12pt" style:font-size-complex="12pt" fo:language="de" style:language-complex="hi" fo:country="DE" style:country-complex="IN"/>
    </style:style>
    <style:style style:family="text" style:name="T1464">
      <style:text-properties fo:color="#000000" fo:font-family="Liberation Serif" style:font-family-complex="Liberation Serif" fo:font-size="12pt" style:font-size-complex="12pt" fo:language="de" style:language-complex="hi" fo:country="DE" style:country-complex="IN"/>
    </style:style>
    <style:style style:family="table-row" style:name="ro37">
      <style:table-row-properties/>
    </style:style>
    <style:style style:family="table-cell" style:name="ce91">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336">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465">
      <style:text-properties fo:color="#000000" fo:font-family="Liberation Serif" style:font-family-complex="Liberation Serif" fo:font-size="10pt" style:font-size-complex="10pt" fo:language="de" style:language-complex="hi" fo:country="DE" style:country-complex="IN"/>
    </style:style>
    <style:style style:family="text" style:name="T1466">
      <style:text-properties fo:color="#000000" fo:font-family="Liberation Serif" style:font-family-complex="Liberation Serif" fo:font-size="12pt" style:font-size-complex="12pt" fo:language="de" style:language-complex="hi" fo:country="DE" style:country-complex="IN"/>
    </style:style>
    <style:style style:family="text" style:name="T1467">
      <style:text-properties fo:color="#000000" fo:font-family="Liberation Serif" style:font-family-complex="Liberation Serif" fo:font-size="12pt" style:font-size-complex="12pt" fo:language="de" style:language-complex="hi" fo:country="DE" style:country-complex="IN"/>
    </style:style>
    <style:style style:family="table-cell" style:name="ce92">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337">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468">
      <style:text-properties fo:color="#000000" fo:font-family="Liberation Serif" style:font-family-complex="Liberation Serif" fo:font-size="10pt" style:font-size-complex="10pt" fo:language="de" style:language-complex="hi" fo:country="DE" style:country-complex="IN"/>
    </style:style>
    <style:style style:family="text" style:name="T1469">
      <style:text-properties fo:color="#000000" fo:font-family="Liberation Serif" style:font-family-complex="Liberation Serif" fo:font-size="12pt" style:font-size-complex="12pt" fo:language="de" style:language-complex="hi" fo:country="DE" style:country-complex="IN"/>
    </style:style>
    <style:style style:family="text" style:name="T1470">
      <style:text-properties fo:color="#000000" fo:font-family="Liberation Serif" style:font-family-complex="Liberation Serif" fo:font-size="12pt" style:font-size-complex="12pt" fo:language="de" style:language-complex="hi" fo:country="DE" style:country-complex="IN"/>
    </style:style>
    <style:style style:family="table-cell" style:name="ce93">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338">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471">
      <style:text-properties fo:color="#000000" fo:font-family="Liberation Serif" style:font-family-complex="Liberation Serif" fo:font-size="10pt" style:font-size-complex="10pt" fo:language="de" style:language-complex="hi" fo:country="DE" style:country-complex="IN"/>
    </style:style>
    <style:style style:family="text" style:name="T1472">
      <style:text-properties fo:color="#000000" fo:font-family="Liberation Serif" style:font-family-complex="Liberation Serif" fo:font-size="12pt" style:font-size-complex="12pt" fo:language="de" style:language-complex="hi" fo:country="DE" style:country-complex="IN"/>
    </style:style>
    <style:style style:family="text" style:name="T1473">
      <style:text-properties fo:color="#000000" fo:font-family="Liberation Serif" style:font-family-complex="Liberation Serif" fo:font-size="12pt" style:font-size-complex="12pt" fo:language="de" style:language-complex="hi" fo:country="DE" style:country-complex="IN"/>
    </style:style>
    <style:style style:family="table-cell" style:name="ce94">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339">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474">
      <style:text-properties fo:color="#000000" fo:font-family="Liberation Serif" style:font-family-complex="Liberation Serif" fo:font-size="10pt" style:font-size-complex="10pt" fo:language="de" style:language-complex="hi" fo:country="DE" style:country-complex="IN"/>
    </style:style>
    <style:style style:family="text" style:name="T1475">
      <style:text-properties fo:color="#000000" fo:font-family="Liberation Serif" style:font-family-complex="Liberation Serif" fo:font-size="12pt" style:font-size-complex="12pt" fo:language="de" style:language-complex="hi" fo:country="DE" style:country-complex="IN"/>
    </style:style>
    <style:style style:family="text" style:name="T1476">
      <style:text-properties fo:color="#000000" fo:font-family="Liberation Serif" style:font-family-complex="Liberation Serif" fo:font-size="12pt" style:font-size-complex="12pt" fo:language="de" style:language-complex="hi" fo:country="DE" style:country-complex="IN"/>
    </style:style>
    <style:style style:family="table-row" style:name="ro38">
      <style:table-row-properties/>
    </style:style>
    <style:style style:family="table-cell" style:name="ce95">
      <style:table-cell-properties style:vertical-align="top" style:direction="ltr" fo:background-color="#f2f2f2" fo:border="0.00882cm solid #CCCCCC" loext:writing-mode="lr-tb" fo:padding-top="0.1411cm" fo:padding-bottom="0.1411cm" fo:padding-left="0.2117cm" fo:padding-right="0.2117cm"/>
    </style:style>
    <style:style style:parent-style-name="737" style:family="paragraph" style:name="P340">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477">
      <style:text-properties fo:color="#000000" fo:font-family="Liberation Serif" style:font-family-complex="Liberation Serif" fo:font-size="10pt" style:font-size-complex="10pt" fo:language="de" style:language-complex="hi" fo:country="DE" style:country-complex="IN"/>
    </style:style>
    <style:style style:family="text" style:name="T1478">
      <style:text-properties fo:color="#000000" fo:font-family="Liberation Serif" style:font-family-complex="Liberation Serif" fo:font-size="12pt" style:font-size-complex="12pt" fo:language="de" style:language-complex="hi" fo:country="DE" style:country-complex="IN"/>
    </style:style>
    <style:style style:family="text" style:name="T1479">
      <style:text-properties fo:color="#000000" fo:font-family="Liberation Serif" style:font-family-complex="Liberation Serif" fo:font-size="12pt" style:font-size-complex="12pt" fo:language="de" style:language-complex="hi" fo:country="DE" style:country-complex="IN"/>
    </style:style>
    <style:style style:family="table-cell" style:name="ce96">
      <style:table-cell-properties style:vertical-align="top" style:direction="ltr" fo:background-color="#f2f2f2" fo:border="0.00882cm solid #CCCCCC" loext:writing-mode="lr-tb" fo:padding-top="0.1411cm" fo:padding-bottom="0.1411cm" fo:padding-left="0.2117cm" fo:padding-right="0.2117cm"/>
    </style:style>
    <style:style style:parent-style-name="737" style:family="paragraph" style:name="P341">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480">
      <style:text-properties fo:color="#000000" fo:font-family="Liberation Serif" style:font-family-complex="Liberation Serif" fo:font-size="10pt" style:font-size-complex="10pt" fo:language="de" style:language-complex="hi" fo:country="DE" style:country-complex="IN"/>
    </style:style>
    <style:style style:family="text" style:name="T1481">
      <style:text-properties fo:color="#000000" fo:font-family="Liberation Serif" style:font-family-complex="Liberation Serif" fo:font-size="12pt" style:font-size-complex="12pt" fo:language="de" style:language-complex="hi" fo:country="DE" style:country-complex="IN"/>
    </style:style>
    <style:style style:family="text" style:name="T1482">
      <style:text-properties fo:color="#000000" fo:font-family="Liberation Serif" style:font-family-complex="Liberation Serif" fo:font-size="12pt" style:font-size-complex="12pt" fo:language="de" style:language-complex="hi" fo:country="DE" style:country-complex="IN"/>
    </style:style>
    <style:style style:family="table-cell" style:name="ce97">
      <style:table-cell-properties style:vertical-align="top" style:direction="ltr" fo:background-color="#f2f2f2" fo:border="0.00882cm solid #CCCCCC" loext:writing-mode="lr-tb" fo:padding-top="0.1411cm" fo:padding-bottom="0.1411cm" fo:padding-left="0.2117cm" fo:padding-right="0.2117cm"/>
    </style:style>
    <style:style style:parent-style-name="737" style:family="paragraph" style:name="P342">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483">
      <style:text-properties fo:color="#000000" fo:font-family="Liberation Serif" style:font-family-complex="Liberation Serif" fo:font-size="10pt" style:font-size-complex="10pt" fo:language="de" style:language-complex="hi" fo:country="DE" style:country-complex="IN"/>
    </style:style>
    <style:style style:family="text" style:name="T1484">
      <style:text-properties fo:color="#000000" fo:font-family="Liberation Serif" style:font-family-complex="Liberation Serif" fo:font-size="12pt" style:font-size-complex="12pt" fo:language="de" style:language-complex="hi" fo:country="DE" style:country-complex="IN"/>
    </style:style>
    <style:style style:family="text" style:name="T1485">
      <style:text-properties fo:color="#000000" fo:font-family="Liberation Serif" style:font-family-complex="Liberation Serif" fo:font-size="12pt" style:font-size-complex="12pt" fo:language="de" style:language-complex="hi" fo:country="DE" style:country-complex="IN"/>
    </style:style>
    <style:style style:family="table-cell" style:name="ce98">
      <style:table-cell-properties style:vertical-align="top" style:direction="ltr" fo:background-color="#f2f2f2" fo:border="0.00882cm solid #CCCCCC" loext:writing-mode="lr-tb" fo:padding-top="0.1411cm" fo:padding-bottom="0.1411cm" fo:padding-left="0.2117cm" fo:padding-right="0.2117cm"/>
    </style:style>
    <style:style style:parent-style-name="737" style:family="paragraph" style:name="P343">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486">
      <style:text-properties fo:color="#000000" fo:font-family="Liberation Serif" style:font-family-complex="Liberation Serif" fo:font-size="10pt" style:font-size-complex="10pt" fo:language="de" style:language-complex="hi" fo:country="DE" style:country-complex="IN"/>
    </style:style>
    <style:style style:family="text" style:name="T1487">
      <style:text-properties fo:color="#000000" fo:font-family="Liberation Serif" style:font-family-complex="Liberation Serif" fo:font-size="12pt" style:font-size-complex="12pt" fo:language="de" style:language-complex="hi" fo:country="DE" style:country-complex="IN"/>
    </style:style>
    <style:style style:family="text" style:name="T1488">
      <style:text-properties fo:color="#000000" fo:font-family="Liberation Serif" style:font-family-complex="Liberation Serif" fo:font-size="12pt" style:font-size-complex="12pt" fo:language="de" style:language-complex="hi" fo:country="DE" style:country-complex="IN"/>
    </style:style>
    <style:style style:family="table-row" style:name="ro39">
      <style:table-row-properties/>
    </style:style>
    <style:style style:family="table-cell" style:name="ce99">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344">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489">
      <style:text-properties fo:color="#000000" fo:font-family="Liberation Serif" style:font-family-complex="Liberation Serif" fo:font-size="10pt" style:font-size-complex="10pt" fo:language="de" style:language-complex="hi" fo:country="DE" style:country-complex="IN"/>
    </style:style>
    <style:style style:family="text" style:name="T1490">
      <style:text-properties fo:color="#000000" fo:font-family="Liberation Serif" style:font-family-complex="Liberation Serif" fo:font-size="12pt" style:font-size-complex="12pt" fo:language="de" style:language-complex="hi" fo:country="DE" style:country-complex="IN"/>
    </style:style>
    <style:style style:family="text" style:name="T1491">
      <style:text-properties fo:color="#000000" fo:font-family="Liberation Serif" style:font-family-complex="Liberation Serif" fo:font-size="12pt" style:font-size-complex="12pt" fo:language="de" style:language-complex="hi" fo:country="DE" style:country-complex="IN"/>
    </style:style>
    <style:style style:family="table-cell" style:name="ce100">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345">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492">
      <style:text-properties fo:color="#000000" fo:font-family="Liberation Serif" style:font-family-complex="Liberation Serif" fo:font-size="10pt" style:font-size-complex="10pt" fo:language="de" style:language-complex="hi" fo:country="DE" style:country-complex="IN"/>
    </style:style>
    <style:style style:family="text" style:name="T1493">
      <style:text-properties fo:color="#000000" fo:font-family="Liberation Serif" style:font-family-complex="Liberation Serif" fo:font-size="12pt" style:font-size-complex="12pt" fo:language="de" style:language-complex="hi" fo:country="DE" style:country-complex="IN"/>
    </style:style>
    <style:style style:family="text" style:name="T1494">
      <style:text-properties fo:color="#000000" fo:font-family="Liberation Serif" style:font-family-complex="Liberation Serif" fo:font-size="12pt" style:font-size-complex="12pt" fo:language="de" style:language-complex="hi" fo:country="DE" style:country-complex="IN"/>
    </style:style>
    <style:style style:family="table-cell" style:name="ce101">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346">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495">
      <style:text-properties fo:color="#000000" fo:font-family="Liberation Serif" style:font-family-complex="Liberation Serif" fo:font-size="10pt" style:font-size-complex="10pt" fo:language="de" style:language-complex="hi" fo:country="DE" style:country-complex="IN"/>
    </style:style>
    <style:style style:family="text" style:name="T1496">
      <style:text-properties fo:color="#000000" fo:font-family="Liberation Serif" style:font-family-complex="Liberation Serif" fo:font-size="10pt" style:font-size-complex="10pt" fo:language="de" style:language-complex="hi" fo:country="DE" style:country-complex="IN"/>
    </style:style>
    <style:style style:family="text" style:name="T1497">
      <style:text-properties fo:color="#000000" fo:font-family="Liberation Serif" style:font-family-complex="Liberation Serif" fo:font-size="12pt" style:font-size-complex="12pt" fo:language="de" style:language-complex="hi" fo:country="DE" style:country-complex="IN"/>
    </style:style>
    <style:style style:family="text" style:name="T1498">
      <style:text-properties fo:color="#000000" fo:font-family="Liberation Serif" style:font-family-complex="Liberation Serif" fo:font-size="12pt" style:font-size-complex="12pt" fo:language="de" style:language-complex="hi" fo:country="DE" style:country-complex="IN"/>
    </style:style>
    <style:style style:family="table-cell" style:name="ce102">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347">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499">
      <style:text-properties fo:color="#000000" fo:font-family="Liberation Serif" style:font-family-complex="Liberation Serif" fo:font-size="10pt" style:font-size-complex="10pt" fo:language="de" style:language-complex="hi" fo:country="DE" style:country-complex="IN"/>
    </style:style>
    <style:style style:family="text" style:name="T1500">
      <style:text-properties fo:color="#000000" fo:font-family="Liberation Serif" style:font-family-complex="Liberation Serif" fo:font-size="12pt" style:font-size-complex="12pt" fo:language="de" style:language-complex="hi" fo:country="DE" style:country-complex="IN"/>
    </style:style>
    <style:style style:family="text" style:name="T1501">
      <style:text-properties fo:color="#000000" fo:font-family="Liberation Serif" style:font-family-complex="Liberation Serif" fo:font-size="12pt" style:font-size-complex="12pt" fo:language="de" style:language-complex="hi" fo:country="DE" style:country-complex="IN"/>
    </style:style>
    <style:style style:parent-style-name="747" style:family="paragraph" style:name="P348">
      <style:paragraph-properties fo:margin-left="0cm" fo:margin-right="0cm" fo:text-indent="0cm"/>
      <style:text-properties fo:color="#000000" fo:font-family="Liberation Sans" style:font-family-complex="Liberation Sans" fo:font-size="16pt" style:font-size-complex="16pt" fo:language="de" style:language-complex="hi" fo:country="DE" style:country-complex="IN" fo:font-weight="bold"/>
    </style:style>
    <style:style style:family="text" style:name="T1502">
      <style:text-properties fo:color="#000000" fo:font-family="Liberation Sans" style:font-family-complex="Liberation Sans" fo:font-size="16pt" style:font-size-complex="16pt" fo:language="de" style:language-complex="hi" fo:country="DE" style:country-complex="IN" fo:font-weight="bold"/>
    </style:style>
    <style:style style:family="text" style:name="T1503">
      <style:text-properties fo:color="#000000" fo:font-family="Liberation Sans" style:font-family-complex="Liberation Sans" fo:font-size="16pt" style:font-size-complex="16pt" fo:language="de" style:language-complex="hi" fo:country="DE" style:country-complex="IN" fo:font-weight="bold"/>
    </style:style>
    <style:style style:family="text" style:name="T1504">
      <style:text-properties fo:color="#000000" fo:font-family="Liberation Sans" style:font-family-complex="Liberation Sans" fo:font-size="16pt" style:font-size-complex="16pt" fo:language="de" style:language-complex="hi" fo:country="DE" style:country-complex="IN" fo:font-weight="bold"/>
    </style:style>
    <style:style style:family="text" style:name="T1505">
      <style:text-properties fo:color="#000000" fo:font-family="Liberation Sans" style:font-family-complex="Liberation Sans" fo:font-size="16pt" style:font-size-complex="16pt" fo:language="de" style:language-complex="hi" fo:country="DE" style:country-complex="IN" fo:font-weight="bold"/>
    </style:style>
    <style:style style:family="text" style:name="T1506">
      <style:text-properties fo:color="#000000" fo:font-family="Liberation Sans" style:font-family-complex="Liberation Sans" fo:font-size="16pt" style:font-size-complex="16pt" fo:language="de" style:language-complex="hi" fo:country="DE" style:country-complex="IN" fo:font-weight="bold"/>
    </style:style>
    <style:style style:parent-style-name="737" style:family="paragraph" style:name="P349">
      <style:paragraph-properties fo:margin-left="0cm" fo:margin-right="0cm" fo:text-indent="0cm" fo:margin-top="3pt" fo:margin-bottom="3pt"/>
      <style:text-properties fo:color="#000000" fo:font-family="Liberation Serif" style:font-family-complex="Liberation Serif" fo:font-size="12pt" style:font-size-complex="12pt" fo:language="de" style:language-complex="hi" fo:country="DE" style:country-complex="IN"/>
    </style:style>
    <style:style style:family="text" style:name="T1507">
      <style:text-properties fo:color="#000000" fo:font-family="Liberation Serif" style:font-family-complex="Liberation Serif" fo:font-size="12pt" style:font-size-complex="12pt" fo:language="de" style:language-complex="hi" fo:country="DE" style:country-complex="IN"/>
    </style:style>
    <style:style style:family="text" style:name="T1508">
      <style:text-properties fo:color="#000000" fo:font-family="Liberation Serif" style:font-family-complex="Liberation Serif" fo:font-size="12pt" style:font-size-complex="12pt" fo:language="de" style:language-complex="hi" fo:country="DE" style:country-complex="IN"/>
    </style:style>
    <style:style style:family="text" style:name="T1509">
      <style:text-properties fo:color="#000000" fo:font-family="Liberation Serif" style:font-family-complex="Liberation Serif" fo:font-size="12pt" style:font-size-complex="12pt" fo:language="de" style:language-complex="hi" fo:country="DE" style:country-complex="IN"/>
    </style:style>
    <style:style style:family="text" style:name="T1510">
      <style:text-properties fo:color="#000000" fo:font-family="Liberation Serif" style:font-family-complex="Liberation Serif" fo:font-size="12pt" style:font-size-complex="12pt" fo:language="de" style:language-complex="hi" fo:country="DE" style:country-complex="IN"/>
    </style:style>
    <style:style style:parent-style-name="737" style:family="paragraph" style:name="P350">
      <style:paragraph-properties fo:margin-left="0cm" fo:margin-right="0cm" fo:text-indent="0cm" fo:margin-top="3pt" fo:margin-bottom="3pt"/>
      <style:text-properties fo:color="#000000" fo:font-family="Liberation Serif" style:font-family-complex="Liberation Serif" fo:font-size="12pt" style:font-size-complex="12pt" fo:language="de" style:language-complex="hi" fo:country="DE" style:country-complex="IN"/>
    </style:style>
    <style:style style:family="text" style:name="T1511">
      <style:text-properties fo:color="#000000" fo:font-family="Liberation Serif" style:font-family-complex="Liberation Serif" fo:font-size="12pt" style:font-size-complex="12pt" fo:language="de" style:language-complex="hi" fo:country="DE" style:country-complex="IN"/>
    </style:style>
    <style:style style:family="text" style:name="T1512">
      <style:text-properties fo:color="#000000" fo:font-family="Liberation Serif" style:font-family-complex="Liberation Serif" fo:font-size="12pt" style:font-size-complex="12pt" fo:language="de" style:language-complex="hi" fo:country="DE" style:country-complex="IN"/>
    </style:style>
    <style:style style:family="text" style:name="T1513">
      <style:text-properties fo:color="#000000" fo:font-family="Liberation Serif" style:font-family-complex="Liberation Serif" fo:font-size="12pt" style:font-size-complex="12pt" fo:language="de" style:language-complex="hi" fo:country="DE" style:country-complex="IN"/>
    </style:style>
    <style:style style:family="table" style:name="ta5">
      <style:table-properties style:width="16.71cm" fo:margin-left="-0.01588cm" table:align="left"/>
    </style:style>
    <style:style style:family="table-column" style:name="co13">
      <style:table-column-properties style:column-width="4.271cm"/>
    </style:style>
    <style:style style:family="table-column" style:name="co14">
      <style:table-column-properties style:column-width="7.056cm"/>
    </style:style>
    <style:style style:family="table-column" style:name="co15">
      <style:table-column-properties style:column-width="5.378cm"/>
    </style:style>
    <style:style style:family="table-row" style:name="ro40">
      <style:table-row-properties/>
    </style:style>
    <style:style style:family="table-cell" style:name="ce104">
      <style:table-cell-properties style:vertical-align="top" style:direction="ltr" fo:background-color="#1f4e79" fo:border="0.00882cm solid #CCCCCC" loext:writing-mode="lr-tb" fo:padding-top="0.1411cm" fo:padding-bottom="0.1411cm" fo:padding-left="0.2117cm" fo:padding-right="0.2117cm"/>
    </style:style>
    <style:style style:parent-style-name="737" style:family="paragraph" style:name="P351">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514">
      <style:text-properties fo:color="#ffffff" fo:font-family="Liberation Serif" style:font-family-complex="Liberation Serif" fo:font-size="10pt" style:font-size-complex="10pt" fo:language="de" style:language-complex="hi" fo:country="DE" style:country-complex="IN" fo:font-weight="bold"/>
    </style:style>
    <style:style style:family="text" style:name="T1515">
      <style:text-properties fo:color="#000000" fo:font-family="Liberation Serif" style:font-family-complex="Liberation Serif" fo:font-size="12pt" style:font-size-complex="12pt" fo:language="de" style:language-complex="hi" fo:country="DE" style:country-complex="IN"/>
    </style:style>
    <style:style style:family="text" style:name="T1516">
      <style:text-properties fo:color="#000000" fo:font-family="Liberation Serif" style:font-family-complex="Liberation Serif" fo:font-size="12pt" style:font-size-complex="12pt" fo:language="de" style:language-complex="hi" fo:country="DE" style:country-complex="IN"/>
    </style:style>
    <style:style style:family="table-cell" style:name="ce105">
      <style:table-cell-properties style:vertical-align="top" style:direction="ltr" fo:background-color="#1f4e79" fo:border="0.00882cm solid #CCCCCC" loext:writing-mode="lr-tb" fo:padding-top="0.1411cm" fo:padding-bottom="0.1411cm" fo:padding-left="0.2117cm" fo:padding-right="0.2117cm"/>
    </style:style>
    <style:style style:parent-style-name="737" style:family="paragraph" style:name="P352">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517">
      <style:text-properties fo:color="#ffffff" fo:font-family="Liberation Serif" style:font-family-complex="Liberation Serif" fo:font-size="10pt" style:font-size-complex="10pt" fo:language="de" style:language-complex="hi" fo:country="DE" style:country-complex="IN" fo:font-weight="bold"/>
    </style:style>
    <style:style style:family="text" style:name="T1518">
      <style:text-properties fo:color="#000000" fo:font-family="Liberation Serif" style:font-family-complex="Liberation Serif" fo:font-size="12pt" style:font-size-complex="12pt" fo:language="de" style:language-complex="hi" fo:country="DE" style:country-complex="IN"/>
    </style:style>
    <style:style style:family="text" style:name="T1519">
      <style:text-properties fo:color="#000000" fo:font-family="Liberation Serif" style:font-family-complex="Liberation Serif" fo:font-size="12pt" style:font-size-complex="12pt" fo:language="de" style:language-complex="hi" fo:country="DE" style:country-complex="IN"/>
    </style:style>
    <style:style style:family="table-cell" style:name="ce106">
      <style:table-cell-properties style:vertical-align="top" style:direction="ltr" fo:background-color="#1f4e79" fo:border="0.00882cm solid #CCCCCC" loext:writing-mode="lr-tb" fo:padding-top="0.1411cm" fo:padding-bottom="0.1411cm" fo:padding-left="0.2117cm" fo:padding-right="0.2117cm"/>
    </style:style>
    <style:style style:parent-style-name="737" style:family="paragraph" style:name="P353">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520">
      <style:text-properties fo:color="#ffffff" fo:font-family="Liberation Serif" style:font-family-complex="Liberation Serif" fo:font-size="10pt" style:font-size-complex="10pt" fo:language="de" style:language-complex="hi" fo:country="DE" style:country-complex="IN" fo:font-weight="bold"/>
    </style:style>
    <style:style style:family="text" style:name="T1521">
      <style:text-properties fo:color="#000000" fo:font-family="Liberation Serif" style:font-family-complex="Liberation Serif" fo:font-size="12pt" style:font-size-complex="12pt" fo:language="de" style:language-complex="hi" fo:country="DE" style:country-complex="IN"/>
    </style:style>
    <style:style style:family="text" style:name="T1522">
      <style:text-properties fo:color="#000000" fo:font-family="Liberation Serif" style:font-family-complex="Liberation Serif" fo:font-size="12pt" style:font-size-complex="12pt" fo:language="de" style:language-complex="hi" fo:country="DE" style:country-complex="IN"/>
    </style:style>
    <style:style style:family="table-row" style:name="ro41">
      <style:table-row-properties/>
    </style:style>
    <style:style style:family="table-cell" style:name="ce107">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354">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523">
      <style:text-properties fo:color="#000000" fo:font-family="Liberation Serif" style:font-family-complex="Liberation Serif" fo:font-size="10pt" style:font-size-complex="10pt" fo:language="de" style:language-complex="hi" fo:country="DE" style:country-complex="IN"/>
    </style:style>
    <style:style style:family="text" style:name="T1524">
      <style:text-properties fo:color="#000000" fo:font-family="Liberation Serif" style:font-family-complex="Liberation Serif" fo:font-size="12pt" style:font-size-complex="12pt" fo:language="de" style:language-complex="hi" fo:country="DE" style:country-complex="IN"/>
    </style:style>
    <style:style style:family="text" style:name="T1525">
      <style:text-properties fo:color="#000000" fo:font-family="Liberation Serif" style:font-family-complex="Liberation Serif" fo:font-size="12pt" style:font-size-complex="12pt" fo:language="de" style:language-complex="hi" fo:country="DE" style:country-complex="IN"/>
    </style:style>
    <style:style style:family="table-cell" style:name="ce108">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355">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526">
      <style:text-properties fo:color="#000000" fo:font-family="Liberation Serif" style:font-family-complex="Liberation Serif" fo:font-size="10pt" style:font-size-complex="10pt" fo:language="de" style:language-complex="hi" fo:country="DE" style:country-complex="IN"/>
    </style:style>
    <style:style style:family="text" style:name="T1527">
      <style:text-properties fo:color="#000000" fo:font-family="Liberation Serif" style:font-family-complex="Liberation Serif" fo:font-size="12pt" style:font-size-complex="12pt" fo:language="de" style:language-complex="hi" fo:country="DE" style:country-complex="IN"/>
    </style:style>
    <style:style style:family="text" style:name="T1528">
      <style:text-properties fo:color="#000000" fo:font-family="Liberation Serif" style:font-family-complex="Liberation Serif" fo:font-size="12pt" style:font-size-complex="12pt" fo:language="de" style:language-complex="hi" fo:country="DE" style:country-complex="IN"/>
    </style:style>
    <style:style style:family="table-cell" style:name="ce109">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356">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529">
      <style:text-properties fo:color="#000000" fo:font-family="Liberation Serif" style:font-family-complex="Liberation Serif" fo:font-size="10pt" style:font-size-complex="10pt" fo:language="de" style:language-complex="hi" fo:country="DE" style:country-complex="IN"/>
    </style:style>
    <style:style style:family="text" style:name="T1530">
      <style:text-properties fo:color="#000000" fo:font-family="Liberation Serif" style:font-family-complex="Liberation Serif" fo:font-size="12pt" style:font-size-complex="12pt" fo:language="de" style:language-complex="hi" fo:country="DE" style:country-complex="IN"/>
    </style:style>
    <style:style style:family="text" style:name="T1531">
      <style:text-properties fo:color="#000000" fo:font-family="Liberation Serif" style:font-family-complex="Liberation Serif" fo:font-size="12pt" style:font-size-complex="12pt" fo:language="de" style:language-complex="hi" fo:country="DE" style:country-complex="IN"/>
    </style:style>
    <style:style style:family="table-row" style:name="ro42">
      <style:table-row-properties/>
    </style:style>
    <style:style style:family="table-cell" style:name="ce110">
      <style:table-cell-properties style:vertical-align="top" style:direction="ltr" fo:background-color="#f2f2f2" fo:border="0.00882cm solid #CCCCCC" loext:writing-mode="lr-tb" fo:padding-top="0.1411cm" fo:padding-bottom="0.1411cm" fo:padding-left="0.2117cm" fo:padding-right="0.2117cm"/>
    </style:style>
    <style:style style:parent-style-name="737" style:family="paragraph" style:name="P357">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532">
      <style:text-properties fo:color="#000000" fo:font-family="Liberation Serif" style:font-family-complex="Liberation Serif" fo:font-size="10pt" style:font-size-complex="10pt" fo:language="de" style:language-complex="hi" fo:country="DE" style:country-complex="IN"/>
    </style:style>
    <style:style style:family="text" style:name="T1533">
      <style:text-properties fo:color="#000000" fo:font-family="Liberation Serif" style:font-family-complex="Liberation Serif" fo:font-size="12pt" style:font-size-complex="12pt" fo:language="de" style:language-complex="hi" fo:country="DE" style:country-complex="IN"/>
    </style:style>
    <style:style style:family="text" style:name="T1534">
      <style:text-properties fo:color="#000000" fo:font-family="Liberation Serif" style:font-family-complex="Liberation Serif" fo:font-size="12pt" style:font-size-complex="12pt" fo:language="de" style:language-complex="hi" fo:country="DE" style:country-complex="IN"/>
    </style:style>
    <style:style style:family="table-cell" style:name="ce111">
      <style:table-cell-properties style:vertical-align="top" style:direction="ltr" fo:background-color="#f2f2f2" fo:border="0.00882cm solid #CCCCCC" loext:writing-mode="lr-tb" fo:padding-top="0.1411cm" fo:padding-bottom="0.1411cm" fo:padding-left="0.2117cm" fo:padding-right="0.2117cm"/>
    </style:style>
    <style:style style:parent-style-name="737" style:family="paragraph" style:name="P358">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535">
      <style:text-properties fo:color="#000000" fo:font-family="Liberation Serif" style:font-family-complex="Liberation Serif" fo:font-size="10pt" style:font-size-complex="10pt" fo:language="de" style:language-complex="hi" fo:country="DE" style:country-complex="IN"/>
    </style:style>
    <style:style style:family="text" style:name="T1536">
      <style:text-properties fo:color="#000000" fo:font-family="Liberation Serif" style:font-family-complex="Liberation Serif" fo:font-size="12pt" style:font-size-complex="12pt" fo:language="de" style:language-complex="hi" fo:country="DE" style:country-complex="IN"/>
    </style:style>
    <style:style style:family="text" style:name="T1537">
      <style:text-properties fo:color="#000000" fo:font-family="Liberation Serif" style:font-family-complex="Liberation Serif" fo:font-size="12pt" style:font-size-complex="12pt" fo:language="de" style:language-complex="hi" fo:country="DE" style:country-complex="IN"/>
    </style:style>
    <style:style style:family="table-cell" style:name="ce112">
      <style:table-cell-properties style:vertical-align="top" style:direction="ltr" fo:background-color="#f2f2f2" fo:border="0.00882cm solid #CCCCCC" loext:writing-mode="lr-tb" fo:padding-top="0.1411cm" fo:padding-bottom="0.1411cm" fo:padding-left="0.2117cm" fo:padding-right="0.2117cm"/>
    </style:style>
    <style:style style:parent-style-name="737" style:family="paragraph" style:name="P359">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538">
      <style:text-properties fo:color="#000000" fo:font-family="Liberation Serif" style:font-family-complex="Liberation Serif" fo:font-size="10pt" style:font-size-complex="10pt" fo:language="de" style:language-complex="hi" fo:country="DE" style:country-complex="IN"/>
    </style:style>
    <style:style style:family="text" style:name="T1539">
      <style:text-properties fo:color="#000000" fo:font-family="Liberation Serif" style:font-family-complex="Liberation Serif" fo:font-size="12pt" style:font-size-complex="12pt" fo:language="de" style:language-complex="hi" fo:country="DE" style:country-complex="IN"/>
    </style:style>
    <style:style style:family="text" style:name="T1540">
      <style:text-properties fo:color="#000000" fo:font-family="Liberation Serif" style:font-family-complex="Liberation Serif" fo:font-size="12pt" style:font-size-complex="12pt" fo:language="de" style:language-complex="hi" fo:country="DE" style:country-complex="IN"/>
    </style:style>
    <style:style style:family="table-row" style:name="ro43">
      <style:table-row-properties/>
    </style:style>
    <style:style style:family="table-cell" style:name="ce113">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360">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541">
      <style:text-properties fo:color="#000000" fo:font-family="Liberation Serif" style:font-family-complex="Liberation Serif" fo:font-size="10pt" style:font-size-complex="10pt" fo:language="de" style:language-complex="hi" fo:country="DE" style:country-complex="IN"/>
    </style:style>
    <style:style style:family="text" style:name="T1542">
      <style:text-properties fo:color="#000000" fo:font-family="Liberation Serif" style:font-family-complex="Liberation Serif" fo:font-size="12pt" style:font-size-complex="12pt" fo:language="de" style:language-complex="hi" fo:country="DE" style:country-complex="IN"/>
    </style:style>
    <style:style style:family="text" style:name="T1543">
      <style:text-properties fo:color="#000000" fo:font-family="Liberation Serif" style:font-family-complex="Liberation Serif" fo:font-size="12pt" style:font-size-complex="12pt" fo:language="de" style:language-complex="hi" fo:country="DE" style:country-complex="IN"/>
    </style:style>
    <style:style style:family="table-cell" style:name="ce114">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361">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544">
      <style:text-properties fo:color="#000000" fo:font-family="Liberation Serif" style:font-family-complex="Liberation Serif" fo:font-size="10pt" style:font-size-complex="10pt" fo:language="de" style:language-complex="hi" fo:country="DE" style:country-complex="IN"/>
    </style:style>
    <style:style style:family="text" style:name="T1545">
      <style:text-properties fo:color="#000000" fo:font-family="Liberation Serif" style:font-family-complex="Liberation Serif" fo:font-size="12pt" style:font-size-complex="12pt" fo:language="de" style:language-complex="hi" fo:country="DE" style:country-complex="IN"/>
    </style:style>
    <style:style style:family="text" style:name="T1546">
      <style:text-properties fo:color="#000000" fo:font-family="Liberation Serif" style:font-family-complex="Liberation Serif" fo:font-size="12pt" style:font-size-complex="12pt" fo:language="de" style:language-complex="hi" fo:country="DE" style:country-complex="IN"/>
    </style:style>
    <style:style style:family="table-cell" style:name="ce115">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362">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547">
      <style:text-properties fo:color="#000000" fo:font-family="Liberation Serif" style:font-family-complex="Liberation Serif" fo:font-size="10pt" style:font-size-complex="10pt" fo:language="de" style:language-complex="hi" fo:country="DE" style:country-complex="IN"/>
    </style:style>
    <style:style style:family="text" style:name="T1548">
      <style:text-properties fo:color="#000000" fo:font-family="Liberation Serif" style:font-family-complex="Liberation Serif" fo:font-size="12pt" style:font-size-complex="12pt" fo:language="de" style:language-complex="hi" fo:country="DE" style:country-complex="IN"/>
    </style:style>
    <style:style style:family="text" style:name="T1549">
      <style:text-properties fo:color="#000000" fo:font-family="Liberation Serif" style:font-family-complex="Liberation Serif" fo:font-size="12pt" style:font-size-complex="12pt" fo:language="de" style:language-complex="hi" fo:country="DE" style:country-complex="IN"/>
    </style:style>
    <style:style style:family="table-row" style:name="ro44">
      <style:table-row-properties/>
    </style:style>
    <style:style style:family="table-cell" style:name="ce116">
      <style:table-cell-properties style:vertical-align="top" style:direction="ltr" fo:background-color="#f2f2f2" fo:border="0.00882cm solid #CCCCCC" loext:writing-mode="lr-tb" fo:padding-top="0.1411cm" fo:padding-bottom="0.1411cm" fo:padding-left="0.2117cm" fo:padding-right="0.2117cm"/>
    </style:style>
    <style:style style:parent-style-name="737" style:family="paragraph" style:name="P363">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550">
      <style:text-properties fo:color="#000000" fo:font-family="Liberation Serif" style:font-family-complex="Liberation Serif" fo:font-size="10pt" style:font-size-complex="10pt" fo:language="de" style:language-complex="hi" fo:country="DE" style:country-complex="IN"/>
    </style:style>
    <style:style style:family="text" style:name="T1551">
      <style:text-properties fo:color="#000000" fo:font-family="Liberation Serif" style:font-family-complex="Liberation Serif" fo:font-size="12pt" style:font-size-complex="12pt" fo:language="de" style:language-complex="hi" fo:country="DE" style:country-complex="IN"/>
    </style:style>
    <style:style style:family="text" style:name="T1552">
      <style:text-properties fo:color="#000000" fo:font-family="Liberation Serif" style:font-family-complex="Liberation Serif" fo:font-size="12pt" style:font-size-complex="12pt" fo:language="de" style:language-complex="hi" fo:country="DE" style:country-complex="IN"/>
    </style:style>
    <style:style style:family="table-cell" style:name="ce117">
      <style:table-cell-properties style:vertical-align="top" style:direction="ltr" fo:background-color="#f2f2f2" fo:border="0.00882cm solid #CCCCCC" loext:writing-mode="lr-tb" fo:padding-top="0.1411cm" fo:padding-bottom="0.1411cm" fo:padding-left="0.2117cm" fo:padding-right="0.2117cm"/>
    </style:style>
    <style:style style:parent-style-name="737" style:family="paragraph" style:name="P364">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553">
      <style:text-properties fo:color="#000000" fo:font-family="Liberation Serif" style:font-family-complex="Liberation Serif" fo:font-size="10pt" style:font-size-complex="10pt" fo:language="de" style:language-complex="hi" fo:country="DE" style:country-complex="IN"/>
    </style:style>
    <style:style style:family="text" style:name="T1554">
      <style:text-properties fo:color="#000000" fo:font-family="Liberation Serif" style:font-family-complex="Liberation Serif" fo:font-size="12pt" style:font-size-complex="12pt" fo:language="de" style:language-complex="hi" fo:country="DE" style:country-complex="IN"/>
    </style:style>
    <style:style style:family="text" style:name="T1555">
      <style:text-properties fo:color="#000000" fo:font-family="Liberation Serif" style:font-family-complex="Liberation Serif" fo:font-size="12pt" style:font-size-complex="12pt" fo:language="de" style:language-complex="hi" fo:country="DE" style:country-complex="IN"/>
    </style:style>
    <style:style style:family="table-cell" style:name="ce118">
      <style:table-cell-properties style:vertical-align="top" style:direction="ltr" fo:background-color="#f2f2f2" fo:border="0.00882cm solid #CCCCCC" loext:writing-mode="lr-tb" fo:padding-top="0.1411cm" fo:padding-bottom="0.1411cm" fo:padding-left="0.2117cm" fo:padding-right="0.2117cm"/>
    </style:style>
    <style:style style:parent-style-name="737" style:family="paragraph" style:name="P365">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556">
      <style:text-properties fo:color="#000000" fo:font-family="Liberation Serif" style:font-family-complex="Liberation Serif" fo:font-size="10pt" style:font-size-complex="10pt" fo:language="de" style:language-complex="hi" fo:country="DE" style:country-complex="IN"/>
    </style:style>
    <style:style style:family="text" style:name="T1557">
      <style:text-properties fo:color="#000000" fo:font-family="Liberation Serif" style:font-family-complex="Liberation Serif" fo:font-size="12pt" style:font-size-complex="12pt" fo:language="de" style:language-complex="hi" fo:country="DE" style:country-complex="IN"/>
    </style:style>
    <style:style style:family="text" style:name="T1558">
      <style:text-properties fo:color="#000000" fo:font-family="Liberation Serif" style:font-family-complex="Liberation Serif" fo:font-size="12pt" style:font-size-complex="12pt" fo:language="de" style:language-complex="hi" fo:country="DE" style:country-complex="IN"/>
    </style:style>
    <style:style style:family="table-row" style:name="ro45">
      <style:table-row-properties/>
    </style:style>
    <style:style style:family="table-cell" style:name="ce119">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366">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559">
      <style:text-properties fo:color="#000000" fo:font-family="Liberation Serif" style:font-family-complex="Liberation Serif" fo:font-size="10pt" style:font-size-complex="10pt" fo:language="de" style:language-complex="hi" fo:country="DE" style:country-complex="IN"/>
    </style:style>
    <style:style style:family="text" style:name="T1560">
      <style:text-properties fo:color="#000000" fo:font-family="Liberation Serif" style:font-family-complex="Liberation Serif" fo:font-size="12pt" style:font-size-complex="12pt" fo:language="de" style:language-complex="hi" fo:country="DE" style:country-complex="IN"/>
    </style:style>
    <style:style style:family="text" style:name="T1561">
      <style:text-properties fo:color="#000000" fo:font-family="Liberation Serif" style:font-family-complex="Liberation Serif" fo:font-size="12pt" style:font-size-complex="12pt" fo:language="de" style:language-complex="hi" fo:country="DE" style:country-complex="IN"/>
    </style:style>
    <style:style style:family="table-cell" style:name="ce120">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367">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562">
      <style:text-properties fo:color="#000000" fo:font-family="Liberation Serif" style:font-family-complex="Liberation Serif" fo:font-size="10pt" style:font-size-complex="10pt" fo:language="de" style:language-complex="hi" fo:country="DE" style:country-complex="IN"/>
    </style:style>
    <style:style style:family="text" style:name="T1563">
      <style:text-properties fo:color="#000000" fo:font-family="Liberation Serif" style:font-family-complex="Liberation Serif" fo:font-size="12pt" style:font-size-complex="12pt" fo:language="de" style:language-complex="hi" fo:country="DE" style:country-complex="IN"/>
    </style:style>
    <style:style style:family="text" style:name="T1564">
      <style:text-properties fo:color="#000000" fo:font-family="Liberation Serif" style:font-family-complex="Liberation Serif" fo:font-size="12pt" style:font-size-complex="12pt" fo:language="de" style:language-complex="hi" fo:country="DE" style:country-complex="IN"/>
    </style:style>
    <style:style style:family="table-cell" style:name="ce121">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368">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565">
      <style:text-properties fo:color="#000000" fo:font-family="Liberation Serif" style:font-family-complex="Liberation Serif" fo:font-size="10pt" style:font-size-complex="10pt" fo:language="de" style:language-complex="hi" fo:country="DE" style:country-complex="IN"/>
    </style:style>
    <style:style style:family="text" style:name="T1566">
      <style:text-properties fo:color="#000000" fo:font-family="Liberation Serif" style:font-family-complex="Liberation Serif" fo:font-size="12pt" style:font-size-complex="12pt" fo:language="de" style:language-complex="hi" fo:country="DE" style:country-complex="IN"/>
    </style:style>
    <style:style style:family="text" style:name="T1567">
      <style:text-properties fo:color="#000000" fo:font-family="Liberation Serif" style:font-family-complex="Liberation Serif" fo:font-size="12pt" style:font-size-complex="12pt" fo:language="de" style:language-complex="hi" fo:country="DE" style:country-complex="IN"/>
    </style:style>
    <style:style style:family="table-row" style:name="ro46">
      <style:table-row-properties/>
    </style:style>
    <style:style style:family="table-cell" style:name="ce122">
      <style:table-cell-properties style:vertical-align="top" style:direction="ltr" fo:background-color="#f2f2f2" fo:border="0.00882cm solid #CCCCCC" loext:writing-mode="lr-tb" fo:padding-top="0.1411cm" fo:padding-bottom="0.1411cm" fo:padding-left="0.2117cm" fo:padding-right="0.2117cm"/>
    </style:style>
    <style:style style:parent-style-name="737" style:family="paragraph" style:name="P369">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568">
      <style:text-properties fo:color="#000000" fo:font-family="Liberation Serif" style:font-family-complex="Liberation Serif" fo:font-size="10pt" style:font-size-complex="10pt" fo:language="de" style:language-complex="hi" fo:country="DE" style:country-complex="IN"/>
    </style:style>
    <style:style style:family="text" style:name="T1569">
      <style:text-properties fo:color="#000000" fo:font-family="Liberation Serif" style:font-family-complex="Liberation Serif" fo:font-size="12pt" style:font-size-complex="12pt" fo:language="de" style:language-complex="hi" fo:country="DE" style:country-complex="IN"/>
    </style:style>
    <style:style style:family="text" style:name="T1570">
      <style:text-properties fo:color="#000000" fo:font-family="Liberation Serif" style:font-family-complex="Liberation Serif" fo:font-size="12pt" style:font-size-complex="12pt" fo:language="de" style:language-complex="hi" fo:country="DE" style:country-complex="IN"/>
    </style:style>
    <style:style style:family="table-cell" style:name="ce123">
      <style:table-cell-properties style:vertical-align="top" style:direction="ltr" fo:background-color="#f2f2f2" fo:border="0.00882cm solid #CCCCCC" loext:writing-mode="lr-tb" fo:padding-top="0.1411cm" fo:padding-bottom="0.1411cm" fo:padding-left="0.2117cm" fo:padding-right="0.2117cm"/>
    </style:style>
    <style:style style:parent-style-name="737" style:family="paragraph" style:name="P370">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571">
      <style:text-properties fo:color="#000000" fo:font-family="Liberation Serif" style:font-family-complex="Liberation Serif" fo:font-size="10pt" style:font-size-complex="10pt" fo:language="de" style:language-complex="hi" fo:country="DE" style:country-complex="IN"/>
    </style:style>
    <style:style style:family="text" style:name="T1572">
      <style:text-properties fo:color="#000000" fo:font-family="Liberation Serif" style:font-family-complex="Liberation Serif" fo:font-size="12pt" style:font-size-complex="12pt" fo:language="de" style:language-complex="hi" fo:country="DE" style:country-complex="IN"/>
    </style:style>
    <style:style style:family="text" style:name="T1573">
      <style:text-properties fo:color="#000000" fo:font-family="Liberation Serif" style:font-family-complex="Liberation Serif" fo:font-size="12pt" style:font-size-complex="12pt" fo:language="de" style:language-complex="hi" fo:country="DE" style:country-complex="IN"/>
    </style:style>
    <style:style style:family="table-cell" style:name="ce124">
      <style:table-cell-properties style:vertical-align="top" style:direction="ltr" fo:background-color="#f2f2f2" fo:border="0.00882cm solid #CCCCCC" loext:writing-mode="lr-tb" fo:padding-top="0.1411cm" fo:padding-bottom="0.1411cm" fo:padding-left="0.2117cm" fo:padding-right="0.2117cm"/>
    </style:style>
    <style:style style:parent-style-name="737" style:family="paragraph" style:name="P371">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574">
      <style:text-properties fo:color="#000000" fo:font-family="Liberation Serif" style:font-family-complex="Liberation Serif" fo:font-size="10pt" style:font-size-complex="10pt" fo:language="de" style:language-complex="hi" fo:country="DE" style:country-complex="IN"/>
    </style:style>
    <style:style style:family="text" style:name="T1575">
      <style:text-properties fo:color="#000000" fo:font-family="Liberation Serif" style:font-family-complex="Liberation Serif" fo:font-size="12pt" style:font-size-complex="12pt" fo:language="de" style:language-complex="hi" fo:country="DE" style:country-complex="IN"/>
    </style:style>
    <style:style style:family="text" style:name="T1576">
      <style:text-properties fo:color="#000000" fo:font-family="Liberation Serif" style:font-family-complex="Liberation Serif" fo:font-size="12pt" style:font-size-complex="12pt" fo:language="de" style:language-complex="hi" fo:country="DE" style:country-complex="IN"/>
    </style:style>
    <style:style style:parent-style-name="737" style:family="paragraph" style:name="P372">
      <style:paragraph-properties fo:margin-left="0cm" fo:margin-right="0cm" fo:text-indent="0cm" fo:margin-top="3pt" fo:margin-bottom="3pt"/>
      <style:text-properties fo:color="#000000" fo:font-family="Liberation Serif" style:font-family-complex="Liberation Serif" fo:font-size="12pt" style:font-size-complex="12pt" fo:language="de" style:language-complex="hi" fo:country="DE" style:country-complex="IN"/>
    </style:style>
    <style:style style:family="text" style:name="T1577">
      <style:text-properties fo:color="#000000" fo:font-family="Liberation Serif" style:font-family-complex="Liberation Serif" fo:font-size="12pt" style:font-size-complex="12pt" fo:language="de" style:language-complex="hi" fo:country="DE" style:country-complex="IN"/>
    </style:style>
    <style:style style:family="text" style:name="T1578">
      <style:text-properties fo:color="#000000" fo:font-family="Liberation Serif" style:font-family-complex="Liberation Serif" fo:font-size="12pt" style:font-size-complex="12pt" fo:language="de" style:language-complex="hi" fo:country="DE" style:country-complex="IN"/>
    </style:style>
    <style:style style:family="text" style:name="T1579">
      <style:text-properties fo:color="#000000" fo:font-family="Liberation Serif" style:font-family-complex="Liberation Serif" fo:font-size="12pt" style:font-size-complex="12pt" fo:language="de" style:language-complex="hi" fo:country="DE" style:country-complex="IN"/>
    </style:style>
    <style:style style:parent-style-name="737" style:family="paragraph" style:name="P373">
      <style:paragraph-properties fo:margin-left="0cm" fo:margin-right="0cm" fo:text-indent="0cm" fo:margin-top="3pt" fo:margin-bottom="3pt"/>
      <style:text-properties fo:color="#000000" fo:font-family="Liberation Serif" style:font-family-complex="Liberation Serif" fo:font-size="12pt" style:font-size-complex="12pt" fo:language="de" style:language-complex="hi" fo:country="DE" style:country-complex="IN"/>
    </style:style>
    <style:style style:family="text" style:name="T1580">
      <style:text-properties fo:color="#000000" fo:font-family="Liberation Serif" style:font-family-complex="Liberation Serif" fo:font-size="12pt" style:font-size-complex="12pt" fo:language="de" style:language-complex="hi" fo:country="DE" style:country-complex="IN"/>
    </style:style>
    <style:style style:family="text" style:name="T1581">
      <style:text-properties fo:color="#000000" fo:font-family="Liberation Serif" style:font-family-complex="Liberation Serif" fo:font-size="12pt" style:font-size-complex="12pt" fo:language="de" style:language-complex="hi" fo:country="DE" style:country-complex="IN"/>
    </style:style>
    <style:style style:family="text" style:name="T1582">
      <style:text-properties fo:color="#000000" fo:font-family="Liberation Serif" style:font-family-complex="Liberation Serif" fo:font-size="12pt" style:font-size-complex="12pt" fo:language="de" style:language-complex="hi" fo:country="DE" style:country-complex="IN"/>
    </style:style>
    <style:style style:family="table" style:name="ta6">
      <style:table-properties style:width="17.88cm" fo:margin-left="-0.01588cm" table:align="left"/>
    </style:style>
    <style:style style:family="table-column" style:name="co16">
      <style:table-column-properties style:column-width="4.909cm"/>
    </style:style>
    <style:style style:family="table-column" style:name="co17">
      <style:table-column-properties style:column-width="2.75cm"/>
    </style:style>
    <style:style style:family="table-column" style:name="co18">
      <style:table-column-properties style:column-width="2.618cm"/>
    </style:style>
    <style:style style:family="table-column" style:name="co19">
      <style:table-column-properties style:column-width="3.45cm"/>
    </style:style>
    <style:style style:family="table-column" style:name="co20">
      <style:table-column-properties style:column-width="4.152cm"/>
    </style:style>
    <style:style style:family="table-row" style:name="ro47">
      <style:table-row-properties/>
    </style:style>
    <style:style style:family="table-cell" style:name="ce126">
      <style:table-cell-properties style:vertical-align="top" style:direction="ltr" fo:background-color="#1f4e79" fo:border="0.00882cm solid #CCCCCC" loext:writing-mode="lr-tb" fo:padding-top="0.1411cm" fo:padding-bottom="0.1411cm" fo:padding-left="0.2117cm" fo:padding-right="0.2117cm"/>
    </style:style>
    <style:style style:parent-style-name="737" style:family="paragraph" style:name="P374">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583">
      <style:text-properties fo:color="#ffffff" fo:font-family="Liberation Serif" style:font-family-complex="Liberation Serif" fo:font-size="10pt" style:font-size-complex="10pt" fo:language="de" style:language-complex="hi" fo:country="DE" style:country-complex="IN" fo:font-weight="bold"/>
    </style:style>
    <style:style style:family="text" style:name="T1584">
      <style:text-properties fo:color="#000000" fo:font-family="Liberation Serif" style:font-family-complex="Liberation Serif" fo:font-size="12pt" style:font-size-complex="12pt" fo:language="de" style:language-complex="hi" fo:country="DE" style:country-complex="IN"/>
    </style:style>
    <style:style style:family="text" style:name="T1585">
      <style:text-properties fo:color="#000000" fo:font-family="Liberation Serif" style:font-family-complex="Liberation Serif" fo:font-size="12pt" style:font-size-complex="12pt" fo:language="de" style:language-complex="hi" fo:country="DE" style:country-complex="IN"/>
    </style:style>
    <style:style style:family="table-cell" style:name="ce127">
      <style:table-cell-properties style:vertical-align="top" style:direction="ltr" fo:background-color="#1f4e79" fo:border="0.00882cm solid #CCCCCC" loext:writing-mode="lr-tb" fo:padding-top="0.1411cm" fo:padding-bottom="0.1411cm" fo:padding-left="0.2117cm" fo:padding-right="0.2117cm"/>
    </style:style>
    <style:style style:parent-style-name="737" style:family="paragraph" style:name="P375">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586">
      <style:text-properties fo:color="#ffffff" fo:font-family="Liberation Serif" style:font-family-complex="Liberation Serif" fo:font-size="10pt" style:font-size-complex="10pt" fo:language="de" style:language-complex="hi" fo:country="DE" style:country-complex="IN" fo:font-weight="bold"/>
    </style:style>
    <style:style style:family="text" style:name="T1587">
      <style:text-properties fo:color="#000000" fo:font-family="Liberation Serif" style:font-family-complex="Liberation Serif" fo:font-size="12pt" style:font-size-complex="12pt" fo:language="de" style:language-complex="hi" fo:country="DE" style:country-complex="IN"/>
    </style:style>
    <style:style style:family="text" style:name="T1588">
      <style:text-properties fo:color="#000000" fo:font-family="Liberation Serif" style:font-family-complex="Liberation Serif" fo:font-size="12pt" style:font-size-complex="12pt" fo:language="de" style:language-complex="hi" fo:country="DE" style:country-complex="IN"/>
    </style:style>
    <style:style style:family="table-cell" style:name="ce128">
      <style:table-cell-properties style:vertical-align="top" style:direction="ltr" fo:background-color="#1f4e79" fo:border="0.00882cm solid #CCCCCC" loext:writing-mode="lr-tb" fo:padding-top="0.1411cm" fo:padding-bottom="0.1411cm" fo:padding-left="0.2117cm" fo:padding-right="0.2117cm"/>
    </style:style>
    <style:style style:parent-style-name="737" style:family="paragraph" style:name="P376">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589">
      <style:text-properties fo:color="#ffffff" fo:font-family="Liberation Serif" style:font-family-complex="Liberation Serif" fo:font-size="10pt" style:font-size-complex="10pt" fo:language="de" style:language-complex="hi" fo:country="DE" style:country-complex="IN" fo:font-weight="bold"/>
    </style:style>
    <style:style style:family="text" style:name="T1590">
      <style:text-properties fo:color="#ffffff" fo:font-family="Liberation Serif" style:font-family-complex="Liberation Serif" fo:font-size="10pt" style:font-size-complex="10pt" fo:language="de" style:language-complex="hi" fo:country="DE" style:country-complex="IN" fo:font-weight="bold"/>
    </style:style>
    <style:style style:family="text" style:name="T1591">
      <style:text-properties fo:color="#000000" fo:font-family="Liberation Serif" style:font-family-complex="Liberation Serif" fo:font-size="12pt" style:font-size-complex="12pt" fo:language="de" style:language-complex="hi" fo:country="DE" style:country-complex="IN"/>
    </style:style>
    <style:style style:family="text" style:name="T1592">
      <style:text-properties fo:color="#000000" fo:font-family="Liberation Serif" style:font-family-complex="Liberation Serif" fo:font-size="12pt" style:font-size-complex="12pt" fo:language="de" style:language-complex="hi" fo:country="DE" style:country-complex="IN"/>
    </style:style>
    <style:style style:family="table-cell" style:name="ce129">
      <style:table-cell-properties style:vertical-align="top" style:direction="ltr" fo:background-color="#1f4e79" fo:border="0.00882cm solid #CCCCCC" loext:writing-mode="lr-tb" fo:padding-top="0.1411cm" fo:padding-bottom="0.1411cm" fo:padding-left="0.2117cm" fo:padding-right="0.2117cm"/>
    </style:style>
    <style:style style:parent-style-name="737" style:family="paragraph" style:name="P377">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593">
      <style:text-properties fo:color="#ffffff" fo:font-family="Liberation Serif" style:font-family-complex="Liberation Serif" fo:font-size="10pt" style:font-size-complex="10pt" fo:language="de" style:language-complex="hi" fo:country="DE" style:country-complex="IN" fo:font-weight="bold"/>
    </style:style>
    <style:style style:family="text" style:name="T1594">
      <style:text-properties fo:color="#ffffff" fo:font-family="Liberation Serif" style:font-family-complex="Liberation Serif" fo:font-size="10pt" style:font-size-complex="10pt" fo:language="de" style:language-complex="hi" fo:country="DE" style:country-complex="IN" fo:font-weight="bold"/>
    </style:style>
    <style:style style:family="text" style:name="T1595">
      <style:text-properties fo:color="#000000" fo:font-family="Liberation Serif" style:font-family-complex="Liberation Serif" fo:font-size="12pt" style:font-size-complex="12pt" fo:language="de" style:language-complex="hi" fo:country="DE" style:country-complex="IN"/>
    </style:style>
    <style:style style:family="text" style:name="T1596">
      <style:text-properties fo:color="#000000" fo:font-family="Liberation Serif" style:font-family-complex="Liberation Serif" fo:font-size="12pt" style:font-size-complex="12pt" fo:language="de" style:language-complex="hi" fo:country="DE" style:country-complex="IN"/>
    </style:style>
    <style:style style:family="table-cell" style:name="ce130">
      <style:table-cell-properties style:vertical-align="top" style:direction="ltr" fo:background-color="#1f4e79" fo:border="0.00882cm solid #CCCCCC" loext:writing-mode="lr-tb" fo:padding-top="0.1411cm" fo:padding-bottom="0.1411cm" fo:padding-left="0.2117cm" fo:padding-right="0.2117cm"/>
    </style:style>
    <style:style style:parent-style-name="737" style:family="paragraph" style:name="P378">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597">
      <style:text-properties fo:color="#ffffff" fo:font-family="Liberation Serif" style:font-family-complex="Liberation Serif" fo:font-size="10pt" style:font-size-complex="10pt" fo:language="de" style:language-complex="hi" fo:country="DE" style:country-complex="IN" fo:font-weight="bold"/>
    </style:style>
    <style:style style:family="text" style:name="T1598">
      <style:text-properties fo:color="#000000" fo:font-family="Liberation Serif" style:font-family-complex="Liberation Serif" fo:font-size="12pt" style:font-size-complex="12pt" fo:language="de" style:language-complex="hi" fo:country="DE" style:country-complex="IN"/>
    </style:style>
    <style:style style:family="text" style:name="T1599">
      <style:text-properties fo:color="#000000" fo:font-family="Liberation Serif" style:font-family-complex="Liberation Serif" fo:font-size="12pt" style:font-size-complex="12pt" fo:language="de" style:language-complex="hi" fo:country="DE" style:country-complex="IN"/>
    </style:style>
    <style:style style:family="table-row" style:name="ro48">
      <style:table-row-properties/>
    </style:style>
    <style:style style:family="table-cell" style:name="ce131">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379">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600">
      <style:text-properties fo:color="#000000" fo:font-family="Liberation Serif" style:font-family-complex="Liberation Serif" fo:font-size="10pt" style:font-size-complex="10pt" fo:language="de" style:language-complex="hi" fo:country="DE" style:country-complex="IN"/>
    </style:style>
    <style:style style:family="text" style:name="T1601">
      <style:text-properties fo:color="#000000" fo:font-family="Liberation Serif" style:font-family-complex="Liberation Serif" fo:font-size="12pt" style:font-size-complex="12pt" fo:language="de" style:language-complex="hi" fo:country="DE" style:country-complex="IN"/>
    </style:style>
    <style:style style:family="text" style:name="T1602">
      <style:text-properties fo:color="#000000" fo:font-family="Liberation Serif" style:font-family-complex="Liberation Serif" fo:font-size="12pt" style:font-size-complex="12pt" fo:language="de" style:language-complex="hi" fo:country="DE" style:country-complex="IN"/>
    </style:style>
    <style:style style:family="table-cell" style:name="ce132">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380">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603">
      <style:text-properties fo:color="#000000" fo:font-family="Liberation Serif" style:font-family-complex="Liberation Serif" fo:font-size="10pt" style:font-size-complex="10pt" fo:language="de" style:language-complex="hi" fo:country="DE" style:country-complex="IN"/>
    </style:style>
    <style:style style:family="text" style:name="T1604">
      <style:text-properties fo:color="#000000" fo:font-family="Liberation Serif" style:font-family-complex="Liberation Serif" fo:font-size="12pt" style:font-size-complex="12pt" fo:language="de" style:language-complex="hi" fo:country="DE" style:country-complex="IN"/>
    </style:style>
    <style:style style:family="text" style:name="T1605">
      <style:text-properties fo:color="#000000" fo:font-family="Liberation Serif" style:font-family-complex="Liberation Serif" fo:font-size="12pt" style:font-size-complex="12pt" fo:language="de" style:language-complex="hi" fo:country="DE" style:country-complex="IN"/>
    </style:style>
    <style:style style:family="table-cell" style:name="ce133">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381">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606">
      <style:text-properties fo:color="#000000" fo:font-family="Liberation Serif" style:font-family-complex="Liberation Serif" fo:font-size="10pt" style:font-size-complex="10pt" fo:language="de" style:language-complex="hi" fo:country="DE" style:country-complex="IN"/>
    </style:style>
    <style:style style:family="text" style:name="T1607">
      <style:text-properties fo:color="#000000" fo:font-family="Liberation Serif" style:font-family-complex="Liberation Serif" fo:font-size="12pt" style:font-size-complex="12pt" fo:language="de" style:language-complex="hi" fo:country="DE" style:country-complex="IN"/>
    </style:style>
    <style:style style:family="text" style:name="T1608">
      <style:text-properties fo:color="#000000" fo:font-family="Liberation Serif" style:font-family-complex="Liberation Serif" fo:font-size="12pt" style:font-size-complex="12pt" fo:language="de" style:language-complex="hi" fo:country="DE" style:country-complex="IN"/>
    </style:style>
    <style:style style:family="table-cell" style:name="ce134">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382">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609">
      <style:text-properties fo:color="#000000" fo:font-family="Liberation Serif" style:font-family-complex="Liberation Serif" fo:font-size="10pt" style:font-size-complex="10pt" fo:language="de" style:language-complex="hi" fo:country="DE" style:country-complex="IN"/>
    </style:style>
    <style:style style:family="text" style:name="T1610">
      <style:text-properties fo:color="#000000" fo:font-family="Liberation Serif" style:font-family-complex="Liberation Serif" fo:font-size="12pt" style:font-size-complex="12pt" fo:language="de" style:language-complex="hi" fo:country="DE" style:country-complex="IN"/>
    </style:style>
    <style:style style:family="text" style:name="T1611">
      <style:text-properties fo:color="#000000" fo:font-family="Liberation Serif" style:font-family-complex="Liberation Serif" fo:font-size="12pt" style:font-size-complex="12pt" fo:language="de" style:language-complex="hi" fo:country="DE" style:country-complex="IN"/>
    </style:style>
    <style:style style:family="table-cell" style:name="ce135">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383">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612">
      <style:text-properties fo:color="#000000" fo:font-family="Liberation Serif" style:font-family-complex="Liberation Serif" fo:font-size="10pt" style:font-size-complex="10pt" fo:language="de" style:language-complex="hi" fo:country="DE" style:country-complex="IN"/>
    </style:style>
    <style:style style:family="text" style:name="T1613">
      <style:text-properties fo:color="#000000" fo:font-family="Liberation Serif" style:font-family-complex="Liberation Serif" fo:font-size="12pt" style:font-size-complex="12pt" fo:language="de" style:language-complex="hi" fo:country="DE" style:country-complex="IN"/>
    </style:style>
    <style:style style:family="text" style:name="T1614">
      <style:text-properties fo:color="#000000" fo:font-family="Liberation Serif" style:font-family-complex="Liberation Serif" fo:font-size="12pt" style:font-size-complex="12pt" fo:language="de" style:language-complex="hi" fo:country="DE" style:country-complex="IN"/>
    </style:style>
    <style:style style:family="table-row" style:name="ro49">
      <style:table-row-properties/>
    </style:style>
    <style:style style:family="table-cell" style:name="ce136">
      <style:table-cell-properties style:vertical-align="top" style:direction="ltr" fo:background-color="#f2f2f2" fo:border="0.00882cm solid #CCCCCC" loext:writing-mode="lr-tb" fo:padding-top="0.1411cm" fo:padding-bottom="0.1411cm" fo:padding-left="0.2117cm" fo:padding-right="0.2117cm"/>
    </style:style>
    <style:style style:parent-style-name="737" style:family="paragraph" style:name="P384">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615">
      <style:text-properties fo:color="#000000" fo:font-family="Liberation Serif" style:font-family-complex="Liberation Serif" fo:font-size="10pt" style:font-size-complex="10pt" fo:language="de" style:language-complex="hi" fo:country="DE" style:country-complex="IN"/>
    </style:style>
    <style:style style:family="text" style:name="T1616">
      <style:text-properties fo:color="#000000" fo:font-family="Liberation Serif" style:font-family-complex="Liberation Serif" fo:font-size="12pt" style:font-size-complex="12pt" fo:language="de" style:language-complex="hi" fo:country="DE" style:country-complex="IN"/>
    </style:style>
    <style:style style:family="text" style:name="T1617">
      <style:text-properties fo:color="#000000" fo:font-family="Liberation Serif" style:font-family-complex="Liberation Serif" fo:font-size="12pt" style:font-size-complex="12pt" fo:language="de" style:language-complex="hi" fo:country="DE" style:country-complex="IN"/>
    </style:style>
    <style:style style:family="table-cell" style:name="ce137">
      <style:table-cell-properties style:vertical-align="top" style:direction="ltr" fo:background-color="#f2f2f2" fo:border="0.00882cm solid #CCCCCC" loext:writing-mode="lr-tb" fo:padding-top="0.1411cm" fo:padding-bottom="0.1411cm" fo:padding-left="0.2117cm" fo:padding-right="0.2117cm"/>
    </style:style>
    <style:style style:parent-style-name="737" style:family="paragraph" style:name="P385">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618">
      <style:text-properties fo:color="#000000" fo:font-family="Liberation Serif" style:font-family-complex="Liberation Serif" fo:font-size="10pt" style:font-size-complex="10pt" fo:language="de" style:language-complex="hi" fo:country="DE" style:country-complex="IN"/>
    </style:style>
    <style:style style:family="text" style:name="T1619">
      <style:text-properties fo:color="#000000" fo:font-family="Liberation Serif" style:font-family-complex="Liberation Serif" fo:font-size="12pt" style:font-size-complex="12pt" fo:language="de" style:language-complex="hi" fo:country="DE" style:country-complex="IN"/>
    </style:style>
    <style:style style:family="text" style:name="T1620">
      <style:text-properties fo:color="#000000" fo:font-family="Liberation Serif" style:font-family-complex="Liberation Serif" fo:font-size="12pt" style:font-size-complex="12pt" fo:language="de" style:language-complex="hi" fo:country="DE" style:country-complex="IN"/>
    </style:style>
    <style:style style:family="table-cell" style:name="ce138">
      <style:table-cell-properties style:vertical-align="top" style:direction="ltr" fo:background-color="#f2f2f2" fo:border="0.00882cm solid #CCCCCC" loext:writing-mode="lr-tb" fo:padding-top="0.1411cm" fo:padding-bottom="0.1411cm" fo:padding-left="0.2117cm" fo:padding-right="0.2117cm"/>
    </style:style>
    <style:style style:parent-style-name="737" style:family="paragraph" style:name="P386">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621">
      <style:text-properties fo:color="#000000" fo:font-family="Liberation Serif" style:font-family-complex="Liberation Serif" fo:font-size="10pt" style:font-size-complex="10pt" fo:language="de" style:language-complex="hi" fo:country="DE" style:country-complex="IN"/>
    </style:style>
    <style:style style:family="text" style:name="T1622">
      <style:text-properties fo:color="#000000" fo:font-family="Liberation Serif" style:font-family-complex="Liberation Serif" fo:font-size="12pt" style:font-size-complex="12pt" fo:language="de" style:language-complex="hi" fo:country="DE" style:country-complex="IN"/>
    </style:style>
    <style:style style:family="text" style:name="T1623">
      <style:text-properties fo:color="#000000" fo:font-family="Liberation Serif" style:font-family-complex="Liberation Serif" fo:font-size="12pt" style:font-size-complex="12pt" fo:language="de" style:language-complex="hi" fo:country="DE" style:country-complex="IN"/>
    </style:style>
    <style:style style:family="table-cell" style:name="ce139">
      <style:table-cell-properties style:vertical-align="top" style:direction="ltr" fo:background-color="#f2f2f2" fo:border="0.00882cm solid #CCCCCC" loext:writing-mode="lr-tb" fo:padding-top="0.1411cm" fo:padding-bottom="0.1411cm" fo:padding-left="0.2117cm" fo:padding-right="0.2117cm"/>
    </style:style>
    <style:style style:parent-style-name="737" style:family="paragraph" style:name="P387">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624">
      <style:text-properties fo:color="#000000" fo:font-family="Liberation Serif" style:font-family-complex="Liberation Serif" fo:font-size="10pt" style:font-size-complex="10pt" fo:language="de" style:language-complex="hi" fo:country="DE" style:country-complex="IN"/>
    </style:style>
    <style:style style:family="text" style:name="T1625">
      <style:text-properties fo:color="#000000" fo:font-family="Liberation Serif" style:font-family-complex="Liberation Serif" fo:font-size="12pt" style:font-size-complex="12pt" fo:language="de" style:language-complex="hi" fo:country="DE" style:country-complex="IN"/>
    </style:style>
    <style:style style:family="text" style:name="T1626">
      <style:text-properties fo:color="#000000" fo:font-family="Liberation Serif" style:font-family-complex="Liberation Serif" fo:font-size="12pt" style:font-size-complex="12pt" fo:language="de" style:language-complex="hi" fo:country="DE" style:country-complex="IN"/>
    </style:style>
    <style:style style:family="table-cell" style:name="ce140">
      <style:table-cell-properties style:vertical-align="top" style:direction="ltr" fo:background-color="#f2f2f2" fo:border="0.00882cm solid #CCCCCC" loext:writing-mode="lr-tb" fo:padding-top="0.1411cm" fo:padding-bottom="0.1411cm" fo:padding-left="0.2117cm" fo:padding-right="0.2117cm"/>
    </style:style>
    <style:style style:parent-style-name="737" style:family="paragraph" style:name="P388">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627">
      <style:text-properties fo:color="#000000" fo:font-family="Liberation Serif" style:font-family-complex="Liberation Serif" fo:font-size="10pt" style:font-size-complex="10pt" fo:language="de" style:language-complex="hi" fo:country="DE" style:country-complex="IN"/>
    </style:style>
    <style:style style:family="text" style:name="T1628">
      <style:text-properties fo:color="#000000" fo:font-family="Liberation Serif" style:font-family-complex="Liberation Serif" fo:font-size="12pt" style:font-size-complex="12pt" fo:language="de" style:language-complex="hi" fo:country="DE" style:country-complex="IN"/>
    </style:style>
    <style:style style:family="text" style:name="T1629">
      <style:text-properties fo:color="#000000" fo:font-family="Liberation Serif" style:font-family-complex="Liberation Serif" fo:font-size="12pt" style:font-size-complex="12pt" fo:language="de" style:language-complex="hi" fo:country="DE" style:country-complex="IN"/>
    </style:style>
    <style:style style:family="table-row" style:name="ro50">
      <style:table-row-properties/>
    </style:style>
    <style:style style:family="table-cell" style:name="ce141">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389">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630">
      <style:text-properties fo:color="#000000" fo:font-family="Liberation Serif" style:font-family-complex="Liberation Serif" fo:font-size="10pt" style:font-size-complex="10pt" fo:language="de" style:language-complex="hi" fo:country="DE" style:country-complex="IN"/>
    </style:style>
    <style:style style:family="text" style:name="T1631">
      <style:text-properties fo:color="#000000" fo:font-family="Liberation Serif" style:font-family-complex="Liberation Serif" fo:font-size="12pt" style:font-size-complex="12pt" fo:language="de" style:language-complex="hi" fo:country="DE" style:country-complex="IN"/>
    </style:style>
    <style:style style:family="text" style:name="T1632">
      <style:text-properties fo:color="#000000" fo:font-family="Liberation Serif" style:font-family-complex="Liberation Serif" fo:font-size="12pt" style:font-size-complex="12pt" fo:language="de" style:language-complex="hi" fo:country="DE" style:country-complex="IN"/>
    </style:style>
    <style:style style:family="table-cell" style:name="ce142">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390">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633">
      <style:text-properties fo:color="#000000" fo:font-family="Liberation Serif" style:font-family-complex="Liberation Serif" fo:font-size="10pt" style:font-size-complex="10pt" fo:language="de" style:language-complex="hi" fo:country="DE" style:country-complex="IN"/>
    </style:style>
    <style:style style:family="text" style:name="T1634">
      <style:text-properties fo:color="#000000" fo:font-family="Liberation Serif" style:font-family-complex="Liberation Serif" fo:font-size="12pt" style:font-size-complex="12pt" fo:language="de" style:language-complex="hi" fo:country="DE" style:country-complex="IN"/>
    </style:style>
    <style:style style:family="text" style:name="T1635">
      <style:text-properties fo:color="#000000" fo:font-family="Liberation Serif" style:font-family-complex="Liberation Serif" fo:font-size="12pt" style:font-size-complex="12pt" fo:language="de" style:language-complex="hi" fo:country="DE" style:country-complex="IN"/>
    </style:style>
    <style:style style:family="table-cell" style:name="ce143">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391">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636">
      <style:text-properties fo:color="#000000" fo:font-family="Liberation Serif" style:font-family-complex="Liberation Serif" fo:font-size="10pt" style:font-size-complex="10pt" fo:language="de" style:language-complex="hi" fo:country="DE" style:country-complex="IN"/>
    </style:style>
    <style:style style:family="text" style:name="T1637">
      <style:text-properties fo:color="#000000" fo:font-family="Liberation Serif" style:font-family-complex="Liberation Serif" fo:font-size="12pt" style:font-size-complex="12pt" fo:language="de" style:language-complex="hi" fo:country="DE" style:country-complex="IN"/>
    </style:style>
    <style:style style:family="text" style:name="T1638">
      <style:text-properties fo:color="#000000" fo:font-family="Liberation Serif" style:font-family-complex="Liberation Serif" fo:font-size="12pt" style:font-size-complex="12pt" fo:language="de" style:language-complex="hi" fo:country="DE" style:country-complex="IN"/>
    </style:style>
    <style:style style:family="table-cell" style:name="ce144">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392">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639">
      <style:text-properties fo:color="#000000" fo:font-family="Liberation Serif" style:font-family-complex="Liberation Serif" fo:font-size="10pt" style:font-size-complex="10pt" fo:language="de" style:language-complex="hi" fo:country="DE" style:country-complex="IN"/>
    </style:style>
    <style:style style:family="text" style:name="T1640">
      <style:text-properties fo:color="#000000" fo:font-family="Liberation Serif" style:font-family-complex="Liberation Serif" fo:font-size="12pt" style:font-size-complex="12pt" fo:language="de" style:language-complex="hi" fo:country="DE" style:country-complex="IN"/>
    </style:style>
    <style:style style:family="text" style:name="T1641">
      <style:text-properties fo:color="#000000" fo:font-family="Liberation Serif" style:font-family-complex="Liberation Serif" fo:font-size="12pt" style:font-size-complex="12pt" fo:language="de" style:language-complex="hi" fo:country="DE" style:country-complex="IN"/>
    </style:style>
    <style:style style:family="table-cell" style:name="ce145">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393">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642">
      <style:text-properties fo:color="#000000" fo:font-family="Liberation Serif" style:font-family-complex="Liberation Serif" fo:font-size="10pt" style:font-size-complex="10pt" fo:language="de" style:language-complex="hi" fo:country="DE" style:country-complex="IN"/>
    </style:style>
    <style:style style:family="text" style:name="T1643">
      <style:text-properties fo:color="#000000" fo:font-family="Liberation Serif" style:font-family-complex="Liberation Serif" fo:font-size="12pt" style:font-size-complex="12pt" fo:language="de" style:language-complex="hi" fo:country="DE" style:country-complex="IN"/>
    </style:style>
    <style:style style:family="text" style:name="T1644">
      <style:text-properties fo:color="#000000" fo:font-family="Liberation Serif" style:font-family-complex="Liberation Serif" fo:font-size="12pt" style:font-size-complex="12pt" fo:language="de" style:language-complex="hi" fo:country="DE" style:country-complex="IN"/>
    </style:style>
    <style:style style:family="table-row" style:name="ro51">
      <style:table-row-properties/>
    </style:style>
    <style:style style:family="table-cell" style:name="ce146">
      <style:table-cell-properties style:vertical-align="top" style:direction="ltr" fo:background-color="#f2f2f2" fo:border="0.00882cm solid #CCCCCC" loext:writing-mode="lr-tb" fo:padding-top="0.1411cm" fo:padding-bottom="0.1411cm" fo:padding-left="0.2117cm" fo:padding-right="0.2117cm"/>
    </style:style>
    <style:style style:parent-style-name="737" style:family="paragraph" style:name="P394">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645">
      <style:text-properties fo:color="#000000" fo:font-family="Liberation Serif" style:font-family-complex="Liberation Serif" fo:font-size="10pt" style:font-size-complex="10pt" fo:language="de" style:language-complex="hi" fo:country="DE" style:country-complex="IN"/>
    </style:style>
    <style:style style:family="text" style:name="T1646">
      <style:text-properties fo:color="#000000" fo:font-family="Liberation Serif" style:font-family-complex="Liberation Serif" fo:font-size="12pt" style:font-size-complex="12pt" fo:language="de" style:language-complex="hi" fo:country="DE" style:country-complex="IN"/>
    </style:style>
    <style:style style:family="text" style:name="T1647">
      <style:text-properties fo:color="#000000" fo:font-family="Liberation Serif" style:font-family-complex="Liberation Serif" fo:font-size="12pt" style:font-size-complex="12pt" fo:language="de" style:language-complex="hi" fo:country="DE" style:country-complex="IN"/>
    </style:style>
    <style:style style:family="table-cell" style:name="ce147">
      <style:table-cell-properties style:vertical-align="top" style:direction="ltr" fo:background-color="#f2f2f2" fo:border="0.00882cm solid #CCCCCC" loext:writing-mode="lr-tb" fo:padding-top="0.1411cm" fo:padding-bottom="0.1411cm" fo:padding-left="0.2117cm" fo:padding-right="0.2117cm"/>
    </style:style>
    <style:style style:parent-style-name="737" style:family="paragraph" style:name="P395">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648">
      <style:text-properties fo:color="#000000" fo:font-family="Liberation Serif" style:font-family-complex="Liberation Serif" fo:font-size="10pt" style:font-size-complex="10pt" fo:language="de" style:language-complex="hi" fo:country="DE" style:country-complex="IN"/>
    </style:style>
    <style:style style:family="text" style:name="T1649">
      <style:text-properties fo:color="#000000" fo:font-family="Liberation Serif" style:font-family-complex="Liberation Serif" fo:font-size="12pt" style:font-size-complex="12pt" fo:language="de" style:language-complex="hi" fo:country="DE" style:country-complex="IN"/>
    </style:style>
    <style:style style:family="text" style:name="T1650">
      <style:text-properties fo:color="#000000" fo:font-family="Liberation Serif" style:font-family-complex="Liberation Serif" fo:font-size="12pt" style:font-size-complex="12pt" fo:language="de" style:language-complex="hi" fo:country="DE" style:country-complex="IN"/>
    </style:style>
    <style:style style:family="table-cell" style:name="ce148">
      <style:table-cell-properties style:vertical-align="top" style:direction="ltr" fo:background-color="#f2f2f2" fo:border="0.00882cm solid #CCCCCC" loext:writing-mode="lr-tb" fo:padding-top="0.1411cm" fo:padding-bottom="0.1411cm" fo:padding-left="0.2117cm" fo:padding-right="0.2117cm"/>
    </style:style>
    <style:style style:parent-style-name="737" style:family="paragraph" style:name="P396">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651">
      <style:text-properties fo:color="#000000" fo:font-family="Liberation Serif" style:font-family-complex="Liberation Serif" fo:font-size="10pt" style:font-size-complex="10pt" fo:language="de" style:language-complex="hi" fo:country="DE" style:country-complex="IN"/>
    </style:style>
    <style:style style:family="text" style:name="T1652">
      <style:text-properties fo:color="#000000" fo:font-family="Liberation Serif" style:font-family-complex="Liberation Serif" fo:font-size="12pt" style:font-size-complex="12pt" fo:language="de" style:language-complex="hi" fo:country="DE" style:country-complex="IN"/>
    </style:style>
    <style:style style:family="text" style:name="T1653">
      <style:text-properties fo:color="#000000" fo:font-family="Liberation Serif" style:font-family-complex="Liberation Serif" fo:font-size="12pt" style:font-size-complex="12pt" fo:language="de" style:language-complex="hi" fo:country="DE" style:country-complex="IN"/>
    </style:style>
    <style:style style:family="table-cell" style:name="ce149">
      <style:table-cell-properties style:vertical-align="top" style:direction="ltr" fo:background-color="#f2f2f2" fo:border="0.00882cm solid #CCCCCC" loext:writing-mode="lr-tb" fo:padding-top="0.1411cm" fo:padding-bottom="0.1411cm" fo:padding-left="0.2117cm" fo:padding-right="0.2117cm"/>
    </style:style>
    <style:style style:parent-style-name="737" style:family="paragraph" style:name="P397">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654">
      <style:text-properties fo:color="#000000" fo:font-family="Liberation Serif" style:font-family-complex="Liberation Serif" fo:font-size="10pt" style:font-size-complex="10pt" fo:language="de" style:language-complex="hi" fo:country="DE" style:country-complex="IN"/>
    </style:style>
    <style:style style:family="text" style:name="T1655">
      <style:text-properties fo:color="#000000" fo:font-family="Liberation Serif" style:font-family-complex="Liberation Serif" fo:font-size="12pt" style:font-size-complex="12pt" fo:language="de" style:language-complex="hi" fo:country="DE" style:country-complex="IN"/>
    </style:style>
    <style:style style:family="text" style:name="T1656">
      <style:text-properties fo:color="#000000" fo:font-family="Liberation Serif" style:font-family-complex="Liberation Serif" fo:font-size="12pt" style:font-size-complex="12pt" fo:language="de" style:language-complex="hi" fo:country="DE" style:country-complex="IN"/>
    </style:style>
    <style:style style:family="table-cell" style:name="ce150">
      <style:table-cell-properties style:vertical-align="top" style:direction="ltr" fo:background-color="#f2f2f2" fo:border="0.00882cm solid #CCCCCC" loext:writing-mode="lr-tb" fo:padding-top="0.1411cm" fo:padding-bottom="0.1411cm" fo:padding-left="0.2117cm" fo:padding-right="0.2117cm"/>
    </style:style>
    <style:style style:parent-style-name="737" style:family="paragraph" style:name="P398">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657">
      <style:text-properties fo:color="#000000" fo:font-family="Liberation Serif" style:font-family-complex="Liberation Serif" fo:font-size="10pt" style:font-size-complex="10pt" fo:language="de" style:language-complex="hi" fo:country="DE" style:country-complex="IN"/>
    </style:style>
    <style:style style:family="text" style:name="T1658">
      <style:text-properties fo:color="#000000" fo:font-family="Liberation Serif" style:font-family-complex="Liberation Serif" fo:font-size="12pt" style:font-size-complex="12pt" fo:language="de" style:language-complex="hi" fo:country="DE" style:country-complex="IN"/>
    </style:style>
    <style:style style:family="text" style:name="T1659">
      <style:text-properties fo:color="#000000" fo:font-family="Liberation Serif" style:font-family-complex="Liberation Serif" fo:font-size="12pt" style:font-size-complex="12pt" fo:language="de" style:language-complex="hi" fo:country="DE" style:country-complex="IN"/>
    </style:style>
    <style:style style:family="table-row" style:name="ro52">
      <style:table-row-properties/>
    </style:style>
    <style:style style:family="table-cell" style:name="ce151">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399">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660">
      <style:text-properties fo:color="#000000" fo:font-family="Liberation Serif" style:font-family-complex="Liberation Serif" fo:font-size="10pt" style:font-size-complex="10pt" fo:language="de" style:language-complex="hi" fo:country="DE" style:country-complex="IN"/>
    </style:style>
    <style:style style:family="text" style:name="T1661">
      <style:text-properties fo:color="#000000" fo:font-family="Liberation Serif" style:font-family-complex="Liberation Serif" fo:font-size="12pt" style:font-size-complex="12pt" fo:language="de" style:language-complex="hi" fo:country="DE" style:country-complex="IN"/>
    </style:style>
    <style:style style:family="text" style:name="T1662">
      <style:text-properties fo:color="#000000" fo:font-family="Liberation Serif" style:font-family-complex="Liberation Serif" fo:font-size="12pt" style:font-size-complex="12pt" fo:language="de" style:language-complex="hi" fo:country="DE" style:country-complex="IN"/>
    </style:style>
    <style:style style:family="table-cell" style:name="ce152">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400">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663">
      <style:text-properties fo:color="#000000" fo:font-family="Liberation Serif" style:font-family-complex="Liberation Serif" fo:font-size="10pt" style:font-size-complex="10pt" fo:language="de" style:language-complex="hi" fo:country="DE" style:country-complex="IN"/>
    </style:style>
    <style:style style:family="text" style:name="T1664">
      <style:text-properties fo:color="#000000" fo:font-family="Liberation Serif" style:font-family-complex="Liberation Serif" fo:font-size="12pt" style:font-size-complex="12pt" fo:language="de" style:language-complex="hi" fo:country="DE" style:country-complex="IN"/>
    </style:style>
    <style:style style:family="text" style:name="T1665">
      <style:text-properties fo:color="#000000" fo:font-family="Liberation Serif" style:font-family-complex="Liberation Serif" fo:font-size="12pt" style:font-size-complex="12pt" fo:language="de" style:language-complex="hi" fo:country="DE" style:country-complex="IN"/>
    </style:style>
    <style:style style:family="table-cell" style:name="ce153">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401">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666">
      <style:text-properties fo:color="#000000" fo:font-family="Liberation Serif" style:font-family-complex="Liberation Serif" fo:font-size="10pt" style:font-size-complex="10pt" fo:language="de" style:language-complex="hi" fo:country="DE" style:country-complex="IN"/>
    </style:style>
    <style:style style:family="text" style:name="T1667">
      <style:text-properties fo:color="#000000" fo:font-family="Liberation Serif" style:font-family-complex="Liberation Serif" fo:font-size="12pt" style:font-size-complex="12pt" fo:language="de" style:language-complex="hi" fo:country="DE" style:country-complex="IN"/>
    </style:style>
    <style:style style:family="text" style:name="T1668">
      <style:text-properties fo:color="#000000" fo:font-family="Liberation Serif" style:font-family-complex="Liberation Serif" fo:font-size="12pt" style:font-size-complex="12pt" fo:language="de" style:language-complex="hi" fo:country="DE" style:country-complex="IN"/>
    </style:style>
    <style:style style:family="table-cell" style:name="ce154">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402">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669">
      <style:text-properties fo:color="#000000" fo:font-family="Liberation Serif" style:font-family-complex="Liberation Serif" fo:font-size="10pt" style:font-size-complex="10pt" fo:language="de" style:language-complex="hi" fo:country="DE" style:country-complex="IN"/>
    </style:style>
    <style:style style:family="text" style:name="T1670">
      <style:text-properties fo:color="#000000" fo:font-family="Liberation Serif" style:font-family-complex="Liberation Serif" fo:font-size="12pt" style:font-size-complex="12pt" fo:language="de" style:language-complex="hi" fo:country="DE" style:country-complex="IN"/>
    </style:style>
    <style:style style:family="text" style:name="T1671">
      <style:text-properties fo:color="#000000" fo:font-family="Liberation Serif" style:font-family-complex="Liberation Serif" fo:font-size="12pt" style:font-size-complex="12pt" fo:language="de" style:language-complex="hi" fo:country="DE" style:country-complex="IN"/>
    </style:style>
    <style:style style:family="table-cell" style:name="ce155">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403">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672">
      <style:text-properties fo:color="#000000" fo:font-family="Liberation Serif" style:font-family-complex="Liberation Serif" fo:font-size="10pt" style:font-size-complex="10pt" fo:language="de" style:language-complex="hi" fo:country="DE" style:country-complex="IN"/>
    </style:style>
    <style:style style:family="text" style:name="T1673">
      <style:text-properties fo:color="#000000" fo:font-family="Liberation Serif" style:font-family-complex="Liberation Serif" fo:font-size="12pt" style:font-size-complex="12pt" fo:language="de" style:language-complex="hi" fo:country="DE" style:country-complex="IN"/>
    </style:style>
    <style:style style:family="text" style:name="T1674">
      <style:text-properties fo:color="#000000" fo:font-family="Liberation Serif" style:font-family-complex="Liberation Serif" fo:font-size="12pt" style:font-size-complex="12pt" fo:language="de" style:language-complex="hi" fo:country="DE" style:country-complex="IN"/>
    </style:style>
    <style:style style:family="table-row" style:name="ro53">
      <style:table-row-properties/>
    </style:style>
    <style:style style:family="table-cell" style:name="ce156">
      <style:table-cell-properties style:vertical-align="top" style:direction="ltr" fo:background-color="#f2f2f2" fo:border="0.00882cm solid #CCCCCC" loext:writing-mode="lr-tb" fo:padding-top="0.1411cm" fo:padding-bottom="0.1411cm" fo:padding-left="0.2117cm" fo:padding-right="0.2117cm"/>
    </style:style>
    <style:style style:parent-style-name="737" style:family="paragraph" style:name="P404">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675">
      <style:text-properties fo:color="#000000" fo:font-family="Liberation Serif" style:font-family-complex="Liberation Serif" fo:font-size="10pt" style:font-size-complex="10pt" fo:language="de" style:language-complex="hi" fo:country="DE" style:country-complex="IN"/>
    </style:style>
    <style:style style:family="text" style:name="T1676">
      <style:text-properties fo:color="#000000" fo:font-family="Liberation Serif" style:font-family-complex="Liberation Serif" fo:font-size="12pt" style:font-size-complex="12pt" fo:language="de" style:language-complex="hi" fo:country="DE" style:country-complex="IN"/>
    </style:style>
    <style:style style:family="text" style:name="T1677">
      <style:text-properties fo:color="#000000" fo:font-family="Liberation Serif" style:font-family-complex="Liberation Serif" fo:font-size="12pt" style:font-size-complex="12pt" fo:language="de" style:language-complex="hi" fo:country="DE" style:country-complex="IN"/>
    </style:style>
    <style:style style:family="table-cell" style:name="ce157">
      <style:table-cell-properties style:vertical-align="top" style:direction="ltr" fo:background-color="#f2f2f2" fo:border="0.00882cm solid #CCCCCC" loext:writing-mode="lr-tb" fo:padding-top="0.1411cm" fo:padding-bottom="0.1411cm" fo:padding-left="0.2117cm" fo:padding-right="0.2117cm"/>
    </style:style>
    <style:style style:parent-style-name="737" style:family="paragraph" style:name="P405">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678">
      <style:text-properties fo:color="#000000" fo:font-family="Liberation Serif" style:font-family-complex="Liberation Serif" fo:font-size="10pt" style:font-size-complex="10pt" fo:language="de" style:language-complex="hi" fo:country="DE" style:country-complex="IN"/>
    </style:style>
    <style:style style:family="text" style:name="T1679">
      <style:text-properties fo:color="#000000" fo:font-family="Liberation Serif" style:font-family-complex="Liberation Serif" fo:font-size="12pt" style:font-size-complex="12pt" fo:language="de" style:language-complex="hi" fo:country="DE" style:country-complex="IN"/>
    </style:style>
    <style:style style:family="text" style:name="T1680">
      <style:text-properties fo:color="#000000" fo:font-family="Liberation Serif" style:font-family-complex="Liberation Serif" fo:font-size="12pt" style:font-size-complex="12pt" fo:language="de" style:language-complex="hi" fo:country="DE" style:country-complex="IN"/>
    </style:style>
    <style:style style:family="table-cell" style:name="ce158">
      <style:table-cell-properties style:vertical-align="top" style:direction="ltr" fo:background-color="#f2f2f2" fo:border="0.00882cm solid #CCCCCC" loext:writing-mode="lr-tb" fo:padding-top="0.1411cm" fo:padding-bottom="0.1411cm" fo:padding-left="0.2117cm" fo:padding-right="0.2117cm"/>
    </style:style>
    <style:style style:parent-style-name="737" style:family="paragraph" style:name="P406">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681">
      <style:text-properties fo:color="#000000" fo:font-family="Liberation Serif" style:font-family-complex="Liberation Serif" fo:font-size="10pt" style:font-size-complex="10pt" fo:language="de" style:language-complex="hi" fo:country="DE" style:country-complex="IN"/>
    </style:style>
    <style:style style:family="text" style:name="T1682">
      <style:text-properties fo:color="#000000" fo:font-family="Liberation Serif" style:font-family-complex="Liberation Serif" fo:font-size="12pt" style:font-size-complex="12pt" fo:language="de" style:language-complex="hi" fo:country="DE" style:country-complex="IN"/>
    </style:style>
    <style:style style:family="text" style:name="T1683">
      <style:text-properties fo:color="#000000" fo:font-family="Liberation Serif" style:font-family-complex="Liberation Serif" fo:font-size="12pt" style:font-size-complex="12pt" fo:language="de" style:language-complex="hi" fo:country="DE" style:country-complex="IN"/>
    </style:style>
    <style:style style:family="table-cell" style:name="ce159">
      <style:table-cell-properties style:vertical-align="top" style:direction="ltr" fo:background-color="#f2f2f2" fo:border="0.00882cm solid #CCCCCC" loext:writing-mode="lr-tb" fo:padding-top="0.1411cm" fo:padding-bottom="0.1411cm" fo:padding-left="0.2117cm" fo:padding-right="0.2117cm"/>
    </style:style>
    <style:style style:parent-style-name="737" style:family="paragraph" style:name="P407">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684">
      <style:text-properties fo:color="#000000" fo:font-family="Liberation Serif" style:font-family-complex="Liberation Serif" fo:font-size="10pt" style:font-size-complex="10pt" fo:language="de" style:language-complex="hi" fo:country="DE" style:country-complex="IN"/>
    </style:style>
    <style:style style:family="text" style:name="T1685">
      <style:text-properties fo:color="#000000" fo:font-family="Liberation Serif" style:font-family-complex="Liberation Serif" fo:font-size="12pt" style:font-size-complex="12pt" fo:language="de" style:language-complex="hi" fo:country="DE" style:country-complex="IN"/>
    </style:style>
    <style:style style:family="text" style:name="T1686">
      <style:text-properties fo:color="#000000" fo:font-family="Liberation Serif" style:font-family-complex="Liberation Serif" fo:font-size="12pt" style:font-size-complex="12pt" fo:language="de" style:language-complex="hi" fo:country="DE" style:country-complex="IN"/>
    </style:style>
    <style:style style:family="table-cell" style:name="ce160">
      <style:table-cell-properties style:vertical-align="top" style:direction="ltr" fo:background-color="#f2f2f2" fo:border="0.00882cm solid #CCCCCC" loext:writing-mode="lr-tb" fo:padding-top="0.1411cm" fo:padding-bottom="0.1411cm" fo:padding-left="0.2117cm" fo:padding-right="0.2117cm"/>
    </style:style>
    <style:style style:parent-style-name="737" style:family="paragraph" style:name="P408">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687">
      <style:text-properties fo:color="#000000" fo:font-family="Liberation Serif" style:font-family-complex="Liberation Serif" fo:font-size="10pt" style:font-size-complex="10pt" fo:language="de" style:language-complex="hi" fo:country="DE" style:country-complex="IN"/>
    </style:style>
    <style:style style:family="text" style:name="T1688">
      <style:text-properties fo:color="#000000" fo:font-family="Liberation Serif" style:font-family-complex="Liberation Serif" fo:font-size="12pt" style:font-size-complex="12pt" fo:language="de" style:language-complex="hi" fo:country="DE" style:country-complex="IN"/>
    </style:style>
    <style:style style:family="text" style:name="T1689">
      <style:text-properties fo:color="#000000" fo:font-family="Liberation Serif" style:font-family-complex="Liberation Serif" fo:font-size="12pt" style:font-size-complex="12pt" fo:language="de" style:language-complex="hi" fo:country="DE" style:country-complex="IN"/>
    </style:style>
    <style:style style:family="table-row" style:name="ro54">
      <style:table-row-properties/>
    </style:style>
    <style:style style:family="table-cell" style:name="ce161">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409">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690">
      <style:text-properties fo:color="#000000" fo:font-family="Liberation Serif" style:font-family-complex="Liberation Serif" fo:font-size="10pt" style:font-size-complex="10pt" fo:language="de" style:language-complex="hi" fo:country="DE" style:country-complex="IN"/>
    </style:style>
    <style:style style:family="text" style:name="T1691">
      <style:text-properties fo:color="#000000" fo:font-family="Liberation Serif" style:font-family-complex="Liberation Serif" fo:font-size="12pt" style:font-size-complex="12pt" fo:language="de" style:language-complex="hi" fo:country="DE" style:country-complex="IN"/>
    </style:style>
    <style:style style:family="text" style:name="T1692">
      <style:text-properties fo:color="#000000" fo:font-family="Liberation Serif" style:font-family-complex="Liberation Serif" fo:font-size="12pt" style:font-size-complex="12pt" fo:language="de" style:language-complex="hi" fo:country="DE" style:country-complex="IN"/>
    </style:style>
    <style:style style:family="table-cell" style:name="ce162">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410">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693">
      <style:text-properties fo:color="#000000" fo:font-family="Liberation Serif" style:font-family-complex="Liberation Serif" fo:font-size="12pt" style:font-size-complex="12pt" fo:language="de" style:language-complex="hi" fo:country="DE" style:country-complex="IN"/>
    </style:style>
    <style:style style:family="text" style:name="T1694">
      <style:text-properties fo:color="#000000" fo:font-family="Liberation Serif" style:font-family-complex="Liberation Serif" fo:font-size="12pt" style:font-size-complex="12pt" fo:language="de" style:language-complex="hi" fo:country="DE" style:country-complex="IN"/>
    </style:style>
    <style:style style:family="text" style:name="T1695">
      <style:text-properties fo:color="#000000" fo:font-family="Liberation Serif" style:font-family-complex="Liberation Serif" fo:font-size="12pt" style:font-size-complex="12pt" fo:language="de" style:language-complex="hi" fo:country="DE" style:country-complex="IN"/>
    </style:style>
    <style:style style:family="table-cell" style:name="ce163">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411">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696">
      <style:text-properties fo:color="#000000" fo:font-family="Liberation Serif" style:font-family-complex="Liberation Serif" fo:font-size="10pt" style:font-size-complex="10pt" fo:language="de" style:language-complex="hi" fo:country="DE" style:country-complex="IN"/>
    </style:style>
    <style:style style:family="text" style:name="T1697">
      <style:text-properties fo:color="#000000" fo:font-family="Liberation Serif" style:font-family-complex="Liberation Serif" fo:font-size="12pt" style:font-size-complex="12pt" fo:language="de" style:language-complex="hi" fo:country="DE" style:country-complex="IN"/>
    </style:style>
    <style:style style:family="text" style:name="T1698">
      <style:text-properties fo:color="#000000" fo:font-family="Liberation Serif" style:font-family-complex="Liberation Serif" fo:font-size="12pt" style:font-size-complex="12pt" fo:language="de" style:language-complex="hi" fo:country="DE" style:country-complex="IN"/>
    </style:style>
    <style:style style:family="table-cell" style:name="ce164">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412">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699">
      <style:text-properties fo:color="#000000" fo:font-family="Liberation Serif" style:font-family-complex="Liberation Serif" fo:font-size="10pt" style:font-size-complex="10pt" fo:language="de" style:language-complex="hi" fo:country="DE" style:country-complex="IN"/>
    </style:style>
    <style:style style:family="text" style:name="T1700">
      <style:text-properties fo:color="#000000" fo:font-family="Liberation Serif" style:font-family-complex="Liberation Serif" fo:font-size="12pt" style:font-size-complex="12pt" fo:language="de" style:language-complex="hi" fo:country="DE" style:country-complex="IN"/>
    </style:style>
    <style:style style:family="text" style:name="T1701">
      <style:text-properties fo:color="#000000" fo:font-family="Liberation Serif" style:font-family-complex="Liberation Serif" fo:font-size="12pt" style:font-size-complex="12pt" fo:language="de" style:language-complex="hi" fo:country="DE" style:country-complex="IN"/>
    </style:style>
    <style:style style:family="table-cell" style:name="ce165">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413">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702">
      <style:text-properties fo:color="#000000" fo:font-family="Liberation Serif" style:font-family-complex="Liberation Serif" fo:font-size="10pt" style:font-size-complex="10pt" fo:language="de" style:language-complex="hi" fo:country="DE" style:country-complex="IN"/>
    </style:style>
    <style:style style:family="text" style:name="T1703">
      <style:text-properties fo:color="#000000" fo:font-family="Liberation Serif" style:font-family-complex="Liberation Serif" fo:font-size="12pt" style:font-size-complex="12pt" fo:language="de" style:language-complex="hi" fo:country="DE" style:country-complex="IN"/>
    </style:style>
    <style:style style:family="text" style:name="T1704">
      <style:text-properties fo:color="#000000" fo:font-family="Liberation Serif" style:font-family-complex="Liberation Serif" fo:font-size="12pt" style:font-size-complex="12pt" fo:language="de" style:language-complex="hi" fo:country="DE" style:country-complex="IN"/>
    </style:style>
    <style:style style:parent-style-name="747" style:family="paragraph" style:name="P414">
      <style:paragraph-properties fo:margin-left="0cm" fo:margin-right="0cm" fo:text-indent="0cm"/>
      <style:text-properties fo:color="#000000" fo:font-family="Liberation Sans" style:font-family-complex="Liberation Sans" fo:font-size="16pt" style:font-size-complex="16pt" fo:language="de" style:language-complex="hi" fo:country="DE" style:country-complex="IN" fo:font-weight="bold"/>
    </style:style>
    <style:style style:family="text" style:name="T1705">
      <style:text-properties fo:color="#000000" fo:font-family="Liberation Sans" style:font-family-complex="Liberation Sans" fo:font-size="16pt" style:font-size-complex="16pt" fo:language="de" style:language-complex="hi" fo:country="DE" style:country-complex="IN" fo:font-weight="bold"/>
    </style:style>
    <style:style style:family="text" style:name="T1706">
      <style:text-properties fo:color="#000000" fo:font-family="Liberation Sans" style:font-family-complex="Liberation Sans" fo:font-size="16pt" style:font-size-complex="16pt" fo:language="de" style:language-complex="hi" fo:country="DE" style:country-complex="IN" fo:font-weight="bold"/>
    </style:style>
    <style:style style:family="text" style:name="T1707">
      <style:text-properties fo:color="#000000" fo:font-family="Liberation Sans" style:font-family-complex="Liberation Sans" fo:font-size="16pt" style:font-size-complex="16pt" fo:language="de" style:language-complex="hi" fo:country="DE" style:country-complex="IN" fo:font-weight="bold"/>
    </style:style>
    <style:style style:family="text" style:name="T1708">
      <style:text-properties fo:color="#000000" fo:font-family="Liberation Sans" style:font-family-complex="Liberation Sans" fo:font-size="16pt" style:font-size-complex="16pt" fo:language="de" style:language-complex="hi" fo:country="DE" style:country-complex="IN" fo:font-weight="bold"/>
    </style:style>
    <style:style style:family="text" style:name="T1709">
      <style:text-properties fo:color="#000000" fo:font-family="Liberation Sans" style:font-family-complex="Liberation Sans" fo:font-size="16pt" style:font-size-complex="16pt" fo:language="de" style:language-complex="hi" fo:country="DE" style:country-complex="IN" fo:font-weight="bold"/>
    </style:style>
    <style:style style:parent-style-name="737" style:family="paragraph" style:name="P415">
      <style:paragraph-properties fo:margin-left="0cm" fo:margin-right="0cm" fo:text-indent="0cm" fo:margin-top="3pt" fo:margin-bottom="3pt"/>
      <style:text-properties fo:color="#000000" fo:font-family="Liberation Serif" style:font-family-complex="Liberation Serif" fo:font-size="12pt" style:font-size-complex="12pt" fo:language="de" style:language-complex="hi" fo:country="DE" style:country-complex="IN"/>
    </style:style>
    <style:style style:family="text" style:name="T1710">
      <style:text-properties fo:color="#000000" fo:font-family="Liberation Serif" style:font-family-complex="Liberation Serif" fo:font-size="12pt" style:font-size-complex="12pt" fo:language="de" style:language-complex="hi" fo:country="DE" style:country-complex="IN"/>
    </style:style>
    <style:style style:family="text" style:name="T1711">
      <style:text-properties fo:color="#000000" fo:font-family="Liberation Serif" style:font-family-complex="Liberation Serif" fo:font-size="12pt" style:font-size-complex="12pt" fo:language="de" style:language-complex="hi" fo:country="DE" style:country-complex="IN"/>
    </style:style>
    <style:style style:family="text" style:name="T1712">
      <style:text-properties fo:color="#000000" fo:font-family="Liberation Serif" style:font-family-complex="Liberation Serif" fo:font-size="12pt" style:font-size-complex="12pt" fo:language="de" style:language-complex="hi" fo:country="DE" style:country-complex="IN"/>
    </style:style>
    <style:style style:parent-style-name="746" style:list-style-name="WWNum1" style:family="paragraph" style:name="P416">
      <style:paragraph-properties fo:margin-left="1.27cm" fo:margin-right="0cm" fo:text-indent="-0.635cm" fo:margin-top="2pt" fo:margin-bottom="2pt"/>
      <style:text-properties fo:color="#000000" fo:font-family="Arial" style:font-family-complex="Arial" fo:font-size="11pt" style:font-size-complex="11pt" fo:language="de" style:language-complex="ar" fo:country="DE" style:country-complex="SA"/>
    </style:style>
    <style:style style:family="text" style:name="T1713">
      <style:text-properties fo:color="#000000" fo:font-family="Arial" style:font-family-complex="Arial" fo:font-size="11pt" style:font-size-complex="11pt" fo:language="de" style:language-complex="ar" fo:country="DE" style:country-complex="SA"/>
    </style:style>
    <style:style style:family="text" style:name="T1714">
      <style:text-properties fo:color="#000000" fo:font-family="Arial" style:font-family-complex="Arial" fo:font-size="11pt" style:font-size-complex="11pt" fo:language="de" style:language-complex="ar" fo:country="DE" style:country-complex="SA"/>
    </style:style>
    <style:style style:family="text" style:name="T1715">
      <style:text-properties fo:color="#000000" fo:font-family="Arial" style:font-family-complex="Arial" fo:font-size="11pt" style:font-size-complex="11pt" fo:language="de" style:language-complex="ar" fo:country="DE" style:country-complex="SA"/>
    </style:style>
    <style:style style:parent-style-name="746" style:list-style-name="WWNum1" style:family="paragraph" style:name="P417">
      <style:paragraph-properties fo:margin-left="1.27cm" fo:margin-right="0cm" fo:text-indent="-0.635cm" fo:margin-top="2pt" fo:margin-bottom="2pt"/>
      <style:text-properties fo:color="#000000" fo:font-family="Arial" style:font-family-complex="Arial" fo:font-size="11pt" style:font-size-complex="11pt" fo:language="de" style:language-complex="ar" fo:country="DE" style:country-complex="SA"/>
    </style:style>
    <style:style style:family="text" style:name="T1716">
      <style:text-properties fo:color="#000000" fo:font-family="Arial" style:font-family-complex="Arial" fo:font-size="11pt" style:font-size-complex="11pt" fo:language="de" style:language-complex="ar" fo:country="DE" style:country-complex="SA"/>
    </style:style>
    <style:style style:family="text" style:name="T1717">
      <style:text-properties fo:color="#000000" fo:font-family="Arial" style:font-family-complex="Arial" fo:font-size="11pt" style:font-size-complex="11pt" fo:language="de" style:language-complex="ar" fo:country="DE" style:country-complex="SA"/>
    </style:style>
    <style:style style:family="text" style:name="T1718">
      <style:text-properties fo:color="#000000" fo:font-family="Arial" style:font-family-complex="Arial" fo:font-size="11pt" style:font-size-complex="11pt" fo:language="de" style:language-complex="ar" fo:country="DE" style:country-complex="SA"/>
    </style:style>
    <style:style style:parent-style-name="746" style:list-style-name="WWNum1" style:family="paragraph" style:name="P418">
      <style:paragraph-properties fo:margin-left="1.27cm" fo:margin-right="0cm" fo:text-indent="-0.635cm" fo:margin-top="2pt" fo:margin-bottom="2pt"/>
      <style:text-properties fo:color="#000000" fo:font-family="Arial" style:font-family-complex="Arial" fo:font-size="11pt" style:font-size-complex="11pt" fo:language="de" style:language-complex="ar" fo:country="DE" style:country-complex="SA"/>
    </style:style>
    <style:style style:family="text" style:name="T1719">
      <style:text-properties fo:color="#000000" fo:font-family="Arial" style:font-family-complex="Arial" fo:font-size="11pt" style:font-size-complex="11pt" fo:language="de" style:language-complex="ar" fo:country="DE" style:country-complex="SA"/>
    </style:style>
    <style:style style:family="text" style:name="T1720">
      <style:text-properties fo:color="#000000" fo:font-family="Arial" style:font-family-complex="Arial" fo:font-size="11pt" style:font-size-complex="11pt" fo:language="de" style:language-complex="ar" fo:country="DE" style:country-complex="SA"/>
    </style:style>
    <style:style style:family="text" style:name="T1721">
      <style:text-properties fo:color="#000000" fo:font-family="Arial" style:font-family-complex="Arial" fo:font-size="11pt" style:font-size-complex="11pt" fo:language="de" style:language-complex="ar" fo:country="DE" style:country-complex="SA"/>
    </style:style>
    <style:style style:parent-style-name="746" style:list-style-name="WWNum1" style:family="paragraph" style:name="P419">
      <style:paragraph-properties fo:margin-left="1.27cm" fo:margin-right="0cm" fo:text-indent="-0.635cm" fo:margin-top="2pt" fo:margin-bottom="2pt"/>
      <style:text-properties fo:color="#000000" fo:font-family="Arial" style:font-family-complex="Arial" fo:font-size="11pt" style:font-size-complex="11pt" fo:language="de" style:language-complex="ar" fo:country="DE" style:country-complex="SA"/>
    </style:style>
    <style:style style:family="text" style:name="T1722">
      <style:text-properties fo:color="#000000" fo:font-family="Arial" style:font-family-complex="Arial" fo:font-size="11pt" style:font-size-complex="11pt" fo:language="de" style:language-complex="ar" fo:country="DE" style:country-complex="SA"/>
    </style:style>
    <style:style style:family="text" style:name="T1723">
      <style:text-properties fo:color="#000000" fo:font-family="Arial" style:font-family-complex="Arial" fo:font-size="11pt" style:font-size-complex="11pt" fo:language="de" style:language-complex="ar" fo:country="DE" style:country-complex="SA"/>
    </style:style>
    <style:style style:family="text" style:name="T1724">
      <style:text-properties fo:color="#000000" fo:font-family="Arial" style:font-family-complex="Arial" fo:font-size="11pt" style:font-size-complex="11pt" fo:language="de" style:language-complex="ar" fo:country="DE" style:country-complex="SA"/>
    </style:style>
    <style:style style:parent-style-name="746" style:list-style-name="WWNum1" style:family="paragraph" style:name="P420">
      <style:paragraph-properties fo:margin-left="1.27cm" fo:margin-right="0cm" fo:text-indent="-0.635cm" fo:margin-top="2pt" fo:margin-bottom="2pt"/>
      <style:text-properties fo:color="#000000" fo:font-family="Arial" style:font-family-complex="Arial" fo:font-size="11pt" style:font-size-complex="11pt" fo:language="de" style:language-complex="ar" fo:country="DE" style:country-complex="SA"/>
    </style:style>
    <style:style style:family="text" style:name="T1725">
      <style:text-properties fo:color="#000000" fo:font-family="Arial" style:font-family-complex="Arial" fo:font-size="11pt" style:font-size-complex="11pt" fo:language="de" style:language-complex="ar" fo:country="DE" style:country-complex="SA"/>
    </style:style>
    <style:style style:family="text" style:name="T1726">
      <style:text-properties fo:color="#000000" fo:font-family="Arial" style:font-family-complex="Arial" fo:font-size="11pt" style:font-size-complex="11pt" fo:language="de" style:language-complex="ar" fo:country="DE" style:country-complex="SA"/>
    </style:style>
    <style:style style:family="text" style:name="T1727">
      <style:text-properties fo:color="#000000" fo:font-family="Arial" style:font-family-complex="Arial" fo:font-size="11pt" style:font-size-complex="11pt" fo:language="de" style:language-complex="ar" fo:country="DE" style:country-complex="SA"/>
    </style:style>
    <style:style style:parent-style-name="746" style:list-style-name="WWNum1" style:family="paragraph" style:name="P421">
      <style:paragraph-properties fo:margin-left="1.27cm" fo:margin-right="0cm" fo:text-indent="-0.635cm" fo:margin-top="2pt" fo:margin-bottom="2pt"/>
      <style:text-properties fo:color="#000000" fo:font-family="Arial" style:font-family-complex="Arial" fo:font-size="11pt" style:font-size-complex="11pt" fo:language="de" style:language-complex="ar" fo:country="DE" style:country-complex="SA"/>
    </style:style>
    <style:style style:family="text" style:name="T1728">
      <style:text-properties fo:color="#000000" fo:font-family="Arial" style:font-family-complex="Arial" fo:font-size="11pt" style:font-size-complex="11pt" fo:language="de" style:language-complex="ar" fo:country="DE" style:country-complex="SA"/>
    </style:style>
    <style:style style:family="text" style:name="T1729">
      <style:text-properties fo:color="#000000" fo:font-family="Arial" style:font-family-complex="Arial" fo:font-size="11pt" style:font-size-complex="11pt" fo:language="de" style:language-complex="ar" fo:country="DE" style:country-complex="SA"/>
    </style:style>
    <style:style style:family="text" style:name="T1730">
      <style:text-properties fo:color="#000000" fo:font-family="Arial" style:font-family-complex="Arial" fo:font-size="11pt" style:font-size-complex="11pt" fo:language="de" style:language-complex="ar" fo:country="DE" style:country-complex="SA"/>
    </style:style>
    <style:style style:parent-style-name="747" style:family="paragraph" style:name="P422">
      <style:paragraph-properties fo:margin-left="0cm" fo:margin-right="0cm" fo:text-indent="0cm"/>
      <style:text-properties fo:color="#000000" fo:font-family="Liberation Sans" style:font-family-complex="Liberation Sans" fo:font-size="16pt" style:font-size-complex="16pt" fo:language="de" style:language-complex="hi" fo:country="DE" style:country-complex="IN" fo:font-weight="bold"/>
    </style:style>
    <style:style style:family="text" style:name="T1731">
      <style:text-properties fo:color="#000000" fo:font-family="Liberation Sans" style:font-family-complex="Liberation Sans" fo:font-size="16pt" style:font-size-complex="16pt" fo:language="de" style:language-complex="hi" fo:country="DE" style:country-complex="IN" fo:font-weight="bold"/>
    </style:style>
    <style:style style:family="text" style:name="T1732">
      <style:text-properties fo:color="#000000" fo:font-family="Liberation Sans" style:font-family-complex="Liberation Sans" fo:font-size="16pt" style:font-size-complex="16pt" fo:language="de" style:language-complex="hi" fo:country="DE" style:country-complex="IN" fo:font-weight="bold"/>
    </style:style>
    <style:style style:family="text" style:name="T1733">
      <style:text-properties fo:color="#000000" fo:font-family="Liberation Sans" style:font-family-complex="Liberation Sans" fo:font-size="16pt" style:font-size-complex="16pt" fo:language="de" style:language-complex="hi" fo:country="DE" style:country-complex="IN" fo:font-weight="bold"/>
    </style:style>
    <style:style style:family="text" style:name="T1734">
      <style:text-properties fo:color="#000000" fo:font-family="Liberation Sans" style:font-family-complex="Liberation Sans" fo:font-size="16pt" style:font-size-complex="16pt" fo:language="de" style:language-complex="hi" fo:country="DE" style:country-complex="IN" fo:font-weight="bold"/>
    </style:style>
    <style:style style:family="text" style:name="T1735">
      <style:text-properties fo:color="#000000" fo:font-family="Liberation Sans" style:font-family-complex="Liberation Sans" fo:font-size="16pt" style:font-size-complex="16pt" fo:language="de" style:language-complex="hi" fo:country="DE" style:country-complex="IN" fo:font-weight="bold"/>
    </style:style>
    <style:style style:parent-style-name="737" style:family="paragraph" style:name="P423">
      <style:paragraph-properties fo:margin-left="0cm" fo:margin-right="0cm" fo:text-indent="0cm" fo:margin-top="3pt" fo:margin-bottom="3pt"/>
      <style:text-properties fo:color="#000000" fo:font-family="Liberation Serif" style:font-family-complex="Liberation Serif" fo:font-size="12pt" style:font-size-complex="12pt" fo:language="de" style:language-complex="hi" fo:country="DE" style:country-complex="IN"/>
    </style:style>
    <style:style style:family="text" style:name="T1736">
      <style:text-properties fo:color="#000000" fo:font-family="Liberation Serif" style:font-family-complex="Liberation Serif" fo:font-size="12pt" style:font-size-complex="12pt" fo:language="de" style:language-complex="hi" fo:country="DE" style:country-complex="IN"/>
    </style:style>
    <style:style style:family="text" style:name="T1737">
      <style:text-properties fo:color="#000000" fo:font-family="Liberation Serif" style:font-family-complex="Liberation Serif" fo:font-size="12pt" style:font-size-complex="12pt" fo:language="de" style:language-complex="hi" fo:country="DE" style:country-complex="IN"/>
    </style:style>
    <style:style style:family="text" style:name="T1738">
      <style:text-properties fo:color="#000000" fo:font-family="Liberation Serif" style:font-family-complex="Liberation Serif" fo:font-size="12pt" style:font-size-complex="12pt" fo:language="de" style:language-complex="hi" fo:country="DE" style:country-complex="IN"/>
    </style:style>
    <style:style style:parent-style-name="746" style:list-style-name="WWNum1" style:family="paragraph" style:name="P424">
      <style:paragraph-properties fo:margin-left="1.27cm" fo:margin-right="0cm" fo:text-indent="-0.635cm" fo:margin-top="2pt" fo:margin-bottom="2pt"/>
      <style:text-properties fo:color="#000000" fo:font-family="Arial" style:font-family-complex="Arial" fo:font-size="11pt" style:font-size-complex="11pt" fo:language="de" style:language-complex="ar" fo:country="DE" style:country-complex="SA"/>
    </style:style>
    <style:style style:family="text" style:name="T1739">
      <style:text-properties fo:color="#000000" fo:font-family="Arial" style:font-family-complex="Arial" fo:font-size="11pt" style:font-size-complex="11pt" fo:language="de" style:language-complex="ar" fo:country="DE" style:country-complex="SA"/>
    </style:style>
    <style:style style:family="text" style:name="T1740">
      <style:text-properties fo:color="#000000" fo:font-family="Arial" style:font-family-complex="Arial" fo:font-size="11pt" style:font-size-complex="11pt" fo:language="de" style:language-complex="ar" fo:country="DE" style:country-complex="SA"/>
    </style:style>
    <style:style style:family="text" style:name="T1741">
      <style:text-properties fo:color="#000000" fo:font-family="Arial" style:font-family-complex="Arial" fo:font-size="11pt" style:font-size-complex="11pt" fo:language="de" style:language-complex="ar" fo:country="DE" style:country-complex="SA"/>
    </style:style>
    <style:style style:parent-style-name="746" style:list-style-name="WWNum1" style:family="paragraph" style:name="P425">
      <style:paragraph-properties fo:margin-left="1.27cm" fo:margin-right="0cm" fo:text-indent="-0.635cm" fo:margin-top="2pt" fo:margin-bottom="2pt"/>
      <style:text-properties fo:color="#000000" fo:font-family="Arial" style:font-family-complex="Arial" fo:font-size="11pt" style:font-size-complex="11pt" fo:language="de" style:language-complex="ar" fo:country="DE" style:country-complex="SA"/>
    </style:style>
    <style:style style:family="text" style:name="T1742">
      <style:text-properties fo:color="#000000" fo:font-family="Arial" style:font-family-complex="Arial" fo:font-size="11pt" style:font-size-complex="11pt" fo:language="de" style:language-complex="ar" fo:country="DE" style:country-complex="SA"/>
    </style:style>
    <style:style style:family="text" style:name="T1743">
      <style:text-properties fo:color="#000000" fo:font-family="Arial" style:font-family-complex="Arial" fo:font-size="11pt" style:font-size-complex="11pt" fo:language="de" style:language-complex="ar" fo:country="DE" style:country-complex="SA"/>
    </style:style>
    <style:style style:family="text" style:name="T1744">
      <style:text-properties fo:color="#000000" fo:font-family="Arial" style:font-family-complex="Arial" fo:font-size="11pt" style:font-size-complex="11pt" fo:language="de" style:language-complex="ar" fo:country="DE" style:country-complex="SA"/>
    </style:style>
    <style:style style:parent-style-name="746" style:list-style-name="WWNum1" style:family="paragraph" style:name="P426">
      <style:paragraph-properties fo:margin-left="1.27cm" fo:margin-right="0cm" fo:text-indent="-0.635cm" fo:margin-top="2pt" fo:margin-bottom="2pt"/>
      <style:text-properties fo:color="#000000" fo:font-family="Arial" style:font-family-complex="Arial" fo:font-size="11pt" style:font-size-complex="11pt" fo:language="de" style:language-complex="ar" fo:country="DE" style:country-complex="SA"/>
    </style:style>
    <style:style style:family="text" style:name="T1745">
      <style:text-properties fo:color="#000000" fo:font-family="Arial" style:font-family-complex="Arial" fo:font-size="11pt" style:font-size-complex="11pt" fo:language="de" style:language-complex="ar" fo:country="DE" style:country-complex="SA"/>
    </style:style>
    <style:style style:family="text" style:name="T1746">
      <style:text-properties fo:color="#000000" fo:font-family="Arial" style:font-family-complex="Arial" fo:font-size="11pt" style:font-size-complex="11pt" fo:language="de" style:language-complex="ar" fo:country="DE" style:country-complex="SA"/>
    </style:style>
    <style:style style:family="text" style:name="T1747">
      <style:text-properties fo:color="#000000" fo:font-family="Arial" style:font-family-complex="Arial" fo:font-size="11pt" style:font-size-complex="11pt" fo:language="de" style:language-complex="ar" fo:country="DE" style:country-complex="SA"/>
    </style:style>
    <style:style style:parent-style-name="746" style:list-style-name="WWNum1" style:family="paragraph" style:name="P427">
      <style:paragraph-properties fo:margin-left="1.27cm" fo:margin-right="0cm" fo:text-indent="-0.635cm" fo:margin-top="2pt" fo:margin-bottom="2pt"/>
      <style:text-properties fo:color="#000000" fo:font-family="Arial" style:font-family-complex="Arial" fo:font-size="11pt" style:font-size-complex="11pt" fo:language="de" style:language-complex="ar" fo:country="DE" style:country-complex="SA"/>
    </style:style>
    <style:style style:family="text" style:name="T1748">
      <style:text-properties fo:color="#000000" fo:font-family="Arial" style:font-family-complex="Arial" fo:font-size="11pt" style:font-size-complex="11pt" fo:language="de" style:language-complex="ar" fo:country="DE" style:country-complex="SA"/>
    </style:style>
    <style:style style:family="text" style:name="T1749">
      <style:text-properties fo:color="#000000" fo:font-family="Arial" style:font-family-complex="Arial" fo:font-size="11pt" style:font-size-complex="11pt" fo:language="de" style:language-complex="ar" fo:country="DE" style:country-complex="SA"/>
    </style:style>
    <style:style style:family="text" style:name="T1750">
      <style:text-properties fo:color="#000000" fo:font-family="Arial" style:font-family-complex="Arial" fo:font-size="11pt" style:font-size-complex="11pt" fo:language="de" style:language-complex="ar" fo:country="DE" style:country-complex="SA"/>
    </style:style>
    <style:style style:parent-style-name="737" style:family="paragraph" style:name="P428">
      <style:paragraph-properties fo:margin-left="0cm" fo:margin-right="0cm" fo:text-indent="0cm" fo:margin-top="3pt" fo:margin-bottom="3pt"/>
      <style:text-properties fo:color="#000000" fo:font-family="Liberation Serif" style:font-family-complex="Liberation Serif" fo:font-size="12pt" style:font-size-complex="12pt" fo:language="de" style:language-complex="hi" fo:country="DE" style:country-complex="IN"/>
    </style:style>
    <style:style style:family="text" style:name="T1751">
      <style:text-properties fo:color="#000000" fo:font-family="Liberation Serif" style:font-family-complex="Liberation Serif" fo:font-size="12pt" style:font-size-complex="12pt" fo:language="de" style:language-complex="hi" fo:country="DE" style:country-complex="IN"/>
    </style:style>
    <style:style style:family="text" style:name="T1752">
      <style:text-properties fo:color="#000000" fo:font-family="Liberation Serif" style:font-family-complex="Liberation Serif" fo:font-size="12pt" style:font-size-complex="12pt" fo:language="de" style:language-complex="hi" fo:country="DE" style:country-complex="IN"/>
    </style:style>
    <style:style style:family="text" style:name="T1753">
      <style:text-properties fo:color="#000000" fo:font-family="Liberation Serif" style:font-family-complex="Liberation Serif" fo:font-size="12pt" style:font-size-complex="12pt" fo:language="de" style:language-complex="hi" fo:country="DE" style:country-complex="IN"/>
    </style:style>
    <style:style style:parent-style-name="737" style:family="paragraph" style:name="P429">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754">
      <style:text-properties fo:color="#000000" fo:font-family="Liberation Serif" style:font-family-complex="Liberation Serif" fo:font-size="12pt" style:font-size-complex="12pt" fo:language="de" style:language-complex="hi" fo:country="DE" style:country-complex="IN"/>
    </style:style>
    <style:style style:family="text" style:name="T1755">
      <style:text-properties fo:color="#000000" fo:font-family="Liberation Serif" style:font-family-complex="Liberation Serif" fo:font-size="12pt" style:font-size-complex="12pt" fo:language="de" style:language-complex="hi" fo:country="DE" style:country-complex="IN"/>
    </style:style>
    <style:style style:family="text" style:name="T1756">
      <style:text-properties fo:color="#000000" fo:font-family="Liberation Serif" style:font-family-complex="Liberation Serif" fo:font-size="12pt" style:font-size-complex="12pt" fo:language="de" style:language-complex="hi" fo:country="DE" style:country-complex="IN"/>
    </style:style>
    <style:style style:parent-style-name="749" style:master-page-name="MasterPage11" style:family="paragraph" style:name="P430">
      <style:paragraph-properties fo:margin-left="0cm" fo:margin-right="0cm" fo:text-indent="0cm" fo:margin-top="0pt" fo:margin-bottom="6pt" fo:break-before="page"/>
      <style:text-properties fo:color="#000000" fo:font-family="Liberation Sans" style:font-family-complex="Liberation Sans" fo:font-size="18pt" style:font-size-complex="18pt" fo:language="de" style:language-complex="hi" fo:country="DE" style:country-complex="IN" fo:font-weight="bold"/>
    </style:style>
    <style:style style:family="text" style:name="T1757">
      <style:text-properties fo:color="#000000" fo:font-family="Liberation Sans" style:font-family-complex="Liberation Sans" fo:font-size="18pt" style:font-size-complex="18pt" fo:language="de" style:language-complex="hi" fo:country="DE" style:country-complex="IN" fo:font-weight="bold"/>
    </style:style>
    <style:style style:family="text" style:name="T1758">
      <style:text-properties fo:color="#000000" fo:font-family="Liberation Sans" style:font-family-complex="Liberation Sans" fo:font-size="18pt" style:font-size-complex="18pt" fo:language="de" style:language-complex="hi" fo:country="DE" style:country-complex="IN" fo:font-weight="bold"/>
    </style:style>
    <style:style style:family="text" style:name="T1759">
      <style:text-properties fo:color="#000000" fo:font-family="Liberation Sans" style:font-family-complex="Liberation Sans" fo:font-size="18pt" style:font-size-complex="18pt" fo:language="de" style:language-complex="hi" fo:country="DE" style:country-complex="IN" fo:font-weight="bold"/>
    </style:style>
    <style:style style:family="text" style:name="T1760">
      <style:text-properties fo:color="#000000" fo:font-family="Liberation Sans" style:font-family-complex="Liberation Sans" fo:font-size="18pt" style:font-size-complex="18pt" fo:language="de" style:language-complex="hi" fo:country="DE" style:country-complex="IN" fo:font-weight="bold"/>
    </style:style>
    <style:style style:family="text" style:name="T1761">
      <style:text-properties fo:color="#000000" fo:font-family="Liberation Sans" style:font-family-complex="Liberation Sans" fo:font-size="18pt" style:font-size-complex="18pt" fo:language="de" style:language-complex="hi" fo:country="DE" style:country-complex="IN" fo:font-weight="bold"/>
    </style:style>
    <style:style style:parent-style-name="747" style:family="paragraph" style:name="P431">
      <style:paragraph-properties fo:margin-left="0cm" fo:margin-right="0cm" fo:text-indent="0cm"/>
      <style:text-properties fo:color="#000000" fo:font-family="Liberation Sans" style:font-family-complex="Liberation Sans" fo:font-size="16pt" style:font-size-complex="16pt" fo:language="de" style:language-complex="hi" fo:country="DE" style:country-complex="IN" fo:font-weight="bold"/>
    </style:style>
    <style:style style:family="text" style:name="T1762">
      <style:text-properties fo:color="#000000" fo:font-family="Liberation Sans" style:font-family-complex="Liberation Sans" fo:font-size="16pt" style:font-size-complex="16pt" fo:language="de" style:language-complex="hi" fo:country="DE" style:country-complex="IN" fo:font-weight="bold"/>
    </style:style>
    <style:style style:family="text" style:name="T1763">
      <style:text-properties fo:color="#000000" fo:font-family="Liberation Sans" style:font-family-complex="Liberation Sans" fo:font-size="16pt" style:font-size-complex="16pt" fo:language="de" style:language-complex="hi" fo:country="DE" style:country-complex="IN" fo:font-weight="bold"/>
    </style:style>
    <style:style style:family="text" style:name="T1764">
      <style:text-properties fo:color="#000000" fo:font-family="Liberation Sans" style:font-family-complex="Liberation Sans" fo:font-size="16pt" style:font-size-complex="16pt" fo:language="de" style:language-complex="hi" fo:country="DE" style:country-complex="IN" fo:font-weight="bold"/>
    </style:style>
    <style:style style:family="text" style:name="T1765">
      <style:text-properties fo:color="#000000" fo:font-family="Liberation Sans" style:font-family-complex="Liberation Sans" fo:font-size="16pt" style:font-size-complex="16pt" fo:language="de" style:language-complex="hi" fo:country="DE" style:country-complex="IN" fo:font-weight="bold"/>
    </style:style>
    <style:style style:family="text" style:name="T1766">
      <style:text-properties fo:color="#000000" fo:font-family="Liberation Sans" style:font-family-complex="Liberation Sans" fo:font-size="16pt" style:font-size-complex="16pt" fo:language="de" style:language-complex="hi" fo:country="DE" style:country-complex="IN" fo:font-weight="bold"/>
    </style:style>
    <style:style style:parent-style-name="737" style:family="paragraph" style:name="P432">
      <style:paragraph-properties fo:margin-left="0cm" fo:margin-right="0cm" fo:text-indent="0cm" fo:margin-top="3pt" fo:margin-bottom="3pt"/>
      <style:text-properties fo:color="#000000" fo:font-family="Liberation Serif" style:font-family-complex="Liberation Serif" fo:font-size="12pt" style:font-size-complex="12pt" fo:language="de" style:language-complex="hi" fo:country="DE" style:country-complex="IN"/>
    </style:style>
    <style:style style:family="text" style:name="T1767">
      <style:text-properties fo:color="#000000" fo:font-family="Liberation Serif" style:font-family-complex="Liberation Serif" fo:font-size="12pt" style:font-size-complex="12pt" fo:language="de" style:language-complex="hi" fo:country="DE" style:country-complex="IN"/>
    </style:style>
    <style:style style:family="text" style:name="T1768">
      <style:text-properties fo:color="#000000" fo:font-family="Liberation Serif" style:font-family-complex="Liberation Serif" fo:font-size="12pt" style:font-size-complex="12pt" fo:language="de" style:language-complex="hi" fo:country="DE" style:country-complex="IN"/>
    </style:style>
    <style:style style:family="text" style:name="T1769">
      <style:text-properties fo:color="#000000" fo:font-family="Liberation Serif" style:font-family-complex="Liberation Serif" fo:font-size="12pt" style:font-size-complex="12pt" fo:language="de" style:language-complex="hi" fo:country="DE" style:country-complex="IN"/>
    </style:style>
    <style:style style:family="text" style:name="T1770">
      <style:text-properties fo:color="#000000" fo:font-family="Liberation Serif" style:font-family-complex="Liberation Serif" fo:font-size="12pt" style:font-size-complex="12pt" fo:language="de" style:language-complex="hi" fo:country="DE" style:country-complex="IN"/>
    </style:style>
    <style:style style:parent-style-name="737" style:family="paragraph" style:name="P433">
      <style:paragraph-properties fo:margin-left="0cm" fo:margin-right="0cm" fo:text-indent="0cm" fo:margin-top="3pt" fo:margin-bottom="3pt"/>
      <style:text-properties fo:color="#000000" fo:font-family="Liberation Serif" style:font-family-complex="Liberation Serif" fo:font-size="12pt" style:font-size-complex="12pt" fo:language="de" style:language-complex="hi" fo:country="DE" style:country-complex="IN"/>
    </style:style>
    <style:style style:family="text" style:name="T1771">
      <style:text-properties fo:color="#000000" fo:font-family="Liberation Serif" style:font-family-complex="Liberation Serif" fo:font-size="12pt" style:font-size-complex="12pt" fo:language="de" style:language-complex="hi" fo:country="DE" style:country-complex="IN"/>
    </style:style>
    <style:style style:family="text" style:name="T1772">
      <style:text-properties fo:color="#000000" fo:font-family="Liberation Serif" style:font-family-complex="Liberation Serif" fo:font-size="12pt" style:font-size-complex="12pt" fo:language="de" style:language-complex="hi" fo:country="DE" style:country-complex="IN"/>
    </style:style>
    <style:style style:family="text" style:name="T1773">
      <style:text-properties fo:color="#000000" fo:font-family="Liberation Serif" style:font-family-complex="Liberation Serif" fo:font-size="12pt" style:font-size-complex="12pt" fo:language="de" style:language-complex="hi" fo:country="DE" style:country-complex="IN"/>
    </style:style>
    <style:style style:parent-style-name="737" style:family="paragraph" style:name="P434">
      <style:paragraph-properties fo:margin-left="0cm" fo:margin-right="0cm" fo:text-indent="0cm" fo:margin-top="3pt" fo:margin-bottom="3pt"/>
      <style:text-properties fo:color="#000000" fo:font-family="Liberation Serif" style:font-family-complex="Liberation Serif" fo:font-size="12pt" style:font-size-complex="12pt" fo:language="de" style:language-complex="hi" fo:country="DE" style:country-complex="IN"/>
    </style:style>
    <style:style style:family="text" style:name="T1774">
      <style:text-properties fo:color="#000000" fo:font-family="Liberation Serif" style:font-family-complex="Liberation Serif" fo:font-size="12pt" style:font-size-complex="12pt" fo:language="de" style:language-complex="hi" fo:country="DE" style:country-complex="IN"/>
    </style:style>
    <style:style style:family="text" style:name="T1775">
      <style:text-properties fo:color="#000000" fo:font-family="Liberation Serif" style:font-family-complex="Liberation Serif" fo:font-size="12pt" style:font-size-complex="12pt" fo:language="de" style:language-complex="hi" fo:country="DE" style:country-complex="IN"/>
    </style:style>
    <style:style style:family="text" style:name="T1776">
      <style:text-properties fo:color="#000000" fo:font-family="Liberation Serif" style:font-family-complex="Liberation Serif" fo:font-size="12pt" style:font-size-complex="12pt" fo:language="de" style:language-complex="hi" fo:country="DE" style:country-complex="IN"/>
    </style:style>
    <style:style style:parent-style-name="747" style:family="paragraph" style:name="P435">
      <style:paragraph-properties fo:margin-left="0cm" fo:margin-right="0cm" fo:text-indent="0cm"/>
      <style:text-properties fo:color="#000000" fo:font-family="Liberation Sans" style:font-family-complex="Liberation Sans" fo:font-size="16pt" style:font-size-complex="16pt" fo:language="de" style:language-complex="hi" fo:country="DE" style:country-complex="IN" fo:font-weight="bold"/>
    </style:style>
    <style:style style:family="text" style:name="T1777">
      <style:text-properties fo:color="#000000" fo:font-family="Liberation Sans" style:font-family-complex="Liberation Sans" fo:font-size="16pt" style:font-size-complex="16pt" fo:language="de" style:language-complex="hi" fo:country="DE" style:country-complex="IN" fo:font-weight="bold"/>
    </style:style>
    <style:style style:family="text" style:name="T1778">
      <style:text-properties fo:color="#000000" fo:font-family="Liberation Sans" style:font-family-complex="Liberation Sans" fo:font-size="16pt" style:font-size-complex="16pt" fo:language="de" style:language-complex="hi" fo:country="DE" style:country-complex="IN" fo:font-weight="bold"/>
    </style:style>
    <style:style style:family="text" style:name="T1779">
      <style:text-properties fo:color="#000000" fo:font-family="Liberation Sans" style:font-family-complex="Liberation Sans" fo:font-size="16pt" style:font-size-complex="16pt" fo:language="de" style:language-complex="hi" fo:country="DE" style:country-complex="IN" fo:font-weight="bold"/>
    </style:style>
    <style:style style:family="text" style:name="T1780">
      <style:text-properties fo:color="#000000" fo:font-family="Liberation Sans" style:font-family-complex="Liberation Sans" fo:font-size="16pt" style:font-size-complex="16pt" fo:language="de" style:language-complex="hi" fo:country="DE" style:country-complex="IN" fo:font-weight="bold"/>
    </style:style>
    <style:style style:family="text" style:name="T1781">
      <style:text-properties fo:color="#000000" fo:font-family="Liberation Sans" style:font-family-complex="Liberation Sans" fo:font-size="16pt" style:font-size-complex="16pt" fo:language="de" style:language-complex="hi" fo:country="DE" style:country-complex="IN" fo:font-weight="bold"/>
    </style:style>
    <style:style style:parent-style-name="737" style:family="paragraph" style:name="P436">
      <style:paragraph-properties fo:margin-left="0cm" fo:margin-right="0cm" fo:text-indent="0cm" fo:margin-top="3pt" fo:margin-bottom="3pt"/>
      <style:text-properties fo:color="#000000" fo:font-family="Liberation Serif" style:font-family-complex="Liberation Serif" fo:font-size="12pt" style:font-size-complex="12pt" fo:language="de" style:language-complex="hi" fo:country="DE" style:country-complex="IN"/>
    </style:style>
    <style:style style:family="text" style:name="T1782">
      <style:text-properties fo:color="#000000" fo:font-family="Liberation Serif" style:font-family-complex="Liberation Serif" fo:font-size="12pt" style:font-size-complex="12pt" fo:language="de" style:language-complex="hi" fo:country="DE" style:country-complex="IN"/>
    </style:style>
    <style:style style:family="text" style:name="T1783">
      <style:text-properties fo:color="#000000" fo:font-family="Liberation Serif" style:font-family-complex="Liberation Serif" fo:font-size="12pt" style:font-size-complex="12pt" fo:language="de" style:language-complex="hi" fo:country="DE" style:country-complex="IN"/>
    </style:style>
    <style:style style:family="text" style:name="T1784">
      <style:text-properties fo:color="#000000" fo:font-family="Liberation Serif" style:font-family-complex="Liberation Serif" fo:font-size="12pt" style:font-size-complex="12pt" fo:language="de" style:language-complex="hi" fo:country="DE" style:country-complex="IN"/>
    </style:style>
    <style:style style:family="text" style:name="T1785">
      <style:text-properties fo:color="#000000" fo:font-family="Liberation Serif" style:font-family-complex="Liberation Serif" fo:font-size="12pt" style:font-size-complex="12pt" fo:language="de" style:language-complex="hi" fo:country="DE" style:country-complex="IN"/>
    </style:style>
    <style:style style:parent-style-name="737" style:family="paragraph" style:name="P437">
      <style:paragraph-properties fo:margin-left="0cm" fo:margin-right="0cm" fo:text-indent="0cm" fo:margin-top="3pt" fo:margin-bottom="3pt"/>
      <style:text-properties fo:color="#000000" fo:font-family="Liberation Serif" style:font-family-complex="Liberation Serif" fo:font-size="12pt" style:font-size-complex="12pt" fo:language="de" style:language-complex="hi" fo:country="DE" style:country-complex="IN"/>
    </style:style>
    <style:style style:family="text" style:name="T1786">
      <style:text-properties fo:color="#000000" fo:font-family="Liberation Serif" style:font-family-complex="Liberation Serif" fo:font-size="12pt" style:font-size-complex="12pt" fo:language="de" style:language-complex="hi" fo:country="DE" style:country-complex="IN"/>
    </style:style>
    <style:style style:family="text" style:name="T1787">
      <style:text-properties fo:color="#000000" fo:font-family="Liberation Serif" style:font-family-complex="Liberation Serif" fo:font-size="12pt" style:font-size-complex="12pt" fo:language="de" style:language-complex="hi" fo:country="DE" style:country-complex="IN"/>
    </style:style>
    <style:style style:family="text" style:name="T1788">
      <style:text-properties fo:color="#000000" fo:font-family="Liberation Serif" style:font-family-complex="Liberation Serif" fo:font-size="12pt" style:font-size-complex="12pt" fo:language="de" style:language-complex="hi" fo:country="DE" style:country-complex="IN"/>
    </style:style>
    <style:style style:parent-style-name="737" style:family="paragraph" style:name="P438">
      <style:paragraph-properties fo:margin-left="0cm" fo:margin-right="0cm" fo:text-indent="0cm" fo:margin-top="3pt" fo:margin-bottom="3pt"/>
      <style:text-properties fo:color="#000000" fo:font-family="Liberation Serif" style:font-family-complex="Liberation Serif" fo:font-size="12pt" style:font-size-complex="12pt" fo:language="de" style:language-complex="hi" fo:country="DE" style:country-complex="IN"/>
    </style:style>
    <style:style style:family="text" style:name="T1789">
      <style:text-properties fo:color="#000000" fo:font-family="Liberation Serif" style:font-family-complex="Liberation Serif" fo:font-size="12pt" style:font-size-complex="12pt" fo:language="de" style:language-complex="hi" fo:country="DE" style:country-complex="IN"/>
    </style:style>
    <style:style style:family="text" style:name="T1790">
      <style:text-properties fo:color="#000000" fo:font-family="Liberation Serif" style:font-family-complex="Liberation Serif" fo:font-size="12pt" style:font-size-complex="12pt" fo:language="de" style:language-complex="hi" fo:country="DE" style:country-complex="IN"/>
    </style:style>
    <style:style style:family="text" style:name="T1791">
      <style:text-properties fo:color="#000000" fo:font-family="Liberation Serif" style:font-family-complex="Liberation Serif" fo:font-size="12pt" style:font-size-complex="12pt" fo:language="de" style:language-complex="hi" fo:country="DE" style:country-complex="IN"/>
    </style:style>
    <style:style style:family="table" style:name="ta7">
      <style:table-properties style:width="15.92cm" fo:margin-left="-0.01588cm" table:align="left"/>
    </style:style>
    <style:style style:family="table-column" style:name="co21">
      <style:table-column-properties style:column-width="15.92cm"/>
    </style:style>
    <style:style style:family="table-row" style:name="ro55">
      <style:table-row-properties/>
    </style:style>
    <style:style style:family="table-cell" style:name="ce167">
      <style:table-cell-properties style:vertical-align="top" style:direction="ltr" fo:background-color="#1e1e1e" fo:border="0.00882cm solid #CCCCCC" loext:writing-mode="lr-tb" fo:padding-top="0.2117cm" fo:padding-bottom="0.2117cm" fo:padding-left="0.3528cm" fo:padding-right="0.3528cm"/>
    </style:style>
    <style:style style:parent-style-name="737" style:family="paragraph" style:name="P439">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792">
      <style:text-properties fo:color="#9cdcfe" fo:font-family="'Courier New'" style:font-family-complex="'Courier New'" fo:font-size="9pt" style:font-size-complex="9pt" fo:language="en" style:language-complex="hi" fo:country="US" style:country-complex="IN"/>
    </style:style>
    <style:style style:family="text" style:name="T1793">
      <style:text-properties fo:color="#000000" fo:font-family="Liberation Serif" style:font-family-complex="Liberation Serif" fo:font-size="12pt" style:font-size-complex="12pt" fo:language="en" style:language-complex="en" fo:country="US" style:country-complex="US"/>
    </style:style>
    <style:style style:family="text" style:name="T1794">
      <style:text-properties fo:color="#000000" fo:font-family="Liberation Serif" style:font-family-complex="Liberation Serif" fo:font-size="12pt" style:font-size-complex="12pt" fo:language="en" style:language-complex="hi" fo:country="US" style:country-complex="IN"/>
    </style:style>
    <style:style style:parent-style-name="737" style:family="paragraph" style:name="P440">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795">
      <style:text-properties fo:color="#00b050" fo:font-family="'Courier New'" style:font-family-complex="'Courier New'" fo:font-size="9pt" style:font-size-complex="9pt" fo:language="en" style:language-complex="hi" fo:country="US" style:country-complex="IN"/>
    </style:style>
    <style:style style:family="text" style:name="T1796">
      <style:text-properties fo:color="#00b050" fo:font-family="Liberation Serif" style:font-family-complex="Liberation Serif" fo:font-size="12pt" style:font-size-complex="12pt" fo:language="en" style:language-complex="en" fo:country="US" style:country-complex="US"/>
    </style:style>
    <style:style style:family="text" style:name="T1797">
      <style:text-properties fo:color="#000000" fo:font-family="Liberation Serif" style:font-family-complex="Liberation Serif" fo:font-size="12pt" style:font-size-complex="12pt" fo:language="en" style:language-complex="hi" fo:country="US" style:country-complex="IN"/>
    </style:style>
    <style:style style:parent-style-name="737" style:family="paragraph" style:name="P441">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798">
      <style:text-properties fo:color="#00b050" fo:font-family="'Courier New'" style:font-family-complex="'Courier New'" fo:font-size="9pt" style:font-size-complex="9pt" fo:language="en" style:language-complex="hi" fo:country="US" style:country-complex="IN"/>
    </style:style>
    <style:style style:family="text" style:name="T1799">
      <style:text-properties fo:color="#00b0f0" fo:font-family="'Courier New'" style:font-family-complex="'Courier New'" fo:font-size="9pt" style:font-size-complex="9pt" fo:language="en" style:language-complex="hi" fo:country="US" style:country-complex="IN"/>
    </style:style>
    <style:style style:family="text" style:name="T1800">
      <style:text-properties fo:color="#00b0f0" fo:font-family="Liberation Serif" style:font-family-complex="Liberation Serif" fo:font-size="12pt" style:font-size-complex="12pt" fo:language="en" style:language-complex="en" fo:country="US" style:country-complex="US"/>
    </style:style>
    <style:style style:family="text" style:name="T1801">
      <style:text-properties fo:color="#000000" fo:font-family="Liberation Serif" style:font-family-complex="Liberation Serif" fo:font-size="12pt" style:font-size-complex="12pt" fo:language="en" style:language-complex="hi" fo:country="US" style:country-complex="IN"/>
    </style:style>
    <style:style style:parent-style-name="737" style:family="paragraph" style:name="P442">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802">
      <style:text-properties fo:color="#00b050" fo:font-family="'Courier New'" style:font-family-complex="'Courier New'" fo:font-size="9pt" style:font-size-complex="9pt" fo:language="en" style:language-complex="hi" fo:country="US" style:country-complex="IN"/>
    </style:style>
    <style:style style:family="text" style:name="T1803">
      <style:text-properties fo:color="#00b0f0" fo:font-family="'Courier New'" style:font-family-complex="'Courier New'" fo:font-size="9pt" style:font-size-complex="9pt" fo:language="en" style:language-complex="hi" fo:country="US" style:country-complex="IN"/>
    </style:style>
    <style:style style:family="text" style:name="T1804">
      <style:text-properties fo:color="#00b0f0" fo:font-family="Liberation Serif" style:font-family-complex="Liberation Serif" fo:font-size="12pt" style:font-size-complex="12pt" fo:language="en" style:language-complex="en" fo:country="US" style:country-complex="US"/>
    </style:style>
    <style:style style:family="text" style:name="T1805">
      <style:text-properties fo:color="#000000" fo:font-family="Liberation Serif" style:font-family-complex="Liberation Serif" fo:font-size="12pt" style:font-size-complex="12pt" fo:language="en" style:language-complex="hi" fo:country="US" style:country-complex="IN"/>
    </style:style>
    <style:style style:parent-style-name="737" style:family="paragraph" style:name="P443">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806">
      <style:text-properties fo:color="#00b050" fo:font-family="'Courier New'" style:font-family-complex="'Courier New'" fo:font-size="9pt" style:font-size-complex="9pt" fo:language="en" style:language-complex="en" fo:country="US" style:country-complex="US"/>
    </style:style>
    <style:style style:family="text" style:name="T1807">
      <style:text-properties fo:color="#00b050" fo:font-family="Liberation Serif" style:font-family-complex="Liberation Serif" fo:font-size="12pt" style:font-size-complex="12pt" fo:language="en" style:language-complex="en" fo:country="US" style:country-complex="US"/>
    </style:style>
    <style:style style:family="text" style:name="T1808">
      <style:text-properties fo:color="#000000" fo:font-family="Liberation Serif" style:font-family-complex="Liberation Serif" fo:font-size="12pt" style:font-size-complex="12pt" fo:language="en" style:language-complex="hi" fo:country="US" style:country-complex="IN"/>
    </style:style>
    <style:style style:parent-style-name="737" style:family="paragraph" style:name="P444">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809">
      <style:text-properties fo:color="#00b050" fo:font-family="'Courier New'" style:font-family-complex="'Courier New'" fo:font-size="9pt" style:font-size-complex="9pt" fo:language="en" style:language-complex="hi" fo:country="US" style:country-complex="IN"/>
    </style:style>
    <style:style style:family="text" style:name="T1810">
      <style:text-properties fo:color="#00b050" fo:font-family="Liberation Serif" style:font-family-complex="Liberation Serif" fo:font-size="12pt" style:font-size-complex="12pt" fo:language="en" style:language-complex="en" fo:country="US" style:country-complex="US"/>
    </style:style>
    <style:style style:family="text" style:name="T1811">
      <style:text-properties fo:color="#000000" fo:font-family="Liberation Serif" style:font-family-complex="Liberation Serif" fo:font-size="12pt" style:font-size-complex="12pt" fo:language="en" style:language-complex="hi" fo:country="US" style:country-complex="IN"/>
    </style:style>
    <style:style style:parent-style-name="737" style:family="paragraph" style:name="P445">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812">
      <style:text-properties fo:color="#00b050" fo:font-family="'Courier New'" style:font-family-complex="'Courier New'" fo:font-size="9pt" style:font-size-complex="9pt" fo:language="en" style:language-complex="hi" fo:country="US" style:country-complex="IN"/>
    </style:style>
    <style:style style:family="text" style:name="T1813">
      <style:text-properties fo:color="#00b0f0" fo:font-family="'Courier New'" style:font-family-complex="'Courier New'" fo:font-size="9pt" style:font-size-complex="9pt" fo:language="en" style:language-complex="hi" fo:country="US" style:country-complex="IN"/>
    </style:style>
    <style:style style:family="text" style:name="T1814">
      <style:text-properties fo:color="#00b050" fo:font-family="Liberation Serif" style:font-family-complex="Liberation Serif" fo:font-size="12pt" style:font-size-complex="12pt" fo:language="en" style:language-complex="en" fo:country="US" style:country-complex="US"/>
    </style:style>
    <style:style style:family="text" style:name="T1815">
      <style:text-properties fo:color="#000000" fo:font-family="Liberation Serif" style:font-family-complex="Liberation Serif" fo:font-size="12pt" style:font-size-complex="12pt" fo:language="en" style:language-complex="hi" fo:country="US" style:country-complex="IN"/>
    </style:style>
    <style:style style:parent-style-name="737" style:family="paragraph" style:name="P446">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816">
      <style:text-properties fo:color="#00b050" fo:font-family="'Courier New'" style:font-family-complex="'Courier New'" fo:font-size="9pt" style:font-size-complex="9pt" fo:language="en" style:language-complex="hi" fo:country="US" style:country-complex="IN"/>
    </style:style>
    <style:style style:family="text" style:name="T1817">
      <style:text-properties fo:color="#00b050" fo:font-family="Liberation Serif" style:font-family-complex="Liberation Serif" fo:font-size="12pt" style:font-size-complex="12pt" fo:language="en" style:language-complex="en" fo:country="US" style:country-complex="US"/>
    </style:style>
    <style:style style:family="text" style:name="T1818">
      <style:text-properties fo:color="#000000" fo:font-family="Liberation Serif" style:font-family-complex="Liberation Serif" fo:font-size="12pt" style:font-size-complex="12pt" fo:language="en" style:language-complex="hi" fo:country="US" style:country-complex="IN"/>
    </style:style>
    <style:style style:parent-style-name="737" style:family="paragraph" style:name="P447">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819">
      <style:text-properties fo:color="#00b050" fo:font-family="'Courier New'" style:font-family-complex="'Courier New'" fo:font-size="9pt" style:font-size-complex="9pt" fo:language="en" style:language-complex="hi" fo:country="US" style:country-complex="IN"/>
    </style:style>
    <style:style style:family="text" style:name="T1820">
      <style:text-properties fo:color="#00b0f0" fo:font-family="'Courier New'" style:font-family-complex="'Courier New'" fo:font-size="9pt" style:font-size-complex="9pt" fo:language="en" style:language-complex="hi" fo:country="US" style:country-complex="IN"/>
    </style:style>
    <style:style style:family="text" style:name="T1821">
      <style:text-properties fo:color="#00b0f0" fo:font-family="Liberation Serif" style:font-family-complex="Liberation Serif" fo:font-size="12pt" style:font-size-complex="12pt" fo:language="en" style:language-complex="en" fo:country="US" style:country-complex="US"/>
    </style:style>
    <style:style style:family="text" style:name="T1822">
      <style:text-properties fo:color="#000000" fo:font-family="Liberation Serif" style:font-family-complex="Liberation Serif" fo:font-size="12pt" style:font-size-complex="12pt" fo:language="en" style:language-complex="hi" fo:country="US" style:country-complex="IN"/>
    </style:style>
    <style:style style:parent-style-name="737" style:family="paragraph" style:name="P448">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823">
      <style:text-properties fo:color="#00b050" fo:font-family="'Courier New'" style:font-family-complex="'Courier New'" fo:font-size="9pt" style:font-size-complex="9pt" fo:language="en" style:language-complex="hi" fo:country="US" style:country-complex="IN"/>
    </style:style>
    <style:style style:family="text" style:name="T1824">
      <style:text-properties fo:color="#00b0f0" fo:font-family="'Courier New'" style:font-family-complex="'Courier New'" fo:font-size="9pt" style:font-size-complex="9pt" fo:language="en" style:language-complex="hi" fo:country="US" style:country-complex="IN"/>
    </style:style>
    <style:style style:family="text" style:name="T1825">
      <style:text-properties fo:color="#00b050" fo:font-family="Liberation Serif" style:font-family-complex="Liberation Serif" fo:font-size="12pt" style:font-size-complex="12pt" fo:language="en" style:language-complex="en" fo:country="US" style:country-complex="US"/>
    </style:style>
    <style:style style:family="text" style:name="T1826">
      <style:text-properties fo:color="#000000" fo:font-family="Liberation Serif" style:font-family-complex="Liberation Serif" fo:font-size="12pt" style:font-size-complex="12pt" fo:language="en" style:language-complex="hi" fo:country="US" style:country-complex="IN"/>
    </style:style>
    <style:style style:parent-style-name="737" style:family="paragraph" style:name="P449">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827">
      <style:text-properties fo:color="#00b050" fo:font-family="'Courier New'" style:font-family-complex="'Courier New'" fo:font-size="9pt" style:font-size-complex="9pt" fo:language="en" style:language-complex="en" fo:country="US" style:country-complex="US"/>
    </style:style>
    <style:style style:family="text" style:name="T1828">
      <style:text-properties fo:color="#00b050" fo:font-family="Liberation Serif" style:font-family-complex="Liberation Serif" fo:font-size="12pt" style:font-size-complex="12pt" fo:language="en" style:language-complex="en" fo:country="US" style:country-complex="US"/>
    </style:style>
    <style:style style:family="text" style:name="T1829">
      <style:text-properties fo:color="#000000" fo:font-family="Liberation Serif" style:font-family-complex="Liberation Serif" fo:font-size="12pt" style:font-size-complex="12pt" fo:language="en" style:language-complex="hi" fo:country="US" style:country-complex="IN"/>
    </style:style>
    <style:style style:parent-style-name="737" style:family="paragraph" style:name="P450">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830">
      <style:text-properties fo:color="#00b050" fo:font-family="'Courier New'" style:font-family-complex="'Courier New'" fo:font-size="9pt" style:font-size-complex="9pt" fo:language="en" style:language-complex="hi" fo:country="US" style:country-complex="IN"/>
    </style:style>
    <style:style style:family="text" style:name="T1831">
      <style:text-properties fo:color="#00b050" fo:font-family="Liberation Serif" style:font-family-complex="Liberation Serif" fo:font-size="12pt" style:font-size-complex="12pt" fo:language="en" style:language-complex="en" fo:country="US" style:country-complex="US"/>
    </style:style>
    <style:style style:family="text" style:name="T1832">
      <style:text-properties fo:color="#000000" fo:font-family="Liberation Serif" style:font-family-complex="Liberation Serif" fo:font-size="12pt" style:font-size-complex="12pt" fo:language="en" style:language-complex="hi" fo:country="US" style:country-complex="IN"/>
    </style:style>
    <style:style style:parent-style-name="737" style:family="paragraph" style:name="P451">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833">
      <style:text-properties fo:color="#00b050" fo:font-family="'Courier New'" style:font-family-complex="'Courier New'" fo:font-size="9pt" style:font-size-complex="9pt" fo:language="en" style:language-complex="hi" fo:country="US" style:country-complex="IN"/>
    </style:style>
    <style:style style:family="text" style:name="T1834">
      <style:text-properties fo:color="#ffff00" fo:font-family="'Courier New'" style:font-family-complex="'Courier New'" fo:font-size="9pt" style:font-size-complex="9pt" fo:language="en" style:language-complex="hi" fo:country="US" style:country-complex="IN"/>
    </style:style>
    <style:style style:family="text" style:name="T1835">
      <style:text-properties fo:color="#00b0f0" fo:font-family="'Courier New'" style:font-family-complex="'Courier New'" fo:font-size="9pt" style:font-size-complex="9pt" fo:language="en" style:language-complex="hi" fo:country="US" style:country-complex="IN"/>
    </style:style>
    <style:style style:family="text" style:name="T1836">
      <style:text-properties fo:color="#ffff00" fo:font-family="'Courier New'" style:font-family-complex="'Courier New'" fo:font-size="9pt" style:font-size-complex="9pt" fo:language="en" style:language-complex="hi" fo:country="US" style:country-complex="IN"/>
    </style:style>
    <style:style style:family="text" style:name="T1837">
      <style:text-properties fo:color="#00b050" fo:font-family="Liberation Serif" style:font-family-complex="Liberation Serif" fo:font-size="12pt" style:font-size-complex="12pt" fo:language="en" style:language-complex="en" fo:country="US" style:country-complex="US"/>
    </style:style>
    <style:style style:family="text" style:name="T1838">
      <style:text-properties fo:color="#000000" fo:font-family="Liberation Serif" style:font-family-complex="Liberation Serif" fo:font-size="12pt" style:font-size-complex="12pt" fo:language="en" style:language-complex="hi" fo:country="US" style:country-complex="IN"/>
    </style:style>
    <style:style style:parent-style-name="737" style:family="paragraph" style:name="P452">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839">
      <style:text-properties fo:color="#00b050" fo:font-family="'Courier New'" style:font-family-complex="'Courier New'" fo:font-size="9pt" style:font-size-complex="9pt" fo:language="en" style:language-complex="en" fo:country="US" style:country-complex="US"/>
    </style:style>
    <style:style style:family="text" style:name="T1840">
      <style:text-properties fo:color="#00b050" fo:font-family="Liberation Serif" style:font-family-complex="Liberation Serif" fo:font-size="12pt" style:font-size-complex="12pt" fo:language="en" style:language-complex="en" fo:country="US" style:country-complex="US"/>
    </style:style>
    <style:style style:family="text" style:name="T1841">
      <style:text-properties fo:color="#000000" fo:font-family="Liberation Serif" style:font-family-complex="Liberation Serif" fo:font-size="12pt" style:font-size-complex="12pt" fo:language="en" style:language-complex="hi" fo:country="US" style:country-complex="IN"/>
    </style:style>
    <style:style style:parent-style-name="737" style:family="paragraph" style:name="P453">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842">
      <style:text-properties fo:color="#00b050" fo:font-family="'Courier New'" style:font-family-complex="'Courier New'" fo:font-size="9pt" style:font-size-complex="9pt" fo:language="en" style:language-complex="hi" fo:country="US" style:country-complex="IN"/>
    </style:style>
    <style:style style:family="text" style:name="T1843">
      <style:text-properties fo:color="#00b0f0" fo:font-family="'Courier New'" style:font-family-complex="'Courier New'" fo:font-size="9pt" style:font-size-complex="9pt" fo:language="en" style:language-complex="hi" fo:country="US" style:country-complex="IN"/>
    </style:style>
    <style:style style:family="text" style:name="T1844">
      <style:text-properties fo:color="#00b050" fo:font-family="Liberation Serif" style:font-family-complex="Liberation Serif" fo:font-size="12pt" style:font-size-complex="12pt" fo:language="en" style:language-complex="en" fo:country="US" style:country-complex="US"/>
    </style:style>
    <style:style style:family="text" style:name="T1845">
      <style:text-properties fo:color="#000000" fo:font-family="Liberation Serif" style:font-family-complex="Liberation Serif" fo:font-size="12pt" style:font-size-complex="12pt" fo:language="en" style:language-complex="hi" fo:country="US" style:country-complex="IN"/>
    </style:style>
    <style:style style:parent-style-name="737" style:family="paragraph" style:name="P454">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846">
      <style:text-properties fo:color="#00b050" fo:font-family="'Courier New'" style:font-family-complex="'Courier New'" fo:font-size="9pt" style:font-size-complex="9pt" fo:language="en" style:language-complex="hi" fo:country="US" style:country-complex="IN"/>
    </style:style>
    <style:style style:family="text" style:name="T1847">
      <style:text-properties fo:color="#00b050" fo:font-family="Liberation Serif" style:font-family-complex="Liberation Serif" fo:font-size="12pt" style:font-size-complex="12pt" fo:language="en" style:language-complex="en" fo:country="US" style:country-complex="US"/>
    </style:style>
    <style:style style:family="text" style:name="T1848">
      <style:text-properties fo:color="#000000" fo:font-family="Liberation Serif" style:font-family-complex="Liberation Serif" fo:font-size="12pt" style:font-size-complex="12pt" fo:language="en" style:language-complex="hi" fo:country="US" style:country-complex="IN"/>
    </style:style>
    <style:style style:parent-style-name="737" style:family="paragraph" style:name="P455">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849">
      <style:text-properties fo:color="#00b050" fo:font-family="'Courier New'" style:font-family-complex="'Courier New'" fo:font-size="9pt" style:font-size-complex="9pt" fo:language="en" style:language-complex="hi" fo:country="US" style:country-complex="IN"/>
    </style:style>
    <style:style style:family="text" style:name="T1850">
      <style:text-properties fo:color="#ffff00" fo:font-family="'Courier New'" style:font-family-complex="'Courier New'" fo:font-size="9pt" style:font-size-complex="9pt" fo:language="en" style:language-complex="hi" fo:country="US" style:country-complex="IN"/>
    </style:style>
    <style:style style:family="text" style:name="T1851">
      <style:text-properties fo:color="#00b0f0" fo:font-family="'Courier New'" style:font-family-complex="'Courier New'" fo:font-size="9pt" style:font-size-complex="9pt" fo:language="en" style:language-complex="hi" fo:country="US" style:country-complex="IN"/>
    </style:style>
    <style:style style:family="text" style:name="T1852">
      <style:text-properties fo:color="#ffff00" fo:font-family="'Courier New'" style:font-family-complex="'Courier New'" fo:font-size="9pt" style:font-size-complex="9pt" fo:language="en" style:language-complex="hi" fo:country="US" style:country-complex="IN"/>
    </style:style>
    <style:style style:family="text" style:name="T1853">
      <style:text-properties fo:color="#00b050" fo:font-family="Liberation Serif" style:font-family-complex="Liberation Serif" fo:font-size="12pt" style:font-size-complex="12pt" fo:language="en" style:language-complex="en" fo:country="US" style:country-complex="US"/>
    </style:style>
    <style:style style:family="text" style:name="T1854">
      <style:text-properties fo:color="#000000" fo:font-family="Liberation Serif" style:font-family-complex="Liberation Serif" fo:font-size="12pt" style:font-size-complex="12pt" fo:language="en" style:language-complex="hi" fo:country="US" style:country-complex="IN"/>
    </style:style>
    <style:style style:parent-style-name="737" style:family="paragraph" style:name="P456">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855">
      <style:text-properties fo:color="#00b050" fo:font-family="'Courier New'" style:font-family-complex="'Courier New'" fo:font-size="9pt" style:font-size-complex="9pt" fo:language="en" style:language-complex="hi" fo:country="US" style:country-complex="IN"/>
    </style:style>
    <style:style style:family="text" style:name="T1856">
      <style:text-properties fo:color="#00b050" fo:font-family="Liberation Serif" style:font-family-complex="Liberation Serif" fo:font-size="12pt" style:font-size-complex="12pt" fo:language="en" style:language-complex="en" fo:country="US" style:country-complex="US"/>
    </style:style>
    <style:style style:family="text" style:name="T1857">
      <style:text-properties fo:color="#000000" fo:font-family="Liberation Serif" style:font-family-complex="Liberation Serif" fo:font-size="12pt" style:font-size-complex="12pt" fo:language="en" style:language-complex="hi" fo:country="US" style:country-complex="IN"/>
    </style:style>
    <style:style style:parent-style-name="737" style:family="paragraph" style:name="P457">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858">
      <style:text-properties fo:color="#00b050" fo:font-family="'Courier New'" style:font-family-complex="'Courier New'" fo:font-size="9pt" style:font-size-complex="9pt" fo:language="en" style:language-complex="hi" fo:country="US" style:country-complex="IN"/>
    </style:style>
    <style:style style:family="text" style:name="T1859">
      <style:text-properties fo:color="#00b0f0" fo:font-family="'Courier New'" style:font-family-complex="'Courier New'" fo:font-size="9pt" style:font-size-complex="9pt" fo:language="en" style:language-complex="hi" fo:country="US" style:country-complex="IN"/>
    </style:style>
    <style:style style:family="text" style:name="T1860">
      <style:text-properties fo:color="#00b050" fo:font-family="Liberation Serif" style:font-family-complex="Liberation Serif" fo:font-size="12pt" style:font-size-complex="12pt" fo:language="en" style:language-complex="en" fo:country="US" style:country-complex="US"/>
    </style:style>
    <style:style style:family="text" style:name="T1861">
      <style:text-properties fo:color="#000000" fo:font-family="Liberation Serif" style:font-family-complex="Liberation Serif" fo:font-size="12pt" style:font-size-complex="12pt" fo:language="en" style:language-complex="hi" fo:country="US" style:country-complex="IN"/>
    </style:style>
    <style:style style:parent-style-name="737" style:family="paragraph" style:name="P458">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862">
      <style:text-properties fo:color="#00b050" fo:font-family="'Courier New'" style:font-family-complex="'Courier New'" fo:font-size="9pt" style:font-size-complex="9pt" fo:language="en" style:language-complex="hi" fo:country="US" style:country-complex="IN"/>
    </style:style>
    <style:style style:family="text" style:name="T1863">
      <style:text-properties fo:color="#ffff00" fo:font-family="'Courier New'" style:font-family-complex="'Courier New'" fo:font-size="9pt" style:font-size-complex="9pt" fo:language="en" style:language-complex="hi" fo:country="US" style:country-complex="IN"/>
    </style:style>
    <style:style style:family="text" style:name="T1864">
      <style:text-properties fo:color="#00b0f0" fo:font-family="'Courier New'" style:font-family-complex="'Courier New'" fo:font-size="9pt" style:font-size-complex="9pt" fo:language="en" style:language-complex="hi" fo:country="US" style:country-complex="IN"/>
    </style:style>
    <style:style style:family="text" style:name="T1865">
      <style:text-properties fo:color="#ffff00" fo:font-family="'Courier New'" style:font-family-complex="'Courier New'" fo:font-size="9pt" style:font-size-complex="9pt" fo:language="en" style:language-complex="hi" fo:country="US" style:country-complex="IN"/>
    </style:style>
    <style:style style:family="text" style:name="T1866">
      <style:text-properties fo:color="#00b050" fo:font-family="Liberation Serif" style:font-family-complex="Liberation Serif" fo:font-size="12pt" style:font-size-complex="12pt" fo:language="en" style:language-complex="en" fo:country="US" style:country-complex="US"/>
    </style:style>
    <style:style style:family="text" style:name="T1867">
      <style:text-properties fo:color="#000000" fo:font-family="Liberation Serif" style:font-family-complex="Liberation Serif" fo:font-size="12pt" style:font-size-complex="12pt" fo:language="en" style:language-complex="hi" fo:country="US" style:country-complex="IN"/>
    </style:style>
    <style:style style:parent-style-name="737" style:family="paragraph" style:name="P459">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868">
      <style:text-properties fo:color="#00b050" fo:font-family="'Courier New'" style:font-family-complex="'Courier New'" fo:font-size="9pt" style:font-size-complex="9pt" fo:language="en" style:language-complex="hi" fo:country="US" style:country-complex="IN"/>
    </style:style>
    <style:style style:family="text" style:name="T1869">
      <style:text-properties fo:color="#00b050" fo:font-family="Liberation Serif" style:font-family-complex="Liberation Serif" fo:font-size="12pt" style:font-size-complex="12pt" fo:language="en" style:language-complex="en" fo:country="US" style:country-complex="US"/>
    </style:style>
    <style:style style:family="text" style:name="T1870">
      <style:text-properties fo:color="#000000" fo:font-family="Liberation Serif" style:font-family-complex="Liberation Serif" fo:font-size="12pt" style:font-size-complex="12pt" fo:language="en" style:language-complex="hi" fo:country="US" style:country-complex="IN"/>
    </style:style>
    <style:style style:parent-style-name="737" style:family="paragraph" style:name="P460">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871">
      <style:text-properties fo:color="#00b050" fo:font-family="'Courier New'" style:font-family-complex="'Courier New'" fo:font-size="9pt" style:font-size-complex="9pt" fo:language="en" style:language-complex="hi" fo:country="US" style:country-complex="IN"/>
    </style:style>
    <style:style style:family="text" style:name="T1872">
      <style:text-properties fo:color="#00b0f0" fo:font-family="'Courier New'" style:font-family-complex="'Courier New'" fo:font-size="9pt" style:font-size-complex="9pt" fo:language="en" style:language-complex="hi" fo:country="US" style:country-complex="IN"/>
    </style:style>
    <style:style style:family="text" style:name="T1873">
      <style:text-properties fo:color="#00b050" fo:font-family="Liberation Serif" style:font-family-complex="Liberation Serif" fo:font-size="12pt" style:font-size-complex="12pt" fo:language="en" style:language-complex="en" fo:country="US" style:country-complex="US"/>
    </style:style>
    <style:style style:family="text" style:name="T1874">
      <style:text-properties fo:color="#000000" fo:font-family="Liberation Serif" style:font-family-complex="Liberation Serif" fo:font-size="12pt" style:font-size-complex="12pt" fo:language="en" style:language-complex="hi" fo:country="US" style:country-complex="IN"/>
    </style:style>
    <style:style style:parent-style-name="737" style:family="paragraph" style:name="P461">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875">
      <style:text-properties fo:color="#00b050" fo:font-family="'Courier New'" style:font-family-complex="'Courier New'" fo:font-size="9pt" style:font-size-complex="9pt" fo:language="en" style:language-complex="en" fo:country="US" style:country-complex="US"/>
    </style:style>
    <style:style style:family="text" style:name="T1876">
      <style:text-properties fo:color="#00b050" fo:font-family="Liberation Serif" style:font-family-complex="Liberation Serif" fo:font-size="12pt" style:font-size-complex="12pt" fo:language="en" style:language-complex="en" fo:country="US" style:country-complex="US"/>
    </style:style>
    <style:style style:family="text" style:name="T1877">
      <style:text-properties fo:color="#000000" fo:font-family="Liberation Serif" style:font-family-complex="Liberation Serif" fo:font-size="12pt" style:font-size-complex="12pt" fo:language="en" style:language-complex="hi" fo:country="US" style:country-complex="IN"/>
    </style:style>
    <style:style style:parent-style-name="737" style:family="paragraph" style:name="P462">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878">
      <style:text-properties fo:color="#00b050" fo:font-family="'Courier New'" style:font-family-complex="'Courier New'" fo:font-size="9pt" style:font-size-complex="9pt" fo:language="en" style:language-complex="en" fo:country="US" style:country-complex="US"/>
    </style:style>
    <style:style style:family="text" style:name="T1879">
      <style:text-properties fo:color="#00b050" fo:font-family="Liberation Serif" style:font-family-complex="Liberation Serif" fo:font-size="12pt" style:font-size-complex="12pt" fo:language="en" style:language-complex="en" fo:country="US" style:country-complex="US"/>
    </style:style>
    <style:style style:family="text" style:name="T1880">
      <style:text-properties fo:color="#000000" fo:font-family="Liberation Serif" style:font-family-complex="Liberation Serif" fo:font-size="12pt" style:font-size-complex="12pt" fo:language="en" style:language-complex="hi" fo:country="US" style:country-complex="IN"/>
    </style:style>
    <style:style style:parent-style-name="737" style:family="paragraph" style:name="P463">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881">
      <style:text-properties fo:color="#00b050" fo:font-family="'Courier New'" style:font-family-complex="'Courier New'" fo:font-size="9pt" style:font-size-complex="9pt" fo:language="en" style:language-complex="hi" fo:country="US" style:country-complex="IN"/>
    </style:style>
    <style:style style:family="text" style:name="T1882">
      <style:text-properties fo:color="#00b0f0" fo:font-family="'Courier New'" style:font-family-complex="'Courier New'" fo:font-size="9pt" style:font-size-complex="9pt" fo:language="en" style:language-complex="hi" fo:country="US" style:country-complex="IN"/>
    </style:style>
    <style:style style:family="text" style:name="T1883">
      <style:text-properties fo:color="#00b0f0" fo:font-family="Liberation Serif" style:font-family-complex="Liberation Serif" fo:font-size="12pt" style:font-size-complex="12pt" fo:language="en" style:language-complex="en" fo:country="US" style:country-complex="US"/>
    </style:style>
    <style:style style:family="text" style:name="T1884">
      <style:text-properties fo:color="#000000" fo:font-family="Liberation Serif" style:font-family-complex="Liberation Serif" fo:font-size="12pt" style:font-size-complex="12pt" fo:language="en" style:language-complex="hi" fo:country="US" style:country-complex="IN"/>
    </style:style>
    <style:style style:parent-style-name="737" style:family="paragraph" style:name="P464">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885">
      <style:text-properties fo:color="#00b050" fo:font-family="'Courier New'" style:font-family-complex="'Courier New'" fo:font-size="9pt" style:font-size-complex="9pt" fo:language="en" style:language-complex="hi" fo:country="US" style:country-complex="IN"/>
    </style:style>
    <style:style style:family="text" style:name="T1886">
      <style:text-properties fo:color="#00b050" fo:font-family="Liberation Serif" style:font-family-complex="Liberation Serif" fo:font-size="12pt" style:font-size-complex="12pt" fo:language="en" style:language-complex="en" fo:country="US" style:country-complex="US"/>
    </style:style>
    <style:style style:family="text" style:name="T1887">
      <style:text-properties fo:color="#000000" fo:font-family="Liberation Serif" style:font-family-complex="Liberation Serif" fo:font-size="12pt" style:font-size-complex="12pt" fo:language="en" style:language-complex="hi" fo:country="US" style:country-complex="IN"/>
    </style:style>
    <style:style style:parent-style-name="737" style:family="paragraph" style:name="P465">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888">
      <style:text-properties fo:color="#00b050" fo:font-family="'Courier New'" style:font-family-complex="'Courier New'" fo:font-size="9pt" style:font-size-complex="9pt" fo:language="en" style:language-complex="hi" fo:country="US" style:country-complex="IN"/>
    </style:style>
    <style:style style:family="text" style:name="T1889">
      <style:text-properties fo:color="#ffff00" fo:font-family="'Courier New'" style:font-family-complex="'Courier New'" fo:font-size="9pt" style:font-size-complex="9pt" fo:language="en" style:language-complex="hi" fo:country="US" style:country-complex="IN"/>
    </style:style>
    <style:style style:family="text" style:name="T1890">
      <style:text-properties fo:color="#00b0f0" fo:font-family="'Courier New'" style:font-family-complex="'Courier New'" fo:font-size="9pt" style:font-size-complex="9pt" fo:language="en" style:language-complex="hi" fo:country="US" style:country-complex="IN"/>
    </style:style>
    <style:style style:family="text" style:name="T1891">
      <style:text-properties fo:color="#ffff00" fo:font-family="'Courier New'" style:font-family-complex="'Courier New'" fo:font-size="9pt" style:font-size-complex="9pt" fo:language="en" style:language-complex="hi" fo:country="US" style:country-complex="IN"/>
    </style:style>
    <style:style style:family="text" style:name="T1892">
      <style:text-properties fo:color="#00b050" fo:font-family="Liberation Serif" style:font-family-complex="Liberation Serif" fo:font-size="12pt" style:font-size-complex="12pt" fo:language="en" style:language-complex="en" fo:country="US" style:country-complex="US"/>
    </style:style>
    <style:style style:family="text" style:name="T1893">
      <style:text-properties fo:color="#000000" fo:font-family="Liberation Serif" style:font-family-complex="Liberation Serif" fo:font-size="12pt" style:font-size-complex="12pt" fo:language="en" style:language-complex="hi" fo:country="US" style:country-complex="IN"/>
    </style:style>
    <style:style style:parent-style-name="737" style:family="paragraph" style:name="P466">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894">
      <style:text-properties fo:color="#00b050" fo:font-family="'Courier New'" style:font-family-complex="'Courier New'" fo:font-size="9pt" style:font-size-complex="9pt" fo:language="en" style:language-complex="hi" fo:country="US" style:country-complex="IN"/>
    </style:style>
    <style:style style:family="text" style:name="T1895">
      <style:text-properties fo:color="#00b050" fo:font-family="Liberation Serif" style:font-family-complex="Liberation Serif" fo:font-size="12pt" style:font-size-complex="12pt" fo:language="en" style:language-complex="en" fo:country="US" style:country-complex="US"/>
    </style:style>
    <style:style style:family="text" style:name="T1896">
      <style:text-properties fo:color="#000000" fo:font-family="Liberation Serif" style:font-family-complex="Liberation Serif" fo:font-size="12pt" style:font-size-complex="12pt" fo:language="en" style:language-complex="hi" fo:country="US" style:country-complex="IN"/>
    </style:style>
    <style:style style:parent-style-name="737" style:family="paragraph" style:name="P467">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897">
      <style:text-properties fo:color="#00b050" fo:font-family="'Courier New'" style:font-family-complex="'Courier New'" fo:font-size="9pt" style:font-size-complex="9pt" fo:language="en" style:language-complex="hi" fo:country="US" style:country-complex="IN"/>
    </style:style>
    <style:style style:family="text" style:name="T1898">
      <style:text-properties fo:color="#00b0f0" fo:font-family="'Courier New'" style:font-family-complex="'Courier New'" fo:font-size="9pt" style:font-size-complex="9pt" fo:language="en" style:language-complex="hi" fo:country="US" style:country-complex="IN"/>
    </style:style>
    <style:style style:family="text" style:name="T1899">
      <style:text-properties fo:color="#00b050" fo:font-family="Liberation Serif" style:font-family-complex="Liberation Serif" fo:font-size="12pt" style:font-size-complex="12pt" fo:language="en" style:language-complex="en" fo:country="US" style:country-complex="US"/>
    </style:style>
    <style:style style:family="text" style:name="T1900">
      <style:text-properties fo:color="#000000" fo:font-family="Liberation Serif" style:font-family-complex="Liberation Serif" fo:font-size="12pt" style:font-size-complex="12pt" fo:language="en" style:language-complex="hi" fo:country="US" style:country-complex="IN"/>
    </style:style>
    <style:style style:parent-style-name="737" style:family="paragraph" style:name="P468">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901">
      <style:text-properties fo:color="#00b050" fo:font-family="'Courier New'" style:font-family-complex="'Courier New'" fo:font-size="9pt" style:font-size-complex="9pt" fo:language="en" style:language-complex="hi" fo:country="US" style:country-complex="IN"/>
    </style:style>
    <style:style style:family="text" style:name="T1902">
      <style:text-properties fo:color="#ffff00" fo:font-family="'Courier New'" style:font-family-complex="'Courier New'" fo:font-size="9pt" style:font-size-complex="9pt" fo:language="en" style:language-complex="hi" fo:country="US" style:country-complex="IN"/>
    </style:style>
    <style:style style:family="text" style:name="T1903">
      <style:text-properties fo:color="#00b0f0" fo:font-family="'Courier New'" style:font-family-complex="'Courier New'" fo:font-size="9pt" style:font-size-complex="9pt" fo:language="en" style:language-complex="hi" fo:country="US" style:country-complex="IN"/>
    </style:style>
    <style:style style:family="text" style:name="T1904">
      <style:text-properties fo:color="#ffff00" fo:font-family="'Courier New'" style:font-family-complex="'Courier New'" fo:font-size="9pt" style:font-size-complex="9pt" fo:language="en" style:language-complex="hi" fo:country="US" style:country-complex="IN"/>
    </style:style>
    <style:style style:family="text" style:name="T1905">
      <style:text-properties fo:color="#00b050" fo:font-family="Liberation Serif" style:font-family-complex="Liberation Serif" fo:font-size="12pt" style:font-size-complex="12pt" fo:language="en" style:language-complex="en" fo:country="US" style:country-complex="US"/>
    </style:style>
    <style:style style:family="text" style:name="T1906">
      <style:text-properties fo:color="#000000" fo:font-family="Liberation Serif" style:font-family-complex="Liberation Serif" fo:font-size="12pt" style:font-size-complex="12pt" fo:language="en" style:language-complex="hi" fo:country="US" style:country-complex="IN"/>
    </style:style>
    <style:style style:parent-style-name="737" style:family="paragraph" style:name="P469">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907">
      <style:text-properties fo:color="#00b050" fo:font-family="'Courier New'" style:font-family-complex="'Courier New'" fo:font-size="9pt" style:font-size-complex="9pt" fo:language="en" style:language-complex="hi" fo:country="US" style:country-complex="IN"/>
    </style:style>
    <style:style style:family="text" style:name="T1908">
      <style:text-properties fo:color="#00b050" fo:font-family="Liberation Serif" style:font-family-complex="Liberation Serif" fo:font-size="12pt" style:font-size-complex="12pt" fo:language="en" style:language-complex="en" fo:country="US" style:country-complex="US"/>
    </style:style>
    <style:style style:family="text" style:name="T1909">
      <style:text-properties fo:color="#000000" fo:font-family="Liberation Serif" style:font-family-complex="Liberation Serif" fo:font-size="12pt" style:font-size-complex="12pt" fo:language="en" style:language-complex="hi" fo:country="US" style:country-complex="IN"/>
    </style:style>
    <style:style style:parent-style-name="737" style:family="paragraph" style:name="P470">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910">
      <style:text-properties fo:color="#00b050" fo:font-family="'Courier New'" style:font-family-complex="'Courier New'" fo:font-size="9pt" style:font-size-complex="9pt" fo:language="en" style:language-complex="hi" fo:country="US" style:country-complex="IN"/>
    </style:style>
    <style:style style:family="text" style:name="T1911">
      <style:text-properties fo:color="#00b0f0" fo:font-family="'Courier New'" style:font-family-complex="'Courier New'" fo:font-size="9pt" style:font-size-complex="9pt" fo:language="en" style:language-complex="hi" fo:country="US" style:country-complex="IN"/>
    </style:style>
    <style:style style:family="text" style:name="T1912">
      <style:text-properties fo:color="#00b050" fo:font-family="Liberation Serif" style:font-family-complex="Liberation Serif" fo:font-size="12pt" style:font-size-complex="12pt" fo:language="en" style:language-complex="en" fo:country="US" style:country-complex="US"/>
    </style:style>
    <style:style style:family="text" style:name="T1913">
      <style:text-properties fo:color="#000000" fo:font-family="Liberation Serif" style:font-family-complex="Liberation Serif" fo:font-size="12pt" style:font-size-complex="12pt" fo:language="en" style:language-complex="hi" fo:country="US" style:country-complex="IN"/>
    </style:style>
    <style:style style:parent-style-name="737" style:family="paragraph" style:name="P471">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914">
      <style:text-properties fo:color="#00b050" fo:font-family="'Courier New'" style:font-family-complex="'Courier New'" fo:font-size="9pt" style:font-size-complex="9pt" fo:language="en" style:language-complex="hi" fo:country="US" style:country-complex="IN"/>
    </style:style>
    <style:style style:family="text" style:name="T1915">
      <style:text-properties fo:color="#ffff00" fo:font-family="'Courier New'" style:font-family-complex="'Courier New'" fo:font-size="9pt" style:font-size-complex="9pt" fo:language="en" style:language-complex="hi" fo:country="US" style:country-complex="IN"/>
    </style:style>
    <style:style style:family="text" style:name="T1916">
      <style:text-properties fo:color="#00b0f0" fo:font-family="'Courier New'" style:font-family-complex="'Courier New'" fo:font-size="9pt" style:font-size-complex="9pt" fo:language="en" style:language-complex="hi" fo:country="US" style:country-complex="IN"/>
    </style:style>
    <style:style style:family="text" style:name="T1917">
      <style:text-properties fo:color="#ffff00" fo:font-family="'Courier New'" style:font-family-complex="'Courier New'" fo:font-size="9pt" style:font-size-complex="9pt" fo:language="en" style:language-complex="hi" fo:country="US" style:country-complex="IN"/>
    </style:style>
    <style:style style:family="text" style:name="T1918">
      <style:text-properties fo:color="#00b050" fo:font-family="Liberation Serif" style:font-family-complex="Liberation Serif" fo:font-size="12pt" style:font-size-complex="12pt" fo:language="en" style:language-complex="en" fo:country="US" style:country-complex="US"/>
    </style:style>
    <style:style style:family="text" style:name="T1919">
      <style:text-properties fo:color="#000000" fo:font-family="Liberation Serif" style:font-family-complex="Liberation Serif" fo:font-size="12pt" style:font-size-complex="12pt" fo:language="en" style:language-complex="hi" fo:country="US" style:country-complex="IN"/>
    </style:style>
    <style:style style:parent-style-name="737" style:family="paragraph" style:name="P472">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920">
      <style:text-properties fo:color="#00b050" fo:font-family="'Courier New'" style:font-family-complex="'Courier New'" fo:font-size="9pt" style:font-size-complex="9pt" fo:language="en" style:language-complex="hi" fo:country="US" style:country-complex="IN"/>
    </style:style>
    <style:style style:family="text" style:name="T1921">
      <style:text-properties fo:color="#00b050" fo:font-family="Liberation Serif" style:font-family-complex="Liberation Serif" fo:font-size="12pt" style:font-size-complex="12pt" fo:language="en" style:language-complex="en" fo:country="US" style:country-complex="US"/>
    </style:style>
    <style:style style:family="text" style:name="T1922">
      <style:text-properties fo:color="#000000" fo:font-family="Liberation Serif" style:font-family-complex="Liberation Serif" fo:font-size="12pt" style:font-size-complex="12pt" fo:language="en" style:language-complex="hi" fo:country="US" style:country-complex="IN"/>
    </style:style>
    <style:style style:parent-style-name="737" style:family="paragraph" style:name="P473">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923">
      <style:text-properties fo:color="#00b050" fo:font-family="'Courier New'" style:font-family-complex="'Courier New'" fo:font-size="9pt" style:font-size-complex="9pt" fo:language="en" style:language-complex="hi" fo:country="US" style:country-complex="IN"/>
    </style:style>
    <style:style style:family="text" style:name="T1924">
      <style:text-properties fo:color="#00b0f0" fo:font-family="'Courier New'" style:font-family-complex="'Courier New'" fo:font-size="9pt" style:font-size-complex="9pt" fo:language="en" style:language-complex="hi" fo:country="US" style:country-complex="IN"/>
    </style:style>
    <style:style style:family="text" style:name="T1925">
      <style:text-properties fo:color="#00b050" fo:font-family="Liberation Serif" style:font-family-complex="Liberation Serif" fo:font-size="12pt" style:font-size-complex="12pt" fo:language="en" style:language-complex="en" fo:country="US" style:country-complex="US"/>
    </style:style>
    <style:style style:family="text" style:name="T1926">
      <style:text-properties fo:color="#000000" fo:font-family="Liberation Serif" style:font-family-complex="Liberation Serif" fo:font-size="12pt" style:font-size-complex="12pt" fo:language="en" style:language-complex="hi" fo:country="US" style:country-complex="IN"/>
    </style:style>
    <style:style style:parent-style-name="737" style:family="paragraph" style:name="P474">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927">
      <style:text-properties fo:color="#00b050" fo:font-family="'Courier New'" style:font-family-complex="'Courier New'" fo:font-size="9pt" style:font-size-complex="9pt" fo:language="en" style:language-complex="en" fo:country="US" style:country-complex="US"/>
    </style:style>
    <style:style style:family="text" style:name="T1928">
      <style:text-properties fo:color="#00b050" fo:font-family="Liberation Serif" style:font-family-complex="Liberation Serif" fo:font-size="12pt" style:font-size-complex="12pt" fo:language="en" style:language-complex="en" fo:country="US" style:country-complex="US"/>
    </style:style>
    <style:style style:family="text" style:name="T1929">
      <style:text-properties fo:color="#000000" fo:font-family="Liberation Serif" style:font-family-complex="Liberation Serif" fo:font-size="12pt" style:font-size-complex="12pt" fo:language="en" style:language-complex="hi" fo:country="US" style:country-complex="IN"/>
    </style:style>
    <style:style style:parent-style-name="737" style:family="paragraph" style:name="P475">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930">
      <style:text-properties fo:color="#00b050" fo:font-family="'Courier New'" style:font-family-complex="'Courier New'" fo:font-size="9pt" style:font-size-complex="9pt" fo:language="en" style:language-complex="hi" fo:country="US" style:country-complex="IN"/>
    </style:style>
    <style:style style:family="text" style:name="T1931">
      <style:text-properties fo:color="#00b0f0" fo:font-family="'Courier New'" style:font-family-complex="'Courier New'" fo:font-size="9pt" style:font-size-complex="9pt" fo:language="en" style:language-complex="hi" fo:country="US" style:country-complex="IN"/>
    </style:style>
    <style:style style:family="text" style:name="T1932">
      <style:text-properties fo:color="#00b050" fo:font-family="Liberation Serif" style:font-family-complex="Liberation Serif" fo:font-size="12pt" style:font-size-complex="12pt" fo:language="en" style:language-complex="en" fo:country="US" style:country-complex="US"/>
    </style:style>
    <style:style style:family="text" style:name="T1933">
      <style:text-properties fo:color="#000000" fo:font-family="Liberation Serif" style:font-family-complex="Liberation Serif" fo:font-size="12pt" style:font-size-complex="12pt" fo:language="en" style:language-complex="hi" fo:country="US" style:country-complex="IN"/>
    </style:style>
    <style:style style:parent-style-name="737" style:family="paragraph" style:name="P476">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934">
      <style:text-properties fo:color="#00b050" fo:font-family="'Courier New'" style:font-family-complex="'Courier New'" fo:font-size="9pt" style:font-size-complex="9pt" fo:language="en" style:language-complex="hi" fo:country="US" style:country-complex="IN"/>
    </style:style>
    <style:style style:family="text" style:name="T1935">
      <style:text-properties fo:color="#00b050" fo:font-family="Liberation Serif" style:font-family-complex="Liberation Serif" fo:font-size="12pt" style:font-size-complex="12pt" fo:language="en" style:language-complex="en" fo:country="US" style:country-complex="US"/>
    </style:style>
    <style:style style:family="text" style:name="T1936">
      <style:text-properties fo:color="#000000" fo:font-family="Liberation Serif" style:font-family-complex="Liberation Serif" fo:font-size="12pt" style:font-size-complex="12pt" fo:language="en" style:language-complex="hi" fo:country="US" style:country-complex="IN"/>
    </style:style>
    <style:style style:parent-style-name="737" style:family="paragraph" style:name="P477">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937">
      <style:text-properties fo:color="#00b050" fo:font-family="'Courier New'" style:font-family-complex="'Courier New'" fo:font-size="9pt" style:font-size-complex="9pt" fo:language="en" style:language-complex="hi" fo:country="US" style:country-complex="IN"/>
    </style:style>
    <style:style style:family="text" style:name="T1938">
      <style:text-properties fo:color="#ffff00" fo:font-family="'Courier New'" style:font-family-complex="'Courier New'" fo:font-size="9pt" style:font-size-complex="9pt" fo:language="en" style:language-complex="hi" fo:country="US" style:country-complex="IN"/>
    </style:style>
    <style:style style:family="text" style:name="T1939">
      <style:text-properties fo:color="#00b0f0" fo:font-family="'Courier New'" style:font-family-complex="'Courier New'" fo:font-size="9pt" style:font-size-complex="9pt" fo:language="en" style:language-complex="hi" fo:country="US" style:country-complex="IN"/>
    </style:style>
    <style:style style:family="text" style:name="T1940">
      <style:text-properties fo:color="#ffff00" fo:font-family="'Courier New'" style:font-family-complex="'Courier New'" fo:font-size="9pt" style:font-size-complex="9pt" fo:language="en" style:language-complex="hi" fo:country="US" style:country-complex="IN"/>
    </style:style>
    <style:style style:family="text" style:name="T1941">
      <style:text-properties fo:color="#00b050" fo:font-family="Liberation Serif" style:font-family-complex="Liberation Serif" fo:font-size="12pt" style:font-size-complex="12pt" fo:language="en" style:language-complex="en" fo:country="US" style:country-complex="US"/>
    </style:style>
    <style:style style:family="text" style:name="T1942">
      <style:text-properties fo:color="#000000" fo:font-family="Liberation Serif" style:font-family-complex="Liberation Serif" fo:font-size="12pt" style:font-size-complex="12pt" fo:language="en" style:language-complex="hi" fo:country="US" style:country-complex="IN"/>
    </style:style>
    <style:style style:parent-style-name="737" style:family="paragraph" style:name="P478">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943">
      <style:text-properties fo:color="#00b050" fo:font-family="'Courier New'" style:font-family-complex="'Courier New'" fo:font-size="9pt" style:font-size-complex="9pt" fo:language="en" style:language-complex="hi" fo:country="US" style:country-complex="IN"/>
    </style:style>
    <style:style style:family="text" style:name="T1944">
      <style:text-properties fo:color="#00b050" fo:font-family="Liberation Serif" style:font-family-complex="Liberation Serif" fo:font-size="12pt" style:font-size-complex="12pt" fo:language="en" style:language-complex="en" fo:country="US" style:country-complex="US"/>
    </style:style>
    <style:style style:family="text" style:name="T1945">
      <style:text-properties fo:color="#000000" fo:font-family="Liberation Serif" style:font-family-complex="Liberation Serif" fo:font-size="12pt" style:font-size-complex="12pt" fo:language="en" style:language-complex="hi" fo:country="US" style:country-complex="IN"/>
    </style:style>
    <style:style style:parent-style-name="737" style:family="paragraph" style:name="P479">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946">
      <style:text-properties fo:color="#00b050" fo:font-family="'Courier New'" style:font-family-complex="'Courier New'" fo:font-size="9pt" style:font-size-complex="9pt" fo:language="en" style:language-complex="hi" fo:country="US" style:country-complex="IN"/>
    </style:style>
    <style:style style:family="text" style:name="T1947">
      <style:text-properties fo:color="#00b0f0" fo:font-family="'Courier New'" style:font-family-complex="'Courier New'" fo:font-size="9pt" style:font-size-complex="9pt" fo:language="en" style:language-complex="hi" fo:country="US" style:country-complex="IN"/>
    </style:style>
    <style:style style:family="text" style:name="T1948">
      <style:text-properties fo:color="#00b0f0" fo:font-family="Liberation Serif" style:font-family-complex="Liberation Serif" fo:font-size="12pt" style:font-size-complex="12pt" fo:language="en" style:language-complex="en" fo:country="US" style:country-complex="US"/>
    </style:style>
    <style:style style:family="text" style:name="T1949">
      <style:text-properties fo:color="#000000" fo:font-family="Liberation Serif" style:font-family-complex="Liberation Serif" fo:font-size="12pt" style:font-size-complex="12pt" fo:language="en" style:language-complex="hi" fo:country="US" style:country-complex="IN"/>
    </style:style>
    <style:style style:parent-style-name="737" style:family="paragraph" style:name="P480">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950">
      <style:text-properties fo:color="#00b050" fo:font-family="'Courier New'" style:font-family-complex="'Courier New'" fo:font-size="9pt" style:font-size-complex="9pt" fo:language="en" style:language-complex="en" fo:country="US" style:country-complex="US"/>
    </style:style>
    <style:style style:family="text" style:name="T1951">
      <style:text-properties fo:color="#00b050" fo:font-family="Liberation Serif" style:font-family-complex="Liberation Serif" fo:font-size="12pt" style:font-size-complex="12pt" fo:language="en" style:language-complex="en" fo:country="US" style:country-complex="US"/>
    </style:style>
    <style:style style:family="text" style:name="T1952">
      <style:text-properties fo:color="#000000" fo:font-family="Liberation Serif" style:font-family-complex="Liberation Serif" fo:font-size="12pt" style:font-size-complex="12pt" fo:language="en" style:language-complex="hi" fo:country="US" style:country-complex="IN"/>
    </style:style>
    <style:style style:parent-style-name="737" style:family="paragraph" style:name="P481">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953">
      <style:text-properties fo:color="#00b050" fo:font-family="'Courier New'" style:font-family-complex="'Courier New'" fo:font-size="9pt" style:font-size-complex="9pt" fo:language="en" style:language-complex="hi" fo:country="US" style:country-complex="IN"/>
    </style:style>
    <style:style style:family="text" style:name="T1954">
      <style:text-properties fo:color="#00b0f0" fo:font-family="'Courier New'" style:font-family-complex="'Courier New'" fo:font-size="9pt" style:font-size-complex="9pt" fo:language="en" style:language-complex="hi" fo:country="US" style:country-complex="IN"/>
    </style:style>
    <style:style style:family="text" style:name="T1955">
      <style:text-properties fo:color="#00b0f0" fo:font-family="Liberation Serif" style:font-family-complex="Liberation Serif" fo:font-size="12pt" style:font-size-complex="12pt" fo:language="en" style:language-complex="en" fo:country="US" style:country-complex="US"/>
    </style:style>
    <style:style style:family="text" style:name="T1956">
      <style:text-properties fo:color="#000000" fo:font-family="Liberation Serif" style:font-family-complex="Liberation Serif" fo:font-size="12pt" style:font-size-complex="12pt" fo:language="en" style:language-complex="hi" fo:country="US" style:country-complex="IN"/>
    </style:style>
    <style:style style:parent-style-name="737" style:family="paragraph" style:name="P482">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957">
      <style:text-properties fo:color="#00b050" fo:font-family="'Courier New'" style:font-family-complex="'Courier New'" fo:font-size="9pt" style:font-size-complex="9pt" fo:language="en" style:language-complex="hi" fo:country="US" style:country-complex="IN"/>
    </style:style>
    <style:style style:family="text" style:name="T1958">
      <style:text-properties fo:color="#00b0f0" fo:font-family="'Courier New'" style:font-family-complex="'Courier New'" fo:font-size="9pt" style:font-size-complex="9pt" fo:language="en" style:language-complex="hi" fo:country="US" style:country-complex="IN"/>
    </style:style>
    <style:style style:family="text" style:name="T1959">
      <style:text-properties fo:color="#00b0f0" fo:font-family="Liberation Serif" style:font-family-complex="Liberation Serif" fo:font-size="12pt" style:font-size-complex="12pt" fo:language="en" style:language-complex="en" fo:country="US" style:country-complex="US"/>
    </style:style>
    <style:style style:family="text" style:name="T1960">
      <style:text-properties fo:color="#000000" fo:font-family="Liberation Serif" style:font-family-complex="Liberation Serif" fo:font-size="12pt" style:font-size-complex="12pt" fo:language="en" style:language-complex="hi" fo:country="US" style:country-complex="IN"/>
    </style:style>
    <style:style style:parent-style-name="737" style:family="paragraph" style:name="P483">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961">
      <style:text-properties fo:color="#00b050" fo:font-family="'Courier New'" style:font-family-complex="'Courier New'" fo:font-size="9pt" style:font-size-complex="9pt" fo:language="en" style:language-complex="hi" fo:country="US" style:country-complex="IN"/>
    </style:style>
    <style:style style:family="text" style:name="T1962">
      <style:text-properties fo:color="#00b050" fo:font-family="Liberation Serif" style:font-family-complex="Liberation Serif" fo:font-size="12pt" style:font-size-complex="12pt" fo:language="en" style:language-complex="en" fo:country="US" style:country-complex="US"/>
    </style:style>
    <style:style style:family="text" style:name="T1963">
      <style:text-properties fo:color="#000000" fo:font-family="Liberation Serif" style:font-family-complex="Liberation Serif" fo:font-size="12pt" style:font-size-complex="12pt" fo:language="en" style:language-complex="hi" fo:country="US" style:country-complex="IN"/>
    </style:style>
    <style:style style:parent-style-name="737" style:family="paragraph" style:name="P484">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964">
      <style:text-properties fo:color="#00b050" fo:font-family="'Courier New'" style:font-family-complex="'Courier New'" fo:font-size="9pt" style:font-size-complex="9pt" fo:language="en" style:language-complex="hi" fo:country="US" style:country-complex="IN"/>
    </style:style>
    <style:style style:family="text" style:name="T1965">
      <style:text-properties fo:color="#ffff00" fo:font-family="'Courier New'" style:font-family-complex="'Courier New'" fo:font-size="9pt" style:font-size-complex="9pt" fo:language="en" style:language-complex="hi" fo:country="US" style:country-complex="IN"/>
    </style:style>
    <style:style style:family="text" style:name="T1966">
      <style:text-properties fo:color="#00b0f0" fo:font-family="'Courier New'" style:font-family-complex="'Courier New'" fo:font-size="9pt" style:font-size-complex="9pt" fo:language="en" style:language-complex="hi" fo:country="US" style:country-complex="IN"/>
    </style:style>
    <style:style style:family="text" style:name="T1967">
      <style:text-properties fo:color="#ffff00" fo:font-family="'Courier New'" style:font-family-complex="'Courier New'" fo:font-size="9pt" style:font-size-complex="9pt" fo:language="en" style:language-complex="hi" fo:country="US" style:country-complex="IN"/>
    </style:style>
    <style:style style:family="text" style:name="T1968">
      <style:text-properties fo:color="#00b050" fo:font-family="Liberation Serif" style:font-family-complex="Liberation Serif" fo:font-size="12pt" style:font-size-complex="12pt" fo:language="en" style:language-complex="en" fo:country="US" style:country-complex="US"/>
    </style:style>
    <style:style style:family="text" style:name="T1969">
      <style:text-properties fo:color="#000000" fo:font-family="Liberation Serif" style:font-family-complex="Liberation Serif" fo:font-size="12pt" style:font-size-complex="12pt" fo:language="en" style:language-complex="hi" fo:country="US" style:country-complex="IN"/>
    </style:style>
    <style:style style:parent-style-name="737" style:family="paragraph" style:name="P485">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970">
      <style:text-properties fo:color="#00b050" fo:font-family="'Courier New'" style:font-family-complex="'Courier New'" fo:font-size="9pt" style:font-size-complex="9pt" fo:language="en" style:language-complex="hi" fo:country="US" style:country-complex="IN"/>
    </style:style>
    <style:style style:family="text" style:name="T1971">
      <style:text-properties fo:color="#00b050" fo:font-family="Liberation Serif" style:font-family-complex="Liberation Serif" fo:font-size="12pt" style:font-size-complex="12pt" fo:language="en" style:language-complex="en" fo:country="US" style:country-complex="US"/>
    </style:style>
    <style:style style:family="text" style:name="T1972">
      <style:text-properties fo:color="#000000" fo:font-family="Liberation Serif" style:font-family-complex="Liberation Serif" fo:font-size="12pt" style:font-size-complex="12pt" fo:language="en" style:language-complex="hi" fo:country="US" style:country-complex="IN"/>
    </style:style>
    <style:style style:parent-style-name="737" style:family="paragraph" style:name="P486">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973">
      <style:text-properties fo:color="#00b050" fo:font-family="'Courier New'" style:font-family-complex="'Courier New'" fo:font-size="9pt" style:font-size-complex="9pt" fo:language="en" style:language-complex="hi" fo:country="US" style:country-complex="IN"/>
    </style:style>
    <style:style style:family="text" style:name="T1974">
      <style:text-properties fo:color="#00b050" fo:font-family="Liberation Serif" style:font-family-complex="Liberation Serif" fo:font-size="12pt" style:font-size-complex="12pt" fo:language="en" style:language-complex="en" fo:country="US" style:country-complex="US"/>
    </style:style>
    <style:style style:family="text" style:name="T1975">
      <style:text-properties fo:color="#000000" fo:font-family="Liberation Serif" style:font-family-complex="Liberation Serif" fo:font-size="12pt" style:font-size-complex="12pt" fo:language="en" style:language-complex="hi" fo:country="US" style:country-complex="IN"/>
    </style:style>
    <style:style style:parent-style-name="737" style:family="paragraph" style:name="P487">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976">
      <style:text-properties fo:color="#00b050" fo:font-family="'Courier New'" style:font-family-complex="'Courier New'" fo:font-size="9pt" style:font-size-complex="9pt" fo:language="en" style:language-complex="hi" fo:country="US" style:country-complex="IN"/>
    </style:style>
    <style:style style:family="text" style:name="T1977">
      <style:text-properties fo:color="#00b0f0" fo:font-family="'Courier New'" style:font-family-complex="'Courier New'" fo:font-size="9pt" style:font-size-complex="9pt" fo:language="en" style:language-complex="hi" fo:country="US" style:country-complex="IN"/>
    </style:style>
    <style:style style:family="text" style:name="T1978">
      <style:text-properties fo:color="#00b050" fo:font-family="Liberation Serif" style:font-family-complex="Liberation Serif" fo:font-size="12pt" style:font-size-complex="12pt" fo:language="en" style:language-complex="en" fo:country="US" style:country-complex="US"/>
    </style:style>
    <style:style style:family="text" style:name="T1979">
      <style:text-properties fo:color="#000000" fo:font-family="Liberation Serif" style:font-family-complex="Liberation Serif" fo:font-size="12pt" style:font-size-complex="12pt" fo:language="en" style:language-complex="hi" fo:country="US" style:country-complex="IN"/>
    </style:style>
    <style:style style:parent-style-name="737" style:family="paragraph" style:name="P488">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980">
      <style:text-properties fo:color="#00b050" fo:font-family="'Courier New'" style:font-family-complex="'Courier New'" fo:font-size="9pt" style:font-size-complex="9pt" fo:language="en" style:language-complex="hi" fo:country="US" style:country-complex="IN"/>
    </style:style>
    <style:style style:family="text" style:name="T1981">
      <style:text-properties fo:color="#00b050" fo:font-family="Liberation Serif" style:font-family-complex="Liberation Serif" fo:font-size="12pt" style:font-size-complex="12pt" fo:language="en" style:language-complex="en" fo:country="US" style:country-complex="US"/>
    </style:style>
    <style:style style:family="text" style:name="T1982">
      <style:text-properties fo:color="#000000" fo:font-family="Liberation Serif" style:font-family-complex="Liberation Serif" fo:font-size="12pt" style:font-size-complex="12pt" fo:language="en" style:language-complex="hi" fo:country="US" style:country-complex="IN"/>
    </style:style>
    <style:style style:parent-style-name="737" style:family="paragraph" style:name="P489">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983">
      <style:text-properties fo:color="#00b050" fo:font-family="'Courier New'" style:font-family-complex="'Courier New'" fo:font-size="9pt" style:font-size-complex="9pt" fo:language="en" style:language-complex="hi" fo:country="US" style:country-complex="IN"/>
    </style:style>
    <style:style style:family="text" style:name="T1984">
      <style:text-properties fo:color="#ffff00" fo:font-family="'Courier New'" style:font-family-complex="'Courier New'" fo:font-size="9pt" style:font-size-complex="9pt" fo:language="en" style:language-complex="hi" fo:country="US" style:country-complex="IN"/>
    </style:style>
    <style:style style:family="text" style:name="T1985">
      <style:text-properties fo:color="#00b0f0" fo:font-family="'Courier New'" style:font-family-complex="'Courier New'" fo:font-size="9pt" style:font-size-complex="9pt" fo:language="en" style:language-complex="hi" fo:country="US" style:country-complex="IN"/>
    </style:style>
    <style:style style:family="text" style:name="T1986">
      <style:text-properties fo:color="#ffff00" fo:font-family="'Courier New'" style:font-family-complex="'Courier New'" fo:font-size="9pt" style:font-size-complex="9pt" fo:language="en" style:language-complex="hi" fo:country="US" style:country-complex="IN"/>
    </style:style>
    <style:style style:family="text" style:name="T1987">
      <style:text-properties fo:color="#00b050" fo:font-family="Liberation Serif" style:font-family-complex="Liberation Serif" fo:font-size="12pt" style:font-size-complex="12pt" fo:language="en" style:language-complex="en" fo:country="US" style:country-complex="US"/>
    </style:style>
    <style:style style:family="text" style:name="T1988">
      <style:text-properties fo:color="#000000" fo:font-family="Liberation Serif" style:font-family-complex="Liberation Serif" fo:font-size="12pt" style:font-size-complex="12pt" fo:language="en" style:language-complex="hi" fo:country="US" style:country-complex="IN"/>
    </style:style>
    <style:style style:parent-style-name="737" style:family="paragraph" style:name="P490">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989">
      <style:text-properties fo:color="#00b050" fo:font-family="'Courier New'" style:font-family-complex="'Courier New'" fo:font-size="9pt" style:font-size-complex="9pt" fo:language="en" style:language-complex="hi" fo:country="US" style:country-complex="IN"/>
    </style:style>
    <style:style style:family="text" style:name="T1990">
      <style:text-properties fo:color="#00b0f0" fo:font-family="'Courier New'" style:font-family-complex="'Courier New'" fo:font-size="9pt" style:font-size-complex="9pt" fo:language="en" style:language-complex="hi" fo:country="US" style:country-complex="IN"/>
    </style:style>
    <style:style style:family="text" style:name="T1991">
      <style:text-properties fo:color="#00b050" fo:font-family="Liberation Serif" style:font-family-complex="Liberation Serif" fo:font-size="12pt" style:font-size-complex="12pt" fo:language="en" style:language-complex="en" fo:country="US" style:country-complex="US"/>
    </style:style>
    <style:style style:family="text" style:name="T1992">
      <style:text-properties fo:color="#000000" fo:font-family="Liberation Serif" style:font-family-complex="Liberation Serif" fo:font-size="12pt" style:font-size-complex="12pt" fo:language="en" style:language-complex="hi" fo:country="US" style:country-complex="IN"/>
    </style:style>
    <style:style style:parent-style-name="737" style:family="paragraph" style:name="P491">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993">
      <style:text-properties fo:color="#00b050" fo:font-family="'Courier New'" style:font-family-complex="'Courier New'" fo:font-size="9pt" style:font-size-complex="9pt" fo:language="en" style:language-complex="hi" fo:country="US" style:country-complex="IN"/>
    </style:style>
    <style:style style:family="text" style:name="T1994">
      <style:text-properties fo:color="#ffff00" fo:font-family="'Courier New'" style:font-family-complex="'Courier New'" fo:font-size="9pt" style:font-size-complex="9pt" fo:language="en" style:language-complex="hi" fo:country="US" style:country-complex="IN"/>
    </style:style>
    <style:style style:family="text" style:name="T1995">
      <style:text-properties fo:color="#00b0f0" fo:font-family="'Courier New'" style:font-family-complex="'Courier New'" fo:font-size="9pt" style:font-size-complex="9pt" fo:language="en" style:language-complex="hi" fo:country="US" style:country-complex="IN"/>
    </style:style>
    <style:style style:family="text" style:name="T1996">
      <style:text-properties fo:color="#ffff00" fo:font-family="'Courier New'" style:font-family-complex="'Courier New'" fo:font-size="9pt" style:font-size-complex="9pt" fo:language="en" style:language-complex="hi" fo:country="US" style:country-complex="IN"/>
    </style:style>
    <style:style style:family="text" style:name="T1997">
      <style:text-properties fo:color="#00b050" fo:font-family="Liberation Serif" style:font-family-complex="Liberation Serif" fo:font-size="12pt" style:font-size-complex="12pt" fo:language="en" style:language-complex="en" fo:country="US" style:country-complex="US"/>
    </style:style>
    <style:style style:family="text" style:name="T1998">
      <style:text-properties fo:color="#000000" fo:font-family="Liberation Serif" style:font-family-complex="Liberation Serif" fo:font-size="12pt" style:font-size-complex="12pt" fo:language="en" style:language-complex="hi" fo:country="US" style:country-complex="IN"/>
    </style:style>
    <style:style style:parent-style-name="737" style:family="paragraph" style:name="P492">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1999">
      <style:text-properties fo:color="#00b050" fo:font-family="'Courier New'" style:font-family-complex="'Courier New'" fo:font-size="9pt" style:font-size-complex="9pt" fo:language="en" style:language-complex="hi" fo:country="US" style:country-complex="IN"/>
    </style:style>
    <style:style style:family="text" style:name="T2000">
      <style:text-properties fo:color="#00b0f0" fo:font-family="'Courier New'" style:font-family-complex="'Courier New'" fo:font-size="9pt" style:font-size-complex="9pt" fo:language="en" style:language-complex="hi" fo:country="US" style:country-complex="IN"/>
    </style:style>
    <style:style style:family="text" style:name="T2001">
      <style:text-properties fo:color="#00b050" fo:font-family="Liberation Serif" style:font-family-complex="Liberation Serif" fo:font-size="12pt" style:font-size-complex="12pt" fo:language="en" style:language-complex="en" fo:country="US" style:country-complex="US"/>
    </style:style>
    <style:style style:family="text" style:name="T2002">
      <style:text-properties fo:color="#000000" fo:font-family="Liberation Serif" style:font-family-complex="Liberation Serif" fo:font-size="12pt" style:font-size-complex="12pt" fo:language="en" style:language-complex="hi" fo:country="US" style:country-complex="IN"/>
    </style:style>
    <style:style style:parent-style-name="737" style:family="paragraph" style:name="P493">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2003">
      <style:text-properties fo:color="#00b050" fo:font-family="'Courier New'" style:font-family-complex="'Courier New'" fo:font-size="9pt" style:font-size-complex="9pt" fo:language="en" style:language-complex="hi" fo:country="US" style:country-complex="IN"/>
    </style:style>
    <style:style style:family="text" style:name="T2004">
      <style:text-properties fo:color="#00b0f0" fo:font-family="'Courier New'" style:font-family-complex="'Courier New'" fo:font-size="9pt" style:font-size-complex="9pt" fo:language="en" style:language-complex="hi" fo:country="US" style:country-complex="IN"/>
    </style:style>
    <style:style style:family="text" style:name="T2005">
      <style:text-properties fo:color="#00b050" fo:font-family="Liberation Serif" style:font-family-complex="Liberation Serif" fo:font-size="12pt" style:font-size-complex="12pt" fo:language="en" style:language-complex="en" fo:country="US" style:country-complex="US"/>
    </style:style>
    <style:style style:family="text" style:name="T2006">
      <style:text-properties fo:color="#000000" fo:font-family="Liberation Serif" style:font-family-complex="Liberation Serif" fo:font-size="12pt" style:font-size-complex="12pt" fo:language="en" style:language-complex="hi" fo:country="US" style:country-complex="IN"/>
    </style:style>
    <style:style style:parent-style-name="737" style:family="paragraph" style:name="P494">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2007">
      <style:text-properties fo:color="#00b050" fo:font-family="'Courier New'" style:font-family-complex="'Courier New'" fo:font-size="9pt" style:font-size-complex="9pt" fo:language="en" style:language-complex="hi" fo:country="US" style:country-complex="IN"/>
    </style:style>
    <style:style style:family="text" style:name="T2008">
      <style:text-properties fo:color="#00b0f0" fo:font-family="'Courier New'" style:font-family-complex="'Courier New'" fo:font-size="9pt" style:font-size-complex="9pt" fo:language="en" style:language-complex="hi" fo:country="US" style:country-complex="IN"/>
    </style:style>
    <style:style style:family="text" style:name="T2009">
      <style:text-properties fo:color="#00b050" fo:font-family="Liberation Serif" style:font-family-complex="Liberation Serif" fo:font-size="12pt" style:font-size-complex="12pt" fo:language="en" style:language-complex="en" fo:country="US" style:country-complex="US"/>
    </style:style>
    <style:style style:family="text" style:name="T2010">
      <style:text-properties fo:color="#000000" fo:font-family="Liberation Serif" style:font-family-complex="Liberation Serif" fo:font-size="12pt" style:font-size-complex="12pt" fo:language="en" style:language-complex="hi" fo:country="US" style:country-complex="IN"/>
    </style:style>
    <style:style style:parent-style-name="747" style:family="paragraph" style:name="P495">
      <style:paragraph-properties fo:margin-left="0cm" fo:margin-right="0cm" fo:text-indent="0cm"/>
      <style:text-properties fo:color="#000000" fo:font-family="Liberation Sans" style:font-family-complex="Liberation Sans" fo:font-size="16pt" style:font-size-complex="16pt" fo:language="de" style:language-complex="hi" fo:country="DE" style:country-complex="IN" fo:font-weight="bold"/>
    </style:style>
    <style:style style:family="text" style:name="T2011">
      <style:text-properties fo:color="#000000" fo:font-family="Liberation Sans" style:font-family-complex="Liberation Sans" fo:font-size="16pt" style:font-size-complex="16pt" fo:language="de" style:language-complex="hi" fo:country="DE" style:country-complex="IN" fo:font-weight="bold"/>
    </style:style>
    <style:style style:family="text" style:name="T2012">
      <style:text-properties fo:color="#000000" fo:font-family="Liberation Sans" style:font-family-complex="Liberation Sans" fo:font-size="16pt" style:font-size-complex="16pt" fo:language="de" style:language-complex="hi" fo:country="DE" style:country-complex="IN" fo:font-weight="bold"/>
    </style:style>
    <style:style style:family="text" style:name="T2013">
      <style:text-properties fo:color="#000000" fo:font-family="Liberation Sans" style:font-family-complex="Liberation Sans" fo:font-size="16pt" style:font-size-complex="16pt" fo:language="de" style:language-complex="hi" fo:country="DE" style:country-complex="IN" fo:font-weight="bold"/>
    </style:style>
    <style:style style:family="text" style:name="T2014">
      <style:text-properties fo:color="#000000" fo:font-family="Liberation Sans" style:font-family-complex="Liberation Sans" fo:font-size="16pt" style:font-size-complex="16pt" fo:language="de" style:language-complex="hi" fo:country="DE" style:country-complex="IN" fo:font-weight="bold"/>
    </style:style>
    <style:style style:family="text" style:name="T2015">
      <style:text-properties fo:color="#000000" fo:font-family="Liberation Sans" style:font-family-complex="Liberation Sans" fo:font-size="16pt" style:font-size-complex="16pt" fo:language="de" style:language-complex="hi" fo:country="DE" style:country-complex="IN" fo:font-weight="bold"/>
    </style:style>
    <style:style style:parent-style-name="737" style:family="paragraph" style:name="P496">
      <style:paragraph-properties fo:margin-left="0cm" fo:margin-right="0cm" fo:text-indent="0cm" fo:margin-top="3pt" fo:margin-bottom="3pt"/>
      <style:text-properties fo:color="#000000" fo:font-family="Liberation Serif" style:font-family-complex="Liberation Serif" fo:font-size="12pt" style:font-size-complex="12pt" fo:language="de" style:language-complex="hi" fo:country="DE" style:country-complex="IN"/>
    </style:style>
    <style:style style:family="text" style:name="T2016">
      <style:text-properties fo:color="#000000" fo:font-family="Liberation Serif" style:font-family-complex="Liberation Serif" fo:font-size="12pt" style:font-size-complex="12pt" fo:language="de" style:language-complex="hi" fo:country="DE" style:country-complex="IN"/>
    </style:style>
    <style:style style:family="text" style:name="T2017">
      <style:text-properties fo:color="#000000" fo:font-family="Liberation Serif" style:font-family-complex="Liberation Serif" fo:font-size="12pt" style:font-size-complex="12pt" fo:language="de" style:language-complex="hi" fo:country="DE" style:country-complex="IN"/>
    </style:style>
    <style:style style:family="text" style:name="T2018">
      <style:text-properties fo:color="#000000" fo:font-family="Liberation Serif" style:font-family-complex="Liberation Serif" fo:font-size="12pt" style:font-size-complex="12pt" fo:language="de" style:language-complex="hi" fo:country="DE" style:country-complex="IN"/>
    </style:style>
    <style:style style:family="text" style:name="T2019">
      <style:text-properties fo:color="#000000" fo:font-family="Liberation Serif" style:font-family-complex="Liberation Serif" fo:font-size="12pt" style:font-size-complex="12pt" fo:language="de" style:language-complex="hi" fo:country="DE" style:country-complex="IN"/>
    </style:style>
    <style:style style:family="text" style:name="T2020">
      <style:text-properties fo:color="#000000" fo:font-family="Liberation Serif" style:font-family-complex="Liberation Serif" fo:font-size="12pt" style:font-size-complex="12pt" fo:language="de" style:language-complex="hi" fo:country="DE" style:country-complex="IN"/>
    </style:style>
    <style:style style:family="text" style:name="T2021">
      <style:text-properties fo:color="#000000" fo:font-family="Liberation Serif" style:font-family-complex="Liberation Serif" fo:font-size="12pt" style:font-size-complex="12pt" fo:language="de" style:language-complex="hi" fo:country="DE" style:country-complex="IN"/>
    </style:style>
    <style:style style:family="text" style:name="T2022">
      <style:text-properties fo:color="#000000" fo:font-family="Liberation Serif" style:font-family-complex="Liberation Serif" fo:font-size="12pt" style:font-size-complex="12pt" fo:language="de" style:language-complex="hi" fo:country="DE" style:country-complex="IN"/>
    </style:style>
    <style:style style:family="text" style:name="T2023">
      <style:text-properties fo:color="#000000" fo:font-family="Liberation Serif" style:font-family-complex="Liberation Serif" fo:font-size="12pt" style:font-size-complex="12pt" fo:language="de" style:language-complex="hi" fo:country="DE" style:country-complex="IN"/>
    </style:style>
    <style:style style:parent-style-name="747" style:family="paragraph" style:name="P497">
      <style:paragraph-properties fo:margin-left="0cm" fo:margin-right="0cm" fo:text-indent="0cm"/>
      <style:text-properties fo:color="#000000" fo:font-family="Liberation Sans" style:font-family-complex="Liberation Sans" fo:font-size="16pt" style:font-size-complex="16pt" fo:language="de" style:language-complex="hi" fo:country="DE" style:country-complex="IN" fo:font-weight="bold"/>
    </style:style>
    <style:style style:family="text" style:name="T2024">
      <style:text-properties fo:color="#000000" fo:font-family="Liberation Sans" style:font-family-complex="Liberation Sans" fo:font-size="16pt" style:font-size-complex="16pt" fo:language="de" style:language-complex="hi" fo:country="DE" style:country-complex="IN" fo:font-weight="bold"/>
    </style:style>
    <style:style style:family="text" style:name="T2025">
      <style:text-properties fo:color="#000000" fo:font-family="Liberation Sans" style:font-family-complex="Liberation Sans" fo:font-size="16pt" style:font-size-complex="16pt" fo:language="de" style:language-complex="hi" fo:country="DE" style:country-complex="IN" fo:font-weight="bold"/>
    </style:style>
    <style:style style:family="text" style:name="T2026">
      <style:text-properties fo:color="#000000" fo:font-family="Liberation Sans" style:font-family-complex="Liberation Sans" fo:font-size="16pt" style:font-size-complex="16pt" fo:language="de" style:language-complex="hi" fo:country="DE" style:country-complex="IN" fo:font-weight="bold"/>
    </style:style>
    <style:style style:family="text" style:name="T2027">
      <style:text-properties fo:color="#000000" fo:font-family="Liberation Sans" style:font-family-complex="Liberation Sans" fo:font-size="16pt" style:font-size-complex="16pt" fo:language="de" style:language-complex="hi" fo:country="DE" style:country-complex="IN" fo:font-weight="bold"/>
    </style:style>
    <style:style style:family="text" style:name="T2028">
      <style:text-properties fo:color="#000000" fo:font-family="Liberation Sans" style:font-family-complex="Liberation Sans" fo:font-size="16pt" style:font-size-complex="16pt" fo:language="de" style:language-complex="hi" fo:country="DE" style:country-complex="IN" fo:font-weight="bold"/>
    </style:style>
    <style:style style:parent-style-name="737" style:family="paragraph" style:name="P498">
      <style:paragraph-properties fo:margin-left="0cm" fo:margin-right="0cm" fo:text-indent="0cm" fo:margin-top="3pt" fo:margin-bottom="3pt"/>
      <style:text-properties fo:color="#000000" fo:font-family="Liberation Serif" style:font-family-complex="Liberation Serif" fo:font-size="12pt" style:font-size-complex="12pt" fo:language="de" style:language-complex="hi" fo:country="DE" style:country-complex="IN"/>
    </style:style>
    <style:style style:family="text" style:name="T2029">
      <style:text-properties fo:color="#000000" fo:font-family="Liberation Serif" style:font-family-complex="Liberation Serif" fo:font-size="12pt" style:font-size-complex="12pt" fo:language="de" style:language-complex="hi" fo:country="DE" style:country-complex="IN"/>
    </style:style>
    <style:style style:family="text" style:name="T2030">
      <style:text-properties fo:color="#000000" fo:font-family="Liberation Serif" style:font-family-complex="Liberation Serif" fo:font-size="12pt" style:font-size-complex="12pt" fo:language="de" style:language-complex="hi" fo:country="DE" style:country-complex="IN"/>
    </style:style>
    <style:style style:family="text" style:name="T2031">
      <style:text-properties fo:color="#000000" fo:font-family="Liberation Serif" style:font-family-complex="Liberation Serif" fo:font-size="12pt" style:font-size-complex="12pt" fo:language="de" style:language-complex="hi" fo:country="DE" style:country-complex="IN"/>
    </style:style>
    <style:style style:family="text" style:name="T2032">
      <style:text-properties fo:color="#000000" fo:font-family="Liberation Serif" style:font-family-complex="Liberation Serif" fo:font-size="12pt" style:font-size-complex="12pt" fo:language="de" style:language-complex="hi" fo:country="DE" style:country-complex="IN"/>
    </style:style>
    <style:style style:parent-style-name="747" style:family="paragraph" style:name="P499">
      <style:paragraph-properties fo:margin-left="0cm" fo:margin-right="0cm" fo:text-indent="0cm"/>
      <style:text-properties fo:color="#000000" fo:font-family="Liberation Sans" style:font-family-complex="Liberation Sans" fo:font-size="16pt" style:font-size-complex="16pt" fo:language="de" style:language-complex="hi" fo:country="DE" style:country-complex="IN" fo:font-weight="bold"/>
    </style:style>
    <style:style style:family="text" style:name="T2033">
      <style:text-properties fo:color="#000000" fo:font-family="Liberation Sans" style:font-family-complex="Liberation Sans" fo:font-size="16pt" style:font-size-complex="16pt" fo:language="de" style:language-complex="hi" fo:country="DE" style:country-complex="IN" fo:font-weight="bold"/>
    </style:style>
    <style:style style:family="text" style:name="T2034">
      <style:text-properties fo:color="#000000" fo:font-family="Liberation Sans" style:font-family-complex="Liberation Sans" fo:font-size="16pt" style:font-size-complex="16pt" fo:language="de" style:language-complex="hi" fo:country="DE" style:country-complex="IN" fo:font-weight="bold"/>
    </style:style>
    <style:style style:family="text" style:name="T2035">
      <style:text-properties fo:color="#000000" fo:font-family="Liberation Sans" style:font-family-complex="Liberation Sans" fo:font-size="16pt" style:font-size-complex="16pt" fo:language="de" style:language-complex="hi" fo:country="DE" style:country-complex="IN" fo:font-weight="bold"/>
    </style:style>
    <style:style style:family="text" style:name="T2036">
      <style:text-properties fo:color="#000000" fo:font-family="Liberation Sans" style:font-family-complex="Liberation Sans" fo:font-size="16pt" style:font-size-complex="16pt" fo:language="de" style:language-complex="hi" fo:country="DE" style:country-complex="IN" fo:font-weight="bold"/>
    </style:style>
    <style:style style:family="text" style:name="T2037">
      <style:text-properties fo:color="#000000" fo:font-family="Liberation Sans" style:font-family-complex="Liberation Sans" fo:font-size="16pt" style:font-size-complex="16pt" fo:language="de" style:language-complex="hi" fo:country="DE" style:country-complex="IN" fo:font-weight="bold"/>
    </style:style>
    <style:style style:parent-style-name="737" style:family="paragraph" style:name="P500">
      <style:paragraph-properties fo:margin-left="0cm" fo:margin-right="0cm" fo:text-indent="0cm" fo:margin-top="3pt" fo:margin-bottom="3pt"/>
      <style:text-properties fo:color="#000000" fo:font-family="Liberation Serif" style:font-family-complex="Liberation Serif" fo:font-size="12pt" style:font-size-complex="12pt" fo:language="de" style:language-complex="hi" fo:country="DE" style:country-complex="IN"/>
    </style:style>
    <style:style style:family="text" style:name="T2038">
      <style:text-properties fo:color="#000000" fo:font-family="Liberation Serif" style:font-family-complex="Liberation Serif" fo:font-size="12pt" style:font-size-complex="12pt" fo:language="de" style:language-complex="hi" fo:country="DE" style:country-complex="IN"/>
    </style:style>
    <style:style style:family="text" style:name="T2039">
      <style:text-properties fo:color="#000000" fo:font-family="Liberation Serif" style:font-family-complex="Liberation Serif" fo:font-size="12pt" style:font-size-complex="12pt" fo:language="de" style:language-complex="hi" fo:country="DE" style:country-complex="IN"/>
    </style:style>
    <style:style style:family="text" style:name="T2040">
      <style:text-properties fo:color="#000000" fo:font-family="Liberation Serif" style:font-family-complex="Liberation Serif" fo:font-size="12pt" style:font-size-complex="12pt" fo:language="de" style:language-complex="hi" fo:country="DE" style:country-complex="IN"/>
    </style:style>
    <style:style style:parent-style-name="746" style:list-style-name="WWNum1" style:family="paragraph" style:name="P501">
      <style:paragraph-properties fo:margin-left="1.27cm" fo:margin-right="0cm" fo:text-indent="-0.635cm" fo:margin-top="2pt" fo:margin-bottom="2pt"/>
      <style:text-properties fo:color="#000000" fo:font-family="Arial" style:font-family-complex="Arial" fo:font-size="11pt" style:font-size-complex="11pt" fo:language="de" style:language-complex="ar" fo:country="DE" style:country-complex="SA"/>
    </style:style>
    <style:style style:family="text" style:name="T2041">
      <style:text-properties fo:color="#000000" fo:font-family="Arial" style:font-family-complex="Arial" fo:font-size="11pt" style:font-size-complex="11pt" fo:language="de" style:language-complex="ar" fo:country="DE" style:country-complex="SA"/>
    </style:style>
    <style:style style:family="text" style:name="T2042">
      <style:text-properties fo:color="#000000" fo:font-family="Arial" style:font-family-complex="Arial" fo:font-size="11pt" style:font-size-complex="11pt" fo:language="de" style:language-complex="ar" fo:country="DE" style:country-complex="SA"/>
    </style:style>
    <style:style style:family="text" style:name="T2043">
      <style:text-properties fo:color="#000000" fo:font-family="Arial" style:font-family-complex="Arial" fo:font-size="11pt" style:font-size-complex="11pt" fo:language="de" style:language-complex="ar" fo:country="DE" style:country-complex="SA"/>
    </style:style>
    <style:style style:parent-style-name="746" style:list-style-name="WWNum1" style:family="paragraph" style:name="P502">
      <style:paragraph-properties fo:margin-left="1.27cm" fo:margin-right="0cm" fo:text-indent="-0.635cm" fo:margin-top="2pt" fo:margin-bottom="2pt"/>
      <style:text-properties fo:color="#000000" fo:font-family="Arial" style:font-family-complex="Arial" fo:font-size="11pt" style:font-size-complex="11pt" fo:language="de" style:language-complex="ar" fo:country="DE" style:country-complex="SA"/>
    </style:style>
    <style:style style:family="text" style:name="T2044">
      <style:text-properties fo:color="#000000" fo:font-family="Arial" style:font-family-complex="Arial" fo:font-size="11pt" style:font-size-complex="11pt" fo:language="de" style:language-complex="ar" fo:country="DE" style:country-complex="SA"/>
    </style:style>
    <style:style style:family="text" style:name="T2045">
      <style:text-properties fo:color="#000000" fo:font-family="Arial" style:font-family-complex="Arial" fo:font-size="11pt" style:font-size-complex="11pt" fo:language="de" style:language-complex="ar" fo:country="DE" style:country-complex="SA"/>
    </style:style>
    <style:style style:family="text" style:name="T2046">
      <style:text-properties fo:color="#000000" fo:font-family="Arial" style:font-family-complex="Arial" fo:font-size="11pt" style:font-size-complex="11pt" fo:language="de" style:language-complex="ar" fo:country="DE" style:country-complex="SA"/>
    </style:style>
    <style:style style:parent-style-name="746" style:list-style-name="WWNum1" style:family="paragraph" style:name="P503">
      <style:paragraph-properties fo:margin-left="1.27cm" fo:margin-right="0cm" fo:text-indent="-0.635cm" fo:margin-top="2pt" fo:margin-bottom="2pt"/>
      <style:text-properties fo:color="#000000" fo:font-family="Arial" style:font-family-complex="Arial" fo:font-size="11pt" style:font-size-complex="11pt" fo:language="de" style:language-complex="ar" fo:country="DE" style:country-complex="SA"/>
    </style:style>
    <style:style style:family="text" style:name="T2047">
      <style:text-properties fo:color="#000000" fo:font-family="Arial" style:font-family-complex="Arial" fo:font-size="11pt" style:font-size-complex="11pt" fo:language="de" style:language-complex="ar" fo:country="DE" style:country-complex="SA"/>
    </style:style>
    <style:style style:family="text" style:name="T2048">
      <style:text-properties fo:color="#000000" fo:font-family="Arial" style:font-family-complex="Arial" fo:font-size="11pt" style:font-size-complex="11pt" fo:language="de" style:language-complex="ar" fo:country="DE" style:country-complex="SA"/>
    </style:style>
    <style:style style:family="text" style:name="T2049">
      <style:text-properties fo:color="#000000" fo:font-family="Arial" style:font-family-complex="Arial" fo:font-size="11pt" style:font-size-complex="11pt" fo:language="de" style:language-complex="ar" fo:country="DE" style:country-complex="SA"/>
    </style:style>
    <style:style style:parent-style-name="746" style:list-style-name="WWNum1" style:family="paragraph" style:name="P504">
      <style:paragraph-properties fo:margin-left="1.27cm" fo:margin-right="0cm" fo:text-indent="-0.635cm" fo:margin-top="2pt" fo:margin-bottom="2pt"/>
      <style:text-properties fo:color="#000000" fo:font-family="Arial" style:font-family-complex="Arial" fo:font-size="11pt" style:font-size-complex="11pt" fo:language="de" style:language-complex="ar" fo:country="DE" style:country-complex="SA"/>
    </style:style>
    <style:style style:family="text" style:name="T2050">
      <style:text-properties fo:color="#000000" fo:font-family="Arial" style:font-family-complex="Arial" fo:font-size="11pt" style:font-size-complex="11pt" fo:language="de" style:language-complex="ar" fo:country="DE" style:country-complex="SA"/>
    </style:style>
    <style:style style:family="text" style:name="T2051">
      <style:text-properties fo:color="#000000" fo:font-family="Arial" style:font-family-complex="Arial" fo:font-size="11pt" style:font-size-complex="11pt" fo:language="de" style:language-complex="ar" fo:country="DE" style:country-complex="SA"/>
    </style:style>
    <style:style style:family="text" style:name="T2052">
      <style:text-properties fo:color="#000000" fo:font-family="Arial" style:font-family-complex="Arial" fo:font-size="11pt" style:font-size-complex="11pt" fo:language="de" style:language-complex="ar" fo:country="DE" style:country-complex="SA"/>
    </style:style>
    <style:style style:parent-style-name="737" style:family="paragraph" style:name="P505">
      <style:paragraph-properties fo:margin-left="0cm" fo:margin-right="0cm" fo:text-indent="0cm" fo:margin-top="3pt" fo:margin-bottom="3pt"/>
      <style:text-properties fo:color="#000000" fo:font-family="Liberation Serif" style:font-family-complex="Liberation Serif" fo:font-size="12pt" style:font-size-complex="12pt" fo:language="de" style:language-complex="hi" fo:country="DE" style:country-complex="IN"/>
    </style:style>
    <style:style style:family="text" style:name="T2053">
      <style:text-properties fo:color="#000000" fo:font-family="Liberation Serif" style:font-family-complex="Liberation Serif" fo:font-size="12pt" style:font-size-complex="12pt" fo:language="de" style:language-complex="hi" fo:country="DE" style:country-complex="IN"/>
    </style:style>
    <style:style style:family="text" style:name="T2054">
      <style:text-properties fo:color="#000000" fo:font-family="Liberation Serif" style:font-family-complex="Liberation Serif" fo:font-size="12pt" style:font-size-complex="12pt" fo:language="de" style:language-complex="hi" fo:country="DE" style:country-complex="IN"/>
    </style:style>
    <style:style style:family="text" style:name="T2055">
      <style:text-properties fo:color="#000000" fo:font-family="Liberation Serif" style:font-family-complex="Liberation Serif" fo:font-size="12pt" style:font-size-complex="12pt" fo:language="de" style:language-complex="hi" fo:country="DE" style:country-complex="IN"/>
    </style:style>
    <style:style style:parent-style-name="737" style:family="paragraph" style:name="P506">
      <style:paragraph-properties fo:margin-left="0cm" fo:margin-right="0cm" fo:text-indent="0cm" fo:margin-top="3pt" fo:margin-bottom="3pt"/>
      <style:text-properties fo:color="#000000" fo:font-family="Liberation Serif" style:font-family-complex="Liberation Serif" fo:font-size="12pt" style:font-size-complex="12pt" fo:language="de" style:language-complex="hi" fo:country="DE" style:country-complex="IN"/>
    </style:style>
    <style:style style:family="text" style:name="T2056">
      <style:text-properties fo:color="#000000" fo:font-family="Liberation Serif" style:font-family-complex="Liberation Serif" fo:font-size="12pt" style:font-size-complex="12pt" fo:language="de" style:language-complex="hi" fo:country="DE" style:country-complex="IN"/>
    </style:style>
    <style:style style:family="text" style:name="T2057">
      <style:text-properties fo:color="#000000" fo:font-family="Liberation Serif" style:font-family-complex="Liberation Serif" fo:font-size="12pt" style:font-size-complex="12pt" fo:language="de" style:language-complex="hi" fo:country="DE" style:country-complex="IN"/>
    </style:style>
    <style:style style:family="text" style:name="T2058">
      <style:text-properties fo:color="#000000" fo:font-family="Liberation Serif" style:font-family-complex="Liberation Serif" fo:font-size="12pt" style:font-size-complex="12pt" fo:language="de" style:language-complex="hi" fo:country="DE" style:country-complex="IN"/>
    </style:style>
    <style:style style:parent-style-name="737" style:family="paragraph" style:name="P507">
      <style:paragraph-properties fo:margin-left="0cm" fo:margin-right="0cm" fo:text-indent="0cm" fo:margin-top="3pt" fo:margin-bottom="3pt"/>
      <style:text-properties fo:color="#000000" fo:font-family="Liberation Serif" style:font-family-complex="Liberation Serif" fo:font-size="12pt" style:font-size-complex="12pt" fo:language="de" style:language-complex="hi" fo:country="DE" style:country-complex="IN"/>
    </style:style>
    <style:style style:family="text" style:name="T2059">
      <style:text-properties fo:color="#000000" fo:font-family="Liberation Serif" style:font-family-complex="Liberation Serif" fo:font-size="12pt" style:font-size-complex="12pt" fo:language="de" style:language-complex="hi" fo:country="DE" style:country-complex="IN"/>
    </style:style>
    <style:style style:family="text" style:name="T2060">
      <style:text-properties fo:color="#000000" fo:font-family="Liberation Serif" style:font-family-complex="Liberation Serif" fo:font-size="12pt" style:font-size-complex="12pt" fo:language="de" style:language-complex="hi" fo:country="DE" style:country-complex="IN"/>
    </style:style>
    <style:style style:family="text" style:name="T2061">
      <style:text-properties fo:color="#000000" fo:font-family="Liberation Serif" style:font-family-complex="Liberation Serif" fo:font-size="12pt" style:font-size-complex="12pt" fo:language="de" style:language-complex="hi" fo:country="DE" style:country-complex="IN"/>
    </style:style>
    <style:style style:parent-style-name="737" style:family="paragraph" style:name="P508">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2062">
      <style:text-properties fo:color="#000000" fo:font-family="Liberation Serif" style:font-family-complex="Liberation Serif" fo:font-size="12pt" style:font-size-complex="12pt" fo:language="de" style:language-complex="hi" fo:country="DE" style:country-complex="IN"/>
    </style:style>
    <style:style style:family="text" style:name="T2063">
      <style:text-properties fo:color="#000000" fo:font-family="Liberation Serif" style:font-family-complex="Liberation Serif" fo:font-size="12pt" style:font-size-complex="12pt" fo:language="de" style:language-complex="hi" fo:country="DE" style:country-complex="IN"/>
    </style:style>
    <style:style style:family="text" style:name="T2064">
      <style:text-properties fo:color="#000000" fo:font-family="Liberation Serif" style:font-family-complex="Liberation Serif" fo:font-size="12pt" style:font-size-complex="12pt" fo:language="de" style:language-complex="hi" fo:country="DE" style:country-complex="IN"/>
    </style:style>
    <style:style style:parent-style-name="749" style:master-page-name="MasterPage12" style:family="paragraph" style:name="P509">
      <style:paragraph-properties fo:margin-left="0cm" fo:margin-right="0cm" fo:text-indent="0cm" fo:margin-top="0pt" fo:margin-bottom="6pt" fo:break-before="page"/>
      <style:text-properties fo:color="#000000" fo:font-family="Liberation Sans" style:font-family-complex="Liberation Sans" fo:font-size="18pt" style:font-size-complex="18pt" fo:language="de" style:language-complex="hi" fo:country="DE" style:country-complex="IN" fo:font-weight="bold"/>
    </style:style>
    <style:style style:family="text" style:name="T2065">
      <style:text-properties fo:color="#000000" fo:font-family="Liberation Sans" style:font-family-complex="Liberation Sans" fo:font-size="18pt" style:font-size-complex="18pt" fo:language="de" style:language-complex="hi" fo:country="DE" style:country-complex="IN" fo:font-weight="bold"/>
    </style:style>
    <style:style style:family="text" style:name="T2066">
      <style:text-properties fo:color="#000000" fo:font-family="Liberation Sans" style:font-family-complex="Liberation Sans" fo:font-size="18pt" style:font-size-complex="18pt" fo:language="de" style:language-complex="hi" fo:country="DE" style:country-complex="IN" fo:font-weight="bold"/>
    </style:style>
    <style:style style:family="text" style:name="T2067">
      <style:text-properties fo:color="#000000" fo:font-family="Liberation Sans" style:font-family-complex="Liberation Sans" fo:font-size="18pt" style:font-size-complex="18pt" fo:language="de" style:language-complex="hi" fo:country="DE" style:country-complex="IN" fo:font-weight="bold"/>
    </style:style>
    <style:style style:family="text" style:name="T2068">
      <style:text-properties fo:color="#000000" fo:font-family="Liberation Sans" style:font-family-complex="Liberation Sans" fo:font-size="18pt" style:font-size-complex="18pt" fo:language="de" style:language-complex="hi" fo:country="DE" style:country-complex="IN" fo:font-weight="bold"/>
    </style:style>
    <style:style style:family="text" style:name="T2069">
      <style:text-properties fo:color="#000000" fo:font-family="Liberation Sans" style:font-family-complex="Liberation Sans" fo:font-size="18pt" style:font-size-complex="18pt" fo:language="de" style:language-complex="hi" fo:country="DE" style:country-complex="IN" fo:font-weight="bold"/>
    </style:style>
    <style:style style:parent-style-name="747" style:family="paragraph" style:name="P510">
      <style:paragraph-properties fo:margin-left="0cm" fo:margin-right="0cm" fo:text-indent="0cm"/>
      <style:text-properties fo:color="#000000" fo:font-family="Liberation Sans" style:font-family-complex="Liberation Sans" fo:font-size="16pt" style:font-size-complex="16pt" fo:language="de" style:language-complex="hi" fo:country="DE" style:country-complex="IN" fo:font-weight="bold"/>
    </style:style>
    <style:style style:family="text" style:name="T2070">
      <style:text-properties fo:color="#000000" fo:font-family="Liberation Sans" style:font-family-complex="Liberation Sans" fo:font-size="16pt" style:font-size-complex="16pt" fo:language="de" style:language-complex="hi" fo:country="DE" style:country-complex="IN" fo:font-weight="bold"/>
    </style:style>
    <style:style style:family="text" style:name="T2071">
      <style:text-properties fo:color="#000000" fo:font-family="Liberation Sans" style:font-family-complex="Liberation Sans" fo:font-size="16pt" style:font-size-complex="16pt" fo:language="de" style:language-complex="hi" fo:country="DE" style:country-complex="IN" fo:font-weight="bold"/>
    </style:style>
    <style:style style:family="text" style:name="T2072">
      <style:text-properties fo:color="#000000" fo:font-family="Liberation Sans" style:font-family-complex="Liberation Sans" fo:font-size="16pt" style:font-size-complex="16pt" fo:language="de" style:language-complex="hi" fo:country="DE" style:country-complex="IN" fo:font-weight="bold"/>
    </style:style>
    <style:style style:family="text" style:name="T2073">
      <style:text-properties fo:color="#000000" fo:font-family="Liberation Sans" style:font-family-complex="Liberation Sans" fo:font-size="16pt" style:font-size-complex="16pt" fo:language="de" style:language-complex="hi" fo:country="DE" style:country-complex="IN" fo:font-weight="bold"/>
    </style:style>
    <style:style style:family="text" style:name="T2074">
      <style:text-properties fo:color="#000000" fo:font-family="Liberation Sans" style:font-family-complex="Liberation Sans" fo:font-size="16pt" style:font-size-complex="16pt" fo:language="de" style:language-complex="hi" fo:country="DE" style:country-complex="IN" fo:font-weight="bold"/>
    </style:style>
    <style:style style:parent-style-name="737" style:family="paragraph" style:name="P511">
      <style:paragraph-properties fo:margin-left="0cm" fo:margin-right="0cm" fo:text-indent="0cm" fo:margin-top="3pt" fo:margin-bottom="3pt"/>
      <style:text-properties fo:color="#000000" fo:font-family="Liberation Serif" style:font-family-complex="Liberation Serif" fo:font-size="12pt" style:font-size-complex="12pt" fo:language="de" style:language-complex="hi" fo:country="DE" style:country-complex="IN"/>
    </style:style>
    <style:style style:family="text" style:name="T2075">
      <style:text-properties fo:color="#000000" fo:font-family="Liberation Serif" style:font-family-complex="Liberation Serif" fo:font-size="12pt" style:font-size-complex="12pt" fo:language="de" style:language-complex="hi" fo:country="DE" style:country-complex="IN"/>
    </style:style>
    <style:style style:family="text" style:name="T2076">
      <style:text-properties fo:color="#000000" fo:font-family="Liberation Serif" style:font-family-complex="Liberation Serif" fo:font-size="12pt" style:font-size-complex="12pt" fo:language="de" style:language-complex="hi" fo:country="DE" style:country-complex="IN"/>
    </style:style>
    <style:style style:family="text" style:name="T2077">
      <style:text-properties fo:color="#000000" fo:font-family="Liberation Serif" style:font-family-complex="Liberation Serif" fo:font-size="12pt" style:font-size-complex="12pt" fo:language="de" style:language-complex="hi" fo:country="DE" style:country-complex="IN"/>
    </style:style>
    <style:style style:parent-style-name="737" style:family="paragraph" style:name="P512">
      <style:paragraph-properties fo:margin-left="0cm" fo:margin-right="0cm" fo:text-indent="0cm" fo:margin-top="3pt" fo:margin-bottom="3pt"/>
      <style:text-properties fo:color="#000000" fo:font-family="Liberation Serif" style:font-family-complex="Liberation Serif" fo:font-size="12pt" style:font-size-complex="12pt" fo:language="de" style:language-complex="hi" fo:country="DE" style:country-complex="IN"/>
    </style:style>
    <style:style style:family="text" style:name="T2078">
      <style:text-properties fo:color="#000000" fo:font-family="Liberation Serif" style:font-family-complex="Liberation Serif" fo:font-size="12pt" style:font-size-complex="12pt" fo:language="de" style:language-complex="hi" fo:country="DE" style:country-complex="IN"/>
    </style:style>
    <style:style style:family="text" style:name="T2079">
      <style:text-properties fo:color="#000000" fo:font-family="Liberation Serif" style:font-family-complex="Liberation Serif" fo:font-size="12pt" style:font-size-complex="12pt" fo:language="de" style:language-complex="hi" fo:country="DE" style:country-complex="IN"/>
    </style:style>
    <style:style style:family="text" style:name="T2080">
      <style:text-properties fo:color="#000000" fo:font-family="Liberation Serif" style:font-family-complex="Liberation Serif" fo:font-size="12pt" style:font-size-complex="12pt" fo:language="de" style:language-complex="hi" fo:country="DE" style:country-complex="IN"/>
    </style:style>
    <style:style style:family="table" style:name="ta8">
      <style:table-properties style:width="16.71cm" fo:margin-left="-0.01588cm" table:align="left"/>
    </style:style>
    <style:style style:family="table-column" style:name="co22">
      <style:table-column-properties style:column-width="4.802cm"/>
    </style:style>
    <style:style style:family="table-column" style:name="co23">
      <style:table-column-properties style:column-width="7.054cm"/>
    </style:style>
    <style:style style:family="table-column" style:name="co24">
      <style:table-column-properties style:column-width="4.849cm"/>
    </style:style>
    <style:style style:family="table-row" style:name="ro56">
      <style:table-row-properties/>
    </style:style>
    <style:style style:family="table-cell" style:name="ce169">
      <style:table-cell-properties style:vertical-align="top" style:direction="ltr" fo:background-color="#1f4e79" fo:border="0.00882cm solid #CCCCCC" loext:writing-mode="lr-tb" fo:padding-top="0.1411cm" fo:padding-bottom="0.1411cm" fo:padding-left="0.2117cm" fo:padding-right="0.2117cm"/>
    </style:style>
    <style:style style:parent-style-name="737" style:family="paragraph" style:name="P513">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2081">
      <style:text-properties fo:color="#ffffff" fo:font-family="Liberation Serif" style:font-family-complex="Liberation Serif" fo:font-size="10pt" style:font-size-complex="10pt" fo:language="de" style:language-complex="hi" fo:country="DE" style:country-complex="IN" fo:font-weight="bold"/>
    </style:style>
    <style:style style:family="text" style:name="T2082">
      <style:text-properties fo:color="#000000" fo:font-family="Liberation Serif" style:font-family-complex="Liberation Serif" fo:font-size="12pt" style:font-size-complex="12pt" fo:language="de" style:language-complex="hi" fo:country="DE" style:country-complex="IN"/>
    </style:style>
    <style:style style:family="text" style:name="T2083">
      <style:text-properties fo:color="#000000" fo:font-family="Liberation Serif" style:font-family-complex="Liberation Serif" fo:font-size="12pt" style:font-size-complex="12pt" fo:language="de" style:language-complex="hi" fo:country="DE" style:country-complex="IN"/>
    </style:style>
    <style:style style:family="table-cell" style:name="ce170">
      <style:table-cell-properties style:vertical-align="top" style:direction="ltr" fo:background-color="#1f4e79" fo:border="0.00882cm solid #CCCCCC" loext:writing-mode="lr-tb" fo:padding-top="0.1411cm" fo:padding-bottom="0.1411cm" fo:padding-left="0.2117cm" fo:padding-right="0.2117cm"/>
    </style:style>
    <style:style style:parent-style-name="737" style:family="paragraph" style:name="P514">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2084">
      <style:text-properties fo:color="#ffffff" fo:font-family="Liberation Serif" style:font-family-complex="Liberation Serif" fo:font-size="10pt" style:font-size-complex="10pt" fo:language="de" style:language-complex="hi" fo:country="DE" style:country-complex="IN" fo:font-weight="bold"/>
    </style:style>
    <style:style style:family="text" style:name="T2085">
      <style:text-properties fo:color="#000000" fo:font-family="Liberation Serif" style:font-family-complex="Liberation Serif" fo:font-size="12pt" style:font-size-complex="12pt" fo:language="de" style:language-complex="hi" fo:country="DE" style:country-complex="IN"/>
    </style:style>
    <style:style style:family="text" style:name="T2086">
      <style:text-properties fo:color="#000000" fo:font-family="Liberation Serif" style:font-family-complex="Liberation Serif" fo:font-size="12pt" style:font-size-complex="12pt" fo:language="de" style:language-complex="hi" fo:country="DE" style:country-complex="IN"/>
    </style:style>
    <style:style style:family="table-cell" style:name="ce171">
      <style:table-cell-properties style:vertical-align="top" style:direction="ltr" fo:background-color="#1f4e79" fo:border="0.00882cm solid #CCCCCC" loext:writing-mode="lr-tb" fo:padding-top="0.1411cm" fo:padding-bottom="0.1411cm" fo:padding-left="0.2117cm" fo:padding-right="0.2117cm"/>
    </style:style>
    <style:style style:parent-style-name="737" style:family="paragraph" style:name="P515">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2087">
      <style:text-properties fo:color="#ffffff" fo:font-family="Liberation Serif" style:font-family-complex="Liberation Serif" fo:font-size="10pt" style:font-size-complex="10pt" fo:language="de" style:language-complex="hi" fo:country="DE" style:country-complex="IN" fo:font-weight="bold"/>
    </style:style>
    <style:style style:family="text" style:name="T2088">
      <style:text-properties fo:color="#000000" fo:font-family="Liberation Serif" style:font-family-complex="Liberation Serif" fo:font-size="12pt" style:font-size-complex="12pt" fo:language="de" style:language-complex="hi" fo:country="DE" style:country-complex="IN"/>
    </style:style>
    <style:style style:family="text" style:name="T2089">
      <style:text-properties fo:color="#000000" fo:font-family="Liberation Serif" style:font-family-complex="Liberation Serif" fo:font-size="12pt" style:font-size-complex="12pt" fo:language="de" style:language-complex="hi" fo:country="DE" style:country-complex="IN"/>
    </style:style>
    <style:style style:family="table-row" style:name="ro57">
      <style:table-row-properties/>
    </style:style>
    <style:style style:family="table-cell" style:name="ce172">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516">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2090">
      <style:text-properties fo:color="#000000" fo:font-family="Liberation Serif" style:font-family-complex="Liberation Serif" fo:font-size="10pt" style:font-size-complex="10pt" fo:language="de" style:language-complex="hi" fo:country="DE" style:country-complex="IN"/>
    </style:style>
    <style:style style:family="text" style:name="T2091">
      <style:text-properties fo:color="#000000" fo:font-family="Liberation Serif" style:font-family-complex="Liberation Serif" fo:font-size="12pt" style:font-size-complex="12pt" fo:language="de" style:language-complex="hi" fo:country="DE" style:country-complex="IN"/>
    </style:style>
    <style:style style:family="text" style:name="T2092">
      <style:text-properties fo:color="#000000" fo:font-family="Liberation Serif" style:font-family-complex="Liberation Serif" fo:font-size="12pt" style:font-size-complex="12pt" fo:language="de" style:language-complex="hi" fo:country="DE" style:country-complex="IN"/>
    </style:style>
    <style:style style:family="table-cell" style:name="ce173">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517">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2093">
      <style:text-properties fo:color="#000000" fo:font-family="Liberation Serif" style:font-family-complex="Liberation Serif" fo:font-size="10pt" style:font-size-complex="10pt" fo:language="de" style:language-complex="hi" fo:country="DE" style:country-complex="IN"/>
    </style:style>
    <style:style style:family="text" style:name="T2094">
      <style:text-properties fo:color="#000000" fo:font-family="Liberation Serif" style:font-family-complex="Liberation Serif" fo:font-size="12pt" style:font-size-complex="12pt" fo:language="de" style:language-complex="hi" fo:country="DE" style:country-complex="IN"/>
    </style:style>
    <style:style style:family="text" style:name="T2095">
      <style:text-properties fo:color="#000000" fo:font-family="Liberation Serif" style:font-family-complex="Liberation Serif" fo:font-size="12pt" style:font-size-complex="12pt" fo:language="de" style:language-complex="hi" fo:country="DE" style:country-complex="IN"/>
    </style:style>
    <style:style style:family="table-cell" style:name="ce174">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518">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2096">
      <style:text-properties fo:color="#000000" fo:font-family="Liberation Serif" style:font-family-complex="Liberation Serif" fo:font-size="10pt" style:font-size-complex="10pt" fo:language="de" style:language-complex="hi" fo:country="DE" style:country-complex="IN"/>
    </style:style>
    <style:style style:family="text" style:name="T2097">
      <style:text-properties fo:color="#000000" fo:font-family="Liberation Serif" style:font-family-complex="Liberation Serif" fo:font-size="12pt" style:font-size-complex="12pt" fo:language="de" style:language-complex="hi" fo:country="DE" style:country-complex="IN"/>
    </style:style>
    <style:style style:family="text" style:name="T2098">
      <style:text-properties fo:color="#000000" fo:font-family="Liberation Serif" style:font-family-complex="Liberation Serif" fo:font-size="12pt" style:font-size-complex="12pt" fo:language="de" style:language-complex="hi" fo:country="DE" style:country-complex="IN"/>
    </style:style>
    <style:style style:family="table-row" style:name="ro58">
      <style:table-row-properties/>
    </style:style>
    <style:style style:family="table-cell" style:name="ce175">
      <style:table-cell-properties style:vertical-align="top" style:direction="ltr" fo:background-color="#f2f2f2" fo:border="0.00882cm solid #CCCCCC" loext:writing-mode="lr-tb" fo:padding-top="0.1411cm" fo:padding-bottom="0.1411cm" fo:padding-left="0.2117cm" fo:padding-right="0.2117cm"/>
    </style:style>
    <style:style style:parent-style-name="737" style:family="paragraph" style:name="P519">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2099">
      <style:text-properties fo:color="#000000" fo:font-family="Liberation Serif" style:font-family-complex="Liberation Serif" fo:font-size="10pt" style:font-size-complex="10pt" fo:language="de" style:language-complex="hi" fo:country="DE" style:country-complex="IN"/>
    </style:style>
    <style:style style:family="text" style:name="T2100">
      <style:text-properties fo:color="#000000" fo:font-family="Liberation Serif" style:font-family-complex="Liberation Serif" fo:font-size="12pt" style:font-size-complex="12pt" fo:language="de" style:language-complex="hi" fo:country="DE" style:country-complex="IN"/>
    </style:style>
    <style:style style:family="text" style:name="T2101">
      <style:text-properties fo:color="#000000" fo:font-family="Liberation Serif" style:font-family-complex="Liberation Serif" fo:font-size="12pt" style:font-size-complex="12pt" fo:language="de" style:language-complex="hi" fo:country="DE" style:country-complex="IN"/>
    </style:style>
    <style:style style:family="table-cell" style:name="ce176">
      <style:table-cell-properties style:vertical-align="top" style:direction="ltr" fo:background-color="#f2f2f2" fo:border="0.00882cm solid #CCCCCC" loext:writing-mode="lr-tb" fo:padding-top="0.1411cm" fo:padding-bottom="0.1411cm" fo:padding-left="0.2117cm" fo:padding-right="0.2117cm"/>
    </style:style>
    <style:style style:parent-style-name="737" style:family="paragraph" style:name="P520">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2102">
      <style:text-properties fo:color="#000000" fo:font-family="Liberation Serif" style:font-family-complex="Liberation Serif" fo:font-size="10pt" style:font-size-complex="10pt" fo:language="de" style:language-complex="hi" fo:country="DE" style:country-complex="IN"/>
    </style:style>
    <style:style style:family="text" style:name="T2103">
      <style:text-properties fo:color="#000000" fo:font-family="Liberation Serif" style:font-family-complex="Liberation Serif" fo:font-size="12pt" style:font-size-complex="12pt" fo:language="de" style:language-complex="hi" fo:country="DE" style:country-complex="IN"/>
    </style:style>
    <style:style style:family="text" style:name="T2104">
      <style:text-properties fo:color="#000000" fo:font-family="Liberation Serif" style:font-family-complex="Liberation Serif" fo:font-size="12pt" style:font-size-complex="12pt" fo:language="de" style:language-complex="hi" fo:country="DE" style:country-complex="IN"/>
    </style:style>
    <style:style style:family="table-cell" style:name="ce177">
      <style:table-cell-properties style:vertical-align="top" style:direction="ltr" fo:background-color="#f2f2f2" fo:border="0.00882cm solid #CCCCCC" loext:writing-mode="lr-tb" fo:padding-top="0.1411cm" fo:padding-bottom="0.1411cm" fo:padding-left="0.2117cm" fo:padding-right="0.2117cm"/>
    </style:style>
    <style:style style:parent-style-name="737" style:family="paragraph" style:name="P521">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2105">
      <style:text-properties fo:color="#000000" fo:font-family="Liberation Serif" style:font-family-complex="Liberation Serif" fo:font-size="10pt" style:font-size-complex="10pt" fo:language="de" style:language-complex="hi" fo:country="DE" style:country-complex="IN"/>
    </style:style>
    <style:style style:family="text" style:name="T2106">
      <style:text-properties fo:color="#000000" fo:font-family="Liberation Serif" style:font-family-complex="Liberation Serif" fo:font-size="12pt" style:font-size-complex="12pt" fo:language="de" style:language-complex="hi" fo:country="DE" style:country-complex="IN"/>
    </style:style>
    <style:style style:family="text" style:name="T2107">
      <style:text-properties fo:color="#000000" fo:font-family="Liberation Serif" style:font-family-complex="Liberation Serif" fo:font-size="12pt" style:font-size-complex="12pt" fo:language="de" style:language-complex="hi" fo:country="DE" style:country-complex="IN"/>
    </style:style>
    <style:style style:family="table-row" style:name="ro59">
      <style:table-row-properties/>
    </style:style>
    <style:style style:family="table-cell" style:name="ce178">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522">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2108">
      <style:text-properties fo:color="#000000" fo:font-family="Liberation Serif" style:font-family-complex="Liberation Serif" fo:font-size="10pt" style:font-size-complex="10pt" fo:language="de" style:language-complex="hi" fo:country="DE" style:country-complex="IN"/>
    </style:style>
    <style:style style:family="text" style:name="T2109">
      <style:text-properties fo:color="#000000" fo:font-family="Liberation Serif" style:font-family-complex="Liberation Serif" fo:font-size="12pt" style:font-size-complex="12pt" fo:language="de" style:language-complex="hi" fo:country="DE" style:country-complex="IN"/>
    </style:style>
    <style:style style:family="text" style:name="T2110">
      <style:text-properties fo:color="#000000" fo:font-family="Liberation Serif" style:font-family-complex="Liberation Serif" fo:font-size="12pt" style:font-size-complex="12pt" fo:language="de" style:language-complex="hi" fo:country="DE" style:country-complex="IN"/>
    </style:style>
    <style:style style:family="table-cell" style:name="ce179">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523">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2111">
      <style:text-properties fo:color="#000000" fo:font-family="Liberation Serif" style:font-family-complex="Liberation Serif" fo:font-size="10pt" style:font-size-complex="10pt" fo:language="de" style:language-complex="hi" fo:country="DE" style:country-complex="IN"/>
    </style:style>
    <style:style style:family="text" style:name="T2112">
      <style:text-properties fo:color="#000000" fo:font-family="Liberation Serif" style:font-family-complex="Liberation Serif" fo:font-size="12pt" style:font-size-complex="12pt" fo:language="de" style:language-complex="hi" fo:country="DE" style:country-complex="IN"/>
    </style:style>
    <style:style style:family="text" style:name="T2113">
      <style:text-properties fo:color="#000000" fo:font-family="Liberation Serif" style:font-family-complex="Liberation Serif" fo:font-size="12pt" style:font-size-complex="12pt" fo:language="de" style:language-complex="hi" fo:country="DE" style:country-complex="IN"/>
    </style:style>
    <style:style style:family="table-cell" style:name="ce180">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524">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2114">
      <style:text-properties fo:color="#000000" fo:font-family="Liberation Serif" style:font-family-complex="Liberation Serif" fo:font-size="10pt" style:font-size-complex="10pt" fo:language="de" style:language-complex="hi" fo:country="DE" style:country-complex="IN"/>
    </style:style>
    <style:style style:family="text" style:name="T2115">
      <style:text-properties fo:color="#000000" fo:font-family="Liberation Serif" style:font-family-complex="Liberation Serif" fo:font-size="12pt" style:font-size-complex="12pt" fo:language="de" style:language-complex="hi" fo:country="DE" style:country-complex="IN"/>
    </style:style>
    <style:style style:family="text" style:name="T2116">
      <style:text-properties fo:color="#000000" fo:font-family="Liberation Serif" style:font-family-complex="Liberation Serif" fo:font-size="12pt" style:font-size-complex="12pt" fo:language="de" style:language-complex="hi" fo:country="DE" style:country-complex="IN"/>
    </style:style>
    <style:style style:family="table-row" style:name="ro60">
      <style:table-row-properties/>
    </style:style>
    <style:style style:family="table-cell" style:name="ce181">
      <style:table-cell-properties style:vertical-align="top" style:direction="ltr" fo:background-color="#f2f2f2" fo:border="0.00882cm solid #CCCCCC" loext:writing-mode="lr-tb" fo:padding-top="0.1411cm" fo:padding-bottom="0.1411cm" fo:padding-left="0.2117cm" fo:padding-right="0.2117cm"/>
    </style:style>
    <style:style style:parent-style-name="737" style:family="paragraph" style:name="P525">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2117">
      <style:text-properties fo:color="#000000" fo:font-family="Liberation Serif" style:font-family-complex="Liberation Serif" fo:font-size="10pt" style:font-size-complex="10pt" fo:language="de" style:language-complex="hi" fo:country="DE" style:country-complex="IN"/>
    </style:style>
    <style:style style:family="text" style:name="T2118">
      <style:text-properties fo:color="#000000" fo:font-family="Liberation Serif" style:font-family-complex="Liberation Serif" fo:font-size="12pt" style:font-size-complex="12pt" fo:language="de" style:language-complex="hi" fo:country="DE" style:country-complex="IN"/>
    </style:style>
    <style:style style:family="text" style:name="T2119">
      <style:text-properties fo:color="#000000" fo:font-family="Liberation Serif" style:font-family-complex="Liberation Serif" fo:font-size="12pt" style:font-size-complex="12pt" fo:language="de" style:language-complex="hi" fo:country="DE" style:country-complex="IN"/>
    </style:style>
    <style:style style:family="table-cell" style:name="ce182">
      <style:table-cell-properties style:vertical-align="top" style:direction="ltr" fo:background-color="#f2f2f2" fo:border="0.00882cm solid #CCCCCC" loext:writing-mode="lr-tb" fo:padding-top="0.1411cm" fo:padding-bottom="0.1411cm" fo:padding-left="0.2117cm" fo:padding-right="0.2117cm"/>
    </style:style>
    <style:style style:parent-style-name="737" style:family="paragraph" style:name="P526">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2120">
      <style:text-properties fo:color="#000000" fo:font-family="Liberation Serif" style:font-family-complex="Liberation Serif" fo:font-size="10pt" style:font-size-complex="10pt" fo:language="de" style:language-complex="hi" fo:country="DE" style:country-complex="IN"/>
    </style:style>
    <style:style style:family="text" style:name="T2121">
      <style:text-properties fo:color="#000000" fo:font-family="Liberation Serif" style:font-family-complex="Liberation Serif" fo:font-size="12pt" style:font-size-complex="12pt" fo:language="de" style:language-complex="hi" fo:country="DE" style:country-complex="IN"/>
    </style:style>
    <style:style style:family="text" style:name="T2122">
      <style:text-properties fo:color="#000000" fo:font-family="Liberation Serif" style:font-family-complex="Liberation Serif" fo:font-size="12pt" style:font-size-complex="12pt" fo:language="de" style:language-complex="hi" fo:country="DE" style:country-complex="IN"/>
    </style:style>
    <style:style style:family="table-cell" style:name="ce183">
      <style:table-cell-properties style:vertical-align="top" style:direction="ltr" fo:background-color="#f2f2f2" fo:border="0.00882cm solid #CCCCCC" loext:writing-mode="lr-tb" fo:padding-top="0.1411cm" fo:padding-bottom="0.1411cm" fo:padding-left="0.2117cm" fo:padding-right="0.2117cm"/>
    </style:style>
    <style:style style:parent-style-name="737" style:family="paragraph" style:name="P527">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2123">
      <style:text-properties fo:color="#000000" fo:font-family="Liberation Serif" style:font-family-complex="Liberation Serif" fo:font-size="10pt" style:font-size-complex="10pt" fo:language="de" style:language-complex="hi" fo:country="DE" style:country-complex="IN"/>
    </style:style>
    <style:style style:family="text" style:name="T2124">
      <style:text-properties fo:color="#000000" fo:font-family="Liberation Serif" style:font-family-complex="Liberation Serif" fo:font-size="12pt" style:font-size-complex="12pt" fo:language="de" style:language-complex="hi" fo:country="DE" style:country-complex="IN"/>
    </style:style>
    <style:style style:family="text" style:name="T2125">
      <style:text-properties fo:color="#000000" fo:font-family="Liberation Serif" style:font-family-complex="Liberation Serif" fo:font-size="12pt" style:font-size-complex="12pt" fo:language="de" style:language-complex="hi" fo:country="DE" style:country-complex="IN"/>
    </style:style>
    <style:style style:family="table-row" style:name="ro61">
      <style:table-row-properties/>
    </style:style>
    <style:style style:family="table-cell" style:name="ce184">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528">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2126">
      <style:text-properties fo:color="#000000" fo:font-family="Liberation Serif" style:font-family-complex="Liberation Serif" fo:font-size="10pt" style:font-size-complex="10pt" fo:language="de" style:language-complex="hi" fo:country="DE" style:country-complex="IN"/>
    </style:style>
    <style:style style:family="text" style:name="T2127">
      <style:text-properties fo:color="#000000" fo:font-family="Liberation Serif" style:font-family-complex="Liberation Serif" fo:font-size="12pt" style:font-size-complex="12pt" fo:language="de" style:language-complex="hi" fo:country="DE" style:country-complex="IN"/>
    </style:style>
    <style:style style:family="text" style:name="T2128">
      <style:text-properties fo:color="#000000" fo:font-family="Liberation Serif" style:font-family-complex="Liberation Serif" fo:font-size="12pt" style:font-size-complex="12pt" fo:language="de" style:language-complex="hi" fo:country="DE" style:country-complex="IN"/>
    </style:style>
    <style:style style:family="table-cell" style:name="ce185">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529">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2129">
      <style:text-properties fo:color="#000000" fo:font-family="Liberation Serif" style:font-family-complex="Liberation Serif" fo:font-size="10pt" style:font-size-complex="10pt" fo:language="de" style:language-complex="hi" fo:country="DE" style:country-complex="IN"/>
    </style:style>
    <style:style style:family="text" style:name="T2130">
      <style:text-properties fo:color="#000000" fo:font-family="Liberation Serif" style:font-family-complex="Liberation Serif" fo:font-size="12pt" style:font-size-complex="12pt" fo:language="de" style:language-complex="hi" fo:country="DE" style:country-complex="IN"/>
    </style:style>
    <style:style style:family="text" style:name="T2131">
      <style:text-properties fo:color="#000000" fo:font-family="Liberation Serif" style:font-family-complex="Liberation Serif" fo:font-size="12pt" style:font-size-complex="12pt" fo:language="de" style:language-complex="hi" fo:country="DE" style:country-complex="IN"/>
    </style:style>
    <style:style style:family="table-cell" style:name="ce186">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530">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2132">
      <style:text-properties fo:color="#000000" fo:font-family="Liberation Serif" style:font-family-complex="Liberation Serif" fo:font-size="10pt" style:font-size-complex="10pt" fo:language="de" style:language-complex="hi" fo:country="DE" style:country-complex="IN"/>
    </style:style>
    <style:style style:family="text" style:name="T2133">
      <style:text-properties fo:color="#000000" fo:font-family="Liberation Serif" style:font-family-complex="Liberation Serif" fo:font-size="12pt" style:font-size-complex="12pt" fo:language="de" style:language-complex="hi" fo:country="DE" style:country-complex="IN"/>
    </style:style>
    <style:style style:family="text" style:name="T2134">
      <style:text-properties fo:color="#000000" fo:font-family="Liberation Serif" style:font-family-complex="Liberation Serif" fo:font-size="12pt" style:font-size-complex="12pt" fo:language="de" style:language-complex="hi" fo:country="DE" style:country-complex="IN"/>
    </style:style>
    <style:style style:family="table-row" style:name="ro62">
      <style:table-row-properties/>
    </style:style>
    <style:style style:family="table-cell" style:name="ce187">
      <style:table-cell-properties style:vertical-align="top" style:direction="ltr" fo:background-color="#f2f2f2" fo:border="0.00882cm solid #CCCCCC" loext:writing-mode="lr-tb" fo:padding-top="0.1411cm" fo:padding-bottom="0.1411cm" fo:padding-left="0.2117cm" fo:padding-right="0.2117cm"/>
    </style:style>
    <style:style style:parent-style-name="737" style:family="paragraph" style:name="P531">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2135">
      <style:text-properties fo:color="#000000" fo:font-family="Liberation Serif" style:font-family-complex="Liberation Serif" fo:font-size="10pt" style:font-size-complex="10pt" fo:language="de" style:language-complex="hi" fo:country="DE" style:country-complex="IN"/>
    </style:style>
    <style:style style:family="text" style:name="T2136">
      <style:text-properties fo:color="#000000" fo:font-family="Liberation Serif" style:font-family-complex="Liberation Serif" fo:font-size="12pt" style:font-size-complex="12pt" fo:language="de" style:language-complex="hi" fo:country="DE" style:country-complex="IN"/>
    </style:style>
    <style:style style:family="text" style:name="T2137">
      <style:text-properties fo:color="#000000" fo:font-family="Liberation Serif" style:font-family-complex="Liberation Serif" fo:font-size="12pt" style:font-size-complex="12pt" fo:language="de" style:language-complex="hi" fo:country="DE" style:country-complex="IN"/>
    </style:style>
    <style:style style:family="table-cell" style:name="ce188">
      <style:table-cell-properties style:vertical-align="top" style:direction="ltr" fo:background-color="#f2f2f2" fo:border="0.00882cm solid #CCCCCC" loext:writing-mode="lr-tb" fo:padding-top="0.1411cm" fo:padding-bottom="0.1411cm" fo:padding-left="0.2117cm" fo:padding-right="0.2117cm"/>
    </style:style>
    <style:style style:parent-style-name="737" style:family="paragraph" style:name="P532">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2138">
      <style:text-properties fo:color="#000000" fo:font-family="Liberation Serif" style:font-family-complex="Liberation Serif" fo:font-size="10pt" style:font-size-complex="10pt" fo:language="de" style:language-complex="hi" fo:country="DE" style:country-complex="IN"/>
    </style:style>
    <style:style style:family="text" style:name="T2139">
      <style:text-properties fo:color="#000000" fo:font-family="Liberation Serif" style:font-family-complex="Liberation Serif" fo:font-size="12pt" style:font-size-complex="12pt" fo:language="de" style:language-complex="hi" fo:country="DE" style:country-complex="IN"/>
    </style:style>
    <style:style style:family="text" style:name="T2140">
      <style:text-properties fo:color="#000000" fo:font-family="Liberation Serif" style:font-family-complex="Liberation Serif" fo:font-size="12pt" style:font-size-complex="12pt" fo:language="de" style:language-complex="hi" fo:country="DE" style:country-complex="IN"/>
    </style:style>
    <style:style style:family="table-cell" style:name="ce189">
      <style:table-cell-properties style:vertical-align="top" style:direction="ltr" fo:background-color="#f2f2f2" fo:border="0.00882cm solid #CCCCCC" loext:writing-mode="lr-tb" fo:padding-top="0.1411cm" fo:padding-bottom="0.1411cm" fo:padding-left="0.2117cm" fo:padding-right="0.2117cm"/>
    </style:style>
    <style:style style:parent-style-name="737" style:family="paragraph" style:name="P533">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2141">
      <style:text-properties fo:color="#000000" fo:font-family="Liberation Serif" style:font-family-complex="Liberation Serif" fo:font-size="10pt" style:font-size-complex="10pt" fo:language="de" style:language-complex="hi" fo:country="DE" style:country-complex="IN"/>
    </style:style>
    <style:style style:family="text" style:name="T2142">
      <style:text-properties fo:color="#000000" fo:font-family="Liberation Serif" style:font-family-complex="Liberation Serif" fo:font-size="12pt" style:font-size-complex="12pt" fo:language="de" style:language-complex="hi" fo:country="DE" style:country-complex="IN"/>
    </style:style>
    <style:style style:family="text" style:name="T2143">
      <style:text-properties fo:color="#000000" fo:font-family="Liberation Serif" style:font-family-complex="Liberation Serif" fo:font-size="12pt" style:font-size-complex="12pt" fo:language="de" style:language-complex="hi" fo:country="DE" style:country-complex="IN"/>
    </style:style>
    <style:style style:parent-style-name="737" style:family="paragraph" style:name="P534">
      <style:paragraph-properties fo:margin-left="0cm" fo:margin-right="0cm" fo:text-indent="0cm" fo:margin-top="3pt" fo:margin-bottom="3pt"/>
      <style:text-properties fo:color="#000000" fo:font-family="Liberation Serif" style:font-family-complex="Liberation Serif" fo:font-size="12pt" style:font-size-complex="12pt" fo:language="de" style:language-complex="hi" fo:country="DE" style:country-complex="IN"/>
    </style:style>
    <style:style style:family="text" style:name="T2144">
      <style:text-properties fo:color="#000000" fo:font-family="Liberation Serif" style:font-family-complex="Liberation Serif" fo:font-size="12pt" style:font-size-complex="12pt" fo:language="de" style:language-complex="hi" fo:country="DE" style:country-complex="IN"/>
    </style:style>
    <style:style style:family="text" style:name="T2145">
      <style:text-properties fo:color="#000000" fo:font-family="Liberation Serif" style:font-family-complex="Liberation Serif" fo:font-size="12pt" style:font-size-complex="12pt" fo:language="de" style:language-complex="hi" fo:country="DE" style:country-complex="IN"/>
    </style:style>
    <style:style style:family="text" style:name="T2146">
      <style:text-properties fo:color="#000000" fo:font-family="Liberation Serif" style:font-family-complex="Liberation Serif" fo:font-size="12pt" style:font-size-complex="12pt" fo:language="de" style:language-complex="hi" fo:country="DE" style:country-complex="IN"/>
    </style:style>
    <style:style style:parent-style-name="737" style:family="paragraph" style:name="P535">
      <style:paragraph-properties fo:margin-left="0cm" fo:margin-right="0cm" fo:text-indent="0cm" fo:margin-top="3pt" fo:margin-bottom="3pt"/>
      <style:text-properties fo:color="#000000" fo:font-family="Liberation Serif" style:font-family-complex="Liberation Serif" fo:font-size="12pt" style:font-size-complex="12pt" fo:language="de" style:language-complex="hi" fo:country="DE" style:country-complex="IN"/>
    </style:style>
    <style:style style:family="text" style:name="T2147">
      <style:text-properties fo:color="#000000" fo:font-family="Liberation Serif" style:font-family-complex="Liberation Serif" fo:font-size="12pt" style:font-size-complex="12pt" fo:language="de" style:language-complex="hi" fo:country="DE" style:country-complex="IN"/>
    </style:style>
    <style:style style:family="text" style:name="T2148">
      <style:text-properties fo:color="#000000" fo:font-family="Liberation Serif" style:font-family-complex="Liberation Serif" fo:font-size="12pt" style:font-size-complex="12pt" fo:language="de" style:language-complex="hi" fo:country="DE" style:country-complex="IN"/>
    </style:style>
    <style:style style:family="text" style:name="T2149">
      <style:text-properties fo:color="#000000" fo:font-family="Liberation Serif" style:font-family-complex="Liberation Serif" fo:font-size="12pt" style:font-size-complex="12pt" fo:language="de" style:language-complex="hi" fo:country="DE" style:country-complex="IN"/>
    </style:style>
    <style:style style:family="text" style:name="T2150">
      <style:text-properties fo:color="#000000" fo:font-family="Liberation Serif" style:font-family-complex="Liberation Serif" fo:font-size="12pt" style:font-size-complex="12pt" fo:language="de" style:language-complex="hi" fo:country="DE" style:country-complex="IN"/>
    </style:style>
    <style:style style:parent-style-name="747" style:family="paragraph" style:name="P536">
      <style:paragraph-properties fo:margin-left="0cm" fo:margin-right="0cm" fo:text-indent="0cm"/>
      <style:text-properties fo:color="#000000" fo:font-family="Liberation Sans" style:font-family-complex="Liberation Sans" fo:font-size="16pt" style:font-size-complex="16pt" fo:language="de" style:language-complex="hi" fo:country="DE" style:country-complex="IN" fo:font-weight="bold"/>
    </style:style>
    <style:style style:family="text" style:name="T2151">
      <style:text-properties fo:color="#000000" fo:font-family="Liberation Sans" style:font-family-complex="Liberation Sans" fo:font-size="16pt" style:font-size-complex="16pt" fo:language="de" style:language-complex="hi" fo:country="DE" style:country-complex="IN" fo:font-weight="bold"/>
    </style:style>
    <style:style style:family="text" style:name="T2152">
      <style:text-properties fo:color="#000000" fo:font-family="Liberation Sans" style:font-family-complex="Liberation Sans" fo:font-size="16pt" style:font-size-complex="16pt" fo:language="de" style:language-complex="hi" fo:country="DE" style:country-complex="IN" fo:font-weight="bold"/>
    </style:style>
    <style:style style:family="text" style:name="T2153">
      <style:text-properties fo:color="#000000" fo:font-family="Liberation Sans" style:font-family-complex="Liberation Sans" fo:font-size="16pt" style:font-size-complex="16pt" fo:language="de" style:language-complex="hi" fo:country="DE" style:country-complex="IN" fo:font-weight="bold"/>
    </style:style>
    <style:style style:family="text" style:name="T2154">
      <style:text-properties fo:color="#000000" fo:font-family="Liberation Sans" style:font-family-complex="Liberation Sans" fo:font-size="16pt" style:font-size-complex="16pt" fo:language="de" style:language-complex="hi" fo:country="DE" style:country-complex="IN" fo:font-weight="bold"/>
    </style:style>
    <style:style style:family="text" style:name="T2155">
      <style:text-properties fo:color="#000000" fo:font-family="Liberation Sans" style:font-family-complex="Liberation Sans" fo:font-size="16pt" style:font-size-complex="16pt" fo:language="de" style:language-complex="hi" fo:country="DE" style:country-complex="IN" fo:font-weight="bold"/>
    </style:style>
    <style:style style:parent-style-name="737" style:family="paragraph" style:name="P537">
      <style:paragraph-properties fo:margin-left="0cm" fo:margin-right="0cm" fo:text-indent="0cm" fo:margin-top="3pt" fo:margin-bottom="3pt"/>
      <style:text-properties fo:color="#000000" fo:font-family="Liberation Serif" style:font-family-complex="Liberation Serif" fo:font-size="12pt" style:font-size-complex="12pt" fo:language="de" style:language-complex="hi" fo:country="DE" style:country-complex="IN"/>
    </style:style>
    <style:style style:family="text" style:name="T2156">
      <style:text-properties fo:color="#000000" fo:font-family="Liberation Serif" style:font-family-complex="Liberation Serif" fo:font-size="12pt" style:font-size-complex="12pt" fo:language="de" style:language-complex="hi" fo:country="DE" style:country-complex="IN"/>
    </style:style>
    <style:style style:family="text" style:name="T2157">
      <style:text-properties fo:color="#000000" fo:font-family="Liberation Serif" style:font-family-complex="Liberation Serif" fo:font-size="12pt" style:font-size-complex="12pt" fo:language="de" style:language-complex="hi" fo:country="DE" style:country-complex="IN"/>
    </style:style>
    <style:style style:family="text" style:name="T2158">
      <style:text-properties fo:color="#000000" fo:font-family="Liberation Serif" style:font-family-complex="Liberation Serif" fo:font-size="12pt" style:font-size-complex="12pt" fo:language="de" style:language-complex="hi" fo:country="DE" style:country-complex="IN"/>
    </style:style>
    <style:style style:family="text" style:name="T2159">
      <style:text-properties fo:color="#000000" fo:font-family="Liberation Serif" style:font-family-complex="Liberation Serif" fo:font-size="12pt" style:font-size-complex="12pt" fo:language="de" style:language-complex="hi" fo:country="DE" style:country-complex="IN"/>
    </style:style>
    <style:style style:parent-style-name="737" style:family="paragraph" style:name="P538">
      <style:paragraph-properties fo:margin-left="0cm" fo:margin-right="0cm" fo:text-indent="0cm" fo:margin-top="3pt" fo:margin-bottom="3pt"/>
      <style:text-properties fo:color="#000000" fo:font-family="Liberation Serif" style:font-family-complex="Liberation Serif" fo:font-size="12pt" style:font-size-complex="12pt" fo:language="de" style:language-complex="hi" fo:country="DE" style:country-complex="IN"/>
    </style:style>
    <style:style style:family="text" style:name="T2160">
      <style:text-properties fo:color="#000000" fo:font-family="Liberation Serif" style:font-family-complex="Liberation Serif" fo:font-size="12pt" style:font-size-complex="12pt" fo:language="de" style:language-complex="hi" fo:country="DE" style:country-complex="IN"/>
    </style:style>
    <style:style style:family="text" style:name="T2161">
      <style:text-properties fo:color="#000000" fo:font-family="Liberation Serif" style:font-family-complex="Liberation Serif" fo:font-size="12pt" style:font-size-complex="12pt" fo:language="de" style:language-complex="hi" fo:country="DE" style:country-complex="IN"/>
    </style:style>
    <style:style style:family="text" style:name="T2162">
      <style:text-properties fo:color="#000000" fo:font-family="Liberation Serif" style:font-family-complex="Liberation Serif" fo:font-size="12pt" style:font-size-complex="12pt" fo:language="de" style:language-complex="hi" fo:country="DE" style:country-complex="IN"/>
    </style:style>
    <style:style style:parent-style-name="749" style:family="paragraph" style:name="P539">
      <style:paragraph-properties fo:margin-left="0cm" fo:margin-right="0cm" fo:text-indent="0cm"/>
      <style:text-properties fo:color="#000000" fo:font-family="Liberation Sans" style:font-family-complex="Liberation Sans" fo:font-size="18pt" style:font-size-complex="18pt" fo:language="de" style:language-complex="hi" fo:country="DE" style:country-complex="IN" fo:font-weight="bold"/>
    </style:style>
    <style:style style:family="text" style:name="T2163">
      <style:text-properties fo:color="#000000" fo:font-family="Liberation Sans" style:font-family-complex="Liberation Sans" fo:font-size="18pt" style:font-size-complex="18pt" fo:language="de" style:language-complex="hi" fo:country="DE" style:country-complex="IN" fo:font-weight="bold"/>
    </style:style>
    <style:style style:family="text" style:name="T2164">
      <style:text-properties fo:color="#000000" fo:font-family="Liberation Sans" style:font-family-complex="Liberation Sans" fo:font-size="18pt" style:font-size-complex="18pt" fo:language="de" style:language-complex="hi" fo:country="DE" style:country-complex="IN" fo:font-weight="bold"/>
    </style:style>
    <style:style style:family="text" style:name="T2165">
      <style:text-properties fo:color="#000000" fo:font-family="Liberation Sans" style:font-family-complex="Liberation Sans" fo:font-size="18pt" style:font-size-complex="18pt" fo:language="de" style:language-complex="hi" fo:country="DE" style:country-complex="IN" fo:font-weight="bold"/>
    </style:style>
    <style:style style:family="text" style:name="T2166">
      <style:text-properties fo:color="#000000" fo:font-family="Liberation Sans" style:font-family-complex="Liberation Sans" fo:font-size="18pt" style:font-size-complex="18pt" fo:language="de" style:language-complex="hi" fo:country="DE" style:country-complex="IN" fo:font-weight="bold"/>
    </style:style>
    <style:style style:family="text" style:name="T2167">
      <style:text-properties fo:color="#000000" fo:font-family="Liberation Sans" style:font-family-complex="Liberation Sans" fo:font-size="18pt" style:font-size-complex="18pt" fo:language="de" style:language-complex="hi" fo:country="DE" style:country-complex="IN" fo:font-weight="bold"/>
    </style:style>
    <style:style style:parent-style-name="737" style:family="paragraph" style:name="P540">
      <style:paragraph-properties fo:margin-left="0cm" fo:margin-right="0cm" fo:text-indent="0cm" fo:margin-top="3pt" fo:margin-bottom="3pt"/>
      <style:text-properties fo:color="#000000" fo:font-family="Liberation Serif" style:font-family-complex="Liberation Serif" fo:font-size="12pt" style:font-size-complex="12pt" fo:language="de" style:language-complex="hi" fo:country="DE" style:country-complex="IN"/>
    </style:style>
    <style:style style:family="text" style:name="T2168">
      <style:text-properties fo:color="#000000" fo:font-family="Liberation Serif" style:font-family-complex="Liberation Serif" fo:font-size="12pt" style:font-size-complex="12pt" fo:language="de" style:language-complex="hi" fo:country="DE" style:country-complex="IN"/>
    </style:style>
    <style:style style:family="text" style:name="T2169">
      <style:text-properties fo:color="#000000" fo:font-family="Liberation Serif" style:font-family-complex="Liberation Serif" fo:font-size="12pt" style:font-size-complex="12pt" fo:language="de" style:language-complex="hi" fo:country="DE" style:country-complex="IN"/>
    </style:style>
    <style:style style:family="text" style:name="T2170">
      <style:text-properties fo:color="#000000" fo:font-family="Liberation Serif" style:font-family-complex="Liberation Serif" fo:font-size="12pt" style:font-size-complex="12pt" fo:language="de" style:language-complex="hi" fo:country="DE" style:country-complex="IN"/>
    </style:style>
    <style:style style:parent-style-name="746" style:list-style-name="WWNum1" style:family="paragraph" style:name="P541">
      <style:paragraph-properties fo:margin-left="1.27cm" fo:margin-right="0cm" fo:text-indent="-0.635cm" fo:margin-top="2pt" fo:margin-bottom="2pt"/>
      <style:text-properties fo:color="#000000" fo:font-family="Arial" style:font-family-complex="Arial" fo:font-size="11pt" style:font-size-complex="11pt" fo:language="de" style:language-complex="ar" fo:country="DE" style:country-complex="SA"/>
    </style:style>
    <style:style style:family="text" style:name="T2171">
      <style:text-properties fo:color="#000000" fo:font-family="Arial" style:font-family-complex="Arial" fo:font-size="11pt" style:font-size-complex="11pt" fo:language="de" style:language-complex="ar" fo:country="DE" style:country-complex="SA"/>
    </style:style>
    <style:style style:family="text" style:name="T2172">
      <style:text-properties fo:color="#000000" fo:font-family="Arial" style:font-family-complex="Arial" fo:font-size="11pt" style:font-size-complex="11pt" fo:language="de" style:language-complex="ar" fo:country="DE" style:country-complex="SA"/>
    </style:style>
    <style:style style:family="text" style:name="T2173">
      <style:text-properties fo:color="#000000" fo:font-family="Arial" style:font-family-complex="Arial" fo:font-size="11pt" style:font-size-complex="11pt" fo:language="de" style:language-complex="ar" fo:country="DE" style:country-complex="SA"/>
    </style:style>
    <style:style style:parent-style-name="746" style:list-style-name="WWNum1" style:family="paragraph" style:name="P542">
      <style:paragraph-properties fo:margin-left="1.27cm" fo:margin-right="0cm" fo:text-indent="-0.635cm" fo:margin-top="2pt" fo:margin-bottom="2pt"/>
      <style:text-properties fo:color="#000000" fo:font-family="Arial" style:font-family-complex="Arial" fo:font-size="11pt" style:font-size-complex="11pt" fo:language="de" style:language-complex="ar" fo:country="DE" style:country-complex="SA"/>
    </style:style>
    <style:style style:family="text" style:name="T2174">
      <style:text-properties fo:color="#000000" fo:font-family="Arial" style:font-family-complex="Arial" fo:font-size="11pt" style:font-size-complex="11pt" fo:language="de" style:language-complex="ar" fo:country="DE" style:country-complex="SA"/>
    </style:style>
    <style:style style:family="text" style:name="T2175">
      <style:text-properties fo:color="#000000" fo:font-family="Arial" style:font-family-complex="Arial" fo:font-size="11pt" style:font-size-complex="11pt" fo:language="de" style:language-complex="ar" fo:country="DE" style:country-complex="SA"/>
    </style:style>
    <style:style style:family="text" style:name="T2176">
      <style:text-properties fo:color="#000000" fo:font-family="Arial" style:font-family-complex="Arial" fo:font-size="11pt" style:font-size-complex="11pt" fo:language="de" style:language-complex="ar" fo:country="DE" style:country-complex="SA"/>
    </style:style>
    <style:style style:parent-style-name="746" style:list-style-name="WWNum1" style:family="paragraph" style:name="P543">
      <style:paragraph-properties fo:margin-left="1.27cm" fo:margin-right="0cm" fo:text-indent="-0.635cm" fo:margin-top="2pt" fo:margin-bottom="2pt"/>
      <style:text-properties fo:color="#000000" fo:font-family="Arial" style:font-family-complex="Arial" fo:font-size="11pt" style:font-size-complex="11pt" fo:language="de" style:language-complex="ar" fo:country="DE" style:country-complex="SA"/>
    </style:style>
    <style:style style:family="text" style:name="T2177">
      <style:text-properties fo:color="#000000" fo:font-family="Arial" style:font-family-complex="Arial" fo:font-size="11pt" style:font-size-complex="11pt" fo:language="de" style:language-complex="ar" fo:country="DE" style:country-complex="SA"/>
    </style:style>
    <style:style style:family="text" style:name="T2178">
      <style:text-properties fo:color="#000000" fo:font-family="Arial" style:font-family-complex="Arial" fo:font-size="11pt" style:font-size-complex="11pt" fo:language="de" style:language-complex="ar" fo:country="DE" style:country-complex="SA"/>
    </style:style>
    <style:style style:family="text" style:name="T2179">
      <style:text-properties fo:color="#000000" fo:font-family="Arial" style:font-family-complex="Arial" fo:font-size="11pt" style:font-size-complex="11pt" fo:language="de" style:language-complex="ar" fo:country="DE" style:country-complex="SA"/>
    </style:style>
    <style:style style:parent-style-name="746" style:list-style-name="WWNum1" style:family="paragraph" style:name="P544">
      <style:paragraph-properties fo:margin-left="1.27cm" fo:margin-right="0cm" fo:text-indent="-0.635cm" fo:margin-top="2pt" fo:margin-bottom="2pt"/>
      <style:text-properties fo:color="#000000" fo:font-family="Arial" style:font-family-complex="Arial" fo:font-size="11pt" style:font-size-complex="11pt" fo:language="de" style:language-complex="ar" fo:country="DE" style:country-complex="SA"/>
    </style:style>
    <style:style style:family="text" style:name="T2180">
      <style:text-properties fo:color="#000000" fo:font-family="Arial" style:font-family-complex="Arial" fo:font-size="11pt" style:font-size-complex="11pt" fo:language="de" style:language-complex="ar" fo:country="DE" style:country-complex="SA"/>
    </style:style>
    <style:style style:family="text" style:name="T2181">
      <style:text-properties fo:color="#000000" fo:font-family="Arial" style:font-family-complex="Arial" fo:font-size="11pt" style:font-size-complex="11pt" fo:language="de" style:language-complex="ar" fo:country="DE" style:country-complex="SA"/>
    </style:style>
    <style:style style:family="text" style:name="T2182">
      <style:text-properties fo:color="#000000" fo:font-family="Arial" style:font-family-complex="Arial" fo:font-size="11pt" style:font-size-complex="11pt" fo:language="de" style:language-complex="ar" fo:country="DE" style:country-complex="SA"/>
    </style:style>
    <style:style style:parent-style-name="737" style:family="paragraph" style:name="P545">
      <style:paragraph-properties fo:margin-left="0cm" fo:margin-right="0cm" fo:text-indent="0cm" fo:margin-top="3pt" fo:margin-bottom="3pt"/>
      <style:text-properties fo:color="#000000" fo:font-family="Liberation Serif" style:font-family-complex="Liberation Serif" fo:font-size="12pt" style:font-size-complex="12pt" fo:language="de" style:language-complex="hi" fo:country="DE" style:country-complex="IN"/>
    </style:style>
    <style:style style:family="text" style:name="T2183">
      <style:text-properties fo:color="#000000" fo:font-family="Liberation Serif" style:font-family-complex="Liberation Serif" fo:font-size="12pt" style:font-size-complex="12pt" fo:language="de" style:language-complex="hi" fo:country="DE" style:country-complex="IN"/>
    </style:style>
    <style:style style:family="text" style:name="T2184">
      <style:text-properties fo:color="#000000" fo:font-family="Liberation Serif" style:font-family-complex="Liberation Serif" fo:font-size="12pt" style:font-size-complex="12pt" fo:language="de" style:language-complex="hi" fo:country="DE" style:country-complex="IN"/>
    </style:style>
    <style:style style:family="text" style:name="T2185">
      <style:text-properties fo:color="#000000" fo:font-family="Liberation Serif" style:font-family-complex="Liberation Serif" fo:font-size="12pt" style:font-size-complex="12pt" fo:language="de" style:language-complex="hi" fo:country="DE" style:country-complex="IN"/>
    </style:style>
    <style:style style:parent-style-name="737" style:family="paragraph" style:name="P546">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2186">
      <style:text-properties fo:color="#000000" fo:font-family="Liberation Serif" style:font-family-complex="Liberation Serif" fo:font-size="12pt" style:font-size-complex="12pt" fo:language="de" style:language-complex="hi" fo:country="DE" style:country-complex="IN"/>
    </style:style>
    <style:style style:family="text" style:name="T2187">
      <style:text-properties fo:color="#000000" fo:font-family="Liberation Serif" style:font-family-complex="Liberation Serif" fo:font-size="12pt" style:font-size-complex="12pt" fo:language="de" style:language-complex="hi" fo:country="DE" style:country-complex="IN"/>
    </style:style>
    <style:style style:family="text" style:name="T2188">
      <style:text-properties fo:color="#000000" fo:font-family="Liberation Serif" style:font-family-complex="Liberation Serif" fo:font-size="12pt" style:font-size-complex="12pt" fo:language="de" style:language-complex="hi" fo:country="DE" style:country-complex="IN"/>
    </style:style>
    <style:style style:parent-style-name="749" style:master-page-name="MasterPage13" style:family="paragraph" style:name="P547">
      <style:paragraph-properties fo:margin-left="0cm" fo:margin-right="0cm" fo:text-indent="0cm" fo:margin-top="0pt" fo:margin-bottom="6pt" fo:break-before="page"/>
      <style:text-properties fo:color="#000000" fo:font-family="Liberation Sans" style:font-family-complex="Liberation Sans" fo:font-size="18pt" style:font-size-complex="18pt" fo:language="de" style:language-complex="hi" fo:country="DE" style:country-complex="IN" fo:font-weight="bold"/>
    </style:style>
    <style:style style:family="text" style:name="T2189">
      <style:text-properties fo:color="#000000" fo:font-family="Liberation Sans" style:font-family-complex="Liberation Sans" fo:font-size="18pt" style:font-size-complex="18pt" fo:language="de" style:language-complex="hi" fo:country="DE" style:country-complex="IN" fo:font-weight="bold"/>
    </style:style>
    <style:style style:family="text" style:name="T2190">
      <style:text-properties fo:color="#000000" fo:font-family="Liberation Sans" style:font-family-complex="Liberation Sans" fo:font-size="18pt" style:font-size-complex="18pt" fo:language="de" style:language-complex="hi" fo:country="DE" style:country-complex="IN" fo:font-weight="bold"/>
    </style:style>
    <style:style style:family="text" style:name="T2191">
      <style:text-properties fo:color="#000000" fo:font-family="Liberation Sans" style:font-family-complex="Liberation Sans" fo:font-size="18pt" style:font-size-complex="18pt" fo:language="de" style:language-complex="hi" fo:country="DE" style:country-complex="IN" fo:font-weight="bold"/>
    </style:style>
    <style:style style:family="text" style:name="T2192">
      <style:text-properties fo:color="#000000" fo:font-family="Liberation Sans" style:font-family-complex="Liberation Sans" fo:font-size="18pt" style:font-size-complex="18pt" fo:language="de" style:language-complex="hi" fo:country="DE" style:country-complex="IN" fo:font-weight="bold"/>
    </style:style>
    <style:style style:family="text" style:name="T2193">
      <style:text-properties fo:color="#000000" fo:font-family="Liberation Sans" style:font-family-complex="Liberation Sans" fo:font-size="18pt" style:font-size-complex="18pt" fo:language="de" style:language-complex="hi" fo:country="DE" style:country-complex="IN" fo:font-weight="bold"/>
    </style:style>
    <style:style style:parent-style-name="747" style:family="paragraph" style:name="P548">
      <style:paragraph-properties fo:margin-left="0cm" fo:margin-right="0cm" fo:text-indent="0cm"/>
      <style:text-properties fo:color="#000000" fo:font-family="Liberation Sans" style:font-family-complex="Liberation Sans" fo:font-size="16pt" style:font-size-complex="16pt" fo:language="de" style:language-complex="hi" fo:country="DE" style:country-complex="IN" fo:font-weight="bold"/>
    </style:style>
    <style:style style:family="text" style:name="T2194">
      <style:text-properties fo:color="#000000" fo:font-family="Liberation Sans" style:font-family-complex="Liberation Sans" fo:font-size="16pt" style:font-size-complex="16pt" fo:language="de" style:language-complex="hi" fo:country="DE" style:country-complex="IN" fo:font-weight="bold"/>
    </style:style>
    <style:style style:family="text" style:name="T2195">
      <style:text-properties fo:color="#000000" fo:font-family="Liberation Sans" style:font-family-complex="Liberation Sans" fo:font-size="16pt" style:font-size-complex="16pt" fo:language="de" style:language-complex="hi" fo:country="DE" style:country-complex="IN" fo:font-weight="bold"/>
    </style:style>
    <style:style style:family="text" style:name="T2196">
      <style:text-properties fo:color="#000000" fo:font-family="Liberation Sans" style:font-family-complex="Liberation Sans" fo:font-size="16pt" style:font-size-complex="16pt" fo:language="de" style:language-complex="hi" fo:country="DE" style:country-complex="IN" fo:font-weight="bold"/>
    </style:style>
    <style:style style:family="text" style:name="T2197">
      <style:text-properties fo:color="#000000" fo:font-family="Liberation Sans" style:font-family-complex="Liberation Sans" fo:font-size="16pt" style:font-size-complex="16pt" fo:language="de" style:language-complex="hi" fo:country="DE" style:country-complex="IN" fo:font-weight="bold"/>
    </style:style>
    <style:style style:family="text" style:name="T2198">
      <style:text-properties fo:color="#000000" fo:font-family="Liberation Sans" style:font-family-complex="Liberation Sans" fo:font-size="16pt" style:font-size-complex="16pt" fo:language="de" style:language-complex="hi" fo:country="DE" style:country-complex="IN" fo:font-weight="bold"/>
    </style:style>
    <style:style style:parent-style-name="737" style:family="paragraph" style:name="P549">
      <style:paragraph-properties fo:margin-left="0cm" fo:margin-right="0cm" fo:text-indent="0cm" fo:margin-top="3pt" fo:margin-bottom="3pt"/>
      <style:text-properties fo:color="#000000" fo:font-family="Liberation Serif" style:font-family-complex="Liberation Serif" fo:font-size="12pt" style:font-size-complex="12pt" fo:language="de" style:language-complex="hi" fo:country="DE" style:country-complex="IN"/>
    </style:style>
    <style:style style:family="text" style:name="T2199">
      <style:text-properties fo:color="#000000" fo:font-family="Liberation Serif" style:font-family-complex="Liberation Serif" fo:font-size="12pt" style:font-size-complex="12pt" fo:language="de" style:language-complex="hi" fo:country="DE" style:country-complex="IN"/>
    </style:style>
    <style:style style:family="text" style:name="T2200">
      <style:text-properties fo:color="#000000" fo:font-family="Liberation Serif" style:font-family-complex="Liberation Serif" fo:font-size="12pt" style:font-size-complex="12pt" fo:language="de" style:language-complex="hi" fo:country="DE" style:country-complex="IN"/>
    </style:style>
    <style:style style:family="text" style:name="T2201">
      <style:text-properties fo:color="#000000" fo:font-family="Liberation Serif" style:font-family-complex="Liberation Serif" fo:font-size="12pt" style:font-size-complex="12pt" fo:language="de" style:language-complex="hi" fo:country="DE" style:country-complex="IN"/>
    </style:style>
    <style:style style:parent-style-name="737" style:family="paragraph" style:name="P550">
      <style:paragraph-properties fo:margin-left="0cm" fo:margin-right="0cm" fo:text-indent="0cm" fo:margin-top="3pt" fo:margin-bottom="3pt"/>
      <style:text-properties fo:color="#000000" fo:font-family="Liberation Serif" style:font-family-complex="Liberation Serif" fo:font-size="12pt" style:font-size-complex="12pt" fo:language="de" style:language-complex="hi" fo:country="DE" style:country-complex="IN"/>
    </style:style>
    <style:style style:family="text" style:name="T2202">
      <style:text-properties fo:color="#000000" fo:font-family="Liberation Serif" style:font-family-complex="Liberation Serif" fo:font-size="12pt" style:font-size-complex="12pt" fo:language="de" style:language-complex="hi" fo:country="DE" style:country-complex="IN"/>
    </style:style>
    <style:style style:family="text" style:name="T2203">
      <style:text-properties fo:color="#000000" fo:font-family="Liberation Serif" style:font-family-complex="Liberation Serif" fo:font-size="12pt" style:font-size-complex="12pt" fo:language="de" style:language-complex="hi" fo:country="DE" style:country-complex="IN"/>
    </style:style>
    <style:style style:family="text" style:name="T2204">
      <style:text-properties fo:color="#000000" fo:font-family="Liberation Serif" style:font-family-complex="Liberation Serif" fo:font-size="12pt" style:font-size-complex="12pt" fo:language="de" style:language-complex="hi" fo:country="DE" style:country-complex="IN"/>
    </style:style>
    <style:style style:family="table" style:name="ta9">
      <style:table-properties style:width="17.09cm" fo:margin-left="-0.01588cm" table:align="left"/>
    </style:style>
    <style:style style:family="table-column" style:name="co25">
      <style:table-column-properties style:column-width="7.056cm"/>
    </style:style>
    <style:style style:family="table-column" style:name="co26">
      <style:table-column-properties style:column-width="3.567cm"/>
    </style:style>
    <style:style style:family="table-column" style:name="co27">
      <style:table-column-properties style:column-width="3.565cm"/>
    </style:style>
    <style:style style:family="table-column" style:name="co28">
      <style:table-column-properties style:column-width="2.907cm"/>
    </style:style>
    <style:style style:family="table-row" style:name="ro63">
      <style:table-row-properties/>
    </style:style>
    <style:style style:family="table-cell" style:name="ce191">
      <style:table-cell-properties style:vertical-align="top" style:direction="ltr" fo:background-color="#1f4e79" fo:border="0.00882cm solid #CCCCCC" loext:writing-mode="lr-tb" fo:padding-top="0.1411cm" fo:padding-bottom="0.1411cm" fo:padding-left="0.2117cm" fo:padding-right="0.2117cm"/>
    </style:style>
    <style:style style:parent-style-name="737" style:family="paragraph" style:name="P551">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2205">
      <style:text-properties fo:color="#ffffff" fo:font-family="Liberation Serif" style:font-family-complex="Liberation Serif" fo:font-size="10pt" style:font-size-complex="10pt" fo:language="de" style:language-complex="hi" fo:country="DE" style:country-complex="IN" fo:font-weight="bold"/>
    </style:style>
    <style:style style:family="text" style:name="T2206">
      <style:text-properties fo:color="#000000" fo:font-family="Liberation Serif" style:font-family-complex="Liberation Serif" fo:font-size="12pt" style:font-size-complex="12pt" fo:language="de" style:language-complex="hi" fo:country="DE" style:country-complex="IN"/>
    </style:style>
    <style:style style:family="text" style:name="T2207">
      <style:text-properties fo:color="#000000" fo:font-family="Liberation Serif" style:font-family-complex="Liberation Serif" fo:font-size="12pt" style:font-size-complex="12pt" fo:language="de" style:language-complex="hi" fo:country="DE" style:country-complex="IN"/>
    </style:style>
    <style:style style:family="table-cell" style:name="ce192">
      <style:table-cell-properties style:vertical-align="top" style:direction="ltr" fo:background-color="#1f4e79" fo:border="0.00882cm solid #CCCCCC" loext:writing-mode="lr-tb" fo:padding-top="0.1411cm" fo:padding-bottom="0.1411cm" fo:padding-left="0.2117cm" fo:padding-right="0.2117cm"/>
    </style:style>
    <style:style style:parent-style-name="737" style:family="paragraph" style:name="P552">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2208">
      <style:text-properties fo:color="#ffffff" fo:font-family="Liberation Serif" style:font-family-complex="Liberation Serif" fo:font-size="10pt" style:font-size-complex="10pt" fo:language="de" style:language-complex="hi" fo:country="DE" style:country-complex="IN" fo:font-weight="bold"/>
    </style:style>
    <style:style style:family="text" style:name="T2209">
      <style:text-properties fo:color="#000000" fo:font-family="Liberation Serif" style:font-family-complex="Liberation Serif" fo:font-size="12pt" style:font-size-complex="12pt" fo:language="de" style:language-complex="hi" fo:country="DE" style:country-complex="IN"/>
    </style:style>
    <style:style style:family="text" style:name="T2210">
      <style:text-properties fo:color="#000000" fo:font-family="Liberation Serif" style:font-family-complex="Liberation Serif" fo:font-size="12pt" style:font-size-complex="12pt" fo:language="de" style:language-complex="hi" fo:country="DE" style:country-complex="IN"/>
    </style:style>
    <style:style style:family="table-cell" style:name="ce193">
      <style:table-cell-properties style:vertical-align="top" style:direction="ltr" fo:background-color="#1f4e79" fo:border="0.00882cm solid #CCCCCC" loext:writing-mode="lr-tb" fo:padding-top="0.1411cm" fo:padding-bottom="0.1411cm" fo:padding-left="0.2117cm" fo:padding-right="0.2117cm"/>
    </style:style>
    <style:style style:parent-style-name="737" style:family="paragraph" style:name="P553">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2211">
      <style:text-properties fo:color="#ffffff" fo:font-family="Liberation Serif" style:font-family-complex="Liberation Serif" fo:font-size="10pt" style:font-size-complex="10pt" fo:language="de" style:language-complex="hi" fo:country="DE" style:country-complex="IN" fo:font-weight="bold"/>
    </style:style>
    <style:style style:family="text" style:name="T2212">
      <style:text-properties fo:color="#000000" fo:font-family="Liberation Serif" style:font-family-complex="Liberation Serif" fo:font-size="12pt" style:font-size-complex="12pt" fo:language="de" style:language-complex="hi" fo:country="DE" style:country-complex="IN"/>
    </style:style>
    <style:style style:family="text" style:name="T2213">
      <style:text-properties fo:color="#000000" fo:font-family="Liberation Serif" style:font-family-complex="Liberation Serif" fo:font-size="12pt" style:font-size-complex="12pt" fo:language="de" style:language-complex="hi" fo:country="DE" style:country-complex="IN"/>
    </style:style>
    <style:style style:family="table-cell" style:name="ce194">
      <style:table-cell-properties style:vertical-align="top" style:direction="ltr" fo:background-color="#1f4e79" fo:border="0.00882cm solid #CCCCCC" loext:writing-mode="lr-tb" fo:padding-top="0.1411cm" fo:padding-bottom="0.1411cm" fo:padding-left="0.2117cm" fo:padding-right="0.2117cm"/>
    </style:style>
    <style:style style:parent-style-name="737" style:family="paragraph" style:name="P554">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2214">
      <style:text-properties fo:color="#ffffff" fo:font-family="Liberation Serif" style:font-family-complex="Liberation Serif" fo:font-size="10pt" style:font-size-complex="10pt" fo:language="de" style:language-complex="hi" fo:country="DE" style:country-complex="IN" fo:font-weight="bold"/>
    </style:style>
    <style:style style:family="text" style:name="T2215">
      <style:text-properties fo:color="#000000" fo:font-family="Liberation Serif" style:font-family-complex="Liberation Serif" fo:font-size="12pt" style:font-size-complex="12pt" fo:language="de" style:language-complex="hi" fo:country="DE" style:country-complex="IN"/>
    </style:style>
    <style:style style:family="text" style:name="T2216">
      <style:text-properties fo:color="#000000" fo:font-family="Liberation Serif" style:font-family-complex="Liberation Serif" fo:font-size="12pt" style:font-size-complex="12pt" fo:language="de" style:language-complex="hi" fo:country="DE" style:country-complex="IN"/>
    </style:style>
    <style:style style:family="table-row" style:name="ro64">
      <style:table-row-properties/>
    </style:style>
    <style:style style:family="table-cell" style:name="ce195">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555">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2217">
      <style:text-properties fo:color="#000000" fo:font-family="Liberation Serif" style:font-family-complex="Liberation Serif" fo:font-size="10pt" style:font-size-complex="10pt" fo:language="de" style:language-complex="hi" fo:country="DE" style:country-complex="IN"/>
    </style:style>
    <style:style style:family="text" style:name="T2218">
      <style:text-properties fo:color="#000000" fo:font-family="Liberation Serif" style:font-family-complex="Liberation Serif" fo:font-size="12pt" style:font-size-complex="12pt" fo:language="de" style:language-complex="hi" fo:country="DE" style:country-complex="IN"/>
    </style:style>
    <style:style style:family="text" style:name="T2219">
      <style:text-properties fo:color="#000000" fo:font-family="Liberation Serif" style:font-family-complex="Liberation Serif" fo:font-size="12pt" style:font-size-complex="12pt" fo:language="de" style:language-complex="hi" fo:country="DE" style:country-complex="IN"/>
    </style:style>
    <style:style style:family="table-cell" style:name="ce196">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556">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2220">
      <style:text-properties fo:color="#000000" fo:font-family="Liberation Serif" style:font-family-complex="Liberation Serif" fo:font-size="10pt" style:font-size-complex="10pt" fo:language="de" style:language-complex="hi" fo:country="DE" style:country-complex="IN"/>
    </style:style>
    <style:style style:family="text" style:name="T2221">
      <style:text-properties fo:color="#000000" fo:font-family="Liberation Serif" style:font-family-complex="Liberation Serif" fo:font-size="12pt" style:font-size-complex="12pt" fo:language="de" style:language-complex="hi" fo:country="DE" style:country-complex="IN"/>
    </style:style>
    <style:style style:family="text" style:name="T2222">
      <style:text-properties fo:color="#000000" fo:font-family="Liberation Serif" style:font-family-complex="Liberation Serif" fo:font-size="12pt" style:font-size-complex="12pt" fo:language="de" style:language-complex="hi" fo:country="DE" style:country-complex="IN"/>
    </style:style>
    <style:style style:family="table-cell" style:name="ce197">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557">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2223">
      <style:text-properties fo:color="#000000" fo:font-family="Liberation Serif" style:font-family-complex="Liberation Serif" fo:font-size="10pt" style:font-size-complex="10pt" fo:language="de" style:language-complex="hi" fo:country="DE" style:country-complex="IN"/>
    </style:style>
    <style:style style:family="text" style:name="T2224">
      <style:text-properties fo:color="#000000" fo:font-family="Liberation Serif" style:font-family-complex="Liberation Serif" fo:font-size="12pt" style:font-size-complex="12pt" fo:language="de" style:language-complex="hi" fo:country="DE" style:country-complex="IN"/>
    </style:style>
    <style:style style:family="text" style:name="T2225">
      <style:text-properties fo:color="#000000" fo:font-family="Liberation Serif" style:font-family-complex="Liberation Serif" fo:font-size="12pt" style:font-size-complex="12pt" fo:language="de" style:language-complex="hi" fo:country="DE" style:country-complex="IN"/>
    </style:style>
    <style:style style:family="table-cell" style:name="ce198">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558">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2226">
      <style:text-properties fo:color="#000000" fo:font-family="Liberation Serif" style:font-family-complex="Liberation Serif" fo:font-size="10pt" style:font-size-complex="10pt" fo:language="de" style:language-complex="hi" fo:country="DE" style:country-complex="IN"/>
    </style:style>
    <style:style style:family="text" style:name="T2227">
      <style:text-properties fo:color="#000000" fo:font-family="Liberation Serif" style:font-family-complex="Liberation Serif" fo:font-size="12pt" style:font-size-complex="12pt" fo:language="de" style:language-complex="hi" fo:country="DE" style:country-complex="IN"/>
    </style:style>
    <style:style style:family="text" style:name="T2228">
      <style:text-properties fo:color="#000000" fo:font-family="Liberation Serif" style:font-family-complex="Liberation Serif" fo:font-size="12pt" style:font-size-complex="12pt" fo:language="de" style:language-complex="hi" fo:country="DE" style:country-complex="IN"/>
    </style:style>
    <style:style style:family="table-row" style:name="ro65">
      <style:table-row-properties/>
    </style:style>
    <style:style style:family="table-cell" style:name="ce199">
      <style:table-cell-properties style:vertical-align="top" style:direction="ltr" fo:background-color="#f2f2f2" fo:border="0.00882cm solid #CCCCCC" loext:writing-mode="lr-tb" fo:padding-top="0.1411cm" fo:padding-bottom="0.1411cm" fo:padding-left="0.2117cm" fo:padding-right="0.2117cm"/>
    </style:style>
    <style:style style:parent-style-name="737" style:family="paragraph" style:name="P559">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2229">
      <style:text-properties fo:color="#000000" fo:font-family="Liberation Serif" style:font-family-complex="Liberation Serif" fo:font-size="10pt" style:font-size-complex="10pt" fo:language="de" style:language-complex="hi" fo:country="DE" style:country-complex="IN"/>
    </style:style>
    <style:style style:family="text" style:name="T2230">
      <style:text-properties fo:color="#000000" fo:font-family="Liberation Serif" style:font-family-complex="Liberation Serif" fo:font-size="12pt" style:font-size-complex="12pt" fo:language="de" style:language-complex="hi" fo:country="DE" style:country-complex="IN"/>
    </style:style>
    <style:style style:family="text" style:name="T2231">
      <style:text-properties fo:color="#000000" fo:font-family="Liberation Serif" style:font-family-complex="Liberation Serif" fo:font-size="12pt" style:font-size-complex="12pt" fo:language="de" style:language-complex="hi" fo:country="DE" style:country-complex="IN"/>
    </style:style>
    <style:style style:family="table-cell" style:name="ce200">
      <style:table-cell-properties style:vertical-align="top" style:direction="ltr" fo:background-color="#f2f2f2" fo:border="0.00882cm solid #CCCCCC" loext:writing-mode="lr-tb" fo:padding-top="0.1411cm" fo:padding-bottom="0.1411cm" fo:padding-left="0.2117cm" fo:padding-right="0.2117cm"/>
    </style:style>
    <style:style style:parent-style-name="737" style:family="paragraph" style:name="P560">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2232">
      <style:text-properties fo:color="#000000" fo:font-family="Liberation Serif" style:font-family-complex="Liberation Serif" fo:font-size="10pt" style:font-size-complex="10pt" fo:language="de" style:language-complex="hi" fo:country="DE" style:country-complex="IN"/>
    </style:style>
    <style:style style:family="text" style:name="T2233">
      <style:text-properties fo:color="#000000" fo:font-family="Liberation Serif" style:font-family-complex="Liberation Serif" fo:font-size="12pt" style:font-size-complex="12pt" fo:language="de" style:language-complex="hi" fo:country="DE" style:country-complex="IN"/>
    </style:style>
    <style:style style:family="text" style:name="T2234">
      <style:text-properties fo:color="#000000" fo:font-family="Liberation Serif" style:font-family-complex="Liberation Serif" fo:font-size="12pt" style:font-size-complex="12pt" fo:language="de" style:language-complex="hi" fo:country="DE" style:country-complex="IN"/>
    </style:style>
    <style:style style:family="table-cell" style:name="ce201">
      <style:table-cell-properties style:vertical-align="top" style:direction="ltr" fo:background-color="#f2f2f2" fo:border="0.00882cm solid #CCCCCC" loext:writing-mode="lr-tb" fo:padding-top="0.1411cm" fo:padding-bottom="0.1411cm" fo:padding-left="0.2117cm" fo:padding-right="0.2117cm"/>
    </style:style>
    <style:style style:parent-style-name="737" style:family="paragraph" style:name="P561">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2235">
      <style:text-properties fo:color="#000000" fo:font-family="Liberation Serif" style:font-family-complex="Liberation Serif" fo:font-size="10pt" style:font-size-complex="10pt" fo:language="de" style:language-complex="hi" fo:country="DE" style:country-complex="IN"/>
    </style:style>
    <style:style style:family="text" style:name="T2236">
      <style:text-properties fo:color="#000000" fo:font-family="Liberation Serif" style:font-family-complex="Liberation Serif" fo:font-size="12pt" style:font-size-complex="12pt" fo:language="de" style:language-complex="hi" fo:country="DE" style:country-complex="IN"/>
    </style:style>
    <style:style style:family="text" style:name="T2237">
      <style:text-properties fo:color="#000000" fo:font-family="Liberation Serif" style:font-family-complex="Liberation Serif" fo:font-size="12pt" style:font-size-complex="12pt" fo:language="de" style:language-complex="hi" fo:country="DE" style:country-complex="IN"/>
    </style:style>
    <style:style style:family="table-cell" style:name="ce202">
      <style:table-cell-properties style:vertical-align="top" style:direction="ltr" fo:background-color="#f2f2f2" fo:border="0.00882cm solid #CCCCCC" loext:writing-mode="lr-tb" fo:padding-top="0.1411cm" fo:padding-bottom="0.1411cm" fo:padding-left="0.2117cm" fo:padding-right="0.2117cm"/>
    </style:style>
    <style:style style:parent-style-name="737" style:family="paragraph" style:name="P562">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2238">
      <style:text-properties fo:color="#000000" fo:font-family="Liberation Serif" style:font-family-complex="Liberation Serif" fo:font-size="10pt" style:font-size-complex="10pt" fo:language="de" style:language-complex="hi" fo:country="DE" style:country-complex="IN"/>
    </style:style>
    <style:style style:family="text" style:name="T2239">
      <style:text-properties fo:color="#000000" fo:font-family="Liberation Serif" style:font-family-complex="Liberation Serif" fo:font-size="12pt" style:font-size-complex="12pt" fo:language="de" style:language-complex="hi" fo:country="DE" style:country-complex="IN"/>
    </style:style>
    <style:style style:family="text" style:name="T2240">
      <style:text-properties fo:color="#000000" fo:font-family="Liberation Serif" style:font-family-complex="Liberation Serif" fo:font-size="12pt" style:font-size-complex="12pt" fo:language="de" style:language-complex="hi" fo:country="DE" style:country-complex="IN"/>
    </style:style>
    <style:style style:family="table-row" style:name="ro66">
      <style:table-row-properties/>
    </style:style>
    <style:style style:family="table-cell" style:name="ce203">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563">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2241">
      <style:text-properties fo:color="#000000" fo:font-family="Liberation Serif" style:font-family-complex="Liberation Serif" fo:font-size="10pt" style:font-size-complex="10pt" fo:language="de" style:language-complex="hi" fo:country="DE" style:country-complex="IN"/>
    </style:style>
    <style:style style:family="text" style:name="T2242">
      <style:text-properties fo:color="#000000" fo:font-family="Liberation Serif" style:font-family-complex="Liberation Serif" fo:font-size="12pt" style:font-size-complex="12pt" fo:language="de" style:language-complex="hi" fo:country="DE" style:country-complex="IN"/>
    </style:style>
    <style:style style:family="text" style:name="T2243">
      <style:text-properties fo:color="#000000" fo:font-family="Liberation Serif" style:font-family-complex="Liberation Serif" fo:font-size="12pt" style:font-size-complex="12pt" fo:language="de" style:language-complex="hi" fo:country="DE" style:country-complex="IN"/>
    </style:style>
    <style:style style:family="table-cell" style:name="ce204">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564">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2244">
      <style:text-properties fo:color="#000000" fo:font-family="Liberation Serif" style:font-family-complex="Liberation Serif" fo:font-size="10pt" style:font-size-complex="10pt" fo:language="de" style:language-complex="hi" fo:country="DE" style:country-complex="IN"/>
    </style:style>
    <style:style style:family="text" style:name="T2245">
      <style:text-properties fo:color="#000000" fo:font-family="Liberation Serif" style:font-family-complex="Liberation Serif" fo:font-size="12pt" style:font-size-complex="12pt" fo:language="de" style:language-complex="hi" fo:country="DE" style:country-complex="IN"/>
    </style:style>
    <style:style style:family="text" style:name="T2246">
      <style:text-properties fo:color="#000000" fo:font-family="Liberation Serif" style:font-family-complex="Liberation Serif" fo:font-size="12pt" style:font-size-complex="12pt" fo:language="de" style:language-complex="hi" fo:country="DE" style:country-complex="IN"/>
    </style:style>
    <style:style style:family="table-cell" style:name="ce205">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565">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2247">
      <style:text-properties fo:color="#000000" fo:font-family="Liberation Serif" style:font-family-complex="Liberation Serif" fo:font-size="10pt" style:font-size-complex="10pt" fo:language="de" style:language-complex="hi" fo:country="DE" style:country-complex="IN"/>
    </style:style>
    <style:style style:family="text" style:name="T2248">
      <style:text-properties fo:color="#000000" fo:font-family="Liberation Serif" style:font-family-complex="Liberation Serif" fo:font-size="12pt" style:font-size-complex="12pt" fo:language="de" style:language-complex="hi" fo:country="DE" style:country-complex="IN"/>
    </style:style>
    <style:style style:family="text" style:name="T2249">
      <style:text-properties fo:color="#000000" fo:font-family="Liberation Serif" style:font-family-complex="Liberation Serif" fo:font-size="12pt" style:font-size-complex="12pt" fo:language="de" style:language-complex="hi" fo:country="DE" style:country-complex="IN"/>
    </style:style>
    <style:style style:family="table-cell" style:name="ce206">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566">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2250">
      <style:text-properties fo:color="#000000" fo:font-family="Liberation Serif" style:font-family-complex="Liberation Serif" fo:font-size="10pt" style:font-size-complex="10pt" fo:language="de" style:language-complex="hi" fo:country="DE" style:country-complex="IN"/>
    </style:style>
    <style:style style:family="text" style:name="T2251">
      <style:text-properties fo:color="#000000" fo:font-family="Liberation Serif" style:font-family-complex="Liberation Serif" fo:font-size="12pt" style:font-size-complex="12pt" fo:language="de" style:language-complex="hi" fo:country="DE" style:country-complex="IN"/>
    </style:style>
    <style:style style:family="text" style:name="T2252">
      <style:text-properties fo:color="#000000" fo:font-family="Liberation Serif" style:font-family-complex="Liberation Serif" fo:font-size="12pt" style:font-size-complex="12pt" fo:language="de" style:language-complex="hi" fo:country="DE" style:country-complex="IN"/>
    </style:style>
    <style:style style:family="table-row" style:name="ro67">
      <style:table-row-properties/>
    </style:style>
    <style:style style:family="table-cell" style:name="ce207">
      <style:table-cell-properties style:vertical-align="top" style:direction="ltr" fo:background-color="#f2f2f2" fo:border="0.00882cm solid #CCCCCC" loext:writing-mode="lr-tb" fo:padding-top="0.1411cm" fo:padding-bottom="0.1411cm" fo:padding-left="0.2117cm" fo:padding-right="0.2117cm"/>
    </style:style>
    <style:style style:parent-style-name="737" style:family="paragraph" style:name="P567">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2253">
      <style:text-properties fo:color="#000000" fo:font-family="Liberation Serif" style:font-family-complex="Liberation Serif" fo:font-size="10pt" style:font-size-complex="10pt" fo:language="de" style:language-complex="hi" fo:country="DE" style:country-complex="IN"/>
    </style:style>
    <style:style style:family="text" style:name="T2254">
      <style:text-properties fo:color="#000000" fo:font-family="Liberation Serif" style:font-family-complex="Liberation Serif" fo:font-size="12pt" style:font-size-complex="12pt" fo:language="de" style:language-complex="hi" fo:country="DE" style:country-complex="IN"/>
    </style:style>
    <style:style style:family="text" style:name="T2255">
      <style:text-properties fo:color="#000000" fo:font-family="Liberation Serif" style:font-family-complex="Liberation Serif" fo:font-size="12pt" style:font-size-complex="12pt" fo:language="de" style:language-complex="hi" fo:country="DE" style:country-complex="IN"/>
    </style:style>
    <style:style style:family="table-cell" style:name="ce208">
      <style:table-cell-properties style:vertical-align="top" style:direction="ltr" fo:background-color="#f2f2f2" fo:border="0.00882cm solid #CCCCCC" loext:writing-mode="lr-tb" fo:padding-top="0.1411cm" fo:padding-bottom="0.1411cm" fo:padding-left="0.2117cm" fo:padding-right="0.2117cm"/>
    </style:style>
    <style:style style:parent-style-name="737" style:family="paragraph" style:name="P568">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2256">
      <style:text-properties fo:color="#000000" fo:font-family="Liberation Serif" style:font-family-complex="Liberation Serif" fo:font-size="10pt" style:font-size-complex="10pt" fo:language="de" style:language-complex="hi" fo:country="DE" style:country-complex="IN"/>
    </style:style>
    <style:style style:family="text" style:name="T2257">
      <style:text-properties fo:color="#000000" fo:font-family="Liberation Serif" style:font-family-complex="Liberation Serif" fo:font-size="12pt" style:font-size-complex="12pt" fo:language="de" style:language-complex="hi" fo:country="DE" style:country-complex="IN"/>
    </style:style>
    <style:style style:family="text" style:name="T2258">
      <style:text-properties fo:color="#000000" fo:font-family="Liberation Serif" style:font-family-complex="Liberation Serif" fo:font-size="12pt" style:font-size-complex="12pt" fo:language="de" style:language-complex="hi" fo:country="DE" style:country-complex="IN"/>
    </style:style>
    <style:style style:family="table-cell" style:name="ce209">
      <style:table-cell-properties style:vertical-align="top" style:direction="ltr" fo:background-color="#f2f2f2" fo:border="0.00882cm solid #CCCCCC" loext:writing-mode="lr-tb" fo:padding-top="0.1411cm" fo:padding-bottom="0.1411cm" fo:padding-left="0.2117cm" fo:padding-right="0.2117cm"/>
    </style:style>
    <style:style style:parent-style-name="737" style:family="paragraph" style:name="P569">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2259">
      <style:text-properties fo:color="#000000" fo:font-family="Liberation Serif" style:font-family-complex="Liberation Serif" fo:font-size="10pt" style:font-size-complex="10pt" fo:language="de" style:language-complex="hi" fo:country="DE" style:country-complex="IN"/>
    </style:style>
    <style:style style:family="text" style:name="T2260">
      <style:text-properties fo:color="#000000" fo:font-family="Liberation Serif" style:font-family-complex="Liberation Serif" fo:font-size="12pt" style:font-size-complex="12pt" fo:language="de" style:language-complex="hi" fo:country="DE" style:country-complex="IN"/>
    </style:style>
    <style:style style:family="text" style:name="T2261">
      <style:text-properties fo:color="#000000" fo:font-family="Liberation Serif" style:font-family-complex="Liberation Serif" fo:font-size="12pt" style:font-size-complex="12pt" fo:language="de" style:language-complex="hi" fo:country="DE" style:country-complex="IN"/>
    </style:style>
    <style:style style:family="table-cell" style:name="ce210">
      <style:table-cell-properties style:vertical-align="top" style:direction="ltr" fo:background-color="#f2f2f2" fo:border="0.00882cm solid #CCCCCC" loext:writing-mode="lr-tb" fo:padding-top="0.1411cm" fo:padding-bottom="0.1411cm" fo:padding-left="0.2117cm" fo:padding-right="0.2117cm"/>
    </style:style>
    <style:style style:parent-style-name="737" style:family="paragraph" style:name="P570">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2262">
      <style:text-properties fo:color="#000000" fo:font-family="Liberation Serif" style:font-family-complex="Liberation Serif" fo:font-size="10pt" style:font-size-complex="10pt" fo:language="de" style:language-complex="hi" fo:country="DE" style:country-complex="IN"/>
    </style:style>
    <style:style style:family="text" style:name="T2263">
      <style:text-properties fo:color="#000000" fo:font-family="Liberation Serif" style:font-family-complex="Liberation Serif" fo:font-size="12pt" style:font-size-complex="12pt" fo:language="de" style:language-complex="hi" fo:country="DE" style:country-complex="IN"/>
    </style:style>
    <style:style style:family="text" style:name="T2264">
      <style:text-properties fo:color="#000000" fo:font-family="Liberation Serif" style:font-family-complex="Liberation Serif" fo:font-size="12pt" style:font-size-complex="12pt" fo:language="de" style:language-complex="hi" fo:country="DE" style:country-complex="IN"/>
    </style:style>
    <style:style style:parent-style-name="737" style:family="paragraph" style:name="P571">
      <style:paragraph-properties fo:margin-left="0cm" fo:margin-right="0cm" fo:text-indent="0cm" fo:margin-top="3pt" fo:margin-bottom="3pt"/>
      <style:text-properties fo:color="#000000" fo:font-family="Liberation Serif" style:font-family-complex="Liberation Serif" fo:font-size="12pt" style:font-size-complex="12pt" fo:language="de" style:language-complex="hi" fo:country="DE" style:country-complex="IN"/>
    </style:style>
    <style:style style:family="text" style:name="T2265">
      <style:text-properties fo:color="#000000" fo:font-family="Liberation Serif" style:font-family-complex="Liberation Serif" fo:font-size="12pt" style:font-size-complex="12pt" fo:language="de" style:language-complex="hi" fo:country="DE" style:country-complex="IN"/>
    </style:style>
    <style:style style:family="text" style:name="T2266">
      <style:text-properties fo:color="#000000" fo:font-family="Liberation Serif" style:font-family-complex="Liberation Serif" fo:font-size="12pt" style:font-size-complex="12pt" fo:language="de" style:language-complex="hi" fo:country="DE" style:country-complex="IN"/>
    </style:style>
    <style:style style:family="text" style:name="T2267">
      <style:text-properties fo:color="#000000" fo:font-family="Liberation Serif" style:font-family-complex="Liberation Serif" fo:font-size="12pt" style:font-size-complex="12pt" fo:language="de" style:language-complex="hi" fo:country="DE" style:country-complex="IN"/>
    </style:style>
    <style:style style:parent-style-name="737" style:family="paragraph" style:name="P572">
      <style:paragraph-properties fo:margin-left="0cm" fo:margin-right="0cm" fo:text-indent="0cm" fo:margin-top="3pt" fo:margin-bottom="3pt"/>
      <style:text-properties fo:color="#000000" fo:font-family="Liberation Serif" style:font-family-complex="Liberation Serif" fo:font-size="12pt" style:font-size-complex="12pt" fo:language="de" style:language-complex="hi" fo:country="DE" style:country-complex="IN"/>
    </style:style>
    <style:style style:family="text" style:name="T2268">
      <style:text-properties fo:color="#000000" fo:font-family="Liberation Serif" style:font-family-complex="Liberation Serif" fo:font-size="12pt" style:font-size-complex="12pt" fo:language="de" style:language-complex="hi" fo:country="DE" style:country-complex="IN"/>
    </style:style>
    <style:style style:family="text" style:name="T2269">
      <style:text-properties fo:color="#000000" fo:font-family="Liberation Serif" style:font-family-complex="Liberation Serif" fo:font-size="12pt" style:font-size-complex="12pt" fo:language="de" style:language-complex="hi" fo:country="DE" style:country-complex="IN"/>
    </style:style>
    <style:style style:family="text" style:name="T2270">
      <style:text-properties fo:color="#000000" fo:font-family="Liberation Serif" style:font-family-complex="Liberation Serif" fo:font-size="12pt" style:font-size-complex="12pt" fo:language="de" style:language-complex="hi" fo:country="DE" style:country-complex="IN"/>
    </style:style>
    <style:style style:family="text" style:name="T2271">
      <style:text-properties fo:color="#000000" fo:font-family="Liberation Serif" style:font-family-complex="Liberation Serif" fo:font-size="12pt" style:font-size-complex="12pt" fo:language="de" style:language-complex="hi" fo:country="DE" style:country-complex="IN"/>
    </style:style>
    <style:style style:parent-style-name="737" style:family="paragraph" style:name="P573">
      <style:paragraph-properties fo:margin-left="0cm" fo:margin-right="0cm" fo:text-indent="0cm" fo:margin-top="3pt" fo:margin-bottom="3pt"/>
      <style:text-properties fo:color="#000000" fo:font-family="Liberation Serif" style:font-family-complex="Liberation Serif" fo:font-size="12pt" style:font-size-complex="12pt" fo:language="de" style:language-complex="hi" fo:country="DE" style:country-complex="IN"/>
    </style:style>
    <style:style style:family="text" style:name="T2272">
      <style:text-properties fo:color="#000000" fo:font-family="Liberation Serif" style:font-family-complex="Liberation Serif" fo:font-size="12pt" style:font-size-complex="12pt" fo:language="de" style:language-complex="hi" fo:country="DE" style:country-complex="IN"/>
    </style:style>
    <style:style style:family="text" style:name="T2273">
      <style:text-properties fo:color="#000000" fo:font-family="Liberation Serif" style:font-family-complex="Liberation Serif" fo:font-size="12pt" style:font-size-complex="12pt" fo:language="de" style:language-complex="hi" fo:country="DE" style:country-complex="IN"/>
    </style:style>
    <style:style style:family="text" style:name="T2274">
      <style:text-properties fo:color="#000000" fo:font-family="Liberation Serif" style:font-family-complex="Liberation Serif" fo:font-size="12pt" style:font-size-complex="12pt" fo:language="de" style:language-complex="hi" fo:country="DE" style:country-complex="IN"/>
    </style:style>
    <style:style style:parent-style-name="737" style:family="paragraph" style:name="P574">
      <style:paragraph-properties fo:margin-left="0cm" fo:margin-right="0cm" fo:text-indent="0cm" fo:margin-top="3pt" fo:margin-bottom="3pt"/>
      <style:text-properties fo:color="#000000" fo:font-family="Liberation Serif" style:font-family-complex="Liberation Serif" fo:font-size="12pt" style:font-size-complex="12pt" fo:language="de" style:language-complex="hi" fo:country="DE" style:country-complex="IN"/>
    </style:style>
    <style:style style:family="text" style:name="T2275">
      <style:text-properties fo:color="#000000" fo:font-family="Liberation Serif" style:font-family-complex="Liberation Serif" fo:font-size="12pt" style:font-size-complex="12pt" fo:language="de" style:language-complex="hi" fo:country="DE" style:country-complex="IN"/>
    </style:style>
    <style:style style:family="text" style:name="T2276">
      <style:text-properties fo:color="#000000" fo:font-family="Liberation Serif" style:font-family-complex="Liberation Serif" fo:font-size="12pt" style:font-size-complex="12pt" fo:language="de" style:language-complex="hi" fo:country="DE" style:country-complex="IN"/>
    </style:style>
    <style:style style:family="text" style:name="T2277">
      <style:text-properties fo:color="#000000" fo:font-family="Liberation Serif" style:font-family-complex="Liberation Serif" fo:font-size="12pt" style:font-size-complex="12pt" fo:language="de" style:language-complex="hi" fo:country="DE" style:country-complex="IN"/>
    </style:style>
    <style:style style:family="text" style:name="T2278">
      <style:text-properties fo:color="#000000" fo:font-family="Liberation Serif" style:font-family-complex="Liberation Serif" fo:font-size="12pt" style:font-size-complex="12pt" fo:language="de" style:language-complex="hi" fo:country="DE" style:country-complex="IN"/>
    </style:style>
    <style:style style:parent-style-name="747" style:family="paragraph" style:name="P575">
      <style:paragraph-properties fo:margin-left="0cm" fo:margin-right="0cm" fo:text-indent="0cm"/>
      <style:text-properties fo:color="#000000" fo:font-family="Liberation Sans" style:font-family-complex="Liberation Sans" fo:font-size="16pt" style:font-size-complex="16pt" fo:language="de" style:language-complex="hi" fo:country="DE" style:country-complex="IN" fo:font-weight="bold"/>
    </style:style>
    <style:style style:family="text" style:name="T2279">
      <style:text-properties fo:color="#000000" fo:font-family="Liberation Sans" style:font-family-complex="Liberation Sans" fo:font-size="16pt" style:font-size-complex="16pt" fo:language="de" style:language-complex="hi" fo:country="DE" style:country-complex="IN" fo:font-weight="bold"/>
    </style:style>
    <style:style style:family="text" style:name="T2280">
      <style:text-properties fo:color="#000000" fo:font-family="Liberation Sans" style:font-family-complex="Liberation Sans" fo:font-size="16pt" style:font-size-complex="16pt" fo:language="de" style:language-complex="hi" fo:country="DE" style:country-complex="IN" fo:font-weight="bold"/>
    </style:style>
    <style:style style:family="text" style:name="T2281">
      <style:text-properties fo:color="#000000" fo:font-family="Liberation Sans" style:font-family-complex="Liberation Sans" fo:font-size="16pt" style:font-size-complex="16pt" fo:language="de" style:language-complex="hi" fo:country="DE" style:country-complex="IN" fo:font-weight="bold"/>
    </style:style>
    <style:style style:family="text" style:name="T2282">
      <style:text-properties fo:color="#000000" fo:font-family="Liberation Sans" style:font-family-complex="Liberation Sans" fo:font-size="16pt" style:font-size-complex="16pt" fo:language="de" style:language-complex="hi" fo:country="DE" style:country-complex="IN" fo:font-weight="bold"/>
    </style:style>
    <style:style style:family="text" style:name="T2283">
      <style:text-properties fo:color="#000000" fo:font-family="Liberation Sans" style:font-family-complex="Liberation Sans" fo:font-size="16pt" style:font-size-complex="16pt" fo:language="de" style:language-complex="hi" fo:country="DE" style:country-complex="IN" fo:font-weight="bold"/>
    </style:style>
    <style:style style:parent-style-name="737" style:family="paragraph" style:name="P576">
      <style:paragraph-properties fo:margin-left="0cm" fo:margin-right="0cm" fo:text-indent="0cm" fo:margin-top="3pt" fo:margin-bottom="3pt"/>
      <style:text-properties fo:color="#000000" fo:font-family="Liberation Serif" style:font-family-complex="Liberation Serif" fo:font-size="12pt" style:font-size-complex="12pt" fo:language="de" style:language-complex="hi" fo:country="DE" style:country-complex="IN"/>
    </style:style>
    <style:style style:family="text" style:name="T2284">
      <style:text-properties fo:color="#000000" fo:font-family="Liberation Serif" style:font-family-complex="Liberation Serif" fo:font-size="12pt" style:font-size-complex="12pt" fo:language="de" style:language-complex="hi" fo:country="DE" style:country-complex="IN"/>
    </style:style>
    <style:style style:family="text" style:name="T2285">
      <style:text-properties fo:color="#000000" fo:font-family="Liberation Serif" style:font-family-complex="Liberation Serif" fo:font-size="12pt" style:font-size-complex="12pt" fo:language="de" style:language-complex="hi" fo:country="DE" style:country-complex="IN"/>
    </style:style>
    <style:style style:family="text" style:name="T2286">
      <style:text-properties fo:color="#000000" fo:font-family="Liberation Serif" style:font-family-complex="Liberation Serif" fo:font-size="12pt" style:font-size-complex="12pt" fo:language="de" style:language-complex="hi" fo:country="DE" style:country-complex="IN"/>
    </style:style>
    <style:style style:parent-style-name="737" style:family="paragraph" style:name="P577">
      <style:paragraph-properties fo:margin-left="0cm" fo:margin-right="0cm" fo:text-indent="0cm" fo:margin-top="3pt" fo:margin-bottom="3pt"/>
      <style:text-properties fo:color="#000000" fo:font-family="Liberation Serif" style:font-family-complex="Liberation Serif" fo:font-size="12pt" style:font-size-complex="12pt" fo:language="de" style:language-complex="hi" fo:country="DE" style:country-complex="IN"/>
    </style:style>
    <style:style style:family="text" style:name="T2287">
      <style:text-properties fo:color="#000000" fo:font-family="Liberation Serif" style:font-family-complex="Liberation Serif" fo:font-size="12pt" style:font-size-complex="12pt" fo:language="de" style:language-complex="hi" fo:country="DE" style:country-complex="IN"/>
    </style:style>
    <style:style style:family="text" style:name="T2288">
      <style:text-properties fo:color="#000000" fo:font-family="Liberation Serif" style:font-family-complex="Liberation Serif" fo:font-size="12pt" style:font-size-complex="12pt" fo:language="de" style:language-complex="hi" fo:country="DE" style:country-complex="IN"/>
    </style:style>
    <style:style style:family="text" style:name="T2289">
      <style:text-properties fo:color="#000000" fo:font-family="Liberation Serif" style:font-family-complex="Liberation Serif" fo:font-size="12pt" style:font-size-complex="12pt" fo:language="de" style:language-complex="hi" fo:country="DE" style:country-complex="IN"/>
    </style:style>
    <style:style style:family="table" style:name="ta10">
      <style:table-properties style:width="17.49cm" fo:margin-left="-0.01588cm" table:align="left"/>
    </style:style>
    <style:style style:family="table-column" style:name="co29">
      <style:table-column-properties style:column-width="6.024cm"/>
    </style:style>
    <style:style style:family="table-column" style:name="co30">
      <style:table-column-properties style:column-width="2.186cm"/>
    </style:style>
    <style:style style:family="table-column" style:name="co31">
      <style:table-column-properties style:column-width="4.436cm"/>
    </style:style>
    <style:style style:family="table-column" style:name="co32">
      <style:table-column-properties style:column-width="4.84cm"/>
    </style:style>
    <style:style style:family="table-row" style:name="ro68">
      <style:table-row-properties/>
    </style:style>
    <style:style style:family="table-cell" style:name="ce212">
      <style:table-cell-properties style:vertical-align="top" style:direction="ltr" fo:background-color="#1f4e79" fo:border="0.00882cm solid #CCCCCC" loext:writing-mode="lr-tb" fo:padding-top="0.1411cm" fo:padding-bottom="0.1411cm" fo:padding-left="0.2117cm" fo:padding-right="0.2117cm"/>
    </style:style>
    <style:style style:parent-style-name="737" style:family="paragraph" style:name="P578">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2290">
      <style:text-properties fo:color="#ffffff" fo:font-family="Liberation Serif" style:font-family-complex="Liberation Serif" fo:font-size="10pt" style:font-size-complex="10pt" fo:language="de" style:language-complex="hi" fo:country="DE" style:country-complex="IN" fo:font-weight="bold"/>
    </style:style>
    <style:style style:family="text" style:name="T2291">
      <style:text-properties fo:color="#000000" fo:font-family="Liberation Serif" style:font-family-complex="Liberation Serif" fo:font-size="12pt" style:font-size-complex="12pt" fo:language="de" style:language-complex="hi" fo:country="DE" style:country-complex="IN"/>
    </style:style>
    <style:style style:family="text" style:name="T2292">
      <style:text-properties fo:color="#000000" fo:font-family="Liberation Serif" style:font-family-complex="Liberation Serif" fo:font-size="12pt" style:font-size-complex="12pt" fo:language="de" style:language-complex="hi" fo:country="DE" style:country-complex="IN"/>
    </style:style>
    <style:style style:family="table-cell" style:name="ce213">
      <style:table-cell-properties style:vertical-align="top" style:direction="ltr" fo:background-color="#1f4e79" fo:border="0.00882cm solid #CCCCCC" loext:writing-mode="lr-tb" fo:padding-top="0.1411cm" fo:padding-bottom="0.1411cm" fo:padding-left="0.2117cm" fo:padding-right="0.2117cm"/>
    </style:style>
    <style:style style:parent-style-name="737" style:family="paragraph" style:name="P579">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2293">
      <style:text-properties fo:color="#ffffff" fo:font-family="Liberation Serif" style:font-family-complex="Liberation Serif" fo:font-size="10pt" style:font-size-complex="10pt" fo:language="de" style:language-complex="hi" fo:country="DE" style:country-complex="IN" fo:font-weight="bold"/>
    </style:style>
    <style:style style:family="text" style:name="T2294">
      <style:text-properties fo:color="#000000" fo:font-family="Liberation Serif" style:font-family-complex="Liberation Serif" fo:font-size="12pt" style:font-size-complex="12pt" fo:language="de" style:language-complex="hi" fo:country="DE" style:country-complex="IN"/>
    </style:style>
    <style:style style:family="text" style:name="T2295">
      <style:text-properties fo:color="#000000" fo:font-family="Liberation Serif" style:font-family-complex="Liberation Serif" fo:font-size="12pt" style:font-size-complex="12pt" fo:language="de" style:language-complex="hi" fo:country="DE" style:country-complex="IN"/>
    </style:style>
    <style:style style:family="table-cell" style:name="ce214">
      <style:table-cell-properties style:vertical-align="top" style:direction="ltr" fo:background-color="#1f4e79" fo:border="0.00882cm solid #CCCCCC" loext:writing-mode="lr-tb" fo:padding-top="0.1411cm" fo:padding-bottom="0.1411cm" fo:padding-left="0.2117cm" fo:padding-right="0.2117cm"/>
    </style:style>
    <style:style style:parent-style-name="737" style:family="paragraph" style:name="P580">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2296">
      <style:text-properties fo:color="#ffffff" fo:font-family="Liberation Serif" style:font-family-complex="Liberation Serif" fo:font-size="10pt" style:font-size-complex="10pt" fo:language="de" style:language-complex="hi" fo:country="DE" style:country-complex="IN" fo:font-weight="bold"/>
    </style:style>
    <style:style style:family="text" style:name="T2297">
      <style:text-properties fo:color="#000000" fo:font-family="Liberation Serif" style:font-family-complex="Liberation Serif" fo:font-size="12pt" style:font-size-complex="12pt" fo:language="de" style:language-complex="hi" fo:country="DE" style:country-complex="IN"/>
    </style:style>
    <style:style style:family="text" style:name="T2298">
      <style:text-properties fo:color="#000000" fo:font-family="Liberation Serif" style:font-family-complex="Liberation Serif" fo:font-size="12pt" style:font-size-complex="12pt" fo:language="de" style:language-complex="hi" fo:country="DE" style:country-complex="IN"/>
    </style:style>
    <style:style style:family="table-cell" style:name="ce215">
      <style:table-cell-properties style:vertical-align="top" style:direction="ltr" fo:background-color="#1f4e79" fo:border="0.00882cm solid #CCCCCC" loext:writing-mode="lr-tb" fo:padding-top="0.1411cm" fo:padding-bottom="0.1411cm" fo:padding-left="0.2117cm" fo:padding-right="0.2117cm"/>
    </style:style>
    <style:style style:parent-style-name="737" style:family="paragraph" style:name="P581">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2299">
      <style:text-properties fo:color="#ffffff" fo:font-family="Liberation Serif" style:font-family-complex="Liberation Serif" fo:font-size="10pt" style:font-size-complex="10pt" fo:language="de" style:language-complex="hi" fo:country="DE" style:country-complex="IN" fo:font-weight="bold"/>
    </style:style>
    <style:style style:family="text" style:name="T2300">
      <style:text-properties fo:color="#000000" fo:font-family="Liberation Serif" style:font-family-complex="Liberation Serif" fo:font-size="12pt" style:font-size-complex="12pt" fo:language="de" style:language-complex="hi" fo:country="DE" style:country-complex="IN"/>
    </style:style>
    <style:style style:family="text" style:name="T2301">
      <style:text-properties fo:color="#000000" fo:font-family="Liberation Serif" style:font-family-complex="Liberation Serif" fo:font-size="12pt" style:font-size-complex="12pt" fo:language="de" style:language-complex="hi" fo:country="DE" style:country-complex="IN"/>
    </style:style>
    <style:style style:family="table-row" style:name="ro69">
      <style:table-row-properties/>
    </style:style>
    <style:style style:family="table-cell" style:name="ce216">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582">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2302">
      <style:text-properties fo:color="#000000" fo:font-family="Liberation Serif" style:font-family-complex="Liberation Serif" fo:font-size="10pt" style:font-size-complex="10pt" fo:language="de" style:language-complex="hi" fo:country="DE" style:country-complex="IN"/>
    </style:style>
    <style:style style:family="text" style:name="T2303">
      <style:text-properties fo:color="#000000" fo:font-family="Liberation Serif" style:font-family-complex="Liberation Serif" fo:font-size="12pt" style:font-size-complex="12pt" fo:language="de" style:language-complex="hi" fo:country="DE" style:country-complex="IN"/>
    </style:style>
    <style:style style:family="text" style:name="T2304">
      <style:text-properties fo:color="#000000" fo:font-family="Liberation Serif" style:font-family-complex="Liberation Serif" fo:font-size="12pt" style:font-size-complex="12pt" fo:language="de" style:language-complex="hi" fo:country="DE" style:country-complex="IN"/>
    </style:style>
    <style:style style:family="table-cell" style:name="ce217">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583">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2305">
      <style:text-properties fo:color="#000000" fo:font-family="Liberation Serif" style:font-family-complex="Liberation Serif" fo:font-size="10pt" style:font-size-complex="10pt" fo:language="de" style:language-complex="hi" fo:country="DE" style:country-complex="IN"/>
    </style:style>
    <style:style style:family="text" style:name="T2306">
      <style:text-properties fo:color="#000000" fo:font-family="Liberation Serif" style:font-family-complex="Liberation Serif" fo:font-size="12pt" style:font-size-complex="12pt" fo:language="de" style:language-complex="hi" fo:country="DE" style:country-complex="IN"/>
    </style:style>
    <style:style style:family="text" style:name="T2307">
      <style:text-properties fo:color="#000000" fo:font-family="Liberation Serif" style:font-family-complex="Liberation Serif" fo:font-size="12pt" style:font-size-complex="12pt" fo:language="de" style:language-complex="hi" fo:country="DE" style:country-complex="IN"/>
    </style:style>
    <style:style style:family="table-cell" style:name="ce218">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584">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2308">
      <style:text-properties fo:color="#000000" fo:font-family="Liberation Serif" style:font-family-complex="Liberation Serif" fo:font-size="10pt" style:font-size-complex="10pt" fo:language="de" style:language-complex="hi" fo:country="DE" style:country-complex="IN"/>
    </style:style>
    <style:style style:family="text" style:name="T2309">
      <style:text-properties fo:color="#000000" fo:font-family="Liberation Serif" style:font-family-complex="Liberation Serif" fo:font-size="12pt" style:font-size-complex="12pt" fo:language="de" style:language-complex="hi" fo:country="DE" style:country-complex="IN"/>
    </style:style>
    <style:style style:family="text" style:name="T2310">
      <style:text-properties fo:color="#000000" fo:font-family="Liberation Serif" style:font-family-complex="Liberation Serif" fo:font-size="12pt" style:font-size-complex="12pt" fo:language="de" style:language-complex="hi" fo:country="DE" style:country-complex="IN"/>
    </style:style>
    <style:style style:family="table-cell" style:name="ce219">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585">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2311">
      <style:text-properties fo:color="#000000" fo:font-family="Liberation Serif" style:font-family-complex="Liberation Serif" fo:font-size="10pt" style:font-size-complex="10pt" fo:language="de" style:language-complex="hi" fo:country="DE" style:country-complex="IN"/>
    </style:style>
    <style:style style:family="text" style:name="T2312">
      <style:text-properties fo:color="#000000" fo:font-family="Liberation Serif" style:font-family-complex="Liberation Serif" fo:font-size="12pt" style:font-size-complex="12pt" fo:language="de" style:language-complex="hi" fo:country="DE" style:country-complex="IN"/>
    </style:style>
    <style:style style:family="text" style:name="T2313">
      <style:text-properties fo:color="#000000" fo:font-family="Liberation Serif" style:font-family-complex="Liberation Serif" fo:font-size="12pt" style:font-size-complex="12pt" fo:language="de" style:language-complex="hi" fo:country="DE" style:country-complex="IN"/>
    </style:style>
    <style:style style:family="table-row" style:name="ro70">
      <style:table-row-properties/>
    </style:style>
    <style:style style:family="table-cell" style:name="ce220">
      <style:table-cell-properties style:vertical-align="top" style:direction="ltr" fo:background-color="#f2f2f2" fo:border="0.00882cm solid #CCCCCC" loext:writing-mode="lr-tb" fo:padding-top="0.1411cm" fo:padding-bottom="0.1411cm" fo:padding-left="0.2117cm" fo:padding-right="0.2117cm"/>
    </style:style>
    <style:style style:parent-style-name="737" style:family="paragraph" style:name="P586">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2314">
      <style:text-properties fo:color="#000000" fo:font-family="Liberation Serif" style:font-family-complex="Liberation Serif" fo:font-size="10pt" style:font-size-complex="10pt" fo:language="de" style:language-complex="hi" fo:country="DE" style:country-complex="IN"/>
    </style:style>
    <style:style style:family="text" style:name="T2315">
      <style:text-properties fo:color="#000000" fo:font-family="Liberation Serif" style:font-family-complex="Liberation Serif" fo:font-size="12pt" style:font-size-complex="12pt" fo:language="de" style:language-complex="hi" fo:country="DE" style:country-complex="IN"/>
    </style:style>
    <style:style style:family="text" style:name="T2316">
      <style:text-properties fo:color="#000000" fo:font-family="Liberation Serif" style:font-family-complex="Liberation Serif" fo:font-size="12pt" style:font-size-complex="12pt" fo:language="de" style:language-complex="hi" fo:country="DE" style:country-complex="IN"/>
    </style:style>
    <style:style style:family="table-cell" style:name="ce221">
      <style:table-cell-properties style:vertical-align="top" style:direction="ltr" fo:background-color="#f2f2f2" fo:border="0.00882cm solid #CCCCCC" loext:writing-mode="lr-tb" fo:padding-top="0.1411cm" fo:padding-bottom="0.1411cm" fo:padding-left="0.2117cm" fo:padding-right="0.2117cm"/>
    </style:style>
    <style:style style:parent-style-name="737" style:family="paragraph" style:name="P587">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2317">
      <style:text-properties fo:color="#000000" fo:font-family="Liberation Serif" style:font-family-complex="Liberation Serif" fo:font-size="10pt" style:font-size-complex="10pt" fo:language="de" style:language-complex="hi" fo:country="DE" style:country-complex="IN"/>
    </style:style>
    <style:style style:family="text" style:name="T2318">
      <style:text-properties fo:color="#000000" fo:font-family="Liberation Serif" style:font-family-complex="Liberation Serif" fo:font-size="12pt" style:font-size-complex="12pt" fo:language="de" style:language-complex="hi" fo:country="DE" style:country-complex="IN"/>
    </style:style>
    <style:style style:family="text" style:name="T2319">
      <style:text-properties fo:color="#000000" fo:font-family="Liberation Serif" style:font-family-complex="Liberation Serif" fo:font-size="12pt" style:font-size-complex="12pt" fo:language="de" style:language-complex="hi" fo:country="DE" style:country-complex="IN"/>
    </style:style>
    <style:style style:family="table-cell" style:name="ce222">
      <style:table-cell-properties style:vertical-align="top" style:direction="ltr" fo:background-color="#f2f2f2" fo:border="0.00882cm solid #CCCCCC" loext:writing-mode="lr-tb" fo:padding-top="0.1411cm" fo:padding-bottom="0.1411cm" fo:padding-left="0.2117cm" fo:padding-right="0.2117cm"/>
    </style:style>
    <style:style style:parent-style-name="737" style:family="paragraph" style:name="P588">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2320">
      <style:text-properties fo:color="#000000" fo:font-family="Liberation Serif" style:font-family-complex="Liberation Serif" fo:font-size="10pt" style:font-size-complex="10pt" fo:language="de" style:language-complex="hi" fo:country="DE" style:country-complex="IN"/>
    </style:style>
    <style:style style:family="text" style:name="T2321">
      <style:text-properties fo:color="#000000" fo:font-family="Liberation Serif" style:font-family-complex="Liberation Serif" fo:font-size="12pt" style:font-size-complex="12pt" fo:language="de" style:language-complex="hi" fo:country="DE" style:country-complex="IN"/>
    </style:style>
    <style:style style:family="text" style:name="T2322">
      <style:text-properties fo:color="#000000" fo:font-family="Liberation Serif" style:font-family-complex="Liberation Serif" fo:font-size="12pt" style:font-size-complex="12pt" fo:language="de" style:language-complex="hi" fo:country="DE" style:country-complex="IN"/>
    </style:style>
    <style:style style:family="table-cell" style:name="ce223">
      <style:table-cell-properties style:vertical-align="top" style:direction="ltr" fo:background-color="#f2f2f2" fo:border="0.00882cm solid #CCCCCC" loext:writing-mode="lr-tb" fo:padding-top="0.1411cm" fo:padding-bottom="0.1411cm" fo:padding-left="0.2117cm" fo:padding-right="0.2117cm"/>
    </style:style>
    <style:style style:parent-style-name="737" style:family="paragraph" style:name="P589">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2323">
      <style:text-properties fo:color="#000000" fo:font-family="Liberation Serif" style:font-family-complex="Liberation Serif" fo:font-size="10pt" style:font-size-complex="10pt" fo:language="de" style:language-complex="hi" fo:country="DE" style:country-complex="IN"/>
    </style:style>
    <style:style style:family="text" style:name="T2324">
      <style:text-properties fo:color="#000000" fo:font-family="Liberation Serif" style:font-family-complex="Liberation Serif" fo:font-size="12pt" style:font-size-complex="12pt" fo:language="de" style:language-complex="hi" fo:country="DE" style:country-complex="IN"/>
    </style:style>
    <style:style style:family="text" style:name="T2325">
      <style:text-properties fo:color="#000000" fo:font-family="Liberation Serif" style:font-family-complex="Liberation Serif" fo:font-size="12pt" style:font-size-complex="12pt" fo:language="de" style:language-complex="hi" fo:country="DE" style:country-complex="IN"/>
    </style:style>
    <style:style style:family="table-row" style:name="ro71">
      <style:table-row-properties/>
    </style:style>
    <style:style style:family="table-cell" style:name="ce224">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590">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2326">
      <style:text-properties fo:color="#000000" fo:font-family="Liberation Serif" style:font-family-complex="Liberation Serif" fo:font-size="10pt" style:font-size-complex="10pt" fo:language="de" style:language-complex="hi" fo:country="DE" style:country-complex="IN"/>
    </style:style>
    <style:style style:family="text" style:name="T2327">
      <style:text-properties fo:color="#000000" fo:font-family="Liberation Serif" style:font-family-complex="Liberation Serif" fo:font-size="12pt" style:font-size-complex="12pt" fo:language="de" style:language-complex="hi" fo:country="DE" style:country-complex="IN"/>
    </style:style>
    <style:style style:family="text" style:name="T2328">
      <style:text-properties fo:color="#000000" fo:font-family="Liberation Serif" style:font-family-complex="Liberation Serif" fo:font-size="12pt" style:font-size-complex="12pt" fo:language="de" style:language-complex="hi" fo:country="DE" style:country-complex="IN"/>
    </style:style>
    <style:style style:family="table-cell" style:name="ce225">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591">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2329">
      <style:text-properties fo:color="#000000" fo:font-family="Liberation Serif" style:font-family-complex="Liberation Serif" fo:font-size="10pt" style:font-size-complex="10pt" fo:language="de" style:language-complex="hi" fo:country="DE" style:country-complex="IN"/>
    </style:style>
    <style:style style:family="text" style:name="T2330">
      <style:text-properties fo:color="#000000" fo:font-family="Liberation Serif" style:font-family-complex="Liberation Serif" fo:font-size="12pt" style:font-size-complex="12pt" fo:language="de" style:language-complex="hi" fo:country="DE" style:country-complex="IN"/>
    </style:style>
    <style:style style:family="text" style:name="T2331">
      <style:text-properties fo:color="#000000" fo:font-family="Liberation Serif" style:font-family-complex="Liberation Serif" fo:font-size="12pt" style:font-size-complex="12pt" fo:language="de" style:language-complex="hi" fo:country="DE" style:country-complex="IN"/>
    </style:style>
    <style:style style:family="table-cell" style:name="ce226">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592">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2332">
      <style:text-properties fo:color="#000000" fo:font-family="Liberation Serif" style:font-family-complex="Liberation Serif" fo:font-size="10pt" style:font-size-complex="10pt" fo:language="de" style:language-complex="hi" fo:country="DE" style:country-complex="IN"/>
    </style:style>
    <style:style style:family="text" style:name="T2333">
      <style:text-properties fo:color="#000000" fo:font-family="Liberation Serif" style:font-family-complex="Liberation Serif" fo:font-size="12pt" style:font-size-complex="12pt" fo:language="de" style:language-complex="hi" fo:country="DE" style:country-complex="IN"/>
    </style:style>
    <style:style style:family="text" style:name="T2334">
      <style:text-properties fo:color="#000000" fo:font-family="Liberation Serif" style:font-family-complex="Liberation Serif" fo:font-size="12pt" style:font-size-complex="12pt" fo:language="de" style:language-complex="hi" fo:country="DE" style:country-complex="IN"/>
    </style:style>
    <style:style style:family="table-cell" style:name="ce227">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593">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2335">
      <style:text-properties fo:color="#000000" fo:font-family="Liberation Serif" style:font-family-complex="Liberation Serif" fo:font-size="10pt" style:font-size-complex="10pt" fo:language="de" style:language-complex="hi" fo:country="DE" style:country-complex="IN"/>
    </style:style>
    <style:style style:family="text" style:name="T2336">
      <style:text-properties fo:color="#000000" fo:font-family="Liberation Serif" style:font-family-complex="Liberation Serif" fo:font-size="12pt" style:font-size-complex="12pt" fo:language="de" style:language-complex="hi" fo:country="DE" style:country-complex="IN"/>
    </style:style>
    <style:style style:family="text" style:name="T2337">
      <style:text-properties fo:color="#000000" fo:font-family="Liberation Serif" style:font-family-complex="Liberation Serif" fo:font-size="12pt" style:font-size-complex="12pt" fo:language="de" style:language-complex="hi" fo:country="DE" style:country-complex="IN"/>
    </style:style>
    <style:style style:family="table-row" style:name="ro72">
      <style:table-row-properties/>
    </style:style>
    <style:style style:family="table-cell" style:name="ce228">
      <style:table-cell-properties style:vertical-align="top" style:direction="ltr" fo:background-color="#f2f2f2" fo:border="0.00882cm solid #CCCCCC" loext:writing-mode="lr-tb" fo:padding-top="0.1411cm" fo:padding-bottom="0.1411cm" fo:padding-left="0.2117cm" fo:padding-right="0.2117cm"/>
    </style:style>
    <style:style style:parent-style-name="737" style:family="paragraph" style:name="P594">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2338">
      <style:text-properties fo:color="#000000" fo:font-family="Liberation Serif" style:font-family-complex="Liberation Serif" fo:font-size="10pt" style:font-size-complex="10pt" fo:language="de" style:language-complex="hi" fo:country="DE" style:country-complex="IN"/>
    </style:style>
    <style:style style:family="text" style:name="T2339">
      <style:text-properties fo:color="#000000" fo:font-family="Liberation Serif" style:font-family-complex="Liberation Serif" fo:font-size="12pt" style:font-size-complex="12pt" fo:language="de" style:language-complex="hi" fo:country="DE" style:country-complex="IN"/>
    </style:style>
    <style:style style:family="text" style:name="T2340">
      <style:text-properties fo:color="#000000" fo:font-family="Liberation Serif" style:font-family-complex="Liberation Serif" fo:font-size="12pt" style:font-size-complex="12pt" fo:language="de" style:language-complex="hi" fo:country="DE" style:country-complex="IN"/>
    </style:style>
    <style:style style:family="table-cell" style:name="ce229">
      <style:table-cell-properties style:vertical-align="top" style:direction="ltr" fo:background-color="#f2f2f2" fo:border="0.00882cm solid #CCCCCC" loext:writing-mode="lr-tb" fo:padding-top="0.1411cm" fo:padding-bottom="0.1411cm" fo:padding-left="0.2117cm" fo:padding-right="0.2117cm"/>
    </style:style>
    <style:style style:parent-style-name="737" style:family="paragraph" style:name="P595">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2341">
      <style:text-properties fo:color="#000000" fo:font-family="Liberation Serif" style:font-family-complex="Liberation Serif" fo:font-size="10pt" style:font-size-complex="10pt" fo:language="de" style:language-complex="hi" fo:country="DE" style:country-complex="IN"/>
    </style:style>
    <style:style style:family="text" style:name="T2342">
      <style:text-properties fo:color="#000000" fo:font-family="Liberation Serif" style:font-family-complex="Liberation Serif" fo:font-size="12pt" style:font-size-complex="12pt" fo:language="de" style:language-complex="hi" fo:country="DE" style:country-complex="IN"/>
    </style:style>
    <style:style style:family="text" style:name="T2343">
      <style:text-properties fo:color="#000000" fo:font-family="Liberation Serif" style:font-family-complex="Liberation Serif" fo:font-size="12pt" style:font-size-complex="12pt" fo:language="de" style:language-complex="hi" fo:country="DE" style:country-complex="IN"/>
    </style:style>
    <style:style style:family="table-cell" style:name="ce230">
      <style:table-cell-properties style:vertical-align="top" style:direction="ltr" fo:background-color="#f2f2f2" fo:border="0.00882cm solid #CCCCCC" loext:writing-mode="lr-tb" fo:padding-top="0.1411cm" fo:padding-bottom="0.1411cm" fo:padding-left="0.2117cm" fo:padding-right="0.2117cm"/>
    </style:style>
    <style:style style:parent-style-name="737" style:family="paragraph" style:name="P596">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2344">
      <style:text-properties fo:color="#000000" fo:font-family="Liberation Serif" style:font-family-complex="Liberation Serif" fo:font-size="10pt" style:font-size-complex="10pt" fo:language="de" style:language-complex="hi" fo:country="DE" style:country-complex="IN"/>
    </style:style>
    <style:style style:family="text" style:name="T2345">
      <style:text-properties fo:color="#000000" fo:font-family="Liberation Serif" style:font-family-complex="Liberation Serif" fo:font-size="12pt" style:font-size-complex="12pt" fo:language="de" style:language-complex="hi" fo:country="DE" style:country-complex="IN"/>
    </style:style>
    <style:style style:family="text" style:name="T2346">
      <style:text-properties fo:color="#000000" fo:font-family="Liberation Serif" style:font-family-complex="Liberation Serif" fo:font-size="12pt" style:font-size-complex="12pt" fo:language="de" style:language-complex="hi" fo:country="DE" style:country-complex="IN"/>
    </style:style>
    <style:style style:family="table-cell" style:name="ce231">
      <style:table-cell-properties style:vertical-align="top" style:direction="ltr" fo:background-color="#f2f2f2" fo:border="0.00882cm solid #CCCCCC" loext:writing-mode="lr-tb" fo:padding-top="0.1411cm" fo:padding-bottom="0.1411cm" fo:padding-left="0.2117cm" fo:padding-right="0.2117cm"/>
    </style:style>
    <style:style style:parent-style-name="737" style:family="paragraph" style:name="P597">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2347">
      <style:text-properties fo:color="#000000" fo:font-family="Liberation Serif" style:font-family-complex="Liberation Serif" fo:font-size="10pt" style:font-size-complex="10pt" fo:language="de" style:language-complex="hi" fo:country="DE" style:country-complex="IN"/>
    </style:style>
    <style:style style:family="text" style:name="T2348">
      <style:text-properties fo:color="#000000" fo:font-family="Liberation Serif" style:font-family-complex="Liberation Serif" fo:font-size="12pt" style:font-size-complex="12pt" fo:language="de" style:language-complex="hi" fo:country="DE" style:country-complex="IN"/>
    </style:style>
    <style:style style:family="text" style:name="T2349">
      <style:text-properties fo:color="#000000" fo:font-family="Liberation Serif" style:font-family-complex="Liberation Serif" fo:font-size="12pt" style:font-size-complex="12pt" fo:language="de" style:language-complex="hi" fo:country="DE" style:country-complex="IN"/>
    </style:style>
    <style:style style:family="table-row" style:name="ro73">
      <style:table-row-properties/>
    </style:style>
    <style:style style:family="table-cell" style:name="ce232">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598">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2350">
      <style:text-properties fo:color="#000000" fo:font-family="Liberation Serif" style:font-family-complex="Liberation Serif" fo:font-size="10pt" style:font-size-complex="10pt" fo:language="de" style:language-complex="hi" fo:country="DE" style:country-complex="IN"/>
    </style:style>
    <style:style style:family="text" style:name="T2351">
      <style:text-properties fo:color="#000000" fo:font-family="Liberation Serif" style:font-family-complex="Liberation Serif" fo:font-size="12pt" style:font-size-complex="12pt" fo:language="de" style:language-complex="hi" fo:country="DE" style:country-complex="IN"/>
    </style:style>
    <style:style style:family="text" style:name="T2352">
      <style:text-properties fo:color="#000000" fo:font-family="Liberation Serif" style:font-family-complex="Liberation Serif" fo:font-size="12pt" style:font-size-complex="12pt" fo:language="de" style:language-complex="hi" fo:country="DE" style:country-complex="IN"/>
    </style:style>
    <style:style style:family="table-cell" style:name="ce233">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599">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2353">
      <style:text-properties fo:color="#000000" fo:font-family="Liberation Serif" style:font-family-complex="Liberation Serif" fo:font-size="10pt" style:font-size-complex="10pt" fo:language="de" style:language-complex="hi" fo:country="DE" style:country-complex="IN"/>
    </style:style>
    <style:style style:family="text" style:name="T2354">
      <style:text-properties fo:color="#000000" fo:font-family="Liberation Serif" style:font-family-complex="Liberation Serif" fo:font-size="12pt" style:font-size-complex="12pt" fo:language="de" style:language-complex="hi" fo:country="DE" style:country-complex="IN"/>
    </style:style>
    <style:style style:family="text" style:name="T2355">
      <style:text-properties fo:color="#000000" fo:font-family="Liberation Serif" style:font-family-complex="Liberation Serif" fo:font-size="12pt" style:font-size-complex="12pt" fo:language="de" style:language-complex="hi" fo:country="DE" style:country-complex="IN"/>
    </style:style>
    <style:style style:family="table-cell" style:name="ce234">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600">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2356">
      <style:text-properties fo:color="#000000" fo:font-family="Liberation Serif" style:font-family-complex="Liberation Serif" fo:font-size="10pt" style:font-size-complex="10pt" fo:language="de" style:language-complex="hi" fo:country="DE" style:country-complex="IN"/>
    </style:style>
    <style:style style:family="text" style:name="T2357">
      <style:text-properties fo:color="#000000" fo:font-family="Liberation Serif" style:font-family-complex="Liberation Serif" fo:font-size="12pt" style:font-size-complex="12pt" fo:language="de" style:language-complex="hi" fo:country="DE" style:country-complex="IN"/>
    </style:style>
    <style:style style:family="text" style:name="T2358">
      <style:text-properties fo:color="#000000" fo:font-family="Liberation Serif" style:font-family-complex="Liberation Serif" fo:font-size="12pt" style:font-size-complex="12pt" fo:language="de" style:language-complex="hi" fo:country="DE" style:country-complex="IN"/>
    </style:style>
    <style:style style:family="table-cell" style:name="ce235">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601">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2359">
      <style:text-properties fo:color="#000000" fo:font-family="Liberation Serif" style:font-family-complex="Liberation Serif" fo:font-size="10pt" style:font-size-complex="10pt" fo:language="de" style:language-complex="hi" fo:country="DE" style:country-complex="IN"/>
    </style:style>
    <style:style style:family="text" style:name="T2360">
      <style:text-properties fo:color="#000000" fo:font-family="Liberation Serif" style:font-family-complex="Liberation Serif" fo:font-size="12pt" style:font-size-complex="12pt" fo:language="de" style:language-complex="hi" fo:country="DE" style:country-complex="IN"/>
    </style:style>
    <style:style style:family="text" style:name="T2361">
      <style:text-properties fo:color="#000000" fo:font-family="Liberation Serif" style:font-family-complex="Liberation Serif" fo:font-size="12pt" style:font-size-complex="12pt" fo:language="de" style:language-complex="hi" fo:country="DE" style:country-complex="IN"/>
    </style:style>
    <style:style style:family="table-row" style:name="ro74">
      <style:table-row-properties/>
    </style:style>
    <style:style style:family="table-cell" style:name="ce236">
      <style:table-cell-properties style:vertical-align="top" style:direction="ltr" fo:background-color="#f2f2f2" fo:border="0.00882cm solid #CCCCCC" loext:writing-mode="lr-tb" fo:padding-top="0.1411cm" fo:padding-bottom="0.1411cm" fo:padding-left="0.2117cm" fo:padding-right="0.2117cm"/>
    </style:style>
    <style:style style:parent-style-name="737" style:family="paragraph" style:name="P602">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2362">
      <style:text-properties fo:color="#000000" fo:font-family="Liberation Serif" style:font-family-complex="Liberation Serif" fo:font-size="10pt" style:font-size-complex="10pt" fo:language="de" style:language-complex="hi" fo:country="DE" style:country-complex="IN"/>
    </style:style>
    <style:style style:family="text" style:name="T2363">
      <style:text-properties fo:color="#000000" fo:font-family="Liberation Serif" style:font-family-complex="Liberation Serif" fo:font-size="12pt" style:font-size-complex="12pt" fo:language="de" style:language-complex="hi" fo:country="DE" style:country-complex="IN"/>
    </style:style>
    <style:style style:family="text" style:name="T2364">
      <style:text-properties fo:color="#000000" fo:font-family="Liberation Serif" style:font-family-complex="Liberation Serif" fo:font-size="12pt" style:font-size-complex="12pt" fo:language="de" style:language-complex="hi" fo:country="DE" style:country-complex="IN"/>
    </style:style>
    <style:style style:family="table-cell" style:name="ce237">
      <style:table-cell-properties style:vertical-align="top" style:direction="ltr" fo:background-color="#f2f2f2" fo:border="0.00882cm solid #CCCCCC" loext:writing-mode="lr-tb" fo:padding-top="0.1411cm" fo:padding-bottom="0.1411cm" fo:padding-left="0.2117cm" fo:padding-right="0.2117cm"/>
    </style:style>
    <style:style style:parent-style-name="737" style:family="paragraph" style:name="P603">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2365">
      <style:text-properties fo:color="#000000" fo:font-family="Liberation Serif" style:font-family-complex="Liberation Serif" fo:font-size="10pt" style:font-size-complex="10pt" fo:language="de" style:language-complex="hi" fo:country="DE" style:country-complex="IN"/>
    </style:style>
    <style:style style:family="text" style:name="T2366">
      <style:text-properties fo:color="#000000" fo:font-family="Liberation Serif" style:font-family-complex="Liberation Serif" fo:font-size="12pt" style:font-size-complex="12pt" fo:language="de" style:language-complex="hi" fo:country="DE" style:country-complex="IN"/>
    </style:style>
    <style:style style:family="text" style:name="T2367">
      <style:text-properties fo:color="#000000" fo:font-family="Liberation Serif" style:font-family-complex="Liberation Serif" fo:font-size="12pt" style:font-size-complex="12pt" fo:language="de" style:language-complex="hi" fo:country="DE" style:country-complex="IN"/>
    </style:style>
    <style:style style:family="table-cell" style:name="ce238">
      <style:table-cell-properties style:vertical-align="top" style:direction="ltr" fo:background-color="#f2f2f2" fo:border="0.00882cm solid #CCCCCC" loext:writing-mode="lr-tb" fo:padding-top="0.1411cm" fo:padding-bottom="0.1411cm" fo:padding-left="0.2117cm" fo:padding-right="0.2117cm"/>
    </style:style>
    <style:style style:parent-style-name="737" style:family="paragraph" style:name="P604">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2368">
      <style:text-properties fo:color="#000000" fo:font-family="Liberation Serif" style:font-family-complex="Liberation Serif" fo:font-size="10pt" style:font-size-complex="10pt" fo:language="de" style:language-complex="hi" fo:country="DE" style:country-complex="IN"/>
    </style:style>
    <style:style style:family="text" style:name="T2369">
      <style:text-properties fo:color="#000000" fo:font-family="Liberation Serif" style:font-family-complex="Liberation Serif" fo:font-size="12pt" style:font-size-complex="12pt" fo:language="de" style:language-complex="hi" fo:country="DE" style:country-complex="IN"/>
    </style:style>
    <style:style style:family="text" style:name="T2370">
      <style:text-properties fo:color="#000000" fo:font-family="Liberation Serif" style:font-family-complex="Liberation Serif" fo:font-size="12pt" style:font-size-complex="12pt" fo:language="de" style:language-complex="hi" fo:country="DE" style:country-complex="IN"/>
    </style:style>
    <style:style style:family="table-cell" style:name="ce239">
      <style:table-cell-properties style:vertical-align="top" style:direction="ltr" fo:background-color="#f2f2f2" fo:border="0.00882cm solid #CCCCCC" loext:writing-mode="lr-tb" fo:padding-top="0.1411cm" fo:padding-bottom="0.1411cm" fo:padding-left="0.2117cm" fo:padding-right="0.2117cm"/>
    </style:style>
    <style:style style:parent-style-name="737" style:family="paragraph" style:name="P605">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2371">
      <style:text-properties fo:color="#000000" fo:font-family="Liberation Serif" style:font-family-complex="Liberation Serif" fo:font-size="10pt" style:font-size-complex="10pt" fo:language="de" style:language-complex="hi" fo:country="DE" style:country-complex="IN"/>
    </style:style>
    <style:style style:family="text" style:name="T2372">
      <style:text-properties fo:color="#000000" fo:font-family="Liberation Serif" style:font-family-complex="Liberation Serif" fo:font-size="12pt" style:font-size-complex="12pt" fo:language="de" style:language-complex="hi" fo:country="DE" style:country-complex="IN"/>
    </style:style>
    <style:style style:family="text" style:name="T2373">
      <style:text-properties fo:color="#000000" fo:font-family="Liberation Serif" style:font-family-complex="Liberation Serif" fo:font-size="12pt" style:font-size-complex="12pt" fo:language="de" style:language-complex="hi" fo:country="DE" style:country-complex="IN"/>
    </style:style>
    <style:style style:family="table-row" style:name="ro75">
      <style:table-row-properties/>
    </style:style>
    <style:style style:family="table-cell" style:name="ce240">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606">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2374">
      <style:text-properties fo:color="#000000" fo:font-family="Liberation Serif" style:font-family-complex="Liberation Serif" fo:font-size="10pt" style:font-size-complex="10pt" fo:language="de" style:language-complex="hi" fo:country="DE" style:country-complex="IN"/>
    </style:style>
    <style:style style:family="text" style:name="T2375">
      <style:text-properties fo:color="#000000" fo:font-family="Liberation Serif" style:font-family-complex="Liberation Serif" fo:font-size="12pt" style:font-size-complex="12pt" fo:language="de" style:language-complex="hi" fo:country="DE" style:country-complex="IN"/>
    </style:style>
    <style:style style:family="text" style:name="T2376">
      <style:text-properties fo:color="#000000" fo:font-family="Liberation Serif" style:font-family-complex="Liberation Serif" fo:font-size="12pt" style:font-size-complex="12pt" fo:language="de" style:language-complex="hi" fo:country="DE" style:country-complex="IN"/>
    </style:style>
    <style:style style:family="table-cell" style:name="ce241">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607">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2377">
      <style:text-properties fo:color="#000000" fo:font-family="Liberation Serif" style:font-family-complex="Liberation Serif" fo:font-size="10pt" style:font-size-complex="10pt" fo:language="de" style:language-complex="hi" fo:country="DE" style:country-complex="IN"/>
    </style:style>
    <style:style style:family="text" style:name="T2378">
      <style:text-properties fo:color="#000000" fo:font-family="Liberation Serif" style:font-family-complex="Liberation Serif" fo:font-size="12pt" style:font-size-complex="12pt" fo:language="de" style:language-complex="hi" fo:country="DE" style:country-complex="IN"/>
    </style:style>
    <style:style style:family="text" style:name="T2379">
      <style:text-properties fo:color="#000000" fo:font-family="Liberation Serif" style:font-family-complex="Liberation Serif" fo:font-size="12pt" style:font-size-complex="12pt" fo:language="de" style:language-complex="hi" fo:country="DE" style:country-complex="IN"/>
    </style:style>
    <style:style style:family="table-cell" style:name="ce242">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608">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2380">
      <style:text-properties fo:color="#000000" fo:font-family="Liberation Serif" style:font-family-complex="Liberation Serif" fo:font-size="10pt" style:font-size-complex="10pt" fo:language="de" style:language-complex="hi" fo:country="DE" style:country-complex="IN"/>
    </style:style>
    <style:style style:family="text" style:name="T2381">
      <style:text-properties fo:color="#000000" fo:font-family="Liberation Serif" style:font-family-complex="Liberation Serif" fo:font-size="12pt" style:font-size-complex="12pt" fo:language="de" style:language-complex="hi" fo:country="DE" style:country-complex="IN"/>
    </style:style>
    <style:style style:family="text" style:name="T2382">
      <style:text-properties fo:color="#000000" fo:font-family="Liberation Serif" style:font-family-complex="Liberation Serif" fo:font-size="12pt" style:font-size-complex="12pt" fo:language="de" style:language-complex="hi" fo:country="DE" style:country-complex="IN"/>
    </style:style>
    <style:style style:family="table-cell" style:name="ce243">
      <style:table-cell-properties style:vertical-align="top" style:direction="ltr" fo:background-color="#ffffff" fo:border="0.00882cm solid #CCCCCC" loext:writing-mode="lr-tb" fo:padding-top="0.1411cm" fo:padding-bottom="0.1411cm" fo:padding-left="0.2117cm" fo:padding-right="0.2117cm"/>
    </style:style>
    <style:style style:parent-style-name="737" style:family="paragraph" style:name="P609">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2383">
      <style:text-properties fo:color="#000000" fo:font-family="Liberation Serif" style:font-family-complex="Liberation Serif" fo:font-size="10pt" style:font-size-complex="10pt" fo:language="de" style:language-complex="hi" fo:country="DE" style:country-complex="IN"/>
    </style:style>
    <style:style style:family="text" style:name="T2384">
      <style:text-properties fo:color="#000000" fo:font-family="Liberation Serif" style:font-family-complex="Liberation Serif" fo:font-size="12pt" style:font-size-complex="12pt" fo:language="de" style:language-complex="hi" fo:country="DE" style:country-complex="IN"/>
    </style:style>
    <style:style style:family="text" style:name="T2385">
      <style:text-properties fo:color="#000000" fo:font-family="Liberation Serif" style:font-family-complex="Liberation Serif" fo:font-size="12pt" style:font-size-complex="12pt" fo:language="de" style:language-complex="hi" fo:country="DE" style:country-complex="IN"/>
    </style:style>
    <style:style style:family="table-row" style:name="ro76">
      <style:table-row-properties/>
    </style:style>
    <style:style style:family="table-cell" style:name="ce244">
      <style:table-cell-properties style:vertical-align="top" style:direction="ltr" fo:background-color="#f2f2f2" fo:border="0.00882cm solid #CCCCCC" loext:writing-mode="lr-tb" fo:padding-top="0.1411cm" fo:padding-bottom="0.1411cm" fo:padding-left="0.2117cm" fo:padding-right="0.2117cm"/>
    </style:style>
    <style:style style:parent-style-name="737" style:family="paragraph" style:name="P610">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2386">
      <style:text-properties fo:color="#000000" fo:font-family="Liberation Serif" style:font-family-complex="Liberation Serif" fo:font-size="10pt" style:font-size-complex="10pt" fo:language="de" style:language-complex="hi" fo:country="DE" style:country-complex="IN"/>
    </style:style>
    <style:style style:family="text" style:name="T2387">
      <style:text-properties fo:color="#000000" fo:font-family="Liberation Serif" style:font-family-complex="Liberation Serif" fo:font-size="12pt" style:font-size-complex="12pt" fo:language="de" style:language-complex="hi" fo:country="DE" style:country-complex="IN"/>
    </style:style>
    <style:style style:family="text" style:name="T2388">
      <style:text-properties fo:color="#000000" fo:font-family="Liberation Serif" style:font-family-complex="Liberation Serif" fo:font-size="12pt" style:font-size-complex="12pt" fo:language="de" style:language-complex="hi" fo:country="DE" style:country-complex="IN"/>
    </style:style>
    <style:style style:family="table-cell" style:name="ce245">
      <style:table-cell-properties style:vertical-align="top" style:direction="ltr" fo:background-color="#f2f2f2" fo:border="0.00882cm solid #CCCCCC" loext:writing-mode="lr-tb" fo:padding-top="0.1411cm" fo:padding-bottom="0.1411cm" fo:padding-left="0.2117cm" fo:padding-right="0.2117cm"/>
    </style:style>
    <style:style style:parent-style-name="737" style:family="paragraph" style:name="P611">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2389">
      <style:text-properties fo:color="#000000" fo:font-family="Liberation Serif" style:font-family-complex="Liberation Serif" fo:font-size="12pt" style:font-size-complex="12pt" fo:language="de" style:language-complex="hi" fo:country="DE" style:country-complex="IN"/>
    </style:style>
    <style:style style:family="text" style:name="T2390">
      <style:text-properties fo:color="#000000" fo:font-family="Liberation Serif" style:font-family-complex="Liberation Serif" fo:font-size="12pt" style:font-size-complex="12pt" fo:language="de" style:language-complex="hi" fo:country="DE" style:country-complex="IN"/>
    </style:style>
    <style:style style:family="text" style:name="T2391">
      <style:text-properties fo:color="#000000" fo:font-family="Liberation Serif" style:font-family-complex="Liberation Serif" fo:font-size="12pt" style:font-size-complex="12pt" fo:language="de" style:language-complex="hi" fo:country="DE" style:country-complex="IN"/>
    </style:style>
    <style:style style:family="table-cell" style:name="ce246">
      <style:table-cell-properties style:vertical-align="top" style:direction="ltr" fo:background-color="#f2f2f2" fo:border="0.00882cm solid #CCCCCC" loext:writing-mode="lr-tb" fo:padding-top="0.1411cm" fo:padding-bottom="0.1411cm" fo:padding-left="0.2117cm" fo:padding-right="0.2117cm"/>
    </style:style>
    <style:style style:parent-style-name="737" style:family="paragraph" style:name="P612">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2392">
      <style:text-properties fo:color="#000000" fo:font-family="Liberation Serif" style:font-family-complex="Liberation Serif" fo:font-size="10pt" style:font-size-complex="10pt" fo:language="de" style:language-complex="hi" fo:country="DE" style:country-complex="IN"/>
    </style:style>
    <style:style style:family="text" style:name="T2393">
      <style:text-properties fo:color="#000000" fo:font-family="Liberation Serif" style:font-family-complex="Liberation Serif" fo:font-size="12pt" style:font-size-complex="12pt" fo:language="de" style:language-complex="hi" fo:country="DE" style:country-complex="IN"/>
    </style:style>
    <style:style style:family="text" style:name="T2394">
      <style:text-properties fo:color="#000000" fo:font-family="Liberation Serif" style:font-family-complex="Liberation Serif" fo:font-size="12pt" style:font-size-complex="12pt" fo:language="de" style:language-complex="hi" fo:country="DE" style:country-complex="IN"/>
    </style:style>
    <style:style style:family="table-cell" style:name="ce247">
      <style:table-cell-properties style:vertical-align="top" style:direction="ltr" fo:background-color="#f2f2f2" fo:border="0.00882cm solid #CCCCCC" loext:writing-mode="lr-tb" fo:padding-top="0.1411cm" fo:padding-bottom="0.1411cm" fo:padding-left="0.2117cm" fo:padding-right="0.2117cm"/>
    </style:style>
    <style:style style:parent-style-name="737" style:family="paragraph" style:name="P613">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2395">
      <style:text-properties fo:color="#000000" fo:font-family="Liberation Serif" style:font-family-complex="Liberation Serif" fo:font-size="10pt" style:font-size-complex="10pt" fo:language="de" style:language-complex="hi" fo:country="DE" style:country-complex="IN"/>
    </style:style>
    <style:style style:family="text" style:name="T2396">
      <style:text-properties fo:color="#000000" fo:font-family="Liberation Serif" style:font-family-complex="Liberation Serif" fo:font-size="12pt" style:font-size-complex="12pt" fo:language="de" style:language-complex="hi" fo:country="DE" style:country-complex="IN"/>
    </style:style>
    <style:style style:family="text" style:name="T2397">
      <style:text-properties fo:color="#000000" fo:font-family="Liberation Serif" style:font-family-complex="Liberation Serif" fo:font-size="12pt" style:font-size-complex="12pt" fo:language="de" style:language-complex="hi" fo:country="DE" style:country-complex="IN"/>
    </style:style>
    <style:style style:parent-style-name="747" style:family="paragraph" style:name="P614">
      <style:paragraph-properties fo:margin-left="0cm" fo:margin-right="0cm" fo:text-indent="0cm"/>
      <style:text-properties fo:color="#000000" fo:font-family="Liberation Sans" style:font-family-complex="Liberation Sans" fo:font-size="16pt" style:font-size-complex="16pt" fo:language="de" style:language-complex="hi" fo:country="DE" style:country-complex="IN" fo:font-weight="bold"/>
    </style:style>
    <style:style style:family="text" style:name="T2398">
      <style:text-properties fo:color="#000000" fo:font-family="Liberation Sans" style:font-family-complex="Liberation Sans" fo:font-size="16pt" style:font-size-complex="16pt" fo:language="de" style:language-complex="hi" fo:country="DE" style:country-complex="IN" fo:font-weight="bold"/>
    </style:style>
    <style:style style:family="text" style:name="T2399">
      <style:text-properties fo:color="#000000" fo:font-family="Liberation Sans" style:font-family-complex="Liberation Sans" fo:font-size="16pt" style:font-size-complex="16pt" fo:language="de" style:language-complex="hi" fo:country="DE" style:country-complex="IN" fo:font-weight="bold"/>
    </style:style>
    <style:style style:family="text" style:name="T2400">
      <style:text-properties fo:color="#000000" fo:font-family="Liberation Sans" style:font-family-complex="Liberation Sans" fo:font-size="16pt" style:font-size-complex="16pt" fo:language="de" style:language-complex="hi" fo:country="DE" style:country-complex="IN" fo:font-weight="bold"/>
    </style:style>
    <style:style style:family="text" style:name="T2401">
      <style:text-properties fo:color="#000000" fo:font-family="Liberation Sans" style:font-family-complex="Liberation Sans" fo:font-size="16pt" style:font-size-complex="16pt" fo:language="de" style:language-complex="hi" fo:country="DE" style:country-complex="IN" fo:font-weight="bold"/>
    </style:style>
    <style:style style:family="text" style:name="T2402">
      <style:text-properties fo:color="#000000" fo:font-family="Liberation Sans" style:font-family-complex="Liberation Sans" fo:font-size="16pt" style:font-size-complex="16pt" fo:language="de" style:language-complex="hi" fo:country="DE" style:country-complex="IN" fo:font-weight="bold"/>
    </style:style>
    <style:style style:parent-style-name="737" style:family="paragraph" style:name="P615">
      <style:paragraph-properties fo:margin-left="0cm" fo:margin-right="0cm" fo:text-indent="0cm" fo:margin-top="3pt" fo:margin-bottom="3pt"/>
      <style:text-properties fo:color="#000000" fo:font-family="Liberation Serif" style:font-family-complex="Liberation Serif" fo:font-size="12pt" style:font-size-complex="12pt" fo:language="de" style:language-complex="hi" fo:country="DE" style:country-complex="IN"/>
    </style:style>
    <style:style style:family="text" style:name="T2403">
      <style:text-properties fo:color="#000000" fo:font-family="Liberation Serif" style:font-family-complex="Liberation Serif" fo:font-size="12pt" style:font-size-complex="12pt" fo:language="de" style:language-complex="hi" fo:country="DE" style:country-complex="IN"/>
    </style:style>
    <style:style style:family="text" style:name="T2404">
      <style:text-properties fo:color="#000000" fo:font-family="Liberation Serif" style:font-family-complex="Liberation Serif" fo:font-size="12pt" style:font-size-complex="12pt" fo:language="de" style:language-complex="hi" fo:country="DE" style:country-complex="IN"/>
    </style:style>
    <style:style style:family="text" style:name="T2405">
      <style:text-properties fo:color="#000000" fo:font-family="Liberation Serif" style:font-family-complex="Liberation Serif" fo:font-size="12pt" style:font-size-complex="12pt" fo:language="de" style:language-complex="hi" fo:country="DE" style:country-complex="IN"/>
    </style:style>
    <style:style style:parent-style-name="746" style:list-style-name="WWNum1" style:family="paragraph" style:name="P616">
      <style:paragraph-properties fo:margin-left="1.27cm" fo:margin-right="0cm" fo:text-indent="-0.635cm" fo:margin-top="2pt" fo:margin-bottom="2pt"/>
      <style:text-properties fo:color="#000000" fo:font-family="Arial" style:font-family-complex="Arial" fo:font-size="11pt" style:font-size-complex="11pt" fo:language="de" style:language-complex="ar" fo:country="DE" style:country-complex="SA"/>
    </style:style>
    <style:style style:family="text" style:name="T2406">
      <style:text-properties fo:color="#000000" fo:font-family="Arial" style:font-family-complex="Arial" fo:font-size="11pt" style:font-size-complex="11pt" fo:language="de" style:language-complex="ar" fo:country="DE" style:country-complex="SA"/>
    </style:style>
    <style:style style:family="text" style:name="T2407">
      <style:text-properties fo:color="#000000" fo:font-family="Arial" style:font-family-complex="Arial" fo:font-size="11pt" style:font-size-complex="11pt" fo:language="de" style:language-complex="ar" fo:country="DE" style:country-complex="SA"/>
    </style:style>
    <style:style style:family="text" style:name="T2408">
      <style:text-properties fo:color="#000000" fo:font-family="Arial" style:font-family-complex="Arial" fo:font-size="11pt" style:font-size-complex="11pt" fo:language="de" style:language-complex="ar" fo:country="DE" style:country-complex="SA"/>
    </style:style>
    <style:style style:parent-style-name="746" style:list-style-name="WWNum1" style:family="paragraph" style:name="P617">
      <style:paragraph-properties fo:margin-left="1.27cm" fo:margin-right="0cm" fo:text-indent="-0.635cm" fo:margin-top="2pt" fo:margin-bottom="2pt"/>
      <style:text-properties fo:color="#000000" fo:font-family="Arial" style:font-family-complex="Arial" fo:font-size="11pt" style:font-size-complex="11pt" fo:language="de" style:language-complex="ar" fo:country="DE" style:country-complex="SA"/>
    </style:style>
    <style:style style:family="text" style:name="T2409">
      <style:text-properties fo:color="#000000" fo:font-family="Arial" style:font-family-complex="Arial" fo:font-size="11pt" style:font-size-complex="11pt" fo:language="de" style:language-complex="ar" fo:country="DE" style:country-complex="SA"/>
    </style:style>
    <style:style style:family="text" style:name="T2410">
      <style:text-properties fo:color="#000000" fo:font-family="Arial" style:font-family-complex="Arial" fo:font-size="11pt" style:font-size-complex="11pt" fo:language="de" style:language-complex="ar" fo:country="DE" style:country-complex="SA"/>
    </style:style>
    <style:style style:family="text" style:name="T2411">
      <style:text-properties fo:color="#000000" fo:font-family="Arial" style:font-family-complex="Arial" fo:font-size="11pt" style:font-size-complex="11pt" fo:language="de" style:language-complex="ar" fo:country="DE" style:country-complex="SA"/>
    </style:style>
    <style:style style:parent-style-name="746" style:list-style-name="WWNum1" style:family="paragraph" style:name="P618">
      <style:paragraph-properties fo:margin-left="1.27cm" fo:margin-right="0cm" fo:text-indent="-0.635cm" fo:margin-top="2pt" fo:margin-bottom="2pt"/>
      <style:text-properties fo:color="#000000" fo:font-family="Arial" style:font-family-complex="Arial" fo:font-size="11pt" style:font-size-complex="11pt" fo:language="de" style:language-complex="ar" fo:country="DE" style:country-complex="SA"/>
    </style:style>
    <style:style style:family="text" style:name="T2412">
      <style:text-properties fo:color="#000000" fo:font-family="Arial" style:font-family-complex="Arial" fo:font-size="11pt" style:font-size-complex="11pt" fo:language="de" style:language-complex="ar" fo:country="DE" style:country-complex="SA"/>
    </style:style>
    <style:style style:family="text" style:name="T2413">
      <style:text-properties fo:color="#000000" fo:font-family="Arial" style:font-family-complex="Arial" fo:font-size="11pt" style:font-size-complex="11pt" fo:language="de" style:language-complex="ar" fo:country="DE" style:country-complex="SA"/>
    </style:style>
    <style:style style:family="text" style:name="T2414">
      <style:text-properties fo:color="#000000" fo:font-family="Arial" style:font-family-complex="Arial" fo:font-size="11pt" style:font-size-complex="11pt" fo:language="de" style:language-complex="ar" fo:country="DE" style:country-complex="SA"/>
    </style:style>
    <style:style style:parent-style-name="746" style:list-style-name="WWNum1" style:family="paragraph" style:name="P619">
      <style:paragraph-properties fo:margin-left="1.27cm" fo:margin-right="0cm" fo:text-indent="-0.635cm" fo:margin-top="2pt" fo:margin-bottom="2pt"/>
      <style:text-properties fo:color="#000000" fo:font-family="Arial" style:font-family-complex="Arial" fo:font-size="11pt" style:font-size-complex="11pt" fo:language="de" style:language-complex="ar" fo:country="DE" style:country-complex="SA"/>
    </style:style>
    <style:style style:family="text" style:name="T2415">
      <style:text-properties fo:color="#000000" fo:font-family="Arial" style:font-family-complex="Arial" fo:font-size="11pt" style:font-size-complex="11pt" fo:language="de" style:language-complex="ar" fo:country="DE" style:country-complex="SA"/>
    </style:style>
    <style:style style:family="text" style:name="T2416">
      <style:text-properties fo:color="#000000" fo:font-family="Arial" style:font-family-complex="Arial" fo:font-size="11pt" style:font-size-complex="11pt" fo:language="de" style:language-complex="ar" fo:country="DE" style:country-complex="SA"/>
    </style:style>
    <style:style style:family="text" style:name="T2417">
      <style:text-properties fo:color="#000000" fo:font-family="Arial" style:font-family-complex="Arial" fo:font-size="11pt" style:font-size-complex="11pt" fo:language="de" style:language-complex="ar" fo:country="DE" style:country-complex="SA"/>
    </style:style>
    <style:style style:parent-style-name="746" style:list-style-name="WWNum1" style:family="paragraph" style:name="P620">
      <style:paragraph-properties fo:margin-left="1.27cm" fo:margin-right="0cm" fo:text-indent="-0.635cm" fo:margin-top="2pt" fo:margin-bottom="2pt"/>
      <style:text-properties fo:color="#000000" fo:font-family="Arial" style:font-family-complex="Arial" fo:font-size="11pt" style:font-size-complex="11pt" fo:language="de" style:language-complex="ar" fo:country="DE" style:country-complex="SA"/>
    </style:style>
    <style:style style:family="text" style:name="T2418">
      <style:text-properties fo:color="#000000" fo:font-family="Arial" style:font-family-complex="Arial" fo:font-size="11pt" style:font-size-complex="11pt" fo:language="de" style:language-complex="ar" fo:country="DE" style:country-complex="SA"/>
    </style:style>
    <style:style style:family="text" style:name="T2419">
      <style:text-properties fo:color="#000000" fo:font-family="Arial" style:font-family-complex="Arial" fo:font-size="11pt" style:font-size-complex="11pt" fo:language="de" style:language-complex="ar" fo:country="DE" style:country-complex="SA"/>
    </style:style>
    <style:style style:family="text" style:name="T2420">
      <style:text-properties fo:color="#000000" fo:font-family="Arial" style:font-family-complex="Arial" fo:font-size="11pt" style:font-size-complex="11pt" fo:language="de" style:language-complex="ar" fo:country="DE" style:country-complex="SA"/>
    </style:style>
    <style:style style:parent-style-name="747" style:family="paragraph" style:name="P621">
      <style:paragraph-properties fo:margin-left="0cm" fo:margin-right="0cm" fo:text-indent="0cm"/>
      <style:text-properties fo:color="#000000" fo:font-family="Liberation Sans" style:font-family-complex="Liberation Sans" fo:font-size="16pt" style:font-size-complex="16pt" fo:language="de" style:language-complex="hi" fo:country="DE" style:country-complex="IN" fo:font-weight="bold"/>
    </style:style>
    <style:style style:family="text" style:name="T2421">
      <style:text-properties fo:color="#000000" fo:font-family="Liberation Sans" style:font-family-complex="Liberation Sans" fo:font-size="16pt" style:font-size-complex="16pt" fo:language="de" style:language-complex="hi" fo:country="DE" style:country-complex="IN" fo:font-weight="bold"/>
    </style:style>
    <style:style style:family="text" style:name="T2422">
      <style:text-properties fo:color="#000000" fo:font-family="Liberation Sans" style:font-family-complex="Liberation Sans" fo:font-size="16pt" style:font-size-complex="16pt" fo:language="de" style:language-complex="hi" fo:country="DE" style:country-complex="IN" fo:font-weight="bold"/>
    </style:style>
    <style:style style:family="text" style:name="T2423">
      <style:text-properties fo:color="#000000" fo:font-family="Liberation Sans" style:font-family-complex="Liberation Sans" fo:font-size="16pt" style:font-size-complex="16pt" fo:language="de" style:language-complex="hi" fo:country="DE" style:country-complex="IN" fo:font-weight="bold"/>
    </style:style>
    <style:style style:family="text" style:name="T2424">
      <style:text-properties fo:color="#000000" fo:font-family="Liberation Sans" style:font-family-complex="Liberation Sans" fo:font-size="16pt" style:font-size-complex="16pt" fo:language="de" style:language-complex="hi" fo:country="DE" style:country-complex="IN" fo:font-weight="bold"/>
    </style:style>
    <style:style style:family="text" style:name="T2425">
      <style:text-properties fo:color="#000000" fo:font-family="Liberation Sans" style:font-family-complex="Liberation Sans" fo:font-size="16pt" style:font-size-complex="16pt" fo:language="de" style:language-complex="hi" fo:country="DE" style:country-complex="IN" fo:font-weight="bold"/>
    </style:style>
    <style:style style:parent-style-name="737" style:family="paragraph" style:name="P622">
      <style:paragraph-properties fo:margin-left="0cm" fo:margin-right="0cm" fo:text-indent="0cm" fo:margin-top="3pt" fo:margin-bottom="3pt"/>
      <style:text-properties fo:color="#000000" fo:font-family="Liberation Serif" style:font-family-complex="Liberation Serif" fo:font-size="12pt" style:font-size-complex="12pt" fo:language="de" style:language-complex="hi" fo:country="DE" style:country-complex="IN"/>
    </style:style>
    <style:style style:family="text" style:name="T2426">
      <style:text-properties fo:color="#000000" fo:font-family="Liberation Serif" style:font-family-complex="Liberation Serif" fo:font-size="12pt" style:font-size-complex="12pt" fo:language="de" style:language-complex="hi" fo:country="DE" style:country-complex="IN"/>
    </style:style>
    <style:style style:family="text" style:name="T2427">
      <style:text-properties fo:color="#000000" fo:font-family="Liberation Serif" style:font-family-complex="Liberation Serif" fo:font-size="12pt" style:font-size-complex="12pt" fo:language="de" style:language-complex="hi" fo:country="DE" style:country-complex="IN"/>
    </style:style>
    <style:style style:family="text" style:name="T2428">
      <style:text-properties fo:color="#000000" fo:font-family="Liberation Serif" style:font-family-complex="Liberation Serif" fo:font-size="12pt" style:font-size-complex="12pt" fo:language="de" style:language-complex="hi" fo:country="DE" style:country-complex="IN"/>
    </style:style>
    <style:style style:family="text" style:name="T2429">
      <style:text-properties fo:color="#000000" fo:font-family="Liberation Serif" style:font-family-complex="Liberation Serif" fo:font-size="12pt" style:font-size-complex="12pt" fo:language="de" style:language-complex="hi" fo:country="DE" style:country-complex="IN"/>
    </style:style>
    <style:style style:parent-style-name="746" style:list-style-name="WWNum1" style:family="paragraph" style:name="P623">
      <style:paragraph-properties fo:margin-left="1.27cm" fo:margin-right="0cm" fo:text-indent="-0.635cm" fo:margin-top="2pt" fo:margin-bottom="2pt"/>
      <style:text-properties fo:color="#000000" fo:font-family="Arial" style:font-family-complex="Arial" fo:font-size="11pt" style:font-size-complex="11pt" fo:language="de" style:language-complex="ar" fo:country="DE" style:country-complex="SA"/>
    </style:style>
    <style:style style:family="text" style:name="T2430">
      <style:text-properties fo:color="#000000" fo:font-family="Arial" style:font-family-complex="Arial" fo:font-size="11pt" style:font-size-complex="11pt" fo:language="de" style:language-complex="ar" fo:country="DE" style:country-complex="SA"/>
    </style:style>
    <style:style style:family="text" style:name="T2431">
      <style:text-properties fo:color="#000000" fo:font-family="Arial" style:font-family-complex="Arial" fo:font-size="11pt" style:font-size-complex="11pt" fo:language="de" style:language-complex="ar" fo:country="DE" style:country-complex="SA"/>
    </style:style>
    <style:style style:family="text" style:name="T2432">
      <style:text-properties fo:color="#000000" fo:font-family="Arial" style:font-family-complex="Arial" fo:font-size="11pt" style:font-size-complex="11pt" fo:language="de" style:language-complex="ar" fo:country="DE" style:country-complex="SA"/>
    </style:style>
    <style:style style:parent-style-name="746" style:list-style-name="WWNum1" style:family="paragraph" style:name="P624">
      <style:paragraph-properties fo:margin-left="1.27cm" fo:margin-right="0cm" fo:text-indent="-0.635cm" fo:margin-top="2pt" fo:margin-bottom="2pt"/>
      <style:text-properties fo:color="#000000" fo:font-family="Arial" style:font-family-complex="Arial" fo:font-size="11pt" style:font-size-complex="11pt" fo:language="de" style:language-complex="ar" fo:country="DE" style:country-complex="SA"/>
    </style:style>
    <style:style style:family="text" style:name="T2433">
      <style:text-properties fo:color="#000000" fo:font-family="Arial" style:font-family-complex="Arial" fo:font-size="11pt" style:font-size-complex="11pt" fo:language="de" style:language-complex="ar" fo:country="DE" style:country-complex="SA"/>
    </style:style>
    <style:style style:family="text" style:name="T2434">
      <style:text-properties fo:color="#000000" fo:font-family="Arial" style:font-family-complex="Arial" fo:font-size="11pt" style:font-size-complex="11pt" fo:language="de" style:language-complex="ar" fo:country="DE" style:country-complex="SA"/>
    </style:style>
    <style:style style:family="text" style:name="T2435">
      <style:text-properties fo:color="#000000" fo:font-family="Arial" style:font-family-complex="Arial" fo:font-size="11pt" style:font-size-complex="11pt" fo:language="de" style:language-complex="ar" fo:country="DE" style:country-complex="SA"/>
    </style:style>
    <style:style style:parent-style-name="746" style:list-style-name="WWNum1" style:family="paragraph" style:name="P625">
      <style:paragraph-properties fo:margin-left="1.27cm" fo:margin-right="0cm" fo:text-indent="-0.635cm" fo:margin-top="2pt" fo:margin-bottom="2pt"/>
      <style:text-properties fo:color="#000000" fo:font-family="Arial" style:font-family-complex="Arial" fo:font-size="11pt" style:font-size-complex="11pt" fo:language="de" style:language-complex="ar" fo:country="DE" style:country-complex="SA"/>
    </style:style>
    <style:style style:family="text" style:name="T2436">
      <style:text-properties fo:color="#000000" fo:font-family="Arial" style:font-family-complex="Arial" fo:font-size="11pt" style:font-size-complex="11pt" fo:language="de" style:language-complex="ar" fo:country="DE" style:country-complex="SA"/>
    </style:style>
    <style:style style:family="text" style:name="T2437">
      <style:text-properties fo:color="#000000" fo:font-family="Arial" style:font-family-complex="Arial" fo:font-size="11pt" style:font-size-complex="11pt" fo:language="de" style:language-complex="ar" fo:country="DE" style:country-complex="SA"/>
    </style:style>
    <style:style style:family="text" style:name="T2438">
      <style:text-properties fo:color="#000000" fo:font-family="Arial" style:font-family-complex="Arial" fo:font-size="11pt" style:font-size-complex="11pt" fo:language="de" style:language-complex="ar" fo:country="DE" style:country-complex="SA"/>
    </style:style>
    <style:style style:parent-style-name="746" style:list-style-name="WWNum1" style:family="paragraph" style:name="P626">
      <style:paragraph-properties fo:margin-left="1.27cm" fo:margin-right="0cm" fo:text-indent="-0.635cm" fo:margin-top="2pt" fo:margin-bottom="2pt"/>
      <style:text-properties fo:color="#000000" fo:font-family="Arial" style:font-family-complex="Arial" fo:font-size="11pt" style:font-size-complex="11pt" fo:language="de" style:language-complex="ar" fo:country="DE" style:country-complex="SA"/>
    </style:style>
    <style:style style:family="text" style:name="T2439">
      <style:text-properties fo:color="#000000" fo:font-family="Arial" style:font-family-complex="Arial" fo:font-size="11pt" style:font-size-complex="11pt" fo:language="de" style:language-complex="ar" fo:country="DE" style:country-complex="SA"/>
    </style:style>
    <style:style style:family="text" style:name="T2440">
      <style:text-properties fo:color="#000000" fo:font-family="Arial" style:font-family-complex="Arial" fo:font-size="11pt" style:font-size-complex="11pt" fo:language="de" style:language-complex="ar" fo:country="DE" style:country-complex="SA"/>
    </style:style>
    <style:style style:family="text" style:name="T2441">
      <style:text-properties fo:color="#000000" fo:font-family="Arial" style:font-family-complex="Arial" fo:font-size="11pt" style:font-size-complex="11pt" fo:language="de" style:language-complex="ar" fo:country="DE" style:country-complex="SA"/>
    </style:style>
    <style:style style:parent-style-name="746" style:list-style-name="WWNum1" style:family="paragraph" style:name="P627">
      <style:paragraph-properties fo:margin-left="1.27cm" fo:margin-right="0cm" fo:text-indent="-0.635cm" fo:margin-top="2pt" fo:margin-bottom="2pt"/>
      <style:text-properties fo:color="#000000" fo:font-family="Arial" style:font-family-complex="Arial" fo:font-size="11pt" style:font-size-complex="11pt" fo:language="de" style:language-complex="ar" fo:country="DE" style:country-complex="SA"/>
    </style:style>
    <style:style style:family="text" style:name="T2442">
      <style:text-properties fo:color="#000000" fo:font-family="Arial" style:font-family-complex="Arial" fo:font-size="11pt" style:font-size-complex="11pt" fo:language="de" style:language-complex="ar" fo:country="DE" style:country-complex="SA"/>
    </style:style>
    <style:style style:family="text" style:name="T2443">
      <style:text-properties fo:color="#000000" fo:font-family="Arial" style:font-family-complex="Arial" fo:font-size="11pt" style:font-size-complex="11pt" fo:language="de" style:language-complex="ar" fo:country="DE" style:country-complex="SA"/>
    </style:style>
    <style:style style:family="text" style:name="T2444">
      <style:text-properties fo:color="#000000" fo:font-family="Arial" style:font-family-complex="Arial" fo:font-size="11pt" style:font-size-complex="11pt" fo:language="de" style:language-complex="ar" fo:country="DE" style:country-complex="SA"/>
    </style:style>
    <style:style style:parent-style-name="737" style:family="paragraph" style:name="P628">
      <style:paragraph-properties fo:margin-left="0cm" fo:margin-right="0cm" fo:text-indent="0cm" fo:margin-top="3pt" fo:margin-bottom="3pt"/>
      <style:text-properties fo:color="#000000" fo:font-family="Liberation Serif" style:font-family-complex="Liberation Serif" fo:font-size="12pt" style:font-size-complex="12pt" fo:language="de" style:language-complex="hi" fo:country="DE" style:country-complex="IN"/>
    </style:style>
    <style:style style:family="text" style:name="T2445">
      <style:text-properties fo:color="#000000" fo:font-family="Liberation Serif" style:font-family-complex="Liberation Serif" fo:font-size="12pt" style:font-size-complex="12pt" fo:language="de" style:language-complex="hi" fo:country="DE" style:country-complex="IN"/>
    </style:style>
    <style:style style:family="text" style:name="T2446">
      <style:text-properties fo:color="#000000" fo:font-family="Liberation Serif" style:font-family-complex="Liberation Serif" fo:font-size="12pt" style:font-size-complex="12pt" fo:language="de" style:language-complex="hi" fo:country="DE" style:country-complex="IN"/>
    </style:style>
    <style:style style:family="text" style:name="T2447">
      <style:text-properties fo:color="#000000" fo:font-family="Liberation Serif" style:font-family-complex="Liberation Serif" fo:font-size="12pt" style:font-size-complex="12pt" fo:language="de" style:language-complex="hi" fo:country="DE" style:country-complex="IN"/>
    </style:style>
    <style:style style:family="paragraph" style:name="P629">
      <style:paragraph-properties/>
      <style:text-properties fo:color="#000000" fo:font-family="Liberation Serif" style:font-family-complex="Liberation Serif" fo:font-size="12pt" style:font-size-complex="12pt" fo:language="de" style:language-complex="hi" fo:country="DE" style:country-complex="IN"/>
    </style:style>
    <style:style style:family="text" style:name="T2448">
      <style:text-properties fo:color="#000000" fo:font-family="Liberation Serif" style:font-family-complex="Liberation Serif" fo:font-size="12pt" style:font-size-complex="12pt" fo:language="de" style:language-complex="hi" fo:country="DE" style:country-complex="IN"/>
    </style:style>
    <style:style style:family="text" style:name="T2449">
      <style:text-properties fo:color="#000000" fo:font-family="Liberation Serif" style:font-family-complex="Liberation Serif" fo:font-size="12pt" style:font-size-complex="12pt" fo:language="de" style:language-complex="hi" fo:country="DE" style:country-complex="IN"/>
    </style:style>
    <style:style style:family="text" style:name="T2450">
      <style:text-properties fo:color="#000000" fo:font-family="Liberation Serif" style:font-family-complex="Liberation Serif" fo:font-size="12pt" style:font-size-complex="12pt" fo:language="de" style:language-complex="hi" fo:country="DE" style:country-complex="IN"/>
    </style:style>
    <style:style style:parent-style-name="749" style:family="paragraph" style:name="P630">
      <style:paragraph-properties fo:break-before="page"/>
      <style:text-properties fo:color="#000000" fo:font-family="Liberation Sans" style:font-family-complex="Liberation Sans" fo:font-size="18pt" style:font-size-complex="18pt" fo:language="de" style:language-complex="hi" fo:country="DE" style:country-complex="IN" fo:font-weight="bold"/>
    </style:style>
    <style:style style:family="text" style:name="T2451">
      <style:text-properties fo:language="de" style:language-complex="hi" fo:country="DE" style:country-complex="IN"/>
    </style:style>
    <style:style style:family="text" style:name="T2452">
      <style:text-properties fo:color="#000000" fo:font-family="Liberation Serif" style:font-family-complex="Liberation Serif" fo:font-size="12pt" style:font-size-complex="12pt" fo:language="de" style:language-complex="hi" fo:country="DE" style:country-complex="IN"/>
    </style:style>
    <style:style style:family="text" style:name="T2453">
      <style:text-properties fo:color="#000000" fo:font-family="Liberation Serif" style:font-family-complex="Liberation Serif" fo:font-size="12pt" style:font-size-complex="12pt" fo:language="de" style:language-complex="hi" fo:country="DE" style:country-complex="IN"/>
    </style:style>
    <style:style style:parent-style-name="746" style:list-style-name="WWNum9" style:family="paragraph" style:name="P631">
      <style:paragraph-properties fo:margin-left="0.4992cm" fo:margin-right="0cm" fo:text-indent="-0.4992cm"/>
      <style:text-properties fo:color="#000000" fo:font-family="Arial" style:font-family-complex="Arial" fo:font-size="11pt" style:font-size-complex="11pt" fo:language="de" style:language-complex="ar" fo:country="DE" style:country-complex="SA"/>
    </style:style>
    <style:style style:family="text" style:name="T2454">
      <style:text-properties fo:color="#000000" fo:font-family="Liberation Serif" style:font-family-complex="Liberation Serif" fo:font-size="12pt" style:font-size-complex="12pt" fo:language="de" style:language-complex="hi" fo:country="DE" style:country-complex="IN"/>
    </style:style>
    <style:style style:parent-style-name="717" style:family="text" style:name="T2455">
      <style:text-properties fo:font-family="Liberation Serif" style:font-family-complex="Liberation Serif" fo:font-size="12pt" style:font-size-complex="12pt" fo:language="de" style:language-complex="hi" fo:country="DE" style:country-complex="IN"/>
    </style:style>
    <style:style style:parent-style-name="717" style:family="text" style:name="T2456">
      <style:text-properties fo:font-family="Liberation Serif" style:font-family-complex="Liberation Serif" fo:font-size="12pt" style:font-size-complex="12pt" fo:language="de" style:language-complex="hi" fo:country="DE" style:country-complex="IN"/>
    </style:style>
    <style:style style:family="text" style:name="T2457">
      <style:text-properties fo:color="#000000" fo:font-family="Liberation Serif" style:font-family-complex="Liberation Serif" fo:font-size="12pt" style:font-size-complex="12pt" fo:language="de" style:language-complex="hi" fo:country="DE" style:country-complex="IN"/>
    </style:style>
    <style:style style:family="text" style:name="T2458">
      <style:text-properties fo:color="#000000" fo:font-family="Liberation Serif" style:font-family-complex="Liberation Serif" fo:font-size="12pt" style:font-size-complex="12pt" fo:language="de" style:language-complex="de" fo:country="DE" style:country-complex="DE"/>
    </style:style>
    <style:style style:family="text" style:name="T2459">
      <style:text-properties fo:language="de" style:language-complex="de" fo:country="DE" style:country-complex="DE"/>
    </style:style>
    <style:style style:family="text" style:name="T2460">
      <style:text-properties fo:language="de" fo:country="DE"/>
    </style:style>
    <style:style style:family="text" style:name="T2461">
      <style:text-properties fo:color="#000000" fo:font-family="Liberation Serif" style:font-family-complex="Liberation Serif" fo:font-size="12pt" style:font-size-complex="12pt" fo:language="de" style:language-complex="hi" fo:country="DE" style:country-complex="IN"/>
    </style:style>
    <style:style style:parent-style-name="746" style:list-style-name="WWNum8" style:family="paragraph" style:name="P632">
      <style:paragraph-properties fo:margin-left="0.4992cm" fo:margin-right="0cm" fo:text-indent="-0.4992cm"/>
      <style:text-properties fo:color="#000000" fo:font-family="Arial" style:font-family-complex="Arial" fo:font-size="11pt" style:font-size-complex="11pt" fo:language="de" style:language-complex="ar" fo:country="DE" style:country-complex="SA"/>
    </style:style>
    <style:style style:family="text" style:name="T2462">
      <style:text-properties fo:color="#000000" fo:font-family="Liberation Serif" style:font-family-complex="Liberation Serif" fo:font-size="12pt" style:font-size-complex="12pt" fo:language="de" style:language-complex="hi" fo:country="DE" style:country-complex="IN"/>
    </style:style>
    <style:style style:parent-style-name="717" style:family="text" style:name="T2463">
      <style:text-properties fo:font-family="Liberation Serif" style:font-family-complex="Liberation Serif" fo:font-size="12pt" style:font-size-complex="12pt" fo:language="de" style:language-complex="hi" fo:country="DE" style:country-complex="IN"/>
    </style:style>
    <style:style style:parent-style-name="717" style:family="text" style:name="T2464">
      <style:text-properties fo:font-family="Liberation Serif" style:font-family-complex="Liberation Serif" fo:font-size="12pt" style:font-size-complex="12pt" fo:language="de" style:language-complex="hi" fo:country="DE" style:country-complex="IN"/>
    </style:style>
    <style:style style:family="text" style:name="T2465">
      <style:text-properties fo:color="#000000" fo:font-family="Liberation Serif" style:font-family-complex="Liberation Serif" fo:font-size="12pt" style:font-size-complex="12pt" fo:language="de" style:language-complex="hi" fo:country="DE" style:country-complex="IN"/>
    </style:style>
    <style:style style:family="text" style:name="T2466">
      <style:text-properties fo:color="#000000" fo:font-family="Liberation Serif" style:font-family-complex="Liberation Serif" fo:font-size="12pt" style:font-size-complex="12pt" fo:language="de" style:language-complex="de" fo:country="DE" style:country-complex="DE"/>
    </style:style>
    <style:style style:family="text" style:name="T2467">
      <style:text-properties fo:language="de" style:language-complex="de" fo:country="DE" style:country-complex="DE"/>
    </style:style>
    <style:style style:family="text" style:name="T2468">
      <style:text-properties fo:language="de" fo:country="DE"/>
    </style:style>
    <style:style style:family="text" style:name="T2469">
      <style:text-properties fo:color="#000000" fo:font-family="Liberation Serif" style:font-family-complex="Liberation Serif" fo:font-size="12pt" style:font-size-complex="12pt" fo:language="de" style:language-complex="hi" fo:country="DE" style:country-complex="IN"/>
    </style:style>
    <style:style style:parent-style-name="746" style:list-style-name="WWNum7" style:family="paragraph" style:name="P633">
      <style:paragraph-properties fo:margin-left="0.4992cm" fo:margin-right="0cm" fo:text-indent="-0.4992cm"/>
      <style:text-properties fo:color="#000000" fo:font-family="Arial" style:font-family-complex="Arial" fo:font-size="11pt" style:font-size-complex="11pt" fo:language="de" style:language-complex="ar" fo:country="DE" style:country-complex="SA"/>
    </style:style>
    <style:style style:family="text" style:name="T2470">
      <style:text-properties fo:color="#000000" fo:font-family="Liberation Serif" style:font-family-complex="Liberation Serif" fo:font-size="12pt" style:font-size-complex="12pt" fo:language="de" style:language-complex="hi" fo:country="DE" style:country-complex="IN"/>
    </style:style>
    <style:style style:parent-style-name="717" style:family="text" style:name="T2471">
      <style:text-properties fo:font-family="Liberation Serif" style:font-family-complex="Liberation Serif" fo:font-size="12pt" style:font-size-complex="12pt" fo:language="de" style:language-complex="hi" fo:country="DE" style:country-complex="IN"/>
    </style:style>
    <style:style style:parent-style-name="717" style:family="text" style:name="T2472">
      <style:text-properties fo:font-family="Liberation Serif" style:font-family-complex="Liberation Serif" fo:font-size="12pt" style:font-size-complex="12pt" fo:language="de" style:language-complex="hi" fo:country="DE" style:country-complex="IN"/>
    </style:style>
    <style:style style:parent-style-name="717" style:family="text" style:name="T2473">
      <style:text-properties fo:font-family="Liberation Serif" style:font-family-complex="Liberation Serif" fo:font-size="12pt" style:font-size-complex="12pt" fo:language="de" style:language-complex="hi" fo:country="DE" style:country-complex="IN"/>
    </style:style>
    <style:style style:family="text" style:name="T2474">
      <style:text-properties fo:color="#000000" fo:font-family="Liberation Serif" style:font-family-complex="Liberation Serif" fo:font-size="12pt" style:font-size-complex="12pt" fo:language="de" style:language-complex="hi" fo:country="DE" style:country-complex="IN"/>
    </style:style>
    <style:style style:family="text" style:name="T2475">
      <style:text-properties fo:color="#000000" fo:font-family="Liberation Serif" style:font-family-complex="Liberation Serif" fo:font-size="12pt" style:font-size-complex="12pt" fo:language="de" style:language-complex="de" fo:country="DE" style:country-complex="DE"/>
    </style:style>
    <style:style style:family="text" style:name="T2476">
      <style:text-properties fo:color="#000000" fo:font-family="Liberation Serif" style:font-family-complex="Liberation Serif" fo:font-size="12pt" style:font-size-complex="12pt" fo:language="de" style:language-complex="de" fo:country="DE" style:country-complex="DE"/>
    </style:style>
    <style:style style:family="text" style:name="T2477">
      <style:text-properties fo:language="de" fo:country="DE"/>
    </style:style>
    <style:style style:family="text" style:name="T2478">
      <style:text-properties fo:color="#000000" fo:font-family="Liberation Serif" style:font-family-complex="Liberation Serif" fo:font-size="12pt" style:font-size-complex="12pt" fo:language="de" style:language-complex="hi" fo:country="DE" style:country-complex="IN"/>
    </style:style>
    <style:style style:family="paragraph" style:name="P634">
      <style:paragraph-properties fo:margin-left="0.4992cm" fo:margin-right="0cm" fo:text-indent="0cm"/>
      <style:text-properties style:text-underline-type="single" style:text-underline-style="solid" style:text-underline-width="auto" style:text-underline-color="font-color"/>
    </style:style>
    <style:style style:family="text" style:name="T2479">
      <style:text-properties fo:color="#000000" fo:font-family="Liberation Serif" style:font-family-complex="Liberation Serif" fo:font-size="12pt" style:font-size-complex="12pt" fo:language="de" style:language-complex="hi" fo:country="DE" style:country-complex="IN" style:text-underline-type="single" style:text-underline-style="solid" style:text-underline-width="auto" style:text-underline-color="font-color"/>
    </style:style>
    <style:style style:family="text" style:name="T2480">
      <style:text-properties style:text-underline-type="single" style:text-underline-style="solid" style:text-underline-width="auto" style:text-underline-color="font-color"/>
    </style:style>
    <style:style style:parent-style-name="746" style:list-style-name="WWNum6" style:family="paragraph" style:name="P635">
      <style:paragraph-properties fo:margin-left="0.4992cm" fo:margin-right="0cm" fo:text-indent="-0.4992cm"/>
      <style:text-properties fo:color="#000000" fo:font-family="Arial" style:font-family-complex="Arial" fo:font-size="11pt" style:font-size-complex="11pt" fo:language="de" style:language-complex="ar" fo:country="DE" style:country-complex="SA"/>
    </style:style>
    <style:style style:parent-style-name="717" style:family="text" style:name="T2481">
      <style:text-properties fo:font-family="Liberation Serif" style:font-family-complex="Liberation Serif" fo:font-size="12pt" style:font-size-complex="12pt" fo:language="de" style:language-complex="hi" fo:country="DE" style:country-complex="IN"/>
    </style:style>
    <style:style style:parent-style-name="717" style:family="text" style:name="T2482">
      <style:text-properties fo:font-family="Liberation Serif" style:font-family-complex="Liberation Serif" fo:font-size="12pt" style:font-size-complex="12pt" fo:language="de" style:language-complex="hi" fo:country="DE" style:country-complex="IN"/>
    </style:style>
    <style:style style:family="text" style:name="T2483">
      <style:text-properties fo:color="#000000" fo:font-family="Liberation Serif" style:font-family-complex="Liberation Serif" fo:font-size="12pt" style:font-size-complex="12pt" fo:language="de" style:language-complex="hi" fo:country="DE" style:country-complex="IN"/>
    </style:style>
    <style:style style:parent-style-name="746" style:list-style-name="WWNum5" style:family="paragraph" style:name="P636">
      <style:paragraph-properties fo:margin-left="0.4992cm" fo:margin-right="0cm" fo:text-indent="-0.4992cm"/>
      <style:text-properties fo:color="#000000" fo:font-family="Arial" style:font-family-complex="Arial" fo:font-size="11pt" style:font-size-complex="11pt" fo:language="de" style:language-complex="ar" fo:country="DE" style:country-complex="SA"/>
    </style:style>
    <style:style style:family="text" style:name="T2484">
      <style:text-properties fo:color="#000000" fo:font-family="Liberation Serif" style:font-family-complex="Liberation Serif" fo:font-size="12pt" style:font-size-complex="12pt" fo:language="de" style:language-complex="de" fo:country="DE" style:country-complex="DE"/>
    </style:style>
    <style:style style:parent-style-name="717" style:family="text" style:name="T2485">
      <style:text-properties fo:font-family="Liberation Serif" style:font-family-complex="Liberation Serif" fo:font-size="12pt" style:font-size-complex="12pt" fo:language="de" style:language-complex="de" fo:country="DE" style:country-complex="DE"/>
    </style:style>
    <style:style style:parent-style-name="717" style:family="text" style:name="T2486">
      <style:text-properties fo:font-family="Liberation Serif" style:font-family-complex="Liberation Serif" fo:font-size="12pt" style:font-size-complex="12pt" fo:language="de" style:language-complex="de" fo:country="DE" style:country-complex="DE"/>
    </style:style>
    <style:style style:parent-style-name="717" style:family="text" style:name="T2487">
      <style:text-properties fo:font-family="Liberation Serif" style:font-family-complex="Liberation Serif" fo:font-size="12pt" style:font-size-complex="12pt" fo:language="de" style:language-complex="hi" fo:country="DE" style:country-complex="IN"/>
    </style:style>
    <style:style style:family="text" style:name="T2488">
      <style:text-properties fo:color="#000000" fo:font-family="Liberation Serif" style:font-family-complex="Liberation Serif" fo:font-size="12pt" style:font-size-complex="12pt" fo:language="de" style:language-complex="hi" fo:country="DE" style:country-complex="IN"/>
    </style:style>
    <style:style style:family="text" style:name="T2489">
      <style:text-properties fo:color="#000000" fo:font-family="Liberation Serif" style:font-family-complex="Liberation Serif" fo:font-size="12pt" style:font-size-complex="12pt" fo:language="de" style:language-complex="de" fo:country="DE" style:country-complex="DE"/>
    </style:style>
    <style:style style:family="text" style:name="T2490">
      <style:text-properties fo:color="#000000" fo:font-family="Liberation Serif" style:font-family-complex="Liberation Serif" fo:font-size="12pt" style:font-size-complex="12pt" fo:language="de" style:language-complex="de" fo:country="DE" style:country-complex="DE"/>
    </style:style>
    <style:style style:family="text" style:name="T2491">
      <style:text-properties fo:language="de" fo:country="DE"/>
    </style:style>
    <style:style style:family="text" style:name="T2492">
      <style:text-properties fo:color="#000000" fo:font-family="Liberation Serif" style:font-family-complex="Liberation Serif" fo:font-size="12pt" style:font-size-complex="12pt" fo:language="de" style:language-complex="hi" fo:country="DE" style:country-complex="IN"/>
    </style:style>
    <style:style style:family="paragraph" style:name="P637">
      <style:paragraph-properties fo:margin-left="0.4992cm" fo:margin-right="0cm" fo:text-indent="0cm"/>
      <style:text-properties style:text-underline-type="single" style:text-underline-style="solid" style:text-underline-width="auto" style:text-underline-color="font-color"/>
    </style:style>
    <style:style style:family="text" style:name="T2493">
      <style:text-properties fo:color="#000000" fo:font-family="Liberation Serif" style:font-family-complex="Liberation Serif" fo:font-size="12pt" style:font-size-complex="12pt" fo:language="de" style:language-complex="hi" fo:country="DE" style:country-complex="IN" style:text-underline-type="single" style:text-underline-style="solid" style:text-underline-width="auto" style:text-underline-color="font-color"/>
    </style:style>
    <style:style style:family="text" style:name="T2494">
      <style:text-properties style:text-underline-type="single" style:text-underline-style="solid" style:text-underline-width="auto" style:text-underline-color="font-color"/>
    </style:style>
    <style:style style:parent-style-name="746" style:list-style-name="WWNum10" style:family="paragraph" style:name="P638">
      <style:paragraph-properties fo:margin-left="0.4992cm" fo:margin-right="0cm" fo:text-indent="-0.4992cm"/>
      <style:text-properties fo:color="#000000" fo:font-family="Arial" style:font-family-complex="Arial" fo:font-size="11pt" style:font-size-complex="11pt" fo:language="de" style:language-complex="ar" fo:country="DE" style:country-complex="SA"/>
    </style:style>
    <style:style style:family="text" style:name="T2495">
      <style:text-properties fo:color="#000000" fo:font-family="Liberation Serif" style:font-family-complex="Liberation Serif" fo:font-size="12pt" style:font-size-complex="12pt" fo:language="de" style:language-complex="hi" fo:country="DE" style:country-complex="IN"/>
    </style:style>
    <style:style style:parent-style-name="717" style:family="text" style:name="T2496">
      <style:text-properties fo:font-family="Liberation Serif" style:font-family-complex="Liberation Serif" fo:font-size="12pt" style:font-size-complex="12pt" fo:language="de" style:language-complex="hi" fo:country="DE" style:country-complex="IN"/>
    </style:style>
    <style:style style:parent-style-name="717" style:family="text" style:name="T2497">
      <style:text-properties fo:font-family="Liberation Serif" style:font-family-complex="Liberation Serif" fo:font-size="12pt" style:font-size-complex="12pt" fo:language="de" style:language-complex="hi" fo:country="DE" style:country-complex="IN"/>
    </style:style>
    <style:style style:family="text" style:name="T2498">
      <style:text-properties fo:color="#000000" fo:font-family="Liberation Serif" style:font-family-complex="Liberation Serif" fo:font-size="12pt" style:font-size-complex="12pt" fo:language="de" style:language-complex="hi" fo:country="DE" style:country-complex="IN"/>
    </style:style>
    <style:style style:family="text" style:name="T2499">
      <style:text-properties fo:color="#000000" fo:font-family="Liberation Serif" style:font-family-complex="Liberation Serif" fo:font-size="12pt" style:font-size-complex="12pt" fo:language="de" style:language-complex="de" fo:country="DE" style:country-complex="DE"/>
    </style:style>
    <style:style style:family="text" style:name="T2500">
      <style:text-properties fo:language="de" style:language-complex="de" fo:country="DE" style:country-complex="DE"/>
    </style:style>
    <style:style style:family="text" style:name="T2501">
      <style:text-properties fo:language="de" fo:country="DE"/>
    </style:style>
    <style:style style:family="text" style:name="T2502">
      <style:text-properties fo:color="#000000" fo:font-family="Liberation Serif" style:font-family-complex="Liberation Serif" fo:font-size="12pt" style:font-size-complex="12pt" fo:language="de" style:language-complex="hi" fo:country="DE" style:country-complex="IN"/>
    </style:style>
    <style:style style:family="paragraph" style:name="P639">
      <style:paragraph-properties fo:margin-left="0.4992cm" fo:margin-right="0cm" fo:text-indent="0cm"/>
      <style:text-properties style:text-underline-type="single" style:text-underline-style="solid" style:text-underline-width="auto" style:text-underline-color="font-color"/>
    </style:style>
    <style:style style:family="text" style:name="T2503">
      <style:text-properties fo:color="#000000" fo:font-family="Liberation Serif" style:font-family-complex="Liberation Serif" fo:font-size="12pt" style:font-size-complex="12pt" fo:language="de" style:language-complex="hi" fo:country="DE" style:country-complex="IN" style:text-underline-type="single" style:text-underline-style="solid" style:text-underline-width="auto" style:text-underline-color="font-color"/>
    </style:style>
    <style:style style:family="text" style:name="T2504">
      <style:text-properties style:text-underline-type="single" style:text-underline-style="solid" style:text-underline-width="auto" style:text-underline-color="font-color"/>
    </style:style>
    <style:style style:parent-style-name="746" style:list-style-name="WWNum11" style:family="paragraph" style:name="P640">
      <style:paragraph-properties fo:margin-left="0.4992cm" fo:margin-right="0cm" fo:text-indent="-0.4992cm"/>
      <style:text-properties fo:color="#000000" fo:font-family="Arial" style:font-family-complex="Arial" fo:font-size="11pt" style:font-size-complex="11pt" fo:language="de" style:language-complex="ar" fo:country="DE" style:country-complex="SA"/>
    </style:style>
    <style:style style:family="text" style:name="T2505">
      <style:text-properties fo:color="#000000" fo:font-family="Liberation Serif" style:font-family-complex="Liberation Serif" fo:font-size="12pt" style:font-size-complex="12pt" fo:language="de" style:language-complex="hi" fo:country="DE" style:country-complex="IN"/>
    </style:style>
    <style:style style:parent-style-name="717" style:family="text" style:name="T2506">
      <style:text-properties fo:font-family="Liberation Serif" style:font-family-complex="Liberation Serif" fo:font-size="12pt" style:font-size-complex="12pt" fo:language="de" style:language-complex="hi" fo:country="DE" style:country-complex="IN"/>
    </style:style>
    <style:style style:parent-style-name="717" style:family="text" style:name="T2507">
      <style:text-properties fo:font-family="Liberation Serif" style:font-family-complex="Liberation Serif" fo:font-size="12pt" style:font-size-complex="12pt" fo:language="de" style:language-complex="hi" fo:country="DE" style:country-complex="IN"/>
    </style:style>
    <style:style style:parent-style-name="717" style:family="text" style:name="T2508">
      <style:text-properties fo:font-family="Liberation Serif" style:font-family-complex="Liberation Serif" fo:font-size="12pt" style:font-size-complex="12pt" fo:language="de" style:language-complex="hi" fo:country="DE" style:country-complex="IN"/>
    </style:style>
    <style:style style:family="text" style:name="T2509">
      <style:text-properties fo:color="#000000" fo:font-family="Liberation Serif" style:font-family-complex="Liberation Serif" fo:font-size="12pt" style:font-size-complex="12pt" fo:language="de" style:language-complex="hi" fo:country="DE" style:country-complex="IN"/>
    </style:style>
    <style:style style:family="text" style:name="T2510">
      <style:text-properties fo:color="#000000" fo:font-family="Liberation Serif" style:font-family-complex="Liberation Serif" fo:font-size="12pt" style:font-size-complex="12pt" fo:language="de" style:language-complex="de" fo:country="DE" style:country-complex="DE"/>
    </style:style>
    <style:style style:family="text" style:name="T2511">
      <style:text-properties fo:color="#000000" fo:font-family="Liberation Serif" style:font-family-complex="Liberation Serif" fo:font-size="12pt" style:font-size-complex="12pt" fo:language="de" style:language-complex="de" fo:country="DE" style:country-complex="DE"/>
    </style:style>
    <style:style style:family="text" style:name="T2512">
      <style:text-properties fo:language="de" fo:country="DE"/>
    </style:style>
    <style:style style:family="text" style:name="T2513">
      <style:text-properties fo:color="#000000" fo:font-family="Liberation Serif" style:font-family-complex="Liberation Serif" fo:font-size="12pt" style:font-size-complex="12pt" fo:language="de" style:language-complex="hi" fo:country="DE" style:country-complex="IN"/>
    </style:style>
    <style:style style:parent-style-name="746" style:list-style-name="WWNum11" style:family="paragraph" style:name="P641">
      <style:paragraph-properties fo:margin-left="0.4992cm" fo:margin-right="0cm" fo:text-indent="-0.4992cm"/>
      <style:text-properties fo:color="#000000" fo:font-family="Arial" style:font-family-complex="Arial" fo:font-size="11pt" style:font-size-complex="11pt" fo:language="de" style:language-complex="ar" fo:country="DE" style:country-complex="SA"/>
    </style:style>
    <style:style style:family="text" style:name="T2514">
      <style:text-properties fo:color="#000000" fo:font-family="Liberation Serif" style:font-family-complex="Liberation Serif" fo:font-size="12pt" style:font-size-complex="12pt" fo:language="de" style:language-complex="hi" fo:country="DE" style:country-complex="IN"/>
    </style:style>
    <style:style style:family="text" style:name="T2515">
      <style:text-properties fo:color="#000000" fo:font-family="Liberation Serif" style:font-family-complex="Liberation Serif" fo:font-size="12pt" style:font-size-complex="12pt" fo:language="de" style:language-complex="hi" fo:country="DE" style:country-complex="IN"/>
    </style:style>
    <style:style style:family="text" style:name="T2516">
      <style:text-properties fo:color="#000000" fo:font-family="Liberation Serif" style:font-family-complex="Liberation Serif" fo:font-size="12pt" style:font-size-complex="12pt" fo:language="de" style:language-complex="hi" fo:country="DE" style:country-complex="IN"/>
    </style:style>
    <style:style style:family="text" style:name="T2517">
      <style:text-properties fo:color="#000000" fo:font-family="Liberation Serif" style:font-family-complex="Liberation Serif" fo:font-size="12pt" style:font-size-complex="12pt" fo:language="de" style:language-complex="hi" fo:country="DE" style:country-complex="IN"/>
    </style:style>
    <style:style style:family="text" style:name="T2518">
      <style:text-properties fo:color="#000000" fo:font-family="Liberation Serif" style:font-family-complex="Liberation Serif" fo:font-size="12pt" style:font-size-complex="12pt" fo:language="de" style:language-complex="hi" fo:country="DE" style:country-complex="IN"/>
    </style:style>
    <style:style style:family="text" style:name="T2519">
      <style:text-properties fo:color="#000000" fo:font-family="Liberation Serif" style:font-family-complex="Liberation Serif" fo:font-size="12pt" style:font-size-complex="12pt" fo:language="de" style:language-complex="hi" fo:country="DE" style:country-complex="IN"/>
    </style:style>
    <style:style style:family="paragraph" style:name="P642">
      <style:paragraph-properties/>
      <style:text-properties fo:color="#000000" fo:font-family="Liberation Serif" style:font-family-complex="Liberation Serif" fo:font-size="12pt" style:font-size-complex="12pt" fo:language="de" style:language-complex="hi" fo:country="DE" style:country-complex="IN"/>
    </style:style>
    <style:style style:family="text" style:name="T2520">
      <style:text-properties fo:color="#000000" fo:font-family="Liberation Serif" style:font-family-complex="Liberation Serif" fo:font-size="12pt" style:font-size-complex="12pt" fo:language="de" style:language-complex="hi" fo:country="DE" style:country-complex="IN"/>
    </style:style>
    <style:style style:family="text" style:name="T2521">
      <style:text-properties fo:color="#000000" fo:font-family="Liberation Serif" style:font-family-complex="Liberation Serif" fo:font-size="12pt" style:font-size-complex="12pt" fo:language="de" style:language-complex="hi" fo:country="DE" style:country-complex="IN"/>
    </style:style>
    <style:style style:family="text" style:name="T2522">
      <style:text-properties fo:color="#000000" fo:font-family="Liberation Serif" style:font-family-complex="Liberation Serif" fo:font-size="12pt" style:font-size-complex="12pt" fo:language="de" style:language-complex="hi" fo:country="DE" style:country-complex="IN"/>
    </style:style>
    <style:style style:family="text" style:name="T2523">
      <style:text-properties fo:color="#000000" fo:font-family="Liberation Serif" style:font-family-complex="Liberation Serif" fo:font-size="12pt" style:font-size-complex="12pt" fo:language="de" style:language-complex="hi" fo:country="DE" style:country-complex="IN"/>
    </style:style>
    <style:style style:parent-style-name="737" style:family="paragraph" style:name="P643">
      <style:paragraph-properties fo:margin-left="0cm" fo:margin-right="0cm" fo:text-indent="0cm" fo:break-before="page"/>
      <style:text-properties fo:color="#000000" fo:font-family="Liberation Serif" style:font-family-complex="Liberation Serif" fo:font-size="12pt" style:font-size-complex="12pt" fo:language="de" style:language-complex="hi" fo:country="DE" style:country-complex="IN"/>
    </style:style>
    <style:style style:family="text" style:name="T2524">
      <style:text-properties fo:color="#000000" fo:font-family="Liberation Serif" style:font-family-complex="Liberation Serif" fo:font-size="12pt" style:font-size-complex="12pt" fo:language="de" style:language-complex="hi" fo:country="DE" style:country-complex="IN"/>
    </style:style>
    <style:style style:parent-style-name="749" style:master-page-name="MasterPage14" style:family="paragraph" style:name="P644">
      <style:paragraph-properties fo:margin-left="0cm" fo:margin-right="0cm" fo:text-indent="0cm" fo:margin-top="0pt" fo:margin-bottom="6pt" fo:break-before="page"/>
      <style:text-properties fo:color="#000000" fo:font-family="Liberation Sans" style:font-family-complex="Liberation Sans" fo:font-size="18pt" style:font-size-complex="18pt" fo:language="de" style:language-complex="hi" fo:country="DE" style:country-complex="IN" fo:font-weight="bold"/>
    </style:style>
    <style:style style:family="text" style:name="T2525">
      <style:text-properties fo:color="#000000" fo:font-family="Liberation Sans" style:font-family-complex="Liberation Sans" fo:font-size="18pt" style:font-size-complex="18pt" fo:language="de" style:language-complex="hi" fo:country="DE" style:country-complex="IN" fo:font-weight="bold"/>
    </style:style>
    <style:style style:family="text" style:name="T2526">
      <style:text-properties fo:color="#000000" fo:font-family="Liberation Sans" style:font-family-complex="Liberation Sans" fo:font-size="18pt" style:font-size-complex="18pt" fo:language="de" style:language-complex="hi" fo:country="DE" style:country-complex="IN" fo:font-weight="bold"/>
    </style:style>
    <style:style style:family="text" style:name="T2527">
      <style:text-properties fo:color="#000000" fo:font-family="Liberation Sans" style:font-family-complex="Liberation Sans" fo:font-size="18pt" style:font-size-complex="18pt" fo:language="de" style:language-complex="hi" fo:country="DE" style:country-complex="IN" fo:font-weight="bold"/>
    </style:style>
    <style:style style:family="text" style:name="T2528">
      <style:text-properties fo:color="#000000" fo:font-family="Liberation Sans" style:font-family-complex="Liberation Sans" fo:font-size="18pt" style:font-size-complex="18pt" fo:language="de" style:language-complex="hi" fo:country="DE" style:country-complex="IN" fo:font-weight="bold"/>
    </style:style>
    <style:style style:family="text" style:name="T2529">
      <style:text-properties fo:color="#000000" fo:font-family="Liberation Sans" style:font-family-complex="Liberation Sans" fo:font-size="18pt" style:font-size-complex="18pt" fo:language="de" style:language-complex="hi" fo:country="DE" style:country-complex="IN" fo:font-weight="bold"/>
    </style:style>
    <style:style style:parent-style-name="737" style:family="paragraph" style:name="P645">
      <style:paragraph-properties fo:margin-left="0cm" fo:margin-right="0cm" fo:text-indent="0cm" fo:margin-top="3pt" fo:margin-bottom="3pt"/>
      <style:text-properties fo:color="#000000" fo:font-family="Liberation Serif" style:font-family-complex="Liberation Serif" fo:font-size="12pt" style:font-size-complex="12pt" fo:language="de" style:language-complex="hi" fo:country="DE" style:country-complex="IN"/>
    </style:style>
    <style:style style:family="text" style:name="T2530">
      <style:text-properties fo:color="#000000" fo:font-family="Liberation Serif" style:font-family-complex="Liberation Serif" fo:font-size="12pt" style:font-size-complex="12pt" fo:language="de" style:language-complex="hi" fo:country="DE" style:country-complex="IN"/>
    </style:style>
    <style:style style:family="text" style:name="T2531">
      <style:text-properties fo:color="#000000" fo:font-family="Liberation Serif" style:font-family-complex="Liberation Serif" fo:font-size="12pt" style:font-size-complex="12pt" fo:language="de" style:language-complex="hi" fo:country="DE" style:country-complex="IN"/>
    </style:style>
    <style:style style:family="text" style:name="T2532">
      <style:text-properties fo:color="#000000" fo:font-family="Liberation Serif" style:font-family-complex="Liberation Serif" fo:font-size="12pt" style:font-size-complex="12pt" fo:language="de" style:language-complex="hi" fo:country="DE" style:country-complex="IN"/>
    </style:style>
    <style:style style:parent-style-name="737" style:family="paragraph" style:name="P646">
      <style:paragraph-properties fo:margin-left="0cm" fo:margin-right="0cm" fo:text-indent="0cm" fo:margin-top="3pt" fo:margin-bottom="3pt"/>
      <style:text-properties fo:color="#000000" fo:font-family="Liberation Serif" style:font-family-complex="Liberation Serif" fo:font-size="12pt" style:font-size-complex="12pt" fo:language="de" style:language-complex="hi" fo:country="DE" style:country-complex="IN"/>
    </style:style>
    <style:style style:family="text" style:name="T2533">
      <style:text-properties fo:color="#000000" fo:font-family="Liberation Serif" style:font-family-complex="Liberation Serif" fo:font-size="12pt" style:font-size-complex="12pt" fo:language="de" style:language-complex="hi" fo:country="DE" style:country-complex="IN"/>
    </style:style>
    <style:style style:family="text" style:name="T2534">
      <style:text-properties fo:color="#000000" fo:font-family="Liberation Serif" style:font-family-complex="Liberation Serif" fo:font-size="12pt" style:font-size-complex="12pt" fo:language="de" style:language-complex="hi" fo:country="DE" style:country-complex="IN"/>
    </style:style>
    <style:style style:family="text" style:name="T2535">
      <style:text-properties fo:color="#000000" fo:font-family="Liberation Serif" style:font-family-complex="Liberation Serif" fo:font-size="12pt" style:font-size-complex="12pt" fo:language="de" style:language-complex="hi" fo:country="DE" style:country-complex="IN"/>
    </style:style>
    <style:style style:parent-style-name="737" style:family="paragraph" style:name="P647">
      <style:paragraph-properties fo:margin-left="0cm" fo:margin-right="0cm" fo:text-indent="0cm" fo:margin-top="3pt" fo:margin-bottom="3pt"/>
      <style:text-properties fo:color="#000000" fo:font-family="Liberation Serif" style:font-family-complex="Liberation Serif" fo:font-size="12pt" style:font-size-complex="12pt" fo:language="de" style:language-complex="hi" fo:country="DE" style:country-complex="IN"/>
    </style:style>
    <style:style style:family="text" style:name="T2536">
      <style:text-properties fo:color="#000000" fo:font-family="Liberation Serif" style:font-family-complex="Liberation Serif" fo:font-size="12pt" style:font-size-complex="12pt" fo:language="de" style:language-complex="hi" fo:country="DE" style:country-complex="IN"/>
    </style:style>
    <style:style style:family="text" style:name="T2537">
      <style:text-properties fo:color="#000000" fo:font-family="Liberation Serif" style:font-family-complex="Liberation Serif" fo:font-size="12pt" style:font-size-complex="12pt" fo:language="de" style:language-complex="hi" fo:country="DE" style:country-complex="IN"/>
    </style:style>
    <style:style style:family="text" style:name="T2538">
      <style:text-properties fo:color="#000000" fo:font-family="Liberation Serif" style:font-family-complex="Liberation Serif" fo:font-size="12pt" style:font-size-complex="12pt" fo:language="de" style:language-complex="hi" fo:country="DE" style:country-complex="IN"/>
    </style:style>
    <style:style style:parent-style-name="737" style:family="paragraph" style:name="P648">
      <style:paragraph-properties fo:text-align="center" fo:margin-left="0cm" fo:margin-right="0cm" fo:text-indent="0cm" fo:margin-top="6pt" fo:margin-bottom="6pt"/>
      <style:text-properties fo:color="#000000" fo:font-family="Liberation Serif" style:font-family-complex="Liberation Serif" fo:font-size="12pt" style:font-size-complex="12pt" fo:language="de" style:language-complex="hi" fo:country="DE" style:country-complex="IN"/>
    </style:style>
    <style:style style:family="text" style:name="T2539">
      <style:text-properties fo:color="#000000" fo:font-family="Liberation Serif" style:font-family-complex="Liberation Serif" fo:font-size="12pt" style:font-size-complex="12pt" fo:language="de" style:language-complex="hi" fo:country="DE" style:country-complex="IN" fo:font-style="italic"/>
    </style:style>
    <style:style style:family="text" style:name="T2540">
      <style:text-properties fo:color="#000000" fo:font-family="Liberation Serif" style:font-family-complex="Liberation Serif" fo:font-size="12pt" style:font-size-complex="12pt" fo:language="de" style:language-complex="hi" fo:country="DE" style:country-complex="IN"/>
    </style:style>
    <style:style style:family="text" style:name="T2541">
      <style:text-properties fo:color="#000000" fo:font-family="Liberation Serif" style:font-family-complex="Liberation Serif" fo:font-size="12pt" style:font-size-complex="12pt" fo:language="de" style:language-complex="hi" fo:country="DE" style:country-complex="IN"/>
    </style:style>
    <style:style style:parent-style-name="737" style:family="paragraph" style:name="P649">
      <style:paragraph-properties fo:margin-left="0cm" fo:margin-right="0cm" fo:text-indent="0cm" fo:margin-top="3pt" fo:margin-bottom="3pt"/>
      <style:text-properties fo:color="#000000" fo:font-family="Liberation Serif" style:font-family-complex="Liberation Serif" fo:font-size="12pt" style:font-size-complex="12pt" fo:language="de" style:language-complex="hi" fo:country="DE" style:country-complex="IN"/>
    </style:style>
    <style:style style:family="text" style:name="T2542">
      <style:text-properties fo:color="#000000" fo:font-family="Liberation Serif" style:font-family-complex="Liberation Serif" fo:font-size="12pt" style:font-size-complex="12pt" fo:language="de" style:language-complex="hi" fo:country="DE" style:country-complex="IN"/>
    </style:style>
    <style:style style:family="text" style:name="T2543">
      <style:text-properties fo:color="#000000" fo:font-family="Liberation Serif" style:font-family-complex="Liberation Serif" fo:font-size="12pt" style:font-size-complex="12pt" fo:language="de" style:language-complex="hi" fo:country="DE" style:country-complex="IN"/>
    </style:style>
    <style:style style:family="text" style:name="T2544">
      <style:text-properties fo:color="#000000" fo:font-family="Liberation Serif" style:font-family-complex="Liberation Serif" fo:font-size="12pt" style:font-size-complex="12pt" fo:language="de" style:language-complex="hi" fo:country="DE" style:country-complex="IN"/>
    </style:style>
    <style:style style:parent-style-name="737" style:family="paragraph" style:name="P650">
      <style:paragraph-properties fo:margin-left="0cm" fo:margin-right="0cm" fo:text-indent="0cm" fo:margin-top="3pt" fo:margin-bottom="3pt"/>
      <style:text-properties fo:color="#000000" fo:font-family="Liberation Serif" style:font-family-complex="Liberation Serif" fo:font-size="12pt" style:font-size-complex="12pt" fo:language="de" style:language-complex="hi" fo:country="DE" style:country-complex="IN"/>
    </style:style>
    <style:style style:family="text" style:name="T2545">
      <style:text-properties fo:color="#000000" fo:font-family="Liberation Serif" style:font-family-complex="Liberation Serif" fo:font-size="12pt" style:font-size-complex="12pt" fo:language="de" style:language-complex="hi" fo:country="DE" style:country-complex="IN"/>
    </style:style>
    <style:style style:family="text" style:name="T2546">
      <style:text-properties fo:color="#000000" fo:font-family="Liberation Serif" style:font-family-complex="Liberation Serif" fo:font-size="12pt" style:font-size-complex="12pt" fo:language="de" style:language-complex="hi" fo:country="DE" style:country-complex="IN"/>
    </style:style>
    <style:style style:family="text" style:name="T2547">
      <style:text-properties fo:color="#000000" fo:font-family="Liberation Serif" style:font-family-complex="Liberation Serif" fo:font-size="12pt" style:font-size-complex="12pt" fo:language="de" style:language-complex="hi" fo:country="DE" style:country-complex="IN"/>
    </style:style>
    <style:style style:family="text" style:name="T2548">
      <style:text-properties fo:color="#000000" fo:font-family="Liberation Serif" style:font-family-complex="Liberation Serif" fo:font-size="12pt" style:font-size-complex="12pt" fo:language="de" style:language-complex="hi" fo:country="DE" style:country-complex="IN"/>
    </style:style>
    <style:style style:parent-style-name="737" style:family="paragraph" style:name="P651">
      <style:paragraph-properties fo:margin-left="0cm" fo:margin-right="0cm" fo:text-indent="0cm" fo:margin-top="3pt" fo:margin-bottom="3pt"/>
      <style:text-properties fo:color="#000000" fo:font-family="Liberation Serif" style:font-family-complex="Liberation Serif" fo:font-size="12pt" style:font-size-complex="12pt" fo:language="de" style:language-complex="hi" fo:country="DE" style:country-complex="IN"/>
    </style:style>
    <style:style style:family="text" style:name="T2549">
      <style:text-properties fo:color="#000000" fo:font-family="Liberation Serif" style:font-family-complex="Liberation Serif" fo:font-size="12pt" style:font-size-complex="12pt" fo:language="de" style:language-complex="hi" fo:country="DE" style:country-complex="IN"/>
    </style:style>
    <style:style style:family="text" style:name="T2550">
      <style:text-properties fo:color="#000000" fo:font-family="Liberation Serif" style:font-family-complex="Liberation Serif" fo:font-size="12pt" style:font-size-complex="12pt" fo:language="de" style:language-complex="hi" fo:country="DE" style:country-complex="IN"/>
    </style:style>
    <style:style style:family="text" style:name="T2551">
      <style:text-properties fo:color="#000000" fo:font-family="Liberation Serif" style:font-family-complex="Liberation Serif" fo:font-size="12pt" style:font-size-complex="12pt" fo:language="de" style:language-complex="hi" fo:country="DE" style:country-complex="IN"/>
    </style:style>
    <style:style style:parent-style-name="737" style:family="paragraph" style:name="P652">
      <style:paragraph-properties fo:margin-left="0cm" fo:margin-right="0cm" fo:text-indent="0cm" fo:margin-top="3pt" fo:margin-bottom="3pt"/>
      <style:text-properties fo:color="#000000" fo:font-family="Liberation Serif" style:font-family-complex="Liberation Serif" fo:font-size="12pt" style:font-size-complex="12pt" fo:language="de" style:language-complex="hi" fo:country="DE" style:country-complex="IN"/>
    </style:style>
    <style:style style:family="text" style:name="T2552">
      <style:text-properties fo:color="#000000" fo:font-family="Liberation Serif" style:font-family-complex="Liberation Serif" fo:font-size="12pt" style:font-size-complex="12pt" fo:language="de" style:language-complex="hi" fo:country="DE" style:country-complex="IN"/>
    </style:style>
    <style:style style:family="text" style:name="T2553">
      <style:text-properties fo:color="#000000" fo:font-family="Liberation Serif" style:font-family-complex="Liberation Serif" fo:font-size="12pt" style:font-size-complex="12pt" fo:language="de" style:language-complex="hi" fo:country="DE" style:country-complex="IN"/>
    </style:style>
    <style:style style:family="text" style:name="T2554">
      <style:text-properties fo:color="#000000" fo:font-family="Liberation Serif" style:font-family-complex="Liberation Serif" fo:font-size="12pt" style:font-size-complex="12pt" fo:language="de" style:language-complex="hi" fo:country="DE" style:country-complex="IN"/>
    </style:style>
    <style:style style:parent-style-name="737" style:family="paragraph" style:name="P653">
      <style:paragraph-properties fo:margin-left="0cm" fo:margin-right="0cm" fo:text-indent="0cm" fo:margin-top="3pt" fo:margin-bottom="3pt"/>
      <style:text-properties fo:color="#000000" fo:font-family="Liberation Serif" style:font-family-complex="Liberation Serif" fo:font-size="12pt" style:font-size-complex="12pt" fo:language="de" style:language-complex="hi" fo:country="DE" style:country-complex="IN"/>
    </style:style>
    <style:style style:family="text" style:name="T2555">
      <style:text-properties fo:color="#000000" fo:font-family="Liberation Serif" style:font-family-complex="Liberation Serif" fo:font-size="12pt" style:font-size-complex="12pt" fo:language="de" style:language-complex="hi" fo:country="DE" style:country-complex="IN"/>
    </style:style>
    <style:style style:family="text" style:name="T2556">
      <style:text-properties fo:color="#000000" fo:font-family="Liberation Serif" style:font-family-complex="Liberation Serif" fo:font-size="12pt" style:font-size-complex="12pt" fo:language="de" style:language-complex="hi" fo:country="DE" style:country-complex="IN"/>
    </style:style>
    <style:style style:family="text" style:name="T2557">
      <style:text-properties fo:color="#000000" fo:font-family="Liberation Serif" style:font-family-complex="Liberation Serif" fo:font-size="12pt" style:font-size-complex="12pt" fo:language="de" style:language-complex="hi" fo:country="DE" style:country-complex="IN"/>
    </style:style>
    <style:style style:parent-style-name="737" style:family="paragraph" style:name="P654">
      <style:paragraph-properties fo:margin-left="0cm" fo:margin-right="0cm" fo:text-indent="0cm" fo:margin-top="3pt" fo:margin-bottom="3pt"/>
      <style:text-properties fo:color="#000000" fo:font-family="Liberation Serif" style:font-family-complex="Liberation Serif" fo:font-size="12pt" style:font-size-complex="12pt" fo:language="de" style:language-complex="hi" fo:country="DE" style:country-complex="IN"/>
    </style:style>
    <style:style style:family="text" style:name="T2558">
      <style:text-properties fo:color="#000000" fo:font-family="Liberation Serif" style:font-family-complex="Liberation Serif" fo:font-size="12pt" style:font-size-complex="12pt" fo:language="de" style:language-complex="hi" fo:country="DE" style:country-complex="IN"/>
    </style:style>
    <style:style style:family="text" style:name="T2559">
      <style:text-properties fo:color="#000000" fo:font-family="Liberation Serif" style:font-family-complex="Liberation Serif" fo:font-size="12pt" style:font-size-complex="12pt" fo:language="de" style:language-complex="hi" fo:country="DE" style:country-complex="IN"/>
    </style:style>
    <style:style style:family="text" style:name="T2560">
      <style:text-properties fo:color="#000000" fo:font-family="Liberation Serif" style:font-family-complex="Liberation Serif" fo:font-size="12pt" style:font-size-complex="12pt" fo:language="de" style:language-complex="hi" fo:country="DE" style:country-complex="IN"/>
    </style:style>
    <style:style style:parent-style-name="737" style:family="paragraph" style:name="P655">
      <style:paragraph-properties fo:margin-left="0cm" fo:margin-right="0cm" fo:text-indent="0cm" fo:margin-top="3pt" fo:margin-bottom="3pt"/>
      <style:text-properties fo:color="#000000" fo:font-family="Liberation Serif" style:font-family-complex="Liberation Serif" fo:font-size="12pt" style:font-size-complex="12pt" fo:language="de" style:language-complex="hi" fo:country="DE" style:country-complex="IN"/>
    </style:style>
    <style:style style:family="text" style:name="T2561">
      <style:text-properties fo:color="#000000" fo:font-family="Liberation Serif" style:font-family-complex="Liberation Serif" fo:font-size="12pt" style:font-size-complex="12pt" fo:language="de" style:language-complex="hi" fo:country="DE" style:country-complex="IN"/>
    </style:style>
    <style:style style:family="text" style:name="T2562">
      <style:text-properties fo:color="#000000" fo:font-family="Liberation Serif" style:font-family-complex="Liberation Serif" fo:font-size="12pt" style:font-size-complex="12pt" fo:language="de" style:language-complex="hi" fo:country="DE" style:country-complex="IN"/>
    </style:style>
    <style:style style:family="text" style:name="T2563">
      <style:text-properties fo:color="#000000" fo:font-family="Liberation Serif" style:font-family-complex="Liberation Serif" fo:font-size="12pt" style:font-size-complex="12pt" fo:language="de" style:language-complex="hi" fo:country="DE" style:country-complex="IN"/>
    </style:style>
    <style:style style:parent-style-name="737" style:family="paragraph" style:name="P656">
      <style:paragraph-properties fo:margin-left="0cm" fo:margin-right="0cm" fo:text-indent="0cm" fo:margin-top="3pt" fo:margin-bottom="3pt"/>
      <style:text-properties fo:color="#000000" fo:font-family="Liberation Serif" style:font-family-complex="Liberation Serif" fo:font-size="12pt" style:font-size-complex="12pt" fo:language="de" style:language-complex="hi" fo:country="DE" style:country-complex="IN"/>
    </style:style>
    <style:style style:family="text" style:name="T2564">
      <style:text-properties fo:color="#000000" fo:font-family="Liberation Serif" style:font-family-complex="Liberation Serif" fo:font-size="12pt" style:font-size-complex="12pt" fo:language="de" style:language-complex="hi" fo:country="DE" style:country-complex="IN"/>
    </style:style>
    <style:style style:family="text" style:name="T2565">
      <style:text-properties fo:color="#000000" fo:font-family="Liberation Serif" style:font-family-complex="Liberation Serif" fo:font-size="12pt" style:font-size-complex="12pt" fo:language="de" style:language-complex="hi" fo:country="DE" style:country-complex="IN"/>
    </style:style>
    <style:style style:family="text" style:name="T2566">
      <style:text-properties fo:color="#000000" fo:font-family="Liberation Serif" style:font-family-complex="Liberation Serif" fo:font-size="12pt" style:font-size-complex="12pt" fo:language="de" style:language-complex="hi" fo:country="DE" style:country-complex="IN"/>
    </style:style>
    <style:style style:parent-style-name="737" style:family="paragraph" style:name="P657">
      <style:paragraph-properties fo:margin-left="0cm" fo:margin-right="0cm" fo:text-indent="0cm"/>
      <style:text-properties fo:color="#000000" fo:font-family="Liberation Serif" style:font-family-complex="Liberation Serif" fo:font-size="12pt" style:font-size-complex="12pt" fo:language="de" style:language-complex="hi" fo:country="DE" style:country-complex="IN"/>
    </style:style>
    <style:style style:family="text" style:name="T2567">
      <style:text-properties fo:color="#000000" fo:font-family="Liberation Serif" style:font-family-complex="Liberation Serif" fo:font-size="12pt" style:font-size-complex="12pt" fo:language="de" style:language-complex="hi" fo:country="DE" style:country-complex="IN"/>
    </style:style>
    <style:style style:family="text" style:name="T2568">
      <style:text-properties fo:color="#000000" fo:font-family="Liberation Serif" style:font-family-complex="Liberation Serif" fo:font-size="12pt" style:font-size-complex="12pt" fo:language="de" style:language-complex="hi" fo:country="DE" style:country-complex="IN"/>
    </style:style>
    <style:style style:family="text" style:name="T2569">
      <style:text-properties fo:color="#000000" fo:font-family="Liberation Serif" style:font-family-complex="Liberation Serif" fo:font-size="12pt" style:font-size-complex="12pt" fo:language="de" style:language-complex="hi" fo:country="DE" style:country-complex="IN"/>
    </style:style>
    <style:style style:parent-style-name="737" style:family="paragraph" style:name="P658">
      <style:paragraph-properties fo:margin-left="0cm" fo:margin-right="0cm" fo:text-indent="0cm" fo:margin-top="3pt" fo:margin-bottom="3pt"/>
      <style:text-properties fo:color="#000000" fo:font-family="Liberation Serif" style:font-family-complex="Liberation Serif" fo:font-size="12pt" style:font-size-complex="12pt" fo:language="de" style:language-complex="hi" fo:country="DE" style:country-complex="IN"/>
    </style:style>
    <style:style style:family="text" style:name="T2570">
      <style:text-properties fo:color="#000000" fo:font-family="Liberation Serif" style:font-family-complex="Liberation Serif" fo:font-size="12pt" style:font-size-complex="12pt" fo:language="de" style:language-complex="hi" fo:country="DE" style:country-complex="IN"/>
    </style:style>
    <style:style style:family="text" style:name="T2571">
      <style:text-properties fo:color="#000000" fo:font-family="Liberation Serif" style:font-family-complex="Liberation Serif" fo:font-size="12pt" style:font-size-complex="12pt" fo:language="de" style:language-complex="hi" fo:country="DE" style:country-complex="IN"/>
    </style:style>
    <style:style style:family="text" style:name="T2572">
      <style:text-properties fo:color="#000000" fo:font-family="Liberation Serif" style:font-family-complex="Liberation Serif" fo:font-size="12pt" style:font-size-complex="12pt" fo:language="de" style:language-complex="hi" fo:country="DE" style:country-complex="IN"/>
    </style:style>
    <style:style style:parent-style-name="737" style:family="paragraph" style:name="P659">
      <style:paragraph-properties fo:text-align="left"/>
      <style:text-properties fo:color="#000000" fo:font-family="Liberation Serif" style:font-family-complex="Liberation Serif" fo:font-size="12pt" style:font-size-complex="12pt" fo:language="de" style:language-complex="hi" fo:country="DE" style:country-complex="IN" fo:font-weight="normal"/>
    </style:style>
    <style:style style:family="text" style:name="T2573">
      <style:text-properties fo:color="#000000" fo:font-family="Liberation Serif" style:font-family-complex="Liberation Serif" fo:font-size="12pt" style:font-size-complex="12pt" fo:language="de" style:language-complex="hi" fo:country="DE" style:country-complex="IN" fo:font-weight="normal"/>
    </style:style>
    <style:style style:family="text" style:name="T2574">
      <style:text-properties fo:color="#000000" fo:font-family="Liberation Serif" style:font-family-complex="Liberation Serif" fo:font-size="12pt" style:font-size-complex="12pt" fo:language="de" style:language-complex="hi" fo:country="DE" style:country-complex="IN" fo:font-weight="normal"/>
    </style:style>
    <style:style style:family="text" style:name="T2575">
      <style:text-properties fo:color="#000000" fo:font-family="Liberation Serif" style:font-family-complex="Liberation Serif" fo:font-size="12pt" style:font-size-complex="12pt" fo:language="de" style:language-complex="hi" fo:country="DE" style:country-complex="IN" fo:font-weight="normal"/>
    </style:style>
    <style:style style:parent-style-name="737" style:family="paragraph" style:name="P660">
      <style:paragraph-properties fo:text-align="left"/>
      <style:text-properties fo:color="#000000" fo:font-family="Liberation Serif" style:font-family-complex="Liberation Serif" fo:font-size="12pt" style:font-size-complex="12pt" fo:language="de" style:language-complex="hi" fo:country="DE" style:country-complex="IN" fo:font-weight="normal"/>
    </style:style>
    <style:style style:family="text" style:name="T2576">
      <style:text-properties fo:color="#000000" fo:font-family="Liberation Serif" style:font-family-complex="Liberation Serif" fo:font-size="12pt" style:font-size-complex="12pt" fo:language="de" style:language-complex="hi" fo:country="DE" style:country-complex="IN" fo:font-weight="normal"/>
    </style:style>
    <style:style style:family="text" style:name="T2577">
      <style:text-properties fo:color="#000000" fo:font-family="Liberation Serif" style:font-family-complex="Liberation Serif" fo:font-size="12pt" style:font-size-complex="12pt" fo:language="de" style:language-complex="hi" fo:country="DE" style:country-complex="IN" fo:font-weight="normal"/>
    </style:style>
    <style:style style:family="text" style:name="T2578">
      <style:text-properties fo:color="#000000" fo:font-family="Liberation Serif" style:font-family-complex="Liberation Serif" fo:font-size="12pt" style:font-size-complex="12pt" fo:language="de" style:language-complex="hi" fo:country="DE" style:country-complex="IN" fo:font-weight="normal"/>
    </style:style>
  </office:automatic-styles>
  <office:body>
    <office:text text:use-soft-page-breaks="true">
      <text:p text:style-name="P46"><text:span text:style-name="T243">PROJEKT-DOKUMENTATION</text:span><text:span text:style-name="T244"/><text:span text:style-name="T245"/></text:p>
      <text:p text:style-name="P47"><text:span text:style-name="T246"/><text:span text:style-name="T247"/><text:span text:style-name="T248"/></text:p>
      <text:p text:style-name="P48"><text:span text:style-name="T249"/><text:span/><draw:frame draw:name="Image1" draw:style-name="gr3" draw:z-index="18" svg:width="3.545cm" svg:height="1.783cm" svg:x="0cm" svg:y="0cm"><draw:image xlink:href="Pictures/image1.png" xlink:type="simple" xlink:show="embed" xlink:actuate="onLoad"/></draw:frame><text:span text:style-name="T250"/><text:span text:style-name="T251"/></text:p>
      <text:p text:style-name="P49"><text:span text:style-name="T252"/><text:span text:style-name="T253"/><text:span text:style-name="T254"/></text:p>
      <text:p text:style-name="P50"><text:span text:style-name="T255"/><text:span text:style-name="T256"/><text:span text:style-name="T257"/></text:p>
      <text:p text:style-name="P51"><text:span text:style-name="T258"/><text:span text:style-name="T259"/><text:span text:style-name="T260"/></text:p>
      <text:p text:style-name="P52"><text:span text:style-name="T261"/><text:span text:style-name="T262"/><text:span text:style-name="T263"/></text:p>
      <text:p text:style-name="P53"><text:span text:style-name="T264"/><text:span text:style-name="T265"/><text:span text:style-name="T266"/></text:p>
      <text:p text:style-name="P54"><text:span text:style-name="T267">Fachinformatiker für Systemintegration</text:span><text:span text:style-name="T268"/><text:span text:style-name="T269"/></text:p>
      <text:p text:style-name="P55"><text:span text:style-name="T270"/><text:span text:style-name="T271"/><text:span text:style-name="T272"/></text:p>
      <text:p text:style-name="P56"><text:span text:style-name="T273">Dokumentation zur betrieblichen Projektarbeit</text:span><text:span text:style-name="T274"/><text:span text:style-name="T275"/></text:p>
      <text:p text:style-name="P57"><text:span text:style-name="T276"/><text:span text:style-name="T277"/><text:span text:style-name="T278"/></text:p>
      <text:p text:style-name="P58"><text:span text:style-name="T279">Aufbau einer virtuellen IT-Infrastruktur zur Implementierung eines zentralen Monitoring Systems </text:span><text:span text:style-name="T280"/><text:span text:style-name="T281"/></text:p>
      <text:p text:style-name="P59"><text:span text:style-name="T282"/><text:span text:style-name="T283"/><text:span text:style-name="T284"/></text:p>
      <text:p text:style-name="P60"><text:span text:style-name="T285">Abgabetermin: Nürnberg, 15.05.2026</text:span><text:span text:style-name="T286"/><text:span text:style-name="T287"/></text:p>
      <text:p text:style-name="P61"><text:span text:style-name="T288"/><text:span text:style-name="T289"/><text:span text:style-name="T290"/></text:p>
      <text:p text:style-name="P62"><text:span text:style-name="T291"/><text:span text:style-name="T292"/><text:span text:style-name="T293"/></text:p>
      <text:p text:style-name="P63"><text:span text:style-name="T294">Prüfungsbewerber:</text:span><text:span text:style-name="T295"/><text:span text:style-name="T296"/></text:p>
      <text:p text:style-name="P64"><text:span text:style-name="T297">Ioannis Kiourtzidis</text:span><text:span text:style-name="T298"/><text:span text:style-name="T299"/></text:p>
      <text:p text:style-name="P65"><text:span text:style-name="T300">Burgschmietstraße 33</text:span><text:span text:style-name="T301"/><text:span text:style-name="T302"/></text:p>
      <text:p text:style-name="P66"><text:span text:style-name="T303">90419 Nürnberg</text:span><text:span text:style-name="T304"/><text:span text:style-name="T305"/></text:p>
      <text:p text:style-name="P67"><text:span text:style-name="T306"/><text:span text:style-name="T307"/><text:span text:style-name="T308"/></text:p>
      <text:p text:style-name="P68"><text:span text:style-name="T309"/><text:span/><draw:frame draw:name="Image2" draw:style-name="gr4" draw:z-index="19" text:anchor-type="paragraph" svg:width="13.32cm" svg:height="1.296cm" svg:x="1.842cm" svg:y="0cm"><draw:image xlink:href="Pictures/image2.png" xlink:type="simple" xlink:show="embed" xlink:actuate="onLoad"/></draw:frame><text:span text:style-name="T310"/><text:span text:style-name="T311"/></text:p>
      <text:p text:style-name="P69"><text:span text:style-name="T312"/><text:span text:style-name="T313"/><text:span text:style-name="T314"/></text:p>
      <text:p text:style-name="P70"><text:span text:style-name="T315">Ausbildungsbetrieb:</text:span><text:span text:style-name="T316"/><text:span text:style-name="T317"/></text:p>
      <text:p text:style-name="P71"><text:span text:style-name="T318">Bissantz und Company GmbH</text:span><text:span text:style-name="T319"/><text:span text:style-name="T320"/></text:p>
      <text:p text:style-name="P72"><text:span text:style-name="T321">Nordring 98</text:span><text:span text:style-name="T322"/><text:span text:style-name="T323"/></text:p>
      <text:p text:style-name="P73"><text:span text:style-name="T324">90409 Nürnberg</text:span><text:span text:style-name="T325"/><text:span text:style-name="T326"/></text:p>
      <text:p text:style-name="P74"><text:span text:style-name="T327"/><text:span text:style-name="T328"/><text:span/></text:p>
      <text:p text:style-name="P75"><text:span/><text:span/></text:p>
      <text:p text:style-name="P76"><text:span/><text:span/></text:p>
      <text:p text:style-name="P77"><text:span text:style-name="T329"/><text:span text:style-name="T330"/><text:span/></text:p>
      <text:p text:style-name="P78"><text:span/><text:span/></text:p>
      <text:p text:style-name="P79"><text:span text:style-name="T331"/><text:span text:style-name="T332"/><text:span text:style-name="T333"/></text:p>
      <text:p text:style-name="P80"><text:span/><text:span/></text:p>
      <text:p text:style-name="P81"><text:span/><text:span/><text:span/><text:span/></text:p>
      <text:table-of-content text:name="">
        <text:table-of-content-source/>
        <text:index-body>
          <text:p text:style-name="P82"><text:span text:style-name="T334"/><text:a xlink:href="#_Toc19" xlink:type="simple"><text:span text:style-name="T335"/><text:span text:style-name="T336"/><text:span text:style-name="T337"/><text:span text:style-name="T338">Abkürzungsverzeichnis</text:span><text:span text:style-name="T339"/><text:span text:style-name="T340"><text:tab/></text:span><text:span text:style-name="T341">3</text:span></text:a><text:span text:style-name="T342"/><text:span text:style-name="T343"/></text:p>
          <text:p text:style-name="P83"><text:span/><text:a xlink:href="#_Toc20" xlink:type="simple"><text:span text:style-name="T344"/><text:span text:style-name="T345">Englisch-Deutsch Übersetzung</text:span><text:span text:style-name="T346"><text:s/></text:span><text:span text:style-name="T347"/><text:span><text:tab/></text:span><text:span>4</text:span></text:a><text:span/><text:span/></text:p>
          <text:p text:style-name="P84"><text:span text:style-name="T348"/><text:a xlink:href="#_Toc21" xlink:type="simple"><text:span text:style-name="T349"/><text:span text:style-name="T350"/><text:span text:style-name="T351"/><text:span text:style-name="T352">1. Einleitung</text:span><text:span text:style-name="T353"/><text:span text:style-name="T354"><text:tab/></text:span><text:span text:style-name="T355">5</text:span></text:a><text:span text:style-name="T356"/><text:span text:style-name="T357"/></text:p>
          <text:p text:style-name="P85"><text:span text:style-name="T358"/><text:a xlink:href="#_Toc22" xlink:type="simple"><text:span text:style-name="T359"/><text:span text:style-name="T360"/><text:span text:style-name="T361"/><text:span text:style-name="T362">1.1 Projektumfeld</text:span><text:span text:style-name="T363"/><text:span text:style-name="T364"><text:tab/></text:span><text:span text:style-name="T365">5</text:span></text:a><text:span text:style-name="T366"/><text:span text:style-name="T367"/></text:p>
          <text:p text:style-name="P86"><text:span text:style-name="T368"/><text:a xlink:href="#_Toc23" xlink:type="simple"><text:span text:style-name="T369"/><text:span text:style-name="T370"/><text:span text:style-name="T371"/><text:span text:style-name="T372">1.2 Projektziel</text:span><text:span text:style-name="T373"/><text:span text:style-name="T374"><text:tab/></text:span><text:span text:style-name="T375">5</text:span></text:a><text:span text:style-name="T376"/><text:span text:style-name="T377"/></text:p>
          <text:p text:style-name="P87"><text:span text:style-name="T378"/><text:a xlink:href="#_Toc24" xlink:type="simple"><text:span text:style-name="T379"/><text:span text:style-name="T380"/><text:span text:style-name="T381"/><text:span text:style-name="T382">1</text:span><text:span text:style-name="T383">.</text:span><text:span text:style-name="T384">3 Projektbegründung</text:span><text:span text:style-name="T385"/><text:span text:style-name="T386"><text:tab/></text:span><text:span text:style-name="T387">5</text:span></text:a><text:span text:style-name="T388"/><text:span text:style-name="T389"/></text:p>
          <text:p text:style-name="P88"><text:span text:style-name="T390"/><text:a xlink:href="#_Toc25" xlink:type="simple"><text:span text:style-name="T391"/><text:span text:style-name="T392"/><text:span text:style-name="T393"/><text:span text:style-name="T394">1.4 Projektschnittstellen</text:span><text:span text:style-name="T395"/><text:span text:style-name="T396"><text:tab/></text:span><text:span text:style-name="T397">5</text:span></text:a><text:span text:style-name="T398"/><text:span text:style-name="T399"/></text:p>
          <text:p text:style-name="P89"><text:span text:style-name="T400"/><text:a xlink:href="#_Toc26" xlink:type="simple"><text:span text:style-name="T401"/><text:span text:style-name="T402"/><text:span text:style-name="T403"/><text:span text:style-name="T404">1.5 Projektabgrenzung</text:span><text:span text:style-name="T405"/><text:span text:style-name="T406"><text:tab/></text:span><text:span text:style-name="T407">6</text:span></text:a><text:span text:style-name="T408"/><text:span text:style-name="T409"/></text:p>
          <text:p text:style-name="P90"><text:span text:style-name="T410"/><text:a xlink:href="#_Toc27" xlink:type="simple"><text:span text:style-name="T411"/><text:span text:style-name="T412"/><text:span text:style-name="T413"/><text:span text:style-name="T414">2. Projektplanung</text:span><text:span text:style-name="T415"/><text:span text:style-name="T416"><text:tab/></text:span><text:span text:style-name="T417">6</text:span></text:a><text:span text:style-name="T418"/><text:span text:style-name="T419"/></text:p>
          <text:p text:style-name="P91"><text:span text:style-name="T420"/><text:a xlink:href="#_Toc28" xlink:type="simple"><text:span text:style-name="T421"/><text:span text:style-name="T422"/><text:span text:style-name="T423"/><text:span text:style-name="T424">2.1 Projektphasen</text:span><text:span text:style-name="T425"/><text:span text:style-name="T426"><text:tab/></text:span><text:span text:style-name="T427">6</text:span></text:a><text:span text:style-name="T428"/><text:span text:style-name="T429"/></text:p>
          <text:p text:style-name="P92"><text:span text:style-name="T430"/><text:a xlink:href="#_Toc29" xlink:type="simple"><text:span text:style-name="T431"/><text:span text:style-name="T432"/><text:span text:style-name="T433"/><text:span text:style-name="T434">2.2 Abweichung vom Projektantrag?</text:span><text:span text:style-name="T435"/><text:span text:style-name="T436"><text:tab/></text:span><text:span text:style-name="T437">7</text:span></text:a><text:span text:style-name="T438"/><text:span text:style-name="T439"/></text:p>
          <text:p text:style-name="P93"><text:span text:style-name="T440"/><text:a xlink:href="#_Toc30" xlink:type="simple"><text:span text:style-name="T441"/><text:span text:style-name="T442"/><text:span text:style-name="T443"/><text:span text:style-name="T444">2.3 Ressourcenplanung</text:span><text:span text:style-name="T445"/><text:span text:style-name="T446"><text:tab/></text:span><text:span text:style-name="T447">7</text:span></text:a><text:span text:style-name="T448"/><text:span text:style-name="T449"/></text:p>
          <text:p text:style-name="P94"><text:span text:style-name="T450"/><text:a xlink:href="#_Toc31" xlink:type="simple"><text:span text:style-name="T451"/><text:span text:style-name="T452"/><text:span text:style-name="T453"/><text:span text:style-name="T454">2.4<text:s text:c="2"/>Entwicklungsprozess</text:span><text:span text:style-name="T455"/><text:span text:style-name="T456"><text:tab/></text:span><text:span text:style-name="T457">7</text:span></text:a><text:span text:style-name="T458"/><text:span text:style-name="T459"/></text:p>
          <text:p text:style-name="P95"><text:span text:style-name="T460"/><text:a xlink:href="#_Toc32" xlink:type="simple"><text:span text:style-name="T461"/><text:span text:style-name="T462"/><text:span text:style-name="T463"/><text:span text:style-name="T464">3. Analysenphase</text:span><text:span text:style-name="T465"/><text:span text:style-name="T466"><text:tab/></text:span><text:span text:style-name="T467">8</text:span></text:a><text:span text:style-name="T468"/><text:span text:style-name="T469"/></text:p>
          <text:p text:style-name="P96"><text:span text:style-name="T470"/><text:a xlink:href="#_Toc33" xlink:type="simple"><text:span text:style-name="T471"/><text:span text:style-name="T472"/><text:span text:style-name="T473"/><text:span text:style-name="T474">3.1 Ist-Analyse</text:span><text:span text:style-name="T475"/><text:span text:style-name="T476"><text:tab/></text:span><text:span text:style-name="T477">8</text:span></text:a><text:span text:style-name="T478"/><text:span text:style-name="T479"/></text:p>
          <text:p text:style-name="P97"><text:span text:style-name="T480"/><text:a xlink:href="#_Toc34" xlink:type="simple"><text:span text:style-name="T481"/><text:span text:style-name="T482"/><text:span text:style-name="T483"/><text:span text:style-name="T484">3.2<text:s text:c="2"/>Wirtschaftlichkeitsanalyse</text:span><text:span text:style-name="T485"/><text:span text:style-name="T486"><text:tab/></text:span><text:span text:style-name="T487">8</text:span></text:a><text:span text:style-name="T488"/><text:span text:style-name="T489"/></text:p>
          <text:p text:style-name="P98"><text:span text:style-name="T490"/><text:a xlink:href="#_Toc35" xlink:type="simple"><text:span text:style-name="T491"/><text:span text:style-name="T492"/><text:span text:style-name="T493"/><text:span text:style-name="T494">3.2.1<text:s text:c="2"/>Make-or-Buy-Entscheidung</text:span><text:span text:style-name="T495"/><text:span text:style-name="T496"><text:tab/></text:span><text:span text:style-name="T497">8</text:span></text:a><text:span text:style-name="T498"/><text:span text:style-name="T499"/></text:p>
          <text:p text:style-name="P99"><text:span text:style-name="T500"/><text:a xlink:href="#_Toc36" xlink:type="simple"><text:span text:style-name="T501"/><text:span text:style-name="T502"/><text:span text:style-name="T503"/><text:span text:style-name="T504">3.2.2<text:s text:c="2"/>Projektkosten</text:span><text:span text:style-name="T505"/><text:span text:style-name="T506"><text:tab/></text:span><text:span text:style-name="T507">8</text:span></text:a><text:span text:style-name="T508"/><text:span text:style-name="T509"/></text:p>
          <text:p text:style-name="P100"><text:span text:style-name="T510"/><text:a xlink:href="#_Toc37" xlink:type="simple"><text:span text:style-name="T511"/><text:span text:style-name="T512"/><text:span text:style-name="T513"/><text:span text:style-name="T514">3.2.3<text:s text:c="2"/>Kostenvergleich</text:span><text:span text:style-name="T515"/><text:span text:style-name="T516"><text:tab/></text:span><text:span text:style-name="T517">8</text:span></text:a><text:span text:style-name="T518"/><text:span text:style-name="T519"/></text:p>
          <text:p text:style-name="P101"><text:span text:style-name="T520"/><text:a xlink:href="#_Toc38" xlink:type="simple"><text:span text:style-name="T521"/><text:span text:style-name="T522"/><text:span text:style-name="T523"/><text:span text:style-name="T524">3.3<text:s text:c="2"/>Anwendungsfälle</text:span><text:span text:style-name="T525"/><text:span text:style-name="T526"><text:tab/></text:span><text:span text:style-name="T527">9</text:span></text:a><text:span text:style-name="T528"/><text:span text:style-name="T529"/></text:p>
          <text:p text:style-name="P102"><text:span text:style-name="T530"/><text:a xlink:href="#_Toc39" xlink:type="simple"><text:span text:style-name="T531"/><text:span text:style-name="T532"/><text:span text:style-name="T533"/><text:span text:style-name="T534">3.4<text:s text:c="2"/>Qualitätsanforderungen</text:span><text:span text:style-name="T535"/><text:span text:style-name="T536"><text:tab/></text:span><text:span text:style-name="T537">9</text:span></text:a><text:span text:style-name="T538"/><text:span text:style-name="T539"/></text:p>
          <text:p text:style-name="P103"><text:span text:style-name="T540"/><text:a xlink:href="#_Toc40" xlink:type="simple"><text:span text:style-name="T541"/><text:span text:style-name="T542"/><text:span text:style-name="T543"/><text:span text:style-name="T544">4<text:s text:c="2"/>Entwurfsphase</text:span><text:span text:style-name="T545"/><text:span text:style-name="T546"><text:tab/></text:span><text:span text:style-name="T547">10</text:span></text:a><text:span text:style-name="T548"/><text:span text:style-name="T549"/></text:p>
          <text:p text:style-name="P104"><text:span text:style-name="T550"/><text:a xlink:href="#_Toc41" xlink:type="simple"><text:span text:style-name="T551"/><text:span text:style-name="T552"/><text:span text:style-name="T553"/><text:span text:style-name="T554">4.1<text:s text:c="2"/>Zielplattform</text:span><text:span text:style-name="T555"/><text:span text:style-name="T556"><text:tab/></text:span><text:span text:style-name="T557">10</text:span></text:a><text:span text:style-name="T558"/><text:span text:style-name="T559"/></text:p>
          <text:p text:style-name="P105"><text:span text:style-name="T560"/><text:a xlink:href="#_Toc42" xlink:type="simple"><text:span text:style-name="T561"/><text:span text:style-name="T562"/><text:span text:style-name="T563"/><text:span text:style-name="T564">4.2<text:s text:c="2"/>Architekturdesign</text:span><text:span text:style-name="T565"/><text:span text:style-name="T566"><text:tab/></text:span><text:span text:style-name="T567">10</text:span></text:a><text:span text:style-name="T568"/><text:span text:style-name="T569"/></text:p>
          <text:p text:style-name="P106"><text:span text:style-name="T570"/><text:a xlink:href="#_Toc43" xlink:type="simple"><text:span text:style-name="T571"/><text:span text:style-name="T572"/><text:span text:style-name="T573"/><text:span text:style-name="T574">4.3<text:s text:c="2"/>Entwurf der überwachten Metriken</text:span><text:span text:style-name="T575"/><text:span text:style-name="T576"><text:tab/></text:span><text:span text:style-name="T577">11</text:span></text:a><text:span text:style-name="T578"/><text:span text:style-name="T579"/></text:p>
          <text:p text:style-name="P107"><text:span text:style-name="T580"/><text:a xlink:href="#_Toc44" xlink:type="simple"><text:span text:style-name="T581"/><text:span text:style-name="T582"/><text:span text:style-name="T583"/><text:span text:style-name="T584">4.4<text:s text:c="2"/>Maßnahmen zur Qualitätssicherung</text:span><text:span text:style-name="T585"/><text:span text:style-name="T586"><text:tab/></text:span><text:span text:style-name="T587">11</text:span></text:a><text:span text:style-name="T588"/><text:span text:style-name="T589"/></text:p>
          <text:p text:style-name="P108"><text:span text:style-name="T590"/><text:a xlink:href="#_Toc45" xlink:type="simple"><text:span text:style-name="T591"/><text:span text:style-name="T592"/><text:span text:style-name="T593"/><text:span text:style-name="T594">5<text:s text:c="2"/>Implementierungsphase</text:span><text:span text:style-name="T595"/><text:span text:style-name="T596"><text:tab/></text:span><text:span text:style-name="T597">12</text:span></text:a><text:span text:style-name="T598"/><text:span text:style-name="T599"/></text:p>
          <text:p text:style-name="P109"><text:span text:style-name="T600"/><text:a xlink:href="#_Toc46" xlink:type="simple"><text:span text:style-name="T601"/><text:span text:style-name="T602"/><text:span text:style-name="T603"/><text:span text:style-name="T604">5.1<text:s text:c="2"/>Aufbau der virtuellen Testumgebung</text:span><text:span text:style-name="T605"/><text:span text:style-name="T606"><text:tab/></text:span><text:span text:style-name="T607">12</text:span></text:a><text:span text:style-name="T608"/><text:span text:style-name="T609"/></text:p>
          <text:p text:style-name="P110"><text:span text:style-name="T610"/><text:a xlink:href="#_Toc47" xlink:type="simple"><text:span text:style-name="T611"/><text:span text:style-name="T612"/><text:span text:style-name="T613"/><text:span text:style-name="T614">5.2<text:s text:c="2"/>Installation und Konfiguration Prometheus</text:span><text:span text:style-name="T615"/><text:span text:style-name="T616"><text:tab/></text:span><text:span text:style-name="T617">12</text:span></text:a><text:span text:style-name="T618"/><text:span text:style-name="T619"/></text:p>
          <text:p text:style-name="P111"><text:span text:style-name="T620"/><text:a xlink:href="#_Toc48" xlink:type="simple"><text:span text:style-name="T621"/><text:span text:style-name="T622"/><text:span text:style-name="T623"/><text:span text:style-name="T624">5.3<text:s text:c="2"/>Installation der Exporters</text:span><text:span text:style-name="T625"/><text:span text:style-name="T626"><text:tab/></text:span><text:span text:style-name="T627">12</text:span></text:a><text:span text:style-name="T628"/><text:span text:style-name="T629"/></text:p>
          <text:p text:style-name="P112"><text:span text:style-name="T630"/><text:a xlink:href="#_Toc49" xlink:type="simple"><text:span text:style-name="T631"/><text:span text:style-name="T632"/><text:span text:style-name="T633"/><text:span text:style-name="T634">5.4<text:s text:c="2"/>Installation und Konfiguration Grafana</text:span><text:span text:style-name="T635"/><text:span text:style-name="T636"><text:tab/></text:span><text:span text:style-name="T637">12</text:span></text:a><text:span text:style-name="T638"/><text:span text:style-name="T639"/></text:p>
          <text:p text:style-name="P113"><text:span text:style-name="T640"/><text:a xlink:href="#_Toc50" xlink:type="simple"><text:span text:style-name="T641"/><text:span text:style-name="T642"/><text:span text:style-name="T643"/><text:span text:style-name="T644">5.5<text:s text:c="2"/>Konfiguration des Alertings</text:span><text:span text:style-name="T645"/><text:span text:style-name="T646"><text:tab/></text:span><text:span text:style-name="T647">13</text:span></text:a><text:span text:style-name="T648"/><text:span text:style-name="T649"/></text:p>
          <text:p text:style-name="P114"><text:span text:style-name="T650"/><text:a xlink:href="#_Toc51" xlink:type="simple"><text:span text:style-name="T651"/><text:span text:style-name="T652"/><text:span text:style-name="T653"/><text:span text:style-name="T654">6<text:s text:c="2"/>Abnahmephase</text:span><text:span text:style-name="T655"/><text:span text:style-name="T656"><text:tab/></text:span><text:span text:style-name="T657">14</text:span></text:a><text:span text:style-name="T658"/><text:span text:style-name="T659"/></text:p>
          <text:p text:style-name="P115"><text:span text:style-name="T660"/><text:a xlink:href="#_Toc52" xlink:type="simple"><text:span text:style-name="T661"/><text:span text:style-name="T662"/><text:span text:style-name="T663"/><text:span text:style-name="T664">6.1<text:s text:c="2"/>Durchgeführte Tests</text:span><text:span text:style-name="T665"/><text:span text:style-name="T666"><text:tab/></text:span><text:span text:style-name="T667">14</text:span></text:a><text:span text:style-name="T668"/><text:span text:style-name="T669"/></text:p>
          <text:p text:style-name="P116"><text:span text:style-name="T670"/><text:a xlink:href="#_Toc53" xlink:type="simple"><text:span text:style-name="T671"/><text:span text:style-name="T672"/><text:span text:style-name="T673"/><text:span text:style-name="T674">6.2<text:s text:c="2"/>Abnahme</text:span><text:span text:style-name="T675"/><text:span text:style-name="T676"><text:tab/></text:span><text:span text:style-name="T677">14</text:span></text:a><text:span text:style-name="T678"/><text:span text:style-name="T679"/></text:p>
          <text:p text:style-name="P117"><text:span text:style-name="T680"/><text:a xlink:href="#_Toc54" xlink:type="simple"><text:span text:style-name="T681"/><text:span text:style-name="T682"/><text:span text:style-name="T683"/><text:span text:style-name="T684">7<text:s text:c="2"/>Dokumentation</text:span><text:span text:style-name="T685"/><text:span text:style-name="T686"><text:tab/></text:span><text:span text:style-name="T687">14</text:span></text:a><text:span text:style-name="T688"/><text:span text:style-name="T689"/></text:p>
          <text:p text:style-name="P118"><text:span text:style-name="T690"/><text:a xlink:href="#_Toc55" xlink:type="simple"><text:span text:style-name="T691"/><text:span text:style-name="T692"/><text:span text:style-name="T693"/><text:span text:style-name="T694">8<text:s text:c="2"/>Fazit</text:span><text:span text:style-name="T695"/><text:span text:style-name="T696"><text:tab/></text:span><text:span text:style-name="T697">15</text:span></text:a><text:span text:style-name="T698"/><text:span text:style-name="T699"/></text:p>
          <text:p text:style-name="P119"><text:span text:style-name="T700"/><text:a xlink:href="#_Toc56" xlink:type="simple"><text:span text:style-name="T701"/><text:span text:style-name="T702"/><text:span text:style-name="T703"/><text:span text:style-name="T704">8.1<text:s text:c="2"/>Soll-/Ist-Vergleich</text:span><text:span text:style-name="T705"/><text:span text:style-name="T706"><text:tab/></text:span><text:span text:style-name="T707">15</text:span></text:a><text:span text:style-name="T708"/><text:span text:style-name="T709"/></text:p>
          <text:p text:style-name="P120"><text:span text:style-name="T710"/><text:a xlink:href="#_Toc57" xlink:type="simple"><text:span text:style-name="T711"/><text:span text:style-name="T712"/><text:span text:style-name="T713"/><text:span text:style-name="T714">8.2<text:s text:c="2"/>Nutzwertanalyse: Prometheus/Grafana vs. PRTG</text:span><text:span text:style-name="T715"/><text:span text:style-name="T716"><text:tab/></text:span><text:span text:style-name="T717">15</text:span></text:a><text:span text:style-name="T718"/><text:span text:style-name="T719"/></text:p>
          <text:p text:style-name="P121"><text:span text:style-name="T720"/><text:a xlink:href="#_Toc58" xlink:type="simple"><text:span text:style-name="T721"/><text:span text:style-name="T722"/><text:span text:style-name="T723"/><text:span text:style-name="T724">8.3<text:s text:c="2"/>Lessons Learned</text:span><text:span text:style-name="T725"/><text:span text:style-name="T726"><text:tab/></text:span><text:span text:style-name="T727">15</text:span></text:a><text:span text:style-name="T728"/><text:span text:style-name="T729"/></text:p>
          <text:p text:style-name="P122"><text:span text:style-name="T730"/><text:a xlink:href="#_Toc59" xlink:type="simple"><text:span text:style-name="T731"/><text:span text:style-name="T732"/><text:span text:style-name="T733"/><text:span text:style-name="T734">8.4<text:s text:c="2"/>Ausblick</text:span><text:span text:style-name="T735"/><text:span text:style-name="T736"><text:tab/></text:span><text:span text:style-name="T737">16</text:span></text:a><text:span text:style-name="T738"/><text:span text:style-name="T739"/></text:p>
          <text:p text:style-name="P123"><text:span text:style-name="T740"/><text:a xlink:href="#_Toc60" xlink:type="simple"><text:span text:style-name="T741"/><text:span text:style-name="T742"/><text:span text:style-name="T743"/><text:span text:style-name="T744">Eidesstattliche Erklärung</text:span><text:span text:style-name="T745"/><text:span text:style-name="T746"><text:tab/></text:span><text:span text:style-name="T747">17</text:span></text:a><text:span text:style-name="T748"/><text:span text:style-name="T749"/></text:p>
          <text:p text:style-name="P124"><text:span/><text:span/></text:p>
          <text:p text:style-name="P125"><text:span/><text:span/></text:p>
          <text:p text:style-name="P126"><text:span/><text:span/></text:p>
        </text:index-body>
      </text:table-of-content>
      <text:p text:style-name="P127"><text:span text:style-name="T750"/><text:span text:style-name="T751"/><text:span/></text:p>
      <text:list>
        <text:list-item>
          <text:p text:style-name="P128"><text:span text:style-name="T752"/><text:bookmark-start text:name="_Toc19"/><text:span text:style-name="T753">Abkürzungsverzeichnis</text:span><text:span text:style-name="T754"/><text:bookmark-end text:name="_Toc19"/><text:span text:style-name="T755"/><text:span text:style-name="T756"/></text:p>
        </text:list-item>
      </text:list>
      <text:p text:style-name="P129"><text:span text:style-name="T757"/><text:span text:style-name="T758"/><text:span/></text:p>
      <text:p text:style-name="P130"><text:span text:style-name="T759">ISS </text:span><text:span text:style-name="T760">= </text:span><text:span text:style-name="T761">Internet Information Services</text:span><text:span text:style-name="T762"/><text:span/></text:p>
      <text:p text:style-name="P131"><text:span text:style-name="T763">FTP</text:span><text:span text:style-name="T764"> = </text:span><text:span text:style-name="T765">File Transfer Protocol</text:span><text:span text:style-name="T766"/><text:span/></text:p>
      <text:p text:style-name="P132"><text:span text:style-name="T767">VM = </text:span><text:span text:style-name="T768">Virtual Machine</text:span><text:span text:style-name="T769"/><text:span/></text:p>
      <text:p text:style-name="P133"><text:span text:style-name="T770">HTTP/S = </text:span><text:span text:style-name="T771">Hypertext Transfer Protocol</text:span><text:span text:style-name="T772"><text:s/></text:span><text:span text:style-name="T773">/</text:span><text:span text:style-name="T774"><text:s/></text:span><text:span text:style-name="T775">Secure</text:span><text:span text:style-name="T776"/><text:span/></text:p>
      <text:p text:style-name="P134"><text:span text:style-name="T777">RAM = </text:span><text:span text:style-name="T778">Random Access Memory</text:span><text:span text:style-name="T779"/><text:span/></text:p>
      <text:p text:style-name="P135"><text:span text:style-name="T780">CPU = </text:span><text:span text:style-name="T781">Central</text:span><text:span text:style-name="T782"> Processing Unit</text:span><text:span text:style-name="T783"/><text:span/></text:p>
      <text:p text:style-name="P136"><text:span text:style-name="T784">LTS = </text:span><text:span text:style-name="T785">Long Term Support</text:span><text:span text:style-name="T786"/><text:span/></text:p>
      <text:p text:style-name="P137"><text:span text:style-name="T787">ICMP </text:span><text:span text:style-name="T788">= </text:span><text:span text:style-name="T789">Internet Control Message Protocol</text:span><text:span text:style-name="T790"/><text:span/></text:p>
      <text:p text:style-name="P138"><text:span text:style-name="T791">BI = </text:span><text:span text:style-name="T792"> Business-Intelligence</text:span><text:span text:style-name="T793"/><text:span/></text:p>
      <text:p text:style-name="P139"><text:span text:style-name="T794">JSON = </text:span><text:span text:style-name="T795">JavaScript Object Notation</text:span><text:span text:style-name="T796"/><text:span/></text:p>
      <text:p text:style-name="P140"><text:span text:style-name="T797">YAML = </text:span><text:span text:style-name="T798">Y</text:span><text:span text:style-name="T799">AML Ain‘t Markup Language</text:span><text:span/></text:p>
      <text:p text:style-name="P141"><text:span text:style-name="T800">XML = </text:span><text:span text:style-name="T801"><text:s/></text:span><text:span text:style-name="T802">Extensible Markup Language</text:span><text:span text:style-name="T803"/><text:span/></text:p>
      <text:p text:style-name="P142"><text:span text:style-name="T804"/><text:span text:style-name="T805"/><text:span/></text:p>
      <text:p text:style-name="P143"><text:span text:style-name="T806"/><text:span text:style-name="T807"/><text:span/></text:p>
      <text:p text:style-name="P144"><text:span text:style-name="T808"/><text:bookmark-start text:name="_Toc20"/><text:span text:style-name="T809">Englisch-Deutsch Übersetzung</text:span><text:span text:style-name="T810"/><text:span text:style-name="T811"/></text:p>
      <text:p text:style-name="P145"><text:span text:style-name="T812"/><text:span text:style-name="T813">Scrape </text:span><text:span text:style-name="T814">= Extrahieren </text:span><text:span text:style-name="T815"/><text:span/></text:p>
      <text:p text:style-name="P146"><text:span text:style-name="T816">Network = Netzwerk</text:span><text:span text:style-name="T817"/><text:span/></text:p>
      <text:p text:style-name="P147"><text:span text:style-name="T818">Community</text:span><text:span text:style-name="T819"> = Gemeinschaft</text:span><text:span text:style-name="T820"/><text:span/></text:p>
      <text:p text:style-name="P148"><text:span text:style-name="T821">Alerting = Alarmierung</text:span><text:span text:style-name="T822"/><text:span/></text:p>
      <text:p text:style-name="P149"><text:span text:style-name="T823">Node = Knoten</text:span><text:span text:style-name="T824"/><text:span/></text:p>
      <text:p text:style-name="P150"><text:span text:style-name="T825">Exporter = Exporteur</text:span><text:span text:style-name="T826"/><text:span/></text:p>
      <text:p text:style-name="P151"><text:span text:style-name="T827">Target</text:span><text:span text:style-name="T828"> = Ziel</text:span><text:span text:style-name="T829"/><text:span/></text:p>
      <text:p text:style-name="P152"><text:span text:style-name="T830">Usability</text:span><text:span text:style-name="T831"> = Benutzerfreundlichkeit</text:span><text:span text:style-name="T832"/><text:span/></text:p>
      <text:p text:style-name="P153"><text:span text:style-name="T833"/><text:span text:style-name="T834">Troubleshooting </text:span><text:span text:style-name="T835">= Fehlerbehebung</text:span><text:span text:style-name="T836"/><text:span/></text:p>
      <text:p text:style-name="P154"><text:span text:style-name="T837"/><text:span text:style-name="T838"/><text:span/></text:p>
      <text:p text:style-name="P155"><text:span text:style-name="T839"/><text:span text:style-name="T840"/><text:bookmark-end text:name="_Toc20"/><text:span text:style-name="T841"/><text:span/></text:p>
      <text:p text:style-name="P156"><text:span text:style-name="T842"/><text:span text:style-name="T843"/><text:span text:style-name="T844"/></text:p>
      <text:list>
        <text:list-item>
          <text:p text:style-name="P157"><text:span text:style-name="T845"/><text:bookmark-start text:name="_Toc21"/><text:span text:style-name="T846">1. Einleitung</text:span><text:span text:style-name="T847"/><text:bookmark-end text:name="_Toc21"/><text:span text:style-name="T848"/><text:span text:style-name="T849"/></text:p>
        </text:list-item>
      </text:list>
      <text:p text:style-name="P158"><text:span text:style-name="T850"/><text:span text:style-name="T851"/><text:span text:style-name="T852"/></text:p>
      <text:list>
        <text:list-item>
          <text:p text:style-name="P159"><text:span text:style-name="T853"/><text:bookmark-start text:name="_Toc22"/><text:span text:style-name="T854">1.1 Projektumfeld</text:span><text:span text:style-name="T855"/><text:bookmark-end text:name="_Toc22"/><text:span text:style-name="T856"/><text:span text:style-name="T857"/></text:p>
        </text:list-item>
      </text:list>
      <text:p text:style-name="P160"><text:span text:style-name="T858"/><text:span text:style-name="T859">D</text:span><text:span text:style-name="T860">ie Bissantz &amp; Company GmbH ist ein mittelständisches Softwareunternehmen mit Sitz in Nürnberg sowie weiteren Standorten in Hamburg und Spreitenbach (Schweiz). Das 1996 gegründete Unternehmen beschäftigt rund 100 Mitarbeitende. Der Schwerpunkt liegt auf der</text:span><text:span text:style-name="T861"><text:s/></text:span><text:span text:style-name="T862">Entwicklung und dem Vertrieb von Business-Intelligence-Lösungen. Das Hauptprodukt DeltaMaster ist eine integrierte BI-Software für professionelle Analysten, Berichtsempfänger und Budgetplaner. Sie stellt Ad-hoc-Analysen, betriebswirtschaftliche und statist</text:span><text:span text:style-name="T863">ische Verfahren sowie Data-Mining-Methoden bereit. Zu den Kunden zählen bekannte Unternehmen wie Bosch, Porsche, Leica und Würth.</text:span><text:span text:style-name="T864"/><text:span text:style-name="T865"/></text:p>
      <text:p text:style-name="P161"><text:span text:style-name="T866"/><text:span text:style-name="T867"/><text:span text:style-name="T868"/></text:p>
      <text:p text:style-name="P162"><text:span text:style-name="T869"/><text:span text:style-name="T870">D</text:span><text:span text:style-name="T871">as Projekt wurde im Rahmen der Ausbildung zum Fachinformatiker mit der Fachrichtung Systemintegration bei der Bissantz &amp; Company GmbH durchgeführt. Die Initiative dazu ging vom Auszubildenden selbst aus, da er in der bestehenden IT-Infrastruktur des Untern</text:span><text:span text:style-name="T872">ehmens einen konkreten Handlungsbedarf erkannte. Betreut wurde das Projekt vom Ausbilder Onur Dervis.</text:span><text:span text:style-name="T873"/><text:span text:style-name="T874"/></text:p>
      <text:p text:style-name="P163"><text:span text:style-name="T875"/><text:span text:style-name="T876"/><text:span text:style-name="T877"/></text:p>
      <text:list>
        <text:list-item>
          <text:p text:style-name="P164"><text:span text:style-name="T878"/><text:bookmark-start text:name="_Toc23"/><text:span text:style-name="T879">1.2 Projektziel</text:span><text:span text:style-name="T880"/><text:bookmark-end text:name="_Toc23"/><text:span text:style-name="T881"/><text:span text:style-name="T882"/></text:p>
        </text:list-item>
      </text:list>
      <text:p text:style-name="P165"><text:span text:style-name="T883">D</text:span><text:span text:style-name="T884">as Projektziel ist die Implementierung einer Monitoring-Lösung mit Prometheus und Grafana in einer virtuellen Testumgebung. Dabei wird ein funktionsfähiges System aufgebaut, das Dashboarding, die Erfassung von Standard- und individuellen Metriken sowie aut</text:span><text:span text:style-name="T885">omatisierte E-Mail-Benachrichtigungen umfasst. </text:span><text:span text:style-name="T886"/><text:span text:style-name="T887"/></text:p>
      <text:p text:style-name="P166"><text:span text:style-name="T888">I</text:span><text:span text:style-name="T889">m zweiten Projektschritt wird die Lösung bewertet. Hierzu wird die implementierte Prometheus-/Grafana-Umgebung anhand definierter Kriterien systematisch mit der bestehenden PRTG-Lösung verglichen. Das Ergebnis ist eine dokumentierte Nutzwertanalyse mit Han</text:span><text:span text:style-name="T890">dlungsempfehlung, die der IT-Abteilung als Entscheidungsgrundlage dient. </text:span><text:span text:style-name="T891"/><text:span text:style-name="T892"/></text:p>
      <text:p text:style-name="P167"><text:span text:style-name="T893">D</text:span><text:span text:style-name="T894">as Projekt gilt als erfolgreich, wenn die technische Umsetzung anhand definierter Tests nachweislich funktioniert und eine nachvollziehbare Bewertung der Lösung vorliegt. Das Ziel besteht in der Schaffung einer belastbaren Entscheidungsgrundlage für eine l</text:span><text:span text:style-name="T895">izenzkostenfreie, flexible und skalierbare Monitoring-Strategie sowie für eine bessere Anpassbarkeit an zukünftige Anforderungen. </text:span><text:span text:style-name="T896"/><text:span text:style-name="T897"/></text:p>
      <text:p text:style-name="P168"><text:span text:style-name="T898"/><text:span text:style-name="T899"/><text:span text:style-name="T900"/></text:p>
      <text:list>
        <text:list-item>
          <text:p text:style-name="P169"><text:span text:style-name="T901"/><text:bookmark-start text:name="_Toc24"/><text:span text:style-name="T902">1</text:span><text:span text:style-name="T903">.</text:span><text:span text:style-name="T904">3 Projektbegründung</text:span><text:span text:style-name="T905"/><text:bookmark-end text:name="_Toc24"/><text:span text:style-name="T906"/><text:span text:style-name="T907"/></text:p>
        </text:list-item>
      </text:list>
      <text:p text:style-name="P170"><text:span text:style-name="T908">Im<text:s text:c="2"/>Unternehmen Bissantz und Company GmbH wird derzeit die kostenlose Lizenzversion von PRTG Network Monitor eingesetzt. Diese ist auf maximal 100 Sensoren begrenzt. Mit zunehmender Systemanzahl wird diese Grenze absehbar erreicht, was eine kostenpflichtige Lizenzerweiterung </text:span><text:span text:style-name="T909">erforderlich machen würde. Darüber hinaus schränken die begrenzten Anpassungsmöglichkeiten der Dashboards in PRTG die effiziente Nutzung im Arbeitsalltag ein.</text:span><text:span text:style-name="T910"/><text:span text:style-name="T911"/></text:p>
      <text:p text:style-name="P171"><text:span text:style-name="T912"/><text:span text:style-name="T913"/><text:span text:style-name="T914"/></text:p>
      <text:p text:style-name="P172"><text:span text:style-name="T915">P</text:span><text:span text:style-name="T916">rometheus und Grafana bieten als Open-Source-Alternativen eine unbegrenzte Anzahl an Metriken, ohne dass Lizenzkosten entstehen. Die flexible Dashboard-Gestaltung und die breite Community-Unterstützung sprechen für eine Evaluierung dieser Lösungen als lang</text:span><text:span text:style-name="T917">fristige Monitoring-Strategie.</text:span><text:span text:style-name="T918"/><text:span text:style-name="T919"/></text:p>
      <text:p text:style-name="P173"><text:span text:style-name="T920"/><text:span text:style-name="T921"/><text:span text:style-name="T922"/></text:p>
      <text:list>
        <text:list-item>
          <text:p text:style-name="P174"><text:span text:style-name="T923"/><text:bookmark-start text:name="_Toc25"/><text:span text:style-name="T924">1.4 Projektschnittstellen</text:span><text:span text:style-name="T925"/><text:bookmark-end text:name="_Toc25"/><text:span text:style-name="T926"/><text:span text:style-name="T927"/></text:p>
        </text:list-item>
      </text:list>
      <text:p text:style-name="P175"><text:span text:style-name="T928">Das Monitoring-System interagiert mit folgenden Systemen und Akteuren:</text:span><text:span text:style-name="T929"/><text:span text:style-name="T930"/></text:p>
      <text:p text:style-name="P176"><text:span text:style-name="T931">•<text:tab/>Windows 11 VM (Client): Überwachung via Windows Exporter</text:span><text:span text:style-name="T932"/><text:span text:style-name="T933"/></text:p>
      <text:p text:style-name="P177"><text:span text:style-name="T934">•<text:tab/>Windows Server 2022 VM (FTP-Server): Überwachung via Windows Exporter, FTP-Dienst</text:span><text:span text:style-name="T935"/><text:span text:style-name="T936"/></text:p>
      <text:p text:style-name="P178"><text:span text:style-name="T937">•<text:tab/>Ubuntu VM (Webserver): Überwachung via Node Exporter, HTTP-Verfügbarkeit via <text:tab/>Blackbox Exporter</text:span><text:span text:style-name="T938"/><text:span text:style-name="T939"/></text:p>
      <text:p text:style-name="P179"><text:span text:style-name="T940">•<text:tab/>Ubuntu-VM (Monitoring-Server): Betrieb von Prometheus und Grafana</text:span><text:span text:style-name="T941"/><text:span text:style-name="T942"/></text:p>
      <text:p text:style-name="P180"><text:span text:style-name="T943">•<text:tab/>Host-Rechner: physisches System, ebenfalls überwacht</text:span><text:span text:style-name="T944"/><text:span text:style-name="T945"/></text:p>
      <text:p text:style-name="P181"><text:span text:style-name="T946">•<text:tab/>E-Mail-Dienst: Alerting-Kanal für automatische Benachrichtigungen</text:span><text:span text:style-name="T947"/><text:span text:style-name="T948"/></text:p>
      <text:p text:style-name="P182"><text:span text:style-name="T949"/><text:span text:style-name="T950"/><text:span text:style-name="T951"/></text:p>
      <text:p text:style-name="P183"><text:span text:style-name="T952">Auftraggeber und Benutzer der Lösung ist die IT-Abteilung der Bissantz &amp; Company GmbH. Das Ergebnis wird d</text:span><text:span text:style-name="T953">em IT-Team</text:span><text:span text:style-name="T954"> präsentiert.</text:span><text:span text:style-name="T955"/><text:span text:style-name="T956"/></text:p>
      <text:p text:style-name="P184"><text:span text:style-name="T957"/><text:span text:style-name="T958"/><text:span text:style-name="T959"/></text:p>
      <text:list>
        <text:list-item>
          <text:p text:style-name="P185"><text:span text:style-name="T960"/><text:bookmark-start text:name="_Toc26"/><text:span text:style-name="T961">1.5 Projektabgrenzung</text:span><text:span text:style-name="T962"/><text:bookmark-end text:name="_Toc26"/><text:span text:style-name="T963"/><text:span text:style-name="T964"/></text:p>
        </text:list-item>
      </text:list>
      <text:p text:style-name="P186"><text:span text:style-name="T965">Das Projekt umfasst ausschließlich den Aufbau einer Testumgeb</text:span><text:span text:style-name="T966">ung. </text:span><text:span text:style-name="T967">Eine Migration des produktiven PRTG-Monitorings in die neue Lösung ist nicht Teil dieses Projekts. Ebenso wird kein Benutzer- oder Rollenmanagement für Grafana konfiguriert. Das Projekt liefert eine Entscheidungsgrundlage, aber keine produktive Umstellung.</text:span><text:span text:style-name="T968"/><text:span text:style-name="T969"/></text:p>
      <text:list>
        <text:list-item>
          <text:p text:style-name="P187"><text:span text:style-name="T970"/><text:bookmark-start text:name="_Toc27"/><text:span text:style-name="T971">2. Projektplanung</text:span><text:span text:style-name="T972"/><text:bookmark-end text:name="_Toc27"/><text:span text:style-name="T973"/><text:span text:style-name="T974"/></text:p>
        </text:list-item>
      </text:list>
      <text:p text:style-name="P188"><text:span text:style-name="T975"/><text:span text:style-name="T976"/><text:span text:style-name="T977"/></text:p>
      <text:list>
        <text:list-item>
          <text:p text:style-name="P189"><text:span text:style-name="T978"/><text:bookmark-start text:name="_Toc28"/><text:span text:style-name="T979">2.1 Projektphasen</text:span><text:span text:style-name="T980"/><text:bookmark-end text:name="_Toc28"/><text:span text:style-name="T981"/><text:span text:style-name="T982"/></text:p>
        </text:list-item>
      </text:list>
      <text:p text:style-name="P190"><text:span text:style-name="T983">Das Projekt fand im Zeitraum vom 20.04.2026 bis 24.04.2026 statt. Die tägliche Arbeitszeit betrug 8 Stunden. Die folgende Tabelle zeigt die grobe Zeitplanung:</text:span><text:span text:style-name="T984"/><text:span text:style-name="T985"/></text:p>
      <text:p text:style-name="P191"><text:span text:style-name="T986"/><text:span text:style-name="T987"/><text:span text:style-name="T988"/></text:p>
      <table:table table:style-name="ta1">
        <table:table-columns>
          <table:table-column table:style-name="co1"/>
          <table:table-column table:style-name="co2"/>
        </table:table-columns>
        <table:table-row table:style-name="ro1" table:default-cell-style-name="ce1">
          <table:table-cell table:style-name="ce2">
            <text:p text:style-name="P192"><text:span text:style-name="T989">Projektphase</text:span><text:span text:style-name="T990"/><text:span text:style-name="T991"/></text:p>
          </table:table-cell>
          <table:table-cell table:style-name="ce3">
            <text:p text:style-name="P193"><text:span text:style-name="T992">Geplante Zeit</text:span><text:span text:style-name="T993"/><text:span text:style-name="T994"/></text:p>
          </table:table-cell>
        </table:table-row>
        <table:table-row table:style-name="ro2" table:default-cell-style-name="ce1">
          <table:table-cell table:style-name="ce4">
            <text:p text:style-name="P194"><text:span text:style-name="T995">Projektinitialisierung und Zieldefinition</text:span><text:span text:style-name="T996"/><text:span text:style-name="T997"/></text:p>
          </table:table-cell>
          <table:table-cell table:style-name="ce5">
            <text:p text:style-name="P195"><text:span text:style-name="T998">2,0 Std.</text:span><text:span text:style-name="T999"/><text:span text:style-name="T1000"/></text:p>
          </table:table-cell>
        </table:table-row>
        <table:table-row table:style-name="ro3" table:default-cell-style-name="ce1">
          <table:table-cell table:style-name="ce6">
            <text:p text:style-name="P196"><text:span text:style-name="T1001">Ist-Analyse PRTG (Metriken, Schwachstellen, Kosten)</text:span><text:span text:style-name="T1002"/><text:span text:style-name="T1003"/></text:p>
          </table:table-cell>
          <table:table-cell table:style-name="ce7">
            <text:p text:style-name="P197"><text:span text:style-name="T1004">2,0 Std.</text:span><text:span text:style-name="T1005"/><text:span text:style-name="T1006"/></text:p>
          </table:table-cell>
        </table:table-row>
        <table:table-row table:style-name="ro4" table:default-cell-style-name="ce1">
          <table:table-cell table:style-name="ce8">
            <text:p text:style-name="P198"><text:span text:style-name="T1007">Soll-Konzept: Monitoring-Strategie, Metrik-Auswahl, Dashboard-Design</text:span><text:span text:style-name="T1008"/><text:span text:style-name="T1009"/></text:p>
          </table:table-cell>
          <table:table-cell table:style-name="ce9">
            <text:p text:style-name="P199"><text:span text:style-name="T1010">3,0 Std.</text:span><text:span text:style-name="T1011"/><text:span text:style-name="T1012"/></text:p>
          </table:table-cell>
        </table:table-row>
        <table:table-row table:style-name="ro5" table:default-cell-style-name="ce1">
          <table:table-cell table:style-name="ce10">
            <text:p text:style-name="P200"><text:span text:style-name="T1013">Recherche Prometheus, Grafana und Exporters</text:span><text:span text:style-name="T1014"/><text:span text:style-name="T1015"/></text:p>
          </table:table-cell>
          <table:table-cell table:style-name="ce11">
            <text:p text:style-name="P201"><text:span text:style-name="T1016">1,0 Std.</text:span><text:span text:style-name="T1017"/><text:span text:style-name="T1018"/></text:p>
          </table:table-cell>
        </table:table-row>
        <table:table-row table:style-name="ro6" table:default-cell-style-name="ce1">
          <table:table-cell table:style-name="ce12">
            <text:p text:style-name="P202"><text:span text:style-name="T1019">Zeit- und Ressourcenplanung</text:span><text:span text:style-name="T1020"/><text:span text:style-name="T1021"/></text:p>
          </table:table-cell>
          <table:table-cell table:style-name="ce13">
            <text:p text:style-name="P203"><text:span text:style-name="T1022">1,0 Std.</text:span><text:span text:style-name="T1023"/><text:span text:style-name="T1024"/></text:p>
          </table:table-cell>
        </table:table-row>
        <table:table-row table:style-name="ro7" table:default-cell-style-name="ce1">
          <table:table-cell table:style-name="ce14">
            <text:p text:style-name="P204"><text:span text:style-name="T1025">Erstellung und Konfiguration von 3 VMs</text:span><text:span text:style-name="T1026"/><text:span text:style-name="T1027"/></text:p>
          </table:table-cell>
          <table:table-cell table:style-name="ce15">
            <text:p text:style-name="P205"><text:span text:style-name="T1028">3,0 Std.</text:span><text:span text:style-name="T1029"/><text:span text:style-name="T1030"/></text:p>
          </table:table-cell>
        </table:table-row>
        <table:table-row table:style-name="ro8" table:default-cell-style-name="ce1">
          <table:table-cell table:style-name="ce16">
            <text:p text:style-name="P206"><text:span text:style-name="T1031">Installation Serverdienste (FTP, Webserver)</text:span><text:span text:style-name="T1032"/><text:span text:style-name="T1033"/></text:p>
          </table:table-cell>
          <table:table-cell table:style-name="ce17">
            <text:p text:style-name="P207"><text:span text:style-name="T1034">2,0 Std.</text:span><text:span text:style-name="T1035"/><text:span text:style-name="T1036"/></text:p>
          </table:table-cell>
        </table:table-row>
        <table:table-row table:style-name="ro9" table:default-cell-style-name="ce1">
          <table:table-cell table:style-name="ce18">
            <text:p text:style-name="P208"><text:span text:style-name="T1037">Installation Linux-VM für Prometheus und Grafana</text:span><text:span text:style-name="T1038"/><text:span text:style-name="T1039"/></text:p>
          </table:table-cell>
          <table:table-cell table:style-name="ce19">
            <text:p text:style-name="P209"><text:span text:style-name="T1040">1,0 Std.</text:span><text:span text:style-name="T1041"/><text:span text:style-name="T1042"/></text:p>
          </table:table-cell>
        </table:table-row>
        <table:table-row table:style-name="ro10" table:default-cell-style-name="ce1">
          <table:table-cell table:style-name="ce20">
            <text:p text:style-name="P210"><text:span text:style-name="T1043">Installation und Konfiguration Prometheus</text:span><text:span text:style-name="T1044"/><text:span text:style-name="T1045"/></text:p>
          </table:table-cell>
          <table:table-cell table:style-name="ce21">
            <text:p text:style-name="P211"><text:span text:style-name="T1046">2,5 Std.</text:span><text:span text:style-name="T1047"/><text:span text:style-name="T1048"/></text:p>
          </table:table-cell>
        </table:table-row>
        <table:table-row table:style-name="ro11" table:default-cell-style-name="ce1">
          <table:table-cell table:style-name="ce22">
            <text:p text:style-name="P212"><text:span text:style-name="T1049">Installation und Konfiguration Grafana</text:span><text:span text:style-name="T1050"/><text:span text:style-name="T1051"/></text:p>
          </table:table-cell>
          <table:table-cell table:style-name="ce23">
            <text:p text:style-name="P213"><text:span text:style-name="T1052">2,0 Std.</text:span><text:span text:style-name="T1053"/><text:span text:style-name="T1054"/></text:p>
          </table:table-cell>
        </table:table-row>
        <table:table-row table:style-name="ro12" table:default-cell-style-name="ce1">
          <table:table-cell table:style-name="ce24">
            <text:p text:style-name="P214"><text:span text:style-name="T1055">Installation Exporters auf allen Systemen</text:span><text:span text:style-name="T1056"/><text:span text:style-name="T1057"/></text:p>
          </table:table-cell>
          <table:table-cell table:style-name="ce25">
            <text:p text:style-name="P215"><text:span text:style-name="T1058">2,0 Std.</text:span><text:span text:style-name="T1059"/><text:span text:style-name="T1060"/></text:p>
          </table:table-cell>
        </table:table-row>
        <table:table-row table:style-name="ro13" table:default-cell-style-name="ce1">
          <table:table-cell table:style-name="ce26">
            <text:p text:style-name="P216"><text:span text:style-name="T1061">Konfiguration Metriken und Scrape-Targets</text:span><text:span text:style-name="T1062"/><text:span text:style-name="T1063"/></text:p>
          </table:table-cell>
          <table:table-cell table:style-name="ce27">
            <text:p text:style-name="P217"><text:span text:style-name="T1064">1,5 Std.</text:span><text:span text:style-name="T1065"/><text:span text:style-name="T1066"/></text:p>
          </table:table-cell>
        </table:table-row>
        <table:table-row table:style-name="ro14" table:default-cell-style-name="ce1">
          <table:table-cell table:style-name="ce28">
            <text:p text:style-name="P218"><text:span text:style-name="T1067">Erstellung individueller Grafana-Dashboards</text:span><text:span text:style-name="T1068"/><text:span text:style-name="T1069"/></text:p>
          </table:table-cell>
          <table:table-cell table:style-name="ce29">
            <text:p text:style-name="P219"><text:span text:style-name="T1070">3,0 Std.</text:span><text:span text:style-name="T1071"/><text:span text:style-name="T1072"/></text:p>
          </table:table-cell>
        </table:table-row>
        <table:table-row table:style-name="ro15" table:default-cell-style-name="ce1">
          <table:table-cell table:style-name="ce30">
            <text:p text:style-name="P220"><text:span text:style-name="T1073">Konfiguration Alert Manager und Alert-Regeln</text:span><text:span text:style-name="T1074"/><text:span text:style-name="T1075"/></text:p>
          </table:table-cell>
          <table:table-cell table:style-name="ce31">
            <text:p text:style-name="P221"><text:span text:style-name="T1076">2,0 Std.</text:span><text:span text:style-name="T1077"/><text:span text:style-name="T1078"/></text:p>
          </table:table-cell>
        </table:table-row>
        <table:table-row table:style-name="ro16" table:default-cell-style-name="ce1">
          <table:table-cell table:style-name="ce32">
            <text:p text:style-name="P222"><text:span text:style-name="T1079">Einrichtung E-Mail-Benachrichtigung</text:span><text:span text:style-name="T1080"/><text:span text:style-name="T1081"/></text:p>
          </table:table-cell>
          <table:table-cell table:style-name="ce33">
            <text:p text:style-name="P223"><text:span text:style-name="T1082">1,0 Std.</text:span><text:span text:style-name="T1083"/><text:span text:style-name="T1084"/></text:p>
          </table:table-cell>
        </table:table-row>
        <table:table-row table:style-name="ro17" table:default-cell-style-name="ce1">
          <table:table-cell table:style-name="ce34">
            <text:p text:style-name="P224"><text:span text:style-name="T1085">Funktions- und Ausfalltests</text:span><text:span text:style-name="T1086"/><text:span text:style-name="T1087"/></text:p>
          </table:table-cell>
          <table:table-cell table:style-name="ce35">
            <text:p text:style-name="P225"><text:span text:style-name="T1088">2,0 Std.</text:span><text:span text:style-name="T1089"/><text:span text:style-name="T1090"/></text:p>
          </table:table-cell>
        </table:table-row>
        <table:table-row table:style-name="ro18" table:default-cell-style-name="ce1">
          <table:table-cell table:style-name="ce36">
            <text:p text:style-name="P226"><text:span text:style-name="T1091">Detaillierte Evaluierung Prometheus/Grafana vs. PRTG</text:span><text:span text:style-name="T1092"/><text:span text:style-name="T1093"/></text:p>
          </table:table-cell>
          <table:table-cell table:style-name="ce37">
            <text:p text:style-name="P227"><text:span text:style-name="T1094">4,0 Std.</text:span><text:span text:style-name="T1095"/><text:span text:style-name="T1096"/></text:p>
          </table:table-cell>
        </table:table-row>
        <table:table-row table:style-name="ro19" table:default-cell-style-name="ce1">
          <table:table-cell table:style-name="ce38">
            <text:p text:style-name="P228"><text:span text:style-name="T1097">Erstellung Projektdokumentation</text:span><text:span text:style-name="T1098"/><text:span text:style-name="T1099"/></text:p>
          </table:table-cell>
          <table:table-cell table:style-name="ce39">
            <text:p text:style-name="P229"><text:span text:style-name="T1100">3,5 Std.</text:span><text:span text:style-name="T1101"/><text:span text:style-name="T1102"/></text:p>
          </table:table-cell>
        </table:table-row>
        <table:table-row table:style-name="ro20" table:default-cell-style-name="ce1">
          <table:table-cell table:style-name="ce40">
            <text:p text:style-name="P230"><text:span text:style-name="T1103">Soll-/Ist-Vergleich</text:span><text:span text:style-name="T1104"/><text:span text:style-name="T1105"/></text:p>
          </table:table-cell>
          <table:table-cell table:style-name="ce41">
            <text:p text:style-name="P231"><text:span text:style-name="T1106">0,5 Std.</text:span><text:span text:style-name="T1107"/><text:span text:style-name="T1108"/></text:p>
          </table:table-cell>
        </table:table-row>
        <table:table-row table:style-name="ro21" table:default-cell-style-name="ce1">
          <table:table-cell table:style-name="ce42">
            <text:p text:style-name="P232"><text:span text:style-name="T1109">Projektübergabe und Präsentation der Empfehlung</text:span><text:span text:style-name="T1110"/><text:span text:style-name="T1111"/></text:p>
          </table:table-cell>
          <table:table-cell table:style-name="ce43">
            <text:p text:style-name="P233"><text:span text:style-name="T1112">1,0 Std.</text:span><text:span text:style-name="T1113"/><text:span text:style-name="T1114"/></text:p>
          </table:table-cell>
        </table:table-row>
        <table:table-row table:style-name="ro22" table:default-cell-style-name="ce1">
          <table:table-cell table:style-name="ce44">
            <text:p text:style-name="P234"><text:span text:style-name="T1115">Gesamt</text:span><text:span text:style-name="T1116"/><text:span text:style-name="T1117"/></text:p>
          </table:table-cell>
          <table:table-cell table:style-name="ce45">
            <text:p text:style-name="P235"><text:span text:style-name="T1118">40,0 Std.</text:span><text:span text:style-name="T1119"/><text:span text:style-name="T1120"/></text:p>
          </table:table-cell>
        </table:table-row>
      </table:table>
      <text:p text:style-name="P236"><text:span text:style-name="T1121"/><text:span text:style-name="T1122"/><text:span text:style-name="T1123"/></text:p>
      <text:list>
        <text:list-item>
          <text:p text:style-name="P237"><text:span text:style-name="T1124"/><text:bookmark-start text:name="_Toc29"/><text:span text:style-name="T1125">2.2 Abweichung vom Projektantrag?</text:span><text:span text:style-name="T1126"/><text:bookmark-end text:name="_Toc29"/><text:span text:style-name="T1127"/><text:span text:style-name="T1128"/></text:p>
        </text:list-item>
      </text:list>
      <text:p text:style-name="P238"><text:span text:style-name="T1129">Im ursprünglichen Projektantrag waren folgende Präsentationsmittel vorgesehen, die im Rahmen der tatsächlichen Durchführung angepasst wurden:</text:span><text:span text:style-name="T1130"/><text:span text:style-name="T1131"/></text:p>
      <text:p text:style-name="P239"><text:span text:style-name="T1132"/><text:span text:style-name="T1133"/><text:span text:style-name="T1134"/></text:p>
      <text:p text:style-name="P240"><text:span text:style-name="T1135">Live-Demo:</text:span><text:span text:style-name="T1136"> Eine Live-Demo des Monitoring-Systems entfällt aus zeitlichen Gründen. Stattdessen werden die Funktionen und Ergebnisse anhand von Screenshots der laufenden Anwendung demonstriert.</text:span><text:span text:style-name="T1137"/><text:span text:style-name="T1138"/></text:p>
      <text:p text:style-name="P241"><text:span text:style-name="T1139"/><text:span text:style-name="T1140"/><text:span text:style-name="T1141"/></text:p>
      <text:p text:style-name="P242"><text:span text:style-name="T1142">Demonstrationsszenarien:</text:span><text:span text:style-name="T1143"> Die simulierten Host-Ausfälle und Alert-Auslösungen werden nicht live vorgeführt, sondern anhand von Screenshots der entsprechenden Grafana-Dashboards und E-Mail-Benachrichtigungen dokumentiert.</text:span><text:span text:style-name="T1144"/><text:span text:style-name="T1145"/></text:p>
      <text:p text:style-name="P243"><text:span text:style-name="T1146"/><text:span text:style-name="T1147"/><text:span text:style-name="T1148"/></text:p>
      <text:p text:style-name="P244"><text:span text:style-name="T1149">ROI-Berechnung:</text:span><text:span text:style-name="T1150"> Eine grafische Darstellung der Kostenersparnis bzw. eine ROI-Berechnung entfällt, da es sich bei beiden verglichenen Lösungen — PRTG in der kostenlosen Version sowie Prometheus und Grafana — um kostenfreie Software handelt. Ein monetärer Vergleich ist dah</text:span><text:span text:style-name="T1151">er nicht sinnvoll anwendbar.</text:span><text:span text:style-name="T1152"/><text:span text:style-name="T1153"/></text:p>
      <text:p text:style-name="P245"><text:span text:style-name="T1154"/><text:span text:style-name="T1155"/><text:span text:style-name="T1156"/></text:p>
      <text:p text:style-name="P246"><text:span text:style-name="T1157">Grafana-Dashboard-Definitionen:</text:span><text:span text:style-name="T1158"> Anstelle der im Antrag genannten JSON-Exporte der Dashboard-Definitionen werden Screenshots der erstellten Grafana-Dashboards beigefügt, die die Überwachung der Systeme und die konfigurierten Panels übersichtlich darstellen.</text:span><text:span text:style-name="T1159"/><text:span text:style-name="T1160"/></text:p>
      <text:p text:style-name="P247"><text:span text:style-name="T1161"/><text:span text:style-name="T1162"/><text:span/></text:p>
      <text:p text:style-name="P248"><text:span text:style-name="T1163"/><text:span text:style-name="T1164"/><text:span/></text:p>
      <text:list>
        <text:list-item>
          <text:p text:style-name="P249"><text:span text:style-name="T1165"/><text:bookmark-start text:name="_Toc30"/><text:span text:style-name="T1166">2.3 Ressourcenplanung</text:span><text:span text:style-name="T1167"/><text:bookmark-end text:name="_Toc30"/><text:span text:style-name="T1168"/><text:span text:style-name="T1169"/></text:p>
        </text:list-item>
      </text:list>
      <text:p text:style-name="P250"><text:span text:style-name="T1170">Für die Durchführung des Projekts wurden folgende Ressourcen geplant und eingesetzt:</text:span><text:span text:style-name="T1171"/><text:span text:style-name="T1172"/></text:p>
      <text:p text:style-name="P251"><text:span text:style-name="T1173">•<text:tab/>Hardware: Host-Rechner mit ausreichend RAM und CPU-Kapazität für den Betrieb <text:tab/>mehrerer VMs</text:span><text:span text:style-name="T1174"/><text:span text:style-name="T1175"/></text:p>
      <text:p text:style-name="P252"><text:span text:style-name="T1176">•<text:tab/>Virtualisierungssoftware: Hyper-V-Manager</text:span><text:span text:style-name="T1177"/><text:span text:style-name="T1178"/></text:p>
      <text:p text:style-name="P253"><text:span text:style-name="T1179">•<text:tab/>Betriebssysteme: Windows 11, Windows Server 2022, Ubuntu Server 22.04 LTS</text:span><text:span text:style-name="T1180"/><text:span text:style-name="T1181"/></text:p>
      <text:p text:style-name="P254"><text:span text:style-name="T1182">•<text:tab/>Software: Prometheus, Grafana, Alertmanager, Node Exporter, Windows Exporter, <text:tab/>Blackbox Exporter</text:span><text:span text:style-name="T1183"/><text:span text:style-name="T1184"/></text:p>
      <text:p text:style-name="P255"><text:span text:style-name="T1185">•<text:tab/>Büroarbeitsplatz mit Internetzugang für Recherche und Dokumentation</text:span><text:span text:style-name="T1186"/><text:span text:style-name="T1187"/></text:p>
      <text:p text:style-name="P256"><text:span text:style-name="T1188">•<text:tab/>E-Mail-Konto für das Alerting-Testing</text:span><text:span text:style-name="T1189"/><text:span text:style-name="T1190"/></text:p>
      <text:p text:style-name="P257"><text:span text:style-name="T1191"/><text:span text:style-name="T1192"/><text:span text:style-name="T1193"/></text:p>
      <text:list>
        <text:list-item>
          <text:p text:style-name="P258"><text:span text:style-name="T1194"/><text:bookmark-start text:name="_Toc31"/><text:span text:style-name="T1195">2.4<text:s text:c="2"/>Entwicklungsprozess</text:span><text:span text:style-name="T1196"/><text:bookmark-end text:name="_Toc31"/><text:span text:style-name="T1197"/><text:span text:style-name="T1198"/></text:p>
        </text:list-item>
      </text:list>
      <text:p text:style-name="P259"><text:span text:style-name="T1199"/><text:span text:style-name="T1200">D</text:span><text:span text:style-name="T1201">as Projekt folgte einem strukturierten Wasserfallmodell mit den Phasen Planung, Analyse, Realisierung und Abschluss. Da es sich um ein klar abgegrenztes Einzelprojekt handelte, war kein iterativer Prozess notwendig. In der Planungsphase erfolgte eine Ist-A</text:span><text:span text:style-name="T1202">nalyse und es wurde ein Konzept erstellt. In der Realisierungsphase fand die technische Umsetzung statt und in der Abschlussphase wurden Tests durchgeführt, eine Evaluation vorgenommen und eine Dokumentation erstellt.</text:span><text:span text:style-name="T1203"/><text:span text:style-name="T1204"/></text:p>
      <text:list>
        <text:list-item>
          <text:p text:style-name="P260"><text:span text:style-name="T1205"/><text:bookmark-start text:name="_Toc32"/><text:span text:style-name="T1206">3. Analysenphase</text:span><text:span text:style-name="T1207"/><text:bookmark-end text:name="_Toc32"/><text:span text:style-name="T1208"/><text:span text:style-name="T1209"/></text:p>
        </text:list-item>
        <text:list-item>
          <text:p text:style-name="P261"><text:span text:style-name="T1210"/><text:bookmark-start text:name="_Toc33"/><text:span text:style-name="T1211">3.1 Ist-Analyse</text:span><text:span text:style-name="T1212"/><text:bookmark-end text:name="_Toc33"/><text:span text:style-name="T1213"/><text:span text:style-name="T1214"/></text:p>
        </text:list-item>
      </text:list>
      <text:p text:style-name="P262"><text:span text:style-name="T1215">D</text:span><text:span text:style-name="T1216">ie Bissantz &amp; Company GmbH verfügt über eine heterogene IT-Infrastruktur, die aus mehreren virtuellen Maschinen und physischen Systemen besteht und zentral überwacht werden muss. Als Monitoring-Lösung wird aktuell die kostenlose Version von PRTG Network Mo</text:span><text:span text:style-name="T1217">nitor eingesetzt.</text:span><text:span text:style-name="T1218"/><text:span text:style-name="T1219"/></text:p>
      <text:p text:style-name="P263"><text:span text:style-name="T1220"/><text:span text:style-name="T1221">D</text:span><text:span text:style-name="T1222">iese ist auf maximal 100 Sensoren begrenzt. Bei wachsender Infrastruktur wird diese Grenze absehbar erreicht. Ein weiterer Kritikpunkt ist die eingeschränkte Flexibilität der Dashboards: Alle Geräte und Sensoren werden in einer einzigen Gesamtansicht aufge</text:span><text:span text:style-name="T1223">listet, was die Übersichtlichkeit bei einer steigenden Anzahl von Systemen erheblich reduziert. Die Möglichkeiten zur individuellen Gestaltung der Dashboards sind begrenzt, was das Erkennen kritischer Zustände verzögern kann.</text:span><text:span text:style-name="T1224"/><text:span text:style-name="T1225"/></text:p>
      <text:p text:style-name="P264"><text:span text:style-name="T1226">Es besteht daher Bedarf an einer flexibleren, skalierbaren und dauerhaft kostenfreien Monitoring-Lösung.</text:span><text:span text:style-name="T1227"/><text:span text:style-name="T1228"/></text:p>
      <text:list>
        <text:list-item>
          <text:p text:style-name="P265"><text:span text:style-name="T1229"/><text:bookmark-start text:name="_Toc34"/><text:span text:style-name="T1230">3.2<text:s text:c="2"/>Wirtschaftlichkeitsanalyse</text:span><text:span text:style-name="T1231"/><text:bookmark-end text:name="_Toc34"/><text:span text:style-name="T1232"/><text:span text:style-name="T1233"/></text:p>
        </text:list-item>
        <text:list-item>
          <text:p text:style-name="P266"><text:span text:style-name="T1234"/><text:bookmark-start text:name="_Toc35"/><text:span text:style-name="T1235">3.2.1<text:s text:c="2"/>Make-or-Buy-Entscheidung</text:span><text:span text:style-name="T1236"/><text:bookmark-end text:name="_Toc35"/><text:span text:style-name="T1237"/><text:span text:style-name="T1238"/></text:p>
        </text:list-item>
      </text:list>
      <text:p text:style-name="P267"><text:span text:style-name="T1239"/><text:span text:style-name="T1240">E</text:span><text:span text:style-name="T1241">s wurde geprüft, ob eine kommerzielle Erweiterung von PRTG oder eine andere fertige Lösung alle Anforderungen erfüllt. Die kostenpflichtige PRTG-Lizenz mit unbegrenzter Sensoranzahl verursacht jedoch erhebliche Lizenzkosten. Prometheus und Grafana sind hin</text:span><text:span text:style-name="T1242">g</text:span><text:span text:style-name="T1243">egen vollständig Open Source und kostenfrei. Da die funktionalen Anforderungen (unbegrenzte Metriken, flexible Dashboards, E-Mail-Alerting) durch Prometheus und Grafana ohne Lizenzkosten erfüllt werden können, wurde eine Eigenimplementierung gegenüber eine</text:span><text:span text:style-name="T1244">r Lizenzerweiterung bevorzugt.</text:span><text:span text:style-name="T1245"/><text:span text:style-name="T1246"/></text:p>
      <text:list>
        <text:list-item>
          <text:p text:style-name="P268"><text:span text:style-name="T1247"/><text:bookmark-start text:name="_Toc36"/><text:span text:style-name="T1248">3.2.2<text:s text:c="2"/>Projektkosten</text:span><text:span text:style-name="T1249"/><text:bookmark-end text:name="_Toc36"/><text:span text:style-name="T1250"/><text:span text:style-name="T1251"/></text:p>
        </text:list-item>
      </text:list>
      <text:p text:style-name="P269"><text:span text:style-name="T1252">Die Projektkosten setzen sich aus Personalkosten des Auszubildenden sowie Ressourcenkosten zusammen:</text:span><text:span text:style-name="T1253"/><text:span text:style-name="T1254"/></text:p>
      <text:p text:style-name="P270"><text:span text:style-name="T1255"/><text:span text:style-name="T1256"/><text:span text:style-name="T1257"/></text:p>
      <table:table table:style-name="ta2">
        <table:table-columns>
          <table:table-column table:style-name="co3"/>
          <table:table-column table:style-name="co4"/>
          <table:table-column table:style-name="co5"/>
          <table:table-column table:style-name="co6"/>
        </table:table-columns>
        <table:table-row table:style-name="ro23" table:default-cell-style-name="ce46">
          <table:table-cell table:style-name="ce47">
            <text:p text:style-name="P271"><text:span text:style-name="T1258">Kostenart</text:span><text:span text:style-name="T1259"/><text:span text:style-name="T1260"/></text:p>
          </table:table-cell>
          <table:table-cell table:style-name="ce48">
            <text:p text:style-name="P272"><text:span text:style-name="T1261">Zeit</text:span><text:span text:style-name="T1262"/><text:span text:style-name="T1263"/></text:p>
          </table:table-cell>
          <table:table-cell table:style-name="ce49">
            <text:p text:style-name="P273"><text:span text:style-name="T1264">Kostensatz</text:span><text:span text:style-name="T1265"/><text:span text:style-name="T1266"/></text:p>
          </table:table-cell>
          <table:table-cell table:style-name="ce50">
            <text:p text:style-name="P274"><text:span text:style-name="T1267">Betrag</text:span><text:span text:style-name="T1268"/><text:span text:style-name="T1269"/></text:p>
          </table:table-cell>
        </table:table-row>
        <table:table-row table:style-name="ro24" table:default-cell-style-name="ce46">
          <table:table-cell table:style-name="ce51">
            <text:p text:style-name="P275"><text:span text:style-name="T1270">Entwicklung / Umsetzung (Auszubildender)</text:span><text:span text:style-name="T1271"/><text:span text:style-name="T1272"/></text:p>
          </table:table-cell>
          <table:table-cell table:style-name="ce52">
            <text:p text:style-name="P276"><text:span text:style-name="T1273">40 Std.</text:span><text:span text:style-name="T1274"/><text:span text:style-name="T1275"/></text:p>
          </table:table-cell>
          <table:table-cell table:style-name="ce53">
            <text:p text:style-name="P277"><text:span text:style-name="T1276">ca. 7,50 €/Std.</text:span><text:span text:style-name="T1277"/><text:span text:style-name="T1278"/></text:p>
          </table:table-cell>
          <table:table-cell table:style-name="ce54">
            <text:p text:style-name="P278"><text:span text:style-name="T1279">300,00 €</text:span><text:span text:style-name="T1280"/><text:span text:style-name="T1281"/></text:p>
          </table:table-cell>
        </table:table-row>
        <table:table-row table:style-name="ro25" table:default-cell-style-name="ce46">
          <table:table-cell table:style-name="ce55">
            <text:p text:style-name="P279"><text:span text:style-name="T1282">Ressourcen (Hardware, Strom, Internetzugang)</text:span><text:span text:style-name="T1283"/><text:span text:style-name="T1284"/></text:p>
          </table:table-cell>
          <table:table-cell table:style-name="ce56">
            <text:p text:style-name="P280"><text:span text:style-name="T1285">40 Std.</text:span><text:span text:style-name="T1286"/><text:span text:style-name="T1287"/></text:p>
          </table:table-cell>
          <table:table-cell table:style-name="ce57">
            <text:p text:style-name="P281"><text:span text:style-name="T1288">ca. 5,00 €/Std.</text:span><text:span text:style-name="T1289"/><text:span text:style-name="T1290"/></text:p>
          </table:table-cell>
          <table:table-cell table:style-name="ce58">
            <text:p text:style-name="P282"><text:span text:style-name="T1291">200,00 €</text:span><text:span text:style-name="T1292"/><text:span text:style-name="T1293"/></text:p>
          </table:table-cell>
        </table:table-row>
        <table:table-row table:style-name="ro26" table:default-cell-style-name="ce46">
          <table:table-cell table:style-name="ce59">
            <text:p text:style-name="P283"><text:span text:style-name="T1294">Gesamt</text:span><text:span text:style-name="T1295"/><text:span text:style-name="T1296"/></text:p>
          </table:table-cell>
          <table:table-cell table:style-name="ce60">
            <text:p text:style-name="P284"><text:span text:style-name="T1297"/><text:span text:style-name="T1298"/><text:span text:style-name="T1299"/></text:p>
          </table:table-cell>
          <table:table-cell table:style-name="ce61">
            <text:p text:style-name="P285"><text:span text:style-name="T1300"/><text:span text:style-name="T1301"/><text:span text:style-name="T1302"/></text:p>
          </table:table-cell>
          <table:table-cell table:style-name="ce62">
            <text:p text:style-name="P286"><text:span text:style-name="T1303">500,00 €</text:span><text:span text:style-name="T1304"/><text:span text:style-name="T1305"/></text:p>
          </table:table-cell>
        </table:table-row>
      </table:table>
      <text:list>
        <text:list-item>
          <text:p text:style-name="P287"><text:span text:style-name="T1306"/><text:bookmark-start text:name="_Toc37"/><text:span text:style-name="T1307">3.2.3<text:s text:c="2"/>Kostenvergleich</text:span><text:span text:style-name="T1308"/><text:bookmark-end text:name="_Toc37"/><text:span text:style-name="T1309"/><text:span text:style-name="T1310"/></text:p>
        </text:list-item>
      </text:list>
      <text:p text:style-name="P288"><text:span text:style-name="T1311">Beide betrachteten Lösungen sind zum aktuellen Zeitpunkt kostenfrei einsetzbar. PRTG wird in der kostenlosen Version mit einem Limit von 100 Sensoren betrieben, Prometheus und Grafana sind vollständig Open Source ohne jegliche Lizenzeinschränkungen.</text:span><text:span text:style-name="T1312"/><text:span text:style-name="T1313"/></text:p>
      <text:p text:style-name="P289"><text:span text:style-name="T1314"/><text:span text:style-name="T1315"/><text:span text:style-name="T1316"/></text:p>
      <text:p text:style-name="P290"><text:span text:style-name="T1317">Sollte die IT-Infrastruktur bei Bissantz &amp; Company GmbH weiter wachsen und das 100-Sensor-Limit von PRTG erreicht werden, würde eine Lizenzerweiterung auf eine kostenpflichtige Version anfallen. Je nach Lizenzmodell (z.B. PRTG 500 oder höher) belaufen sich</text:span><text:span text:style-name="T1318"> diese Kosten laut Hersteller auf mehrere Tausend Euro pro Jahr.</text:span><text:span text:style-name="T1319"/><text:span text:style-name="T1320"/></text:p>
      <text:p text:style-name="P291"><text:span text:style-name="T1321"/><text:span text:style-name="T1322"/><text:span text:style-name="T1323"/></text:p>
      <text:p text:style-name="P292"><text:span text:style-name="T1324">Durch den Einsatz von Prometheus und Grafana entfallen diese zukünftigen Lizenzkosten vollständig, da beide Tools dauerhaft kostenfrei bleiben und keine Sensor-Begrenzung aufweisen. Die einmaligen Projektkosten von ca. 500 € (Personalaufwand und Ressourcen</text:span><text:span text:style-name="T1325">) stehen damit einer langfristigen Kostenvermeidung gegenüber.</text:span><text:span text:style-name="T1326"/><text:span text:style-name="T1327"/></text:p>
      <text:p text:style-name="P293"><text:span text:style-name="T1328"/><text:span text:style-name="T1329"/><text:span text:style-name="T1330"/></text:p>
      <text:list>
        <text:list-item>
          <text:p text:style-name="P294"><text:span text:style-name="T1331"/><text:bookmark-start text:name="_Toc38"/><text:span text:style-name="T1332">3.3<text:s text:c="2"/>Anwendungsfälle</text:span><text:span text:style-name="T1333"/><text:bookmark-end text:name="_Toc38"/><text:span text:style-name="T1334"/><text:span text:style-name="T1335"/></text:p>
        </text:list-item>
      </text:list>
      <text:p text:style-name="P295"><text:span text:style-name="T1336">Das Monitoring-System soll folgende Anwendungsfälle abdecken:</text:span><text:span text:style-name="T1337"/><text:span text:style-name="T1338"/></text:p>
      <text:list text:style-name="WWNum1" text:continue-numbering="true">
        <text:list-item>
          <text:p text:style-name="P296"><text:span text:style-name="T1339">Systemadministrator überwacht alle VMs und den Host in einer zentralen Oberfläche</text:span><text:span text:style-name="T1340"/><text:span text:style-name="T1341"/></text:p>
        </text:list-item>
        <text:list-item>
          <text:p text:style-name="P297"><text:span text:style-name="T1342">Systemadministrator erhält automatische E-Mail-Benachrichtigung bei Systemausfall oder kritischen Metriken</text:span><text:span text:style-name="T1343"/><text:span text:style-name="T1344"/></text:p>
        </text:list-item>
        <text:list-item>
          <text:p text:style-name="P298"><text:span text:style-name="T1345">Systemadministrator filtert und analysiert historische Metriken in Grafana-Dashboards</text:span><text:span text:style-name="T1346"/><text:span text:style-name="T1347"/></text:p>
        </text:list-item>
        <text:list-item>
          <text:p text:style-name="P299"><text:span text:style-name="T1348">Prometheus extrahiert automatisch Metriken aller Zielsysteme</text:span><text:span text:style-name="T1349"/><text:span text:style-name="T1350"/></text:p>
        </text:list-item>
        <text:list-item>
          <text:p text:style-name="P300"><text:span text:style-name="T1351">Blackbox Exporter prüft periodisch die Erreichbarkeit von Diensten (HTTP, ICMP)</text:span><text:span text:style-name="T1352"/><text:span text:style-name="T1353"/></text:p>
        </text:list-item>
      </text:list>
      <text:list>
        <text:list-item>
          <text:p text:style-name="P301"><text:span text:style-name="T1354"/><text:bookmark-start text:name="_Toc39"/><text:span text:style-name="T1355">3.4<text:s text:c="2"/>Qualitätsanforderungen</text:span><text:span text:style-name="T1356"/><text:bookmark-end text:name="_Toc39"/><text:span text:style-name="T1357"/><text:span text:style-name="T1358"/></text:p>
        </text:list-item>
      </text:list>
      <text:p text:style-name="P302"><text:span text:style-name="T1359">An das Monitoring-System werden folgende Qualitätsanforderungen gestellt:</text:span><text:span text:style-name="T1360"/><text:span text:style-name="T1361"/></text:p>
      <text:p text:style-name="P303"><text:span text:style-name="T1362"/><text:span text:style-name="T1363"/><text:span text:style-name="T1364"/></text:p>
      <table:table table:style-name="ta3">
        <table:table-columns>
          <table:table-column table:style-name="co7"/>
          <table:table-column table:style-name="co8"/>
        </table:table-columns>
        <table:table-row table:style-name="ro27" table:default-cell-style-name="ce63">
          <table:table-cell table:style-name="ce64">
            <text:p text:style-name="P304"><text:span text:style-name="T1365">Kriterium</text:span><text:span text:style-name="T1366"/><text:span text:style-name="T1367"/></text:p>
          </table:table-cell>
          <table:table-cell table:style-name="ce65">
            <text:p text:style-name="P305"><text:span text:style-name="T1368">Anforderung</text:span><text:span text:style-name="T1369"/><text:span text:style-name="T1370"/></text:p>
          </table:table-cell>
        </table:table-row>
        <table:table-row table:style-name="ro28" table:default-cell-style-name="ce63">
          <table:table-cell table:style-name="ce66">
            <text:p text:style-name="P306"><text:span text:style-name="T1371">Verfügbarkeit</text:span><text:span text:style-name="T1372"/><text:span text:style-name="T1373"/></text:p>
          </table:table-cell>
          <table:table-cell table:style-name="ce67">
            <text:p text:style-name="P307"><text:span text:style-name="T1374">Monitoring-System läuft dauerhaft und ist jederzeit erreichbar</text:span><text:span text:style-name="T1375"/><text:span text:style-name="T1376"/></text:p>
          </table:table-cell>
        </table:table-row>
        <table:table-row table:style-name="ro29" table:default-cell-style-name="ce63">
          <table:table-cell table:style-name="ce68">
            <text:p text:style-name="P308"><text:span text:style-name="T1377">Korrektheit</text:span><text:span text:style-name="T1378"/><text:span text:style-name="T1379"/></text:p>
          </table:table-cell>
          <table:table-cell table:style-name="ce69">
            <text:p text:style-name="P309"><text:span text:style-name="T1380">Metriken müssen akkurat und aktuell sein (Scrape-Intervall: 15 Sek.)</text:span><text:span text:style-name="T1381"/><text:span text:style-name="T1382"/></text:p>
          </table:table-cell>
        </table:table-row>
        <table:table-row table:style-name="ro30" table:default-cell-style-name="ce63">
          <table:table-cell table:style-name="ce70">
            <text:p text:style-name="P310"><text:span text:style-name="T1383">Erreichbarkeit</text:span><text:span text:style-name="T1384"/><text:span text:style-name="T1385"/></text:p>
          </table:table-cell>
          <table:table-cell table:style-name="ce71">
            <text:p text:style-name="P311"><text:span text:style-name="T1386">Grafana-Weboberfläche ist im Netzwerk erreichbar</text:span><text:span text:style-name="T1387"/><text:span text:style-name="T1388"/></text:p>
          </table:table-cell>
        </table:table-row>
        <table:table-row table:style-name="ro31" table:default-cell-style-name="ce63">
          <table:table-cell table:style-name="ce72">
            <text:p text:style-name="P312"><text:span text:style-name="T1389">Alerting</text:span><text:span text:style-name="T1390"/><text:span text:style-name="T1391"/></text:p>
          </table:table-cell>
          <table:table-cell table:style-name="ce73">
            <text:p text:style-name="P313"><text:span text:style-name="T1392">Bei Ausfall eines überwachten Systems erfolgt E-Mail-Benachrichtigung innerhalb von 1 Minute</text:span><text:span text:style-name="T1393"/><text:span text:style-name="T1394"/></text:p>
          </table:table-cell>
        </table:table-row>
        <table:table-row table:style-name="ro32" table:default-cell-style-name="ce63">
          <table:table-cell table:style-name="ce74">
            <text:p text:style-name="P314"><text:span text:style-name="T1395">Erweiterbarkeit</text:span><text:span text:style-name="T1396"/><text:span text:style-name="T1397"/></text:p>
          </table:table-cell>
          <table:table-cell table:style-name="ce75">
            <text:p text:style-name="P315"><text:span text:style-name="T1398">Neue Systeme können jederzeit als Scrape-Target hinzugefügt werden</text:span><text:span text:style-name="T1399"/><text:span text:style-name="T1400"/></text:p>
          </table:table-cell>
        </table:table-row>
        <table:table-row table:style-name="ro33" table:default-cell-style-name="ce63">
          <table:table-cell table:style-name="ce76">
            <text:p text:style-name="P316"><text:span text:style-name="T1401">Usability</text:span><text:span text:style-name="T1402"/><text:span text:style-name="T1403"/></text:p>
          </table:table-cell>
          <table:table-cell table:style-name="ce77">
            <text:p text:style-name="P317"><text:span text:style-name="T1404">Dashboards sind klar strukturiert und ohne Schulung nutzbar</text:span><text:span text:style-name="T1405"/><text:span text:style-name="T1406"/></text:p>
          </table:table-cell>
        </table:table-row>
      </table:table>
      <text:p text:style-name="P318"><text:span text:style-name="T1407"/><text:span text:style-name="T1408"/><text:span text:style-name="T1409"/></text:p>
      <text:p text:style-name="P319"><text:span text:style-name="T1410"/><text:span text:style-name="T1411"/><text:span text:style-name="T1412"/></text:p>
      <text:list>
        <text:list-item>
          <text:p text:style-name="P320"><text:span text:style-name="T1413"/><text:bookmark-start text:name="_Toc40"/><text:span text:style-name="T1414">4<text:s text:c="2"/>Entwurfsphase</text:span><text:span text:style-name="T1415"/><text:bookmark-end text:name="_Toc40"/><text:span text:style-name="T1416"/><text:span text:style-name="T1417"/></text:p>
        </text:list-item>
        <text:list-item>
          <text:p text:style-name="P321"><text:span text:style-name="T1418"/><text:bookmark-start text:name="_Toc41"/><text:span text:style-name="T1419">4.1<text:s text:c="2"/>Zielplattform</text:span><text:span text:style-name="T1420"/><text:bookmark-end text:name="_Toc41"/><text:span text:style-name="T1421"/><text:span text:style-name="T1422"/></text:p>
        </text:list-item>
      </text:list>
      <text:p text:style-name="P322"><text:span text:style-name="T1423">Als Zielplattform wurde eine lokale Virtualisierungsumgebung gewählt. Die folgende Übersicht zeigt alle eingesetzten Systeme:</text:span><text:span text:style-name="T1424"/><text:span text:style-name="T1425"/></text:p>
      <text:p text:style-name="P323"><text:span text:style-name="T1426"/><text:span text:style-name="T1427"/><text:span text:style-name="T1428"/></text:p>
      <table:table table:style-name="ta4">
        <table:table-columns>
          <table:table-column table:style-name="co9"/>
          <table:table-column table:style-name="co10"/>
          <table:table-column table:style-name="co11"/>
          <table:table-column table:style-name="co12"/>
        </table:table-columns>
        <table:table-row table:style-name="ro34" table:default-cell-style-name="ce78">
          <table:table-cell table:style-name="ce79">
            <text:p text:style-name="P324"><text:span text:style-name="T1429">System</text:span><text:span text:style-name="T1430"/><text:span text:style-name="T1431"/></text:p>
          </table:table-cell>
          <table:table-cell table:style-name="ce80">
            <text:p text:style-name="P325"><text:span text:style-name="T1432">Rolle</text:span><text:span text:style-name="T1433"/><text:span text:style-name="T1434"/></text:p>
          </table:table-cell>
          <table:table-cell table:style-name="ce81">
            <text:p text:style-name="P326"><text:span text:style-name="T1435">Betriebssystem</text:span><text:span text:style-name="T1436"/><text:span text:style-name="T1437"/></text:p>
          </table:table-cell>
          <table:table-cell table:style-name="ce82">
            <text:p text:style-name="P327"><text:span text:style-name="T1438">Typ</text:span><text:span text:style-name="T1439"/><text:span text:style-name="T1440"/></text:p>
          </table:table-cell>
        </table:table-row>
        <table:table-row table:style-name="ro35" table:default-cell-style-name="ce78">
          <table:table-cell table:style-name="ce83">
            <text:p text:style-name="P328"><text:span text:style-name="T1441">Monitoring-VM</text:span><text:span text:style-name="T1442"/><text:span text:style-name="T1443"/></text:p>
          </table:table-cell>
          <table:table-cell table:style-name="ce84">
            <text:p text:style-name="P329"><text:span text:style-name="T1444">Prometheus + Grafana + Alertmanager</text:span><text:span text:style-name="T1445"/><text:span text:style-name="T1446"/></text:p>
          </table:table-cell>
          <table:table-cell table:style-name="ce85">
            <text:p text:style-name="P330"><text:span text:style-name="T1447">Ubuntu Server 22.04 LTS</text:span><text:span text:style-name="T1448"/><text:span text:style-name="T1449"/></text:p>
          </table:table-cell>
          <table:table-cell table:style-name="ce86">
            <text:p text:style-name="P331"><text:span text:style-name="T1450">Virtuelle Maschine</text:span><text:span text:style-name="T1451"/><text:span text:style-name="T1452"/></text:p>
          </table:table-cell>
        </table:table-row>
        <table:table-row table:style-name="ro36" table:default-cell-style-name="ce78">
          <table:table-cell table:style-name="ce87">
            <text:p text:style-name="P332"><text:span text:style-name="T1453">Webserver-VM</text:span><text:span text:style-name="T1454"/><text:span text:style-name="T1455"/></text:p>
          </table:table-cell>
          <table:table-cell table:style-name="ce88">
            <text:p text:style-name="P333"><text:span text:style-name="T1456">Apache/Nginx Webserver</text:span><text:span text:style-name="T1457"/><text:span text:style-name="T1458"/></text:p>
          </table:table-cell>
          <table:table-cell table:style-name="ce89">
            <text:p text:style-name="P334"><text:span text:style-name="T1459">Ubuntu Server 22.04 LTS</text:span><text:span text:style-name="T1460"/><text:span text:style-name="T1461"/></text:p>
          </table:table-cell>
          <table:table-cell table:style-name="ce90">
            <text:p text:style-name="P335"><text:span text:style-name="T1462">Virtuelle Maschine</text:span><text:span text:style-name="T1463"/><text:span text:style-name="T1464"/></text:p>
          </table:table-cell>
        </table:table-row>
        <table:table-row table:style-name="ro37" table:default-cell-style-name="ce78">
          <table:table-cell table:style-name="ce91">
            <text:p text:style-name="P336"><text:span text:style-name="T1465">FTP-Server-VM</text:span><text:span text:style-name="T1466"/><text:span text:style-name="T1467"/></text:p>
          </table:table-cell>
          <table:table-cell table:style-name="ce92">
            <text:p text:style-name="P337"><text:span text:style-name="T1468">IIS FTP-Server</text:span><text:span text:style-name="T1469"/><text:span text:style-name="T1470"/></text:p>
          </table:table-cell>
          <table:table-cell table:style-name="ce93">
            <text:p text:style-name="P338"><text:span text:style-name="T1471">Windows Server 2022</text:span><text:span text:style-name="T1472"/><text:span text:style-name="T1473"/></text:p>
          </table:table-cell>
          <table:table-cell table:style-name="ce94">
            <text:p text:style-name="P339"><text:span text:style-name="T1474">Virtuelle Maschine</text:span><text:span text:style-name="T1475"/><text:span text:style-name="T1476"/></text:p>
          </table:table-cell>
        </table:table-row>
        <table:table-row table:style-name="ro38" table:default-cell-style-name="ce78">
          <table:table-cell table:style-name="ce95">
            <text:p text:style-name="P340"><text:span text:style-name="T1477">Client-VM</text:span><text:span text:style-name="T1478"/><text:span text:style-name="T1479"/></text:p>
          </table:table-cell>
          <table:table-cell table:style-name="ce96">
            <text:p text:style-name="P341"><text:span text:style-name="T1480">Windows-Client</text:span><text:span text:style-name="T1481"/><text:span text:style-name="T1482"/></text:p>
          </table:table-cell>
          <table:table-cell table:style-name="ce97">
            <text:p text:style-name="P342"><text:span text:style-name="T1483">Windows 11</text:span><text:span text:style-name="T1484"/><text:span text:style-name="T1485"/></text:p>
          </table:table-cell>
          <table:table-cell table:style-name="ce98">
            <text:p text:style-name="P343"><text:span text:style-name="T1486">Virtuelle Maschine</text:span><text:span text:style-name="T1487"/><text:span text:style-name="T1488"/></text:p>
          </table:table-cell>
        </table:table-row>
        <table:table-row table:style-name="ro39" table:default-cell-style-name="ce78">
          <table:table-cell table:style-name="ce99">
            <text:p text:style-name="P344"><text:span text:style-name="T1489">Host-Rechner</text:span><text:span text:style-name="T1490"/><text:span text:style-name="T1491"/></text:p>
          </table:table-cell>
          <table:table-cell table:style-name="ce100">
            <text:p text:style-name="P345"><text:span text:style-name="T1492">Physisches System</text:span><text:span text:style-name="T1493"/><text:span text:style-name="T1494"/></text:p>
          </table:table-cell>
          <table:table-cell table:style-name="ce101">
            <text:p text:style-name="P346"><text:span text:style-name="T1495">Windows </text:span><text:span text:style-name="T1496">Server 2022</text:span><text:span text:style-name="T1497"/><text:span text:style-name="T1498"/></text:p>
          </table:table-cell>
          <table:table-cell table:style-name="ce102">
            <text:p text:style-name="P347"><text:span text:style-name="T1499">Physisch</text:span><text:span text:style-name="T1500"/><text:span text:style-name="T1501"/></text:p>
          </table:table-cell>
        </table:table-row>
      </table:table>
      <text:list>
        <text:list-item>
          <text:p text:style-name="P348"><text:span text:style-name="T1502"/><text:bookmark-start text:name="_Toc42"/><text:span text:style-name="T1503">4.2<text:s text:c="2"/>Architekturdesign</text:span><text:span text:style-name="T1504"/><text:bookmark-end text:name="_Toc42"/><text:span text:style-name="T1505"/><text:span text:style-name="T1506"/></text:p>
        </text:list-item>
      </text:list>
      <text:p text:style-name="P349"><text:span text:style-name="T1507">Die gewählte Architektur folgt dem Pull-Modell von Prometheus: Der Prometheus-Server fragt in regelmäßigen Abst</text:span><text:span text:style-name="T1508">änden (Scrape-Intervall: 15 Sekunden) die konfigurierten Exporters auf den Zielsystemen ab. Die gesammelten Metriken werden lokal gespeichert und über Grafana visualisiert. Der Alertmanager empfängt Alarme von Prometheus und leitet diese per E-Mail weiter.</text:span><text:span text:style-name="T1509"/><text:span text:style-name="T1510"/></text:p>
      <text:p text:style-name="P350"><text:span text:style-name="T1511"/><text:span text:style-name="T1512"/><text:span text:style-name="T1513"/></text:p>
      <table:table table:style-name="ta5">
        <table:table-columns>
          <table:table-column table:style-name="co13"/>
          <table:table-column table:style-name="co14"/>
          <table:table-column table:style-name="co15"/>
        </table:table-columns>
        <table:table-row table:style-name="ro40" table:default-cell-style-name="ce103">
          <table:table-cell table:style-name="ce104">
            <text:p text:style-name="P351"><text:span text:style-name="T1514">Komponente</text:span><text:span text:style-name="T1515"/><text:span text:style-name="T1516"/></text:p>
          </table:table-cell>
          <table:table-cell table:style-name="ce105">
            <text:p text:style-name="P352"><text:span text:style-name="T1517">Funktion</text:span><text:span text:style-name="T1518"/><text:span text:style-name="T1519"/></text:p>
          </table:table-cell>
          <table:table-cell table:style-name="ce106">
            <text:p text:style-name="P353"><text:span text:style-name="T1520">Eingesetzt auf</text:span><text:span text:style-name="T1521"/><text:span text:style-name="T1522"/></text:p>
          </table:table-cell>
        </table:table-row>
        <table:table-row table:style-name="ro41" table:default-cell-style-name="ce103">
          <table:table-cell table:style-name="ce107">
            <text:p text:style-name="P354"><text:span text:style-name="T1523">Prometheus</text:span><text:span text:style-name="T1524"/><text:span text:style-name="T1525"/></text:p>
          </table:table-cell>
          <table:table-cell table:style-name="ce108">
            <text:p text:style-name="P355"><text:span text:style-name="T1526">Metriken-Scraping, Speicherung, Alerting-Auslösung</text:span><text:span text:style-name="T1527"/><text:span text:style-name="T1528"/></text:p>
          </table:table-cell>
          <table:table-cell table:style-name="ce109">
            <text:p text:style-name="P356"><text:span text:style-name="T1529">Ubuntu Monitoring-VM</text:span><text:span text:style-name="T1530"/><text:span text:style-name="T1531"/></text:p>
          </table:table-cell>
        </table:table-row>
        <table:table-row table:style-name="ro42" table:default-cell-style-name="ce103">
          <table:table-cell table:style-name="ce110">
            <text:p text:style-name="P357"><text:span text:style-name="T1532">Grafana</text:span><text:span text:style-name="T1533"/><text:span text:style-name="T1534"/></text:p>
          </table:table-cell>
          <table:table-cell table:style-name="ce111">
            <text:p text:style-name="P358"><text:span text:style-name="T1535">Visualisierung, Dashboard-Erstellung</text:span><text:span text:style-name="T1536"/><text:span text:style-name="T1537"/></text:p>
          </table:table-cell>
          <table:table-cell table:style-name="ce112">
            <text:p text:style-name="P359"><text:span text:style-name="T1538">Ubuntu Monitoring-VM</text:span><text:span text:style-name="T1539"/><text:span text:style-name="T1540"/></text:p>
          </table:table-cell>
        </table:table-row>
        <table:table-row table:style-name="ro43" table:default-cell-style-name="ce103">
          <table:table-cell table:style-name="ce113">
            <text:p text:style-name="P360"><text:span text:style-name="T1541">Alertmanager</text:span><text:span text:style-name="T1542"/><text:span text:style-name="T1543"/></text:p>
          </table:table-cell>
          <table:table-cell table:style-name="ce114">
            <text:p text:style-name="P361"><text:span text:style-name="T1544">Alarm-Routing und E-Mail-Versand</text:span><text:span text:style-name="T1545"/><text:span text:style-name="T1546"/></text:p>
          </table:table-cell>
          <table:table-cell table:style-name="ce115">
            <text:p text:style-name="P362"><text:span text:style-name="T1547">Ubuntu Monitoring-VM</text:span><text:span text:style-name="T1548"/><text:span text:style-name="T1549"/></text:p>
          </table:table-cell>
        </table:table-row>
        <table:table-row table:style-name="ro44" table:default-cell-style-name="ce103">
          <table:table-cell table:style-name="ce116">
            <text:p text:style-name="P363"><text:span text:style-name="T1550">Node Exporter</text:span><text:span text:style-name="T1551"/><text:span text:style-name="T1552"/></text:p>
          </table:table-cell>
          <table:table-cell table:style-name="ce117">
            <text:p text:style-name="P364"><text:span text:style-name="T1553">Linux-Systemmetriken (CPU, RAM, Disk, Netzwerk)</text:span><text:span text:style-name="T1554"/><text:span text:style-name="T1555"/></text:p>
          </table:table-cell>
          <table:table-cell table:style-name="ce118">
            <text:p text:style-name="P365"><text:span text:style-name="T1556">Ubuntu VMs</text:span><text:span text:style-name="T1557"/><text:span text:style-name="T1558"/></text:p>
          </table:table-cell>
        </table:table-row>
        <table:table-row table:style-name="ro45" table:default-cell-style-name="ce103">
          <table:table-cell table:style-name="ce119">
            <text:p text:style-name="P366"><text:span text:style-name="T1559">Windows Exporter</text:span><text:span text:style-name="T1560"/><text:span text:style-name="T1561"/></text:p>
          </table:table-cell>
          <table:table-cell table:style-name="ce120">
            <text:p text:style-name="P367"><text:span text:style-name="T1562">Windows-Systemmetriken (CPU, RAM, Disk, Netzwerk)</text:span><text:span text:style-name="T1563"/><text:span text:style-name="T1564"/></text:p>
          </table:table-cell>
          <table:table-cell table:style-name="ce121">
            <text:p text:style-name="P368"><text:span text:style-name="T1565">Windows VMs + Host</text:span><text:span text:style-name="T1566"/><text:span text:style-name="T1567"/></text:p>
          </table:table-cell>
        </table:table-row>
        <table:table-row table:style-name="ro46" table:default-cell-style-name="ce103">
          <table:table-cell table:style-name="ce122">
            <text:p text:style-name="P369"><text:span text:style-name="T1568">Blackbox Exporter</text:span><text:span text:style-name="T1569"/><text:span text:style-name="T1570"/></text:p>
          </table:table-cell>
          <table:table-cell table:style-name="ce123">
            <text:p text:style-name="P370"><text:span text:style-name="T1571">Prüfung der Diensterreichbarkeit (HTTP, ICMP/Ping)</text:span><text:span text:style-name="T1572"/><text:span text:style-name="T1573"/></text:p>
          </table:table-cell>
          <table:table-cell table:style-name="ce124">
            <text:p text:style-name="P371"><text:span text:style-name="T1574">Ubuntu Monitoring-VM</text:span><text:span text:style-name="T1575"/><text:span text:style-name="T1576"/></text:p>
          </table:table-cell>
        </table:table-row>
      </table:table>
      <text:p text:style-name="P372"><text:span text:style-name="T1577"/><text:span text:style-name="T1578"/><text:span text:style-name="T1579"/></text:p>
      <text:p text:style-name="P373"><text:span text:style-name="T1580">Die Nutzwertanalyse zur Technologieauswahl ergab folgendes Ergebnis:</text:span><text:span text:style-name="T1581"/><text:span text:style-name="T1582"/></text:p>
      <table:table table:style-name="ta6">
        <table:table-columns>
          <table:table-column table:style-name="co16"/>
          <table:table-column table:style-name="co17"/>
          <table:table-column table:style-name="co18"/>
          <table:table-column table:style-name="co19"/>
          <table:table-column table:style-name="co20"/>
        </table:table-columns>
        <table:table-row table:style-name="ro47" table:default-cell-style-name="ce125">
          <table:table-cell table:style-name="ce126">
            <text:p text:style-name="P374"><text:span text:style-name="T1583">Kriterium</text:span><text:span text:style-name="T1584"/><text:span text:style-name="T1585"/></text:p>
          </table:table-cell>
          <table:table-cell table:style-name="ce127">
            <text:p text:style-name="P375"><text:span text:style-name="T1586">Gewichtung</text:span><text:span text:style-name="T1587"/><text:span text:style-name="T1588"/></text:p>
          </table:table-cell>
          <table:table-cell table:style-name="ce128">
            <text:p text:style-name="P376"><text:span text:style-name="T1589">PRTG </text:span><text:span text:style-name="T1590">(kostenlos)</text:span><text:span text:style-name="T1591"/><text:span text:style-name="T1592"/></text:p>
          </table:table-cell>
          <table:table-cell table:style-name="ce129">
            <text:p text:style-name="P377"><text:span text:style-name="T1593">PRTG </text:span><text:span text:style-name="T1594">(kostenpflichtig)</text:span><text:span text:style-name="T1595"/><text:span text:style-name="T1596"/></text:p>
          </table:table-cell>
          <table:table-cell table:style-name="ce130">
            <text:p text:style-name="P378"><text:span text:style-name="T1597">Prometheus/Grafana</text:span><text:span text:style-name="T1598"/><text:span text:style-name="T1599"/></text:p>
          </table:table-cell>
        </table:table-row>
        <table:table-row table:style-name="ro48" table:default-cell-style-name="ce125">
          <table:table-cell table:style-name="ce131">
            <text:p text:style-name="P379"><text:span text:style-name="T1600">Lizenzkosten</text:span><text:span text:style-name="T1601"/><text:span text:style-name="T1602"/></text:p>
          </table:table-cell>
          <table:table-cell table:style-name="ce132">
            <text:p text:style-name="P380"><text:span text:style-name="T1603">5</text:span><text:span text:style-name="T1604"/><text:span text:style-name="T1605"/></text:p>
          </table:table-cell>
          <table:table-cell table:style-name="ce133">
            <text:p text:style-name="P381"><text:span text:style-name="T1606">5 (25)</text:span><text:span text:style-name="T1607"/><text:span text:style-name="T1608"/></text:p>
          </table:table-cell>
          <table:table-cell table:style-name="ce134">
            <text:p text:style-name="P382"><text:span text:style-name="T1609">1 (5)</text:span><text:span text:style-name="T1610"/><text:span text:style-name="T1611"/></text:p>
          </table:table-cell>
          <table:table-cell table:style-name="ce135">
            <text:p text:style-name="P383"><text:span text:style-name="T1612">5 (25)</text:span><text:span text:style-name="T1613"/><text:span text:style-name="T1614"/></text:p>
          </table:table-cell>
        </table:table-row>
        <table:table-row table:style-name="ro49" table:default-cell-style-name="ce125">
          <table:table-cell table:style-name="ce136">
            <text:p text:style-name="P384"><text:span text:style-name="T1615">Skalierbarkeit (Sensoren)</text:span><text:span text:style-name="T1616"/><text:span text:style-name="T1617"/></text:p>
          </table:table-cell>
          <table:table-cell table:style-name="ce137">
            <text:p text:style-name="P385"><text:span text:style-name="T1618">5</text:span><text:span text:style-name="T1619"/><text:span text:style-name="T1620"/></text:p>
          </table:table-cell>
          <table:table-cell table:style-name="ce138">
            <text:p text:style-name="P386"><text:span text:style-name="T1621">2 (10)</text:span><text:span text:style-name="T1622"/><text:span text:style-name="T1623"/></text:p>
          </table:table-cell>
          <table:table-cell table:style-name="ce139">
            <text:p text:style-name="P387"><text:span text:style-name="T1624">5 (25)</text:span><text:span text:style-name="T1625"/><text:span text:style-name="T1626"/></text:p>
          </table:table-cell>
          <table:table-cell table:style-name="ce140">
            <text:p text:style-name="P388"><text:span text:style-name="T1627">5 (25)</text:span><text:span text:style-name="T1628"/><text:span text:style-name="T1629"/></text:p>
          </table:table-cell>
        </table:table-row>
        <table:table-row table:style-name="ro50" table:default-cell-style-name="ce125">
          <table:table-cell table:style-name="ce141">
            <text:p text:style-name="P389"><text:span text:style-name="T1630">Dashboard-Flexibilität</text:span><text:span text:style-name="T1631"/><text:span text:style-name="T1632"/></text:p>
          </table:table-cell>
          <table:table-cell table:style-name="ce142">
            <text:p text:style-name="P390"><text:span text:style-name="T1633">4</text:span><text:span text:style-name="T1634"/><text:span text:style-name="T1635"/></text:p>
          </table:table-cell>
          <table:table-cell table:style-name="ce143">
            <text:p text:style-name="P391"><text:span text:style-name="T1636">3 (12)</text:span><text:span text:style-name="T1637"/><text:span text:style-name="T1638"/></text:p>
          </table:table-cell>
          <table:table-cell table:style-name="ce144">
            <text:p text:style-name="P392"><text:span text:style-name="T1639">3 (12)</text:span><text:span text:style-name="T1640"/><text:span text:style-name="T1641"/></text:p>
          </table:table-cell>
          <table:table-cell table:style-name="ce145">
            <text:p text:style-name="P393"><text:span text:style-name="T1642">4 (12)</text:span><text:span text:style-name="T1643"/><text:span text:style-name="T1644"/></text:p>
          </table:table-cell>
        </table:table-row>
        <table:table-row table:style-name="ro51" table:default-cell-style-name="ce125">
          <table:table-cell table:style-name="ce146">
            <text:p text:style-name="P394"><text:span text:style-name="T1645">Dokumentation/Community</text:span><text:span text:style-name="T1646"/><text:span text:style-name="T1647"/></text:p>
          </table:table-cell>
          <table:table-cell table:style-name="ce147">
            <text:p text:style-name="P395"><text:span text:style-name="T1648">3</text:span><text:span text:style-name="T1649"/><text:span text:style-name="T1650"/></text:p>
          </table:table-cell>
          <table:table-cell table:style-name="ce148">
            <text:p text:style-name="P396"><text:span text:style-name="T1651">3 (9)</text:span><text:span text:style-name="T1652"/><text:span text:style-name="T1653"/></text:p>
          </table:table-cell>
          <table:table-cell table:style-name="ce149">
            <text:p text:style-name="P397"><text:span text:style-name="T1654">3 (12)</text:span><text:span text:style-name="T1655"/><text:span text:style-name="T1656"/></text:p>
          </table:table-cell>
          <table:table-cell table:style-name="ce150">
            <text:p text:style-name="P398"><text:span text:style-name="T1657">4 (12)</text:span><text:span text:style-name="T1658"/><text:span text:style-name="T1659"/></text:p>
          </table:table-cell>
        </table:table-row>
        <table:table-row table:style-name="ro52" table:default-cell-style-name="ce125">
          <table:table-cell table:style-name="ce151">
            <text:p text:style-name="P399"><text:span text:style-name="T1660">Einrichtungsaufwand</text:span><text:span text:style-name="T1661"/><text:span text:style-name="T1662"/></text:p>
          </table:table-cell>
          <table:table-cell table:style-name="ce152">
            <text:p text:style-name="P400"><text:span text:style-name="T1663">3</text:span><text:span text:style-name="T1664"/><text:span text:style-name="T1665"/></text:p>
          </table:table-cell>
          <table:table-cell table:style-name="ce153">
            <text:p text:style-name="P401"><text:span text:style-name="T1666">3 (9)</text:span><text:span text:style-name="T1667"/><text:span text:style-name="T1668"/></text:p>
          </table:table-cell>
          <table:table-cell table:style-name="ce154">
            <text:p text:style-name="P402"><text:span text:style-name="T1669">3 (9)</text:span><text:span text:style-name="T1670"/><text:span text:style-name="T1671"/></text:p>
          </table:table-cell>
          <table:table-cell table:style-name="ce155">
            <text:p text:style-name="P403"><text:span text:style-name="T1672">2 (6)</text:span><text:span text:style-name="T1673"/><text:span text:style-name="T1674"/></text:p>
          </table:table-cell>
        </table:table-row>
        <table:table-row table:style-name="ro53" table:default-cell-style-name="ce125">
          <table:table-cell table:style-name="ce156">
            <text:p text:style-name="P404"><text:span text:style-name="T1675">Alerting-Möglichkeiten</text:span><text:span text:style-name="T1676"/><text:span text:style-name="T1677"/></text:p>
          </table:table-cell>
          <table:table-cell table:style-name="ce157">
            <text:p text:style-name="P405"><text:span text:style-name="T1678">4</text:span><text:span text:style-name="T1679"/><text:span text:style-name="T1680"/></text:p>
          </table:table-cell>
          <table:table-cell table:style-name="ce158">
            <text:p text:style-name="P406"><text:span text:style-name="T1681">3 (12)</text:span><text:span text:style-name="T1682"/><text:span text:style-name="T1683"/></text:p>
          </table:table-cell>
          <table:table-cell table:style-name="ce159">
            <text:p text:style-name="P407"><text:span text:style-name="T1684">5 (20)</text:span><text:span text:style-name="T1685"/><text:span text:style-name="T1686"/></text:p>
          </table:table-cell>
          <table:table-cell table:style-name="ce160">
            <text:p text:style-name="P408"><text:span text:style-name="T1687">5 (20)</text:span><text:span text:style-name="T1688"/><text:span text:style-name="T1689"/></text:p>
          </table:table-cell>
        </table:table-row>
        <table:table-row table:style-name="ro54" table:default-cell-style-name="ce125">
          <table:table-cell table:style-name="ce161">
            <text:p text:style-name="P409"><text:span text:style-name="T1690">Nutzwert (Summe gewichtet)</text:span><text:span text:style-name="T1691"/><text:span text:style-name="T1692"/></text:p>
          </table:table-cell>
          <table:table-cell table:style-name="ce162">
            <text:p text:style-name="P410"><text:span text:style-name="T1693"/><text:span text:style-name="T1694"/><text:span text:style-name="T1695"/></text:p>
          </table:table-cell>
          <table:table-cell table:style-name="ce163">
            <text:p text:style-name="P411"><text:span text:style-name="T1696">77</text:span><text:span text:style-name="T1697"/><text:span text:style-name="T1698"/></text:p>
          </table:table-cell>
          <table:table-cell table:style-name="ce164">
            <text:p text:style-name="P412"><text:span text:style-name="T1699">83</text:span><text:span text:style-name="T1700"/><text:span text:style-name="T1701"/></text:p>
          </table:table-cell>
          <table:table-cell table:style-name="ce165">
            <text:p text:style-name="P413"><text:span text:style-name="T1702">100</text:span><text:span text:style-name="T1703"/><text:span text:style-name="T1704"/></text:p>
          </table:table-cell>
        </table:table-row>
      </table:table>
      <text:list>
        <text:list-item>
          <text:p text:style-name="P414"><text:span text:style-name="T1705"/><text:bookmark-start text:name="_Toc43"/><text:span text:style-name="T1706">4.3<text:s text:c="2"/>Entwurf der überwachten Metriken</text:span><text:span text:style-name="T1707"/><text:bookmark-end text:name="_Toc43"/><text:span text:style-name="T1708"/><text:span text:style-name="T1709"/></text:p>
        </text:list-item>
      </text:list>
      <text:p text:style-name="P415"><text:span text:style-name="T1710">Folgende Metriken werden auf allen Systemen erfasst:</text:span><text:span text:style-name="T1711"/><text:span text:style-name="T1712"/></text:p>
      <text:list text:style-name="WWNum1" text:continue-numbering="true">
        <text:list-item>
          <text:p text:style-name="P416"><text:span text:style-name="T1713">CPU-Auslastung (in %, pro Kern und gesamt)</text:span><text:span text:style-name="T1714"/><text:span text:style-name="T1715"/></text:p>
        </text:list-item>
        <text:list-item>
          <text:p text:style-name="P417"><text:span text:style-name="T1716">Arbeitsspeicher-Auslastung (RAM gesamt, verfügbar, genutzt)</text:span><text:span text:style-name="T1717"/><text:span text:style-name="T1718"/></text:p>
        </text:list-item>
        <text:list-item>
          <text:p text:style-name="P418"><text:span text:style-name="T1719">Festplatten-Auslastung (Speicherplatz, Lese-/Schreibraten)</text:span><text:span text:style-name="T1720"/><text:span text:style-name="T1721"/></text:p>
        </text:list-item>
        <text:list-item>
          <text:p text:style-name="P419"><text:span text:style-name="T1722">Netzwerk-Auslastung (ein- und ausgehender Datenverkehr)</text:span><text:span text:style-name="T1723"/><text:span text:style-name="T1724"/></text:p>
        </text:list-item>
        <text:list-item>
          <text:p text:style-name="P420"><text:span text:style-name="T1725">Erreichbarkeit des Systems (Ping / ICMP via Blackbox Exporter)</text:span><text:span text:style-name="T1726"/><text:span text:style-name="T1727"/></text:p>
        </text:list-item>
        <text:list-item>
          <text:p text:style-name="P421"><text:span text:style-name="T1728">HTTP-Verfügbarkeit des Webservers (via Blackbox Exporter)</text:span><text:span text:style-name="T1729"/><text:span text:style-name="T1730"/></text:p>
        </text:list-item>
      </text:list>
      <text:list>
        <text:list-item>
          <text:p text:style-name="P422"><text:span text:style-name="T1731"/><text:bookmark-start text:name="_Toc44"/><text:span text:style-name="T1732">4.4<text:s text:c="2"/>Maßnahmen zur Qualitätssicherung</text:span><text:span text:style-name="T1733"/><text:bookmark-end text:name="_Toc44"/><text:span text:style-name="T1734"/><text:span text:style-name="T1735"/></text:p>
        </text:list-item>
      </text:list>
      <text:p text:style-name="P423"><text:span text:style-name="T1736">Zur Sicherung der Qualität wurden folgende Maßnahmen geplant und umgesetzt:</text:span><text:span text:style-name="T1737"/><text:span text:style-name="T1738"/></text:p>
      <text:list text:style-name="WWNum1" text:continue-numbering="true">
        <text:list-item>
          <text:p text:style-name="P424"><text:span text:style-name="T1739">Funktionstest nach jeder Installationsphase (Exporter erreichbar, Prometheus<text:s text:c="2"/><text:tab/>scraped erfolgreich)</text:span><text:span text:style-name="T1740"/><text:span text:style-name="T1741"/></text:p>
        </text:list-item>
        <text:list-item>
          <text:p text:style-name="P425"><text:span text:style-name="T1742">Ausfalltest: Simulierter VM-Ausfall zur Überprüfung des Alertings</text:span><text:span text:style-name="T1743"/><text:span text:style-name="T1744"/></text:p>
        </text:list-item>
        <text:list-item>
          <text:p text:style-name="P426"><text:span text:style-name="T1745">Überprüfung der E-Mail-Benachrichtigung bei ausgelöstem Alert</text:span><text:span text:style-name="T1746"/><text:span text:style-name="T1747"/></text:p>
        </text:list-item>
        <text:list-item>
          <text:p text:style-name="P427"><text:span text:style-name="T1748">Plausibilitätsprüfung der angezeigten Metriken in Grafana</text:span><text:span text:style-name="T1749"/><text:span text:style-name="T1750"/></text:p>
        </text:list-item>
      </text:list>
      <text:p text:style-name="P428"><text:span text:style-name="T1751"/><text:span text:style-name="T1752"/><text:span text:style-name="T1753"/></text:p>
      <text:p text:style-name="P429"><text:span text:style-name="T1754"/><text:span text:style-name="T1755"/><text:span text:style-name="T1756"/></text:p>
      <text:list>
        <text:list-item>
          <text:p text:style-name="P430"><text:span text:style-name="T1757"/><text:bookmark-start text:name="_Toc45"/><text:span text:style-name="T1758">5<text:s text:c="2"/>Implementierungsphase</text:span><text:span text:style-name="T1759"/><text:bookmark-end text:name="_Toc45"/><text:span text:style-name="T1760"/><text:span text:style-name="T1761"/></text:p>
        </text:list-item>
        <text:list-item>
          <text:p text:style-name="P431"><text:span text:style-name="T1762"/><text:bookmark-start text:name="_Toc46"/><text:span text:style-name="T1763">5.1<text:s text:c="2"/>Aufbau der virtuellen Testumgebung</text:span><text:span text:style-name="T1764"/><text:bookmark-end text:name="_Toc46"/><text:span text:style-name="T1765"/><text:span text:style-name="T1766"/></text:p>
        </text:list-item>
      </text:list>
      <text:p text:style-name="P432"><text:span text:style-name="T1767">Zunächst wurden vier virtuelle Maschinen erstellt und mit den benötigten Betriebssystemen installiert: eine Ubuntu-VM als Monitoring-Se</text:span><text:span text:style-name="T1768">rver, eine Ubuntu-VM als Webserver sowie eine Windows Server 2022-VM als FTP-Server. Zusätzlich wurde eine Windows 11-VM als Client-System eingerichtet. Alle VMs wurden im selben virtuellen Netzwerk betrieben, sodass eine direkte Kommunikation möglich ist.</text:span><text:span text:style-name="T1769"/><text:span text:style-name="T1770"/></text:p>
      <text:p text:style-name="P433"><text:span text:style-name="T1771"/><text:span text:style-name="T1772"/><text:span text:style-name="T1773"/></text:p>
      <text:p text:style-name="P434"><text:span text:style-name="T1774">Auf dem Ubuntu-Webserver wurde ein Apache-Webserver installiert und eine einfache Testwebseite bereitgestellt. Auf dem Windows Server 2022 wurde der IIS FTP-Server eingerichtet und konfiguriert.</text:span><text:span text:style-name="T1775"/><text:span text:style-name="T1776"/></text:p>
      <text:list>
        <text:list-item>
          <text:p text:style-name="P435"><text:span text:style-name="T1777"/><text:bookmark-start text:name="_Toc47"/><text:span text:style-name="T1778">5.2<text:s text:c="2"/>Installation und Konfiguration Prometheus</text:span><text:span text:style-name="T1779"/><text:bookmark-end text:name="_Toc47"/><text:span text:style-name="T1780"/><text:span text:style-name="T1781"/></text:p>
        </text:list-item>
      </text:list>
      <text:p text:style-name="P436"><text:span text:style-name="T1782">Prometheus wurde auf der Ubuntu Monitoring-VM als Syst</text:span><text:span text:style-name="T1783">emdienst installiert. Die Konfigurationsdatei prometheus.yml wurde so angepasst, dass alle Zielsysteme (Scrape-Targets) mit ihren jeweiligen Exporter-Ports und Scrape-Intervallen eingetragen sind. Das globale Scrape-Intervall wurde auf 15 Sekunden gesetzt.</text:span><text:span text:style-name="T1784"/><text:span text:style-name="T1785"/></text:p>
      <text:p text:style-name="P437"><text:span text:style-name="T1786"/><text:span text:style-name="T1787"/><text:span text:style-name="T1788"/></text:p>
      <text:p text:style-name="P438"><text:span text:style-name="T1789">Beispielhafte Struktur der prometheus.yml:</text:span><text:span text:style-name="T1790"/><text:span text:style-name="T1791"/></text:p>
      <table:table table:style-name="ta7">
        <table:table-columns>
          <table:table-column table:style-name="co21"/>
        </table:table-columns>
        <table:table-row table:style-name="ro55" table:default-cell-style-name="ce166">
          <table:table-cell table:style-name="ce167">
            <text:p text:style-name="P439"><text:span text:style-name="T1792">---</text:span><text:span text:style-name="T1793"/><text:span text:style-name="T1794"/></text:p>
            <text:p text:style-name="P440"><text:span text:style-name="T1795">global:</text:span><text:span text:style-name="T1796"/><text:span text:style-name="T1797"/></text:p>
            <text:p text:style-name="P441"><text:span text:style-name="T1798"><text:s text:c="2"/>scrape_interval: </text:span><text:span text:style-name="T1799">15s</text:span><text:span text:style-name="T1800"/><text:span text:style-name="T1801"/></text:p>
            <text:p text:style-name="P442"><text:span text:style-name="T1802"><text:s text:c="2"/>evaluation_interval: </text:span><text:span text:style-name="T1803">15s</text:span><text:span text:style-name="T1804"/><text:span text:style-name="T1805"/></text:p>
            <text:p text:style-name="P443"><text:span text:style-name="T1806"/><text:span text:style-name="T1807"/><text:span text:style-name="T1808"/></text:p>
            <text:p text:style-name="P444"><text:span text:style-name="T1809">scrape_configs:</text:span><text:span text:style-name="T1810"/><text:span text:style-name="T1811"/></text:p>
            <text:p text:style-name="P445"><text:span text:style-name="T1812"><text:s text:c="2"/>- job_name: </text:span><text:span text:style-name="T1813">"prometheus"</text:span><text:span text:style-name="T1814"/><text:span text:style-name="T1815"/></text:p>
            <text:p text:style-name="P446"><text:span text:style-name="T1816"><text:s text:c="4"/>basic_auth:</text:span><text:span text:style-name="T1817"/><text:span text:style-name="T1818"/></text:p>
            <text:p text:style-name="P447"><text:span text:style-name="T1819"><text:s text:c="6"/>username: </text:span><text:span text:style-name="T1820">'admin'</text:span><text:span text:style-name="T1821"/><text:span text:style-name="T1822"/></text:p>
            <text:p text:style-name="P448"><text:span text:style-name="T1823"><text:s text:c="6"/>password: </text:span><text:span text:style-name="T1824">'&lt;PASSWORT&gt;'</text:span><text:span text:style-name="T1825"/><text:span text:style-name="T1826"/></text:p>
            <text:p text:style-name="P449"><text:span text:style-name="T1827"/><text:span text:style-name="T1828"/><text:span text:style-name="T1829"/></text:p>
            <text:p text:style-name="P450"><text:span text:style-name="T1830"><text:s text:c="4"/>static_configs:</text:span><text:span text:style-name="T1831"/><text:span text:style-name="T1832"/></text:p>
            <text:p text:style-name="P451"><text:span text:style-name="T1833"><text:s text:c="6"/>- targets: </text:span><text:span text:style-name="T1834">[</text:span><text:span text:style-name="T1835">"127.0.0.1:9090"</text:span><text:span text:style-name="T1836">]</text:span><text:span text:style-name="T1837"/><text:span text:style-name="T1838"/></text:p>
            <text:p text:style-name="P452"><text:span text:style-name="T1839"/><text:span text:style-name="T1840"/><text:span text:style-name="T1841"/></text:p>
            <text:p text:style-name="P453"><text:span text:style-name="T1842"><text:s text:c="2"/>- job_name: </text:span><text:span text:style-name="T1843">"node_exporter"</text:span><text:span text:style-name="T1844"/><text:span text:style-name="T1845"/></text:p>
            <text:p text:style-name="P454"><text:span text:style-name="T1846"><text:s text:c="4"/>static_configs:</text:span><text:span text:style-name="T1847"/><text:span text:style-name="T1848"/></text:p>
            <text:p text:style-name="P455"><text:span text:style-name="T1849"><text:s text:c="6"/>- targets: </text:span><text:span text:style-name="T1850">[</text:span><text:span text:style-name="T1851">"127.0.0.1:9100"</text:span><text:span text:style-name="T1852">]</text:span><text:span text:style-name="T1853"/><text:span text:style-name="T1854"/></text:p>
            <text:p text:style-name="P456"><text:span text:style-name="T1855"><text:s text:c="8"/>labels:</text:span><text:span text:style-name="T1856"/><text:span text:style-name="T1857"/></text:p>
            <text:p text:style-name="P457"><text:span text:style-name="T1858"><text:s text:c="10"/>instance: </text:span><text:span text:style-name="T1859">"Monitoring_srv"</text:span><text:span text:style-name="T1860"/><text:span text:style-name="T1861"/></text:p>
            <text:p text:style-name="P458"><text:span text:style-name="T1862"><text:s text:c="6"/>- targets: </text:span><text:span text:style-name="T1863">[</text:span><text:span text:style-name="T1864">"10.0.0.14:9100"</text:span><text:span text:style-name="T1865">]</text:span><text:span text:style-name="T1866"/><text:span text:style-name="T1867"/></text:p>
            <text:p text:style-name="P459"><text:span text:style-name="T1868"><text:s text:c="8"/>labels:</text:span><text:span text:style-name="T1869"/><text:span text:style-name="T1870"/></text:p>
            <text:p text:style-name="P460"><text:span text:style-name="T1871"><text:s text:c="10"/>instance: </text:span><text:span text:style-name="T1872">"Webclient"</text:span><text:span text:style-name="T1873"/><text:span text:style-name="T1874"/></text:p>
            <text:p text:style-name="P461"><text:span text:style-name="T1875"/><text:span text:style-name="T1876"/><text:span text:style-name="T1877"/></text:p>
            <text:p text:style-name="P462"><text:span text:style-name="T1878"/><text:span text:style-name="T1879"/><text:span text:style-name="T1880"/></text:p>
            <text:p text:style-name="P463"><text:span text:style-name="T1881"><text:s text:c="2"/>- job_name: </text:span><text:span text:style-name="T1882">"Windows_VM_Metrics"</text:span><text:span text:style-name="T1883"/><text:span text:style-name="T1884"/></text:p>
            <text:p text:style-name="P464"><text:span text:style-name="T1885"><text:s text:c="4"/>static_configs:</text:span><text:span text:style-name="T1886"/><text:span text:style-name="T1887"/></text:p>
            <text:p text:style-name="P465"><text:span text:style-name="T1888"><text:s text:c="6"/>- targets: </text:span><text:span text:style-name="T1889">[</text:span><text:span text:style-name="T1890">"10.0.0.11:9182"</text:span><text:span text:style-name="T1891">]</text:span><text:span text:style-name="T1892"/><text:span text:style-name="T1893"/></text:p>
            <text:p text:style-name="P466"><text:span text:style-name="T1894"><text:s text:c="8"/>labels:</text:span><text:span text:style-name="T1895"/><text:span text:style-name="T1896"/></text:p>
            <text:p text:style-name="P467"><text:span text:style-name="T1897"><text:s text:c="10"/>instance: </text:span><text:span text:style-name="T1898">"windows_client"</text:span><text:span text:style-name="T1899"/><text:span text:style-name="T1900"/></text:p>
            <text:p text:style-name="P468"><text:span text:style-name="T1901"><text:s text:c="6"/>- targets: </text:span><text:span text:style-name="T1902">[</text:span><text:span text:style-name="T1903">"10.0.0.12:9182"</text:span><text:span text:style-name="T1904">]</text:span><text:span text:style-name="T1905"/><text:span text:style-name="T1906"/></text:p>
            <text:p text:style-name="P469"><text:span text:style-name="T1907"><text:s text:c="8"/>labels:</text:span><text:span text:style-name="T1908"/><text:span text:style-name="T1909"/></text:p>
            <text:p text:style-name="P470"><text:span text:style-name="T1910"><text:s text:c="10"/>instance: </text:span><text:span text:style-name="T1911">"ftp-server"</text:span><text:span text:style-name="T1912"/><text:span text:style-name="T1913"/></text:p>
            <text:p text:style-name="P471"><text:span text:style-name="T1914"><text:s text:c="6"/>- targets: </text:span><text:span text:style-name="T1915">[</text:span><text:span text:style-name="T1916">"10.0.0.10:9182"</text:span><text:span text:style-name="T1917">]</text:span><text:span text:style-name="T1918"/><text:span text:style-name="T1919"/></text:p>
            <text:p text:style-name="P472"><text:span text:style-name="T1920"><text:s text:c="8"/>labels:</text:span><text:span text:style-name="T1921"/><text:span text:style-name="T1922"/></text:p>
            <text:p text:style-name="P473"><text:span text:style-name="T1923"><text:s text:c="10"/>instance: </text:span><text:span text:style-name="T1924">"Hyper-V_Host"</text:span><text:span text:style-name="T1925"/><text:span text:style-name="T1926"/></text:p>
            <text:p text:style-name="P474"><text:span text:style-name="T1927"/><text:span text:style-name="T1928"/><text:span text:style-name="T1929"/></text:p>
            <text:p text:style-name="P475"><text:span text:style-name="T1930"><text:s text:c="2"/>- job_name: </text:span><text:span text:style-name="T1931">"apache"</text:span><text:span text:style-name="T1932"/><text:span text:style-name="T1933"/></text:p>
            <text:p text:style-name="P476"><text:span text:style-name="T1934"><text:s text:c="4"/>static_configs:</text:span><text:span text:style-name="T1935"/><text:span text:style-name="T1936"/></text:p>
            <text:p text:style-name="P477"><text:span text:style-name="T1937"><text:s text:c="6"/>- targets: </text:span><text:span text:style-name="T1938">[</text:span><text:span text:style-name="T1939">"10.0.0.14:9117"</text:span><text:span text:style-name="T1940">]</text:span><text:span text:style-name="T1941"/><text:span text:style-name="T1942"/></text:p>
            <text:p text:style-name="P478"><text:span text:style-name="T1943"><text:s text:c="8"/>labels:</text:span><text:span text:style-name="T1944"/><text:span text:style-name="T1945"/></text:p>
            <text:p text:style-name="P479"><text:span text:style-name="T1946"><text:s text:c="10"/>instance: </text:span><text:span text:style-name="T1947">"Webclient"</text:span><text:span text:style-name="T1948"/><text:span text:style-name="T1949"/></text:p>
            <text:p text:style-name="P480"><text:span text:style-name="T1950"/><text:span text:style-name="T1951"/><text:span text:style-name="T1952"/></text:p>
            <text:p text:style-name="P481"><text:span text:style-name="T1953"><text:s text:c="2"/>- job_name: </text:span><text:span text:style-name="T1954">"blackbox"</text:span><text:span text:style-name="T1955"/><text:span text:style-name="T1956"/></text:p>
            <text:p text:style-name="P482"><text:span text:style-name="T1957"><text:s text:c="4"/>metrics_path: </text:span><text:span text:style-name="T1958">/probe</text:span><text:span text:style-name="T1959"/><text:span text:style-name="T1960"/></text:p>
            <text:p text:style-name="P483"><text:span text:style-name="T1961"><text:s text:c="4"/>params:</text:span><text:span text:style-name="T1962"/><text:span text:style-name="T1963"/></text:p>
            <text:p text:style-name="P484"><text:span text:style-name="T1964"><text:s text:c="6"/>module: </text:span><text:span text:style-name="T1965">[</text:span><text:span text:style-name="T1966">http_2xx</text:span><text:span text:style-name="T1967">]</text:span><text:span text:style-name="T1968"/><text:span text:style-name="T1969"/></text:p>
            <text:p text:style-name="P485"><text:span text:style-name="T1970"><text:s text:c="4"/>static_configs:</text:span><text:span text:style-name="T1971"/><text:span text:style-name="T1972"/></text:p>
            <text:p text:style-name="P486"><text:span text:style-name="T1973"><text:s text:c="6"/>- targets:</text:span><text:span text:style-name="T1974"/><text:span text:style-name="T1975"/></text:p>
            <text:p text:style-name="P487"><text:span text:style-name="T1976"><text:s text:c="10"/>- </text:span><text:span text:style-name="T1977">http://10.0.0.14</text:span><text:span text:style-name="T1978"/><text:span text:style-name="T1979"/></text:p>
            <text:p text:style-name="P488"><text:span text:style-name="T1980"><text:s text:c="4"/>relabel_configs:</text:span><text:span text:style-name="T1981"/><text:span text:style-name="T1982"/></text:p>
            <text:p text:style-name="P489"><text:span text:style-name="T1983"><text:s text:c="6"/>- source_labels: </text:span><text:span text:style-name="T1984">[</text:span><text:span text:style-name="T1985">__address__</text:span><text:span text:style-name="T1986">]</text:span><text:span text:style-name="T1987"/><text:span text:style-name="T1988"/></text:p>
            <text:p text:style-name="P490"><text:span text:style-name="T1989"><text:s text:c="8"/>target_label: </text:span><text:span text:style-name="T1990">__param_target</text:span><text:span text:style-name="T1991"/><text:span text:style-name="T1992"/></text:p>
            <text:p text:style-name="P491"><text:span text:style-name="T1993"><text:s text:c="6"/>- source_labels: </text:span><text:span text:style-name="T1994">[</text:span><text:span text:style-name="T1995">__param_target</text:span><text:span text:style-name="T1996">]</text:span><text:span text:style-name="T1997"/><text:span text:style-name="T1998"/></text:p>
            <text:p text:style-name="P492"><text:span text:style-name="T1999"><text:s text:c="8"/>target_label: </text:span><text:span text:style-name="T2000">instance</text:span><text:span text:style-name="T2001"/><text:span text:style-name="T2002"/></text:p>
            <text:p text:style-name="P493"><text:span text:style-name="T2003"><text:s text:c="6"/>- target_label: </text:span><text:span text:style-name="T2004">__address__</text:span><text:span text:style-name="T2005"/><text:span text:style-name="T2006"/></text:p>
            <text:p text:style-name="P494"><text:span text:style-name="T2007"><text:s text:c="8"/>replacement: </text:span><text:span text:style-name="T2008">127.0.0.1:9115</text:span><text:span text:style-name="T2009"/><text:span text:style-name="T2010"/></text:p>
          </table:table-cell>
        </table:table-row>
      </table:table>
      <text:list>
        <text:list-item>
          <text:p text:style-name="P495"><text:span text:style-name="T2011"/><text:bookmark-start text:name="_Toc48"/><text:span text:style-name="T2012">5.3<text:s text:c="2"/>Installation der Exporters</text:span><text:span text:style-name="T2013"/><text:bookmark-end text:name="_Toc48"/><text:span text:style-name="T2014"/><text:span text:style-name="T2015"/></text:p>
        </text:list-item>
      </text:list>
      <text:p text:style-name="P496"><text:span text:style-name="T2016"/><text:span text:style-name="T2017">A</text:span><text:span text:style-name="T2018">uf den Linux-Systemen (Ubuntu-VMs) wurde der Node Exporter als Systemdienst installiert. Er stellt Systemmetriken standardmäßig auf Port 9100 bereit. Auf den Windows-Systemen (Windows Server 2022, Windows 11 Client, Host-Rechner) wurde der Windows Exporter</text:span><text:span text:style-name="T2019"><text:s/></text:span><text:span text:style-name="T2020">als Windows-Dienst installiert. Dieser stellt Metriken auf Port 9182 bereit und wird in der Aufgabenplanung automatisch beim Hochfahren des Rechners gestartet. Ebenfalls auf der Monitoring-VM installiert wurde der Blackbox Exporter, der die Überprüfung der</text:span><text:span text:style-name="T2021"> Erreichbarkeit von Diensten über HTTP- und ICMP-Probes erlaubt.</text:span><text:span text:style-name="T2022"/><text:span text:style-name="T2023"/></text:p>
      <text:list>
        <text:list-item>
          <text:p text:style-name="P497"><text:span text:style-name="T2024"/><text:bookmark-start text:name="_Toc49"/><text:span text:style-name="T2025">5.4<text:s text:c="2"/>Installation und Konfiguration Grafana</text:span><text:span text:style-name="T2026"/><text:bookmark-end text:name="_Toc49"/><text:span text:style-name="T2027"/><text:span text:style-name="T2028"/></text:p>
        </text:list-item>
      </text:list>
      <text:p text:style-name="P498"><text:span text:style-name="T2029">Grafana wurde auf der Monitoring-VM installiert und ist über Port 3000 im Browser erreichbar. Prometheus wurde als Datenquelle eingebunden. Anschließend wurden individu</text:span><text:span text:style-name="T2030">elle Dashboards erstellt, die eine übersichtliche Visualisierung der Metriken je System ermöglichen. Für jedes überwachte System wurde ein eigenes Dashboard-Panel angelegt, das CPU-Auslastung, RAM-Verbrauch, Festplattennutzung und Netzwerk-Traffic anzeigt.</text:span><text:span text:style-name="T2031"/><text:span text:style-name="T2032"/></text:p>
      <text:list>
        <text:list-item>
          <text:p text:style-name="P499"><text:span text:style-name="T2033"/><text:bookmark-start text:name="_Toc50"/><text:span text:style-name="T2034">5.5<text:s text:c="2"/>Konfiguration des Alertings</text:span><text:span text:style-name="T2035"/><text:bookmark-end text:name="_Toc50"/><text:span text:style-name="T2036"/><text:span text:style-name="T2037"/></text:p>
        </text:list-item>
      </text:list>
      <text:p text:style-name="P500"><text:span text:style-name="T2038">Der Alertmanager wurde als Systemdienst installiert und konfiguriert. In Prometheus wurden Alerting-Regeln definiert, die bei folgenden Ereignissen einen Alarm auslösen:</text:span><text:span text:style-name="T2039"/><text:span text:style-name="T2040"/></text:p>
      <text:list text:style-name="WWNum1" text:continue-numbering="true">
        <text:list-item>
          <text:p text:style-name="P501"><text:span text:style-name="T2041">Systemausfall: Exporter eines Zielsystems ist länger als 1 Minute nicht erreichbar</text:span><text:span text:style-name="T2042"/><text:span text:style-name="T2043"/></text:p>
        </text:list-item>
        <text:list-item>
          <text:p text:style-name="P502"><text:span text:style-name="T2044">Hohe CPU-Auslastung: CPU-Nutzung liegt über 90 % für mehr als 5 Minuten</text:span><text:span text:style-name="T2045"/><text:span text:style-name="T2046"/></text:p>
        </text:list-item>
        <text:list-item>
          <text:p text:style-name="P503"><text:span text:style-name="T2047">Kritischer Speichermangel: Freier Festplattenspeicher unter 10 %</text:span><text:span text:style-name="T2048"/><text:span text:style-name="T2049"/></text:p>
        </text:list-item>
        <text:list-item>
          <text:p text:style-name="P504"><text:span text:style-name="T2050">Hohe RAM-Auslastung: Arbeitsspeichernutzung über 85 % für mehr als 5 Minuten</text:span><text:span text:style-name="T2051"/><text:span text:style-name="T2052"/></text:p>
        </text:list-item>
      </text:list>
      <text:p text:style-name="P505"><text:span text:style-name="T2053"/><text:span text:style-name="T2054"/><text:span text:style-name="T2055"/></text:p>
      <text:p text:style-name="P506"><text:span text:style-name="T2056">Der Alertmanager wurde so konfiguriert, dass bei ausgelöstem Alarm automatisch eine E-Mail an die hinterlegte Adresse versandt wird. Die E-Mail enthält Informationen über das betroffene System, die Art des Alarms sowie den Zeitpunkt der Auslösung.</text:span><text:span text:style-name="T2057"/><text:span text:style-name="T2058"/></text:p>
      <text:p text:style-name="P507"><text:span text:style-name="T2059"/><text:span text:style-name="T2060"/><text:span text:style-name="T2061"/></text:p>
      <text:p text:style-name="P508"><text:span text:style-name="T2062"/><text:span text:style-name="T2063"/><text:span text:style-name="T2064"/></text:p>
      <text:list>
        <text:list-item>
          <text:p text:style-name="P509"><text:span text:style-name="T2065"/><text:bookmark-start text:name="_Toc51"/><text:span text:style-name="T2066">6<text:s text:c="2"/>Abnahmephase</text:span><text:span text:style-name="T2067"/><text:bookmark-end text:name="_Toc51"/><text:span text:style-name="T2068"/><text:span text:style-name="T2069"/></text:p>
        </text:list-item>
        <text:list-item>
          <text:p text:style-name="P510"><text:span text:style-name="T2070"/><text:bookmark-start text:name="_Toc52"/><text:span text:style-name="T2071">6.1<text:s text:c="2"/>Durchgeführte Tests</text:span><text:span text:style-name="T2072"/><text:bookmark-end text:name="_Toc52"/><text:span text:style-name="T2073"/><text:span text:style-name="T2074"/></text:p>
        </text:list-item>
      </text:list>
      <text:p text:style-name="P511"><text:span text:style-name="T2075">Nach Abschluss der Implementierung wurden folgende Tests durchgeführt:</text:span><text:span text:style-name="T2076"/><text:span text:style-name="T2077"/></text:p>
      <text:p text:style-name="P512"><text:span text:style-name="T2078"/><text:span text:style-name="T2079"/><text:span text:style-name="T2080"/></text:p>
      <table:table table:style-name="ta8">
        <table:table-columns>
          <table:table-column table:style-name="co22"/>
          <table:table-column table:style-name="co23"/>
          <table:table-column table:style-name="co24"/>
        </table:table-columns>
        <table:table-row table:style-name="ro56" table:default-cell-style-name="ce168">
          <table:table-cell table:style-name="ce169">
            <text:p text:style-name="P513"><text:span text:style-name="T2081">Testfall</text:span><text:span text:style-name="T2082"/><text:span text:style-name="T2083"/></text:p>
          </table:table-cell>
          <table:table-cell table:style-name="ce170">
            <text:p text:style-name="P514"><text:span text:style-name="T2084">Beschreibung</text:span><text:span text:style-name="T2085"/><text:span text:style-name="T2086"/></text:p>
          </table:table-cell>
          <table:table-cell table:style-name="ce171">
            <text:p text:style-name="P515"><text:span text:style-name="T2087">Ergebnis</text:span><text:span text:style-name="T2088"/><text:span text:style-name="T2089"/></text:p>
          </table:table-cell>
        </table:table-row>
        <table:table-row table:style-name="ro57" table:default-cell-style-name="ce168">
          <table:table-cell table:style-name="ce172">
            <text:p text:style-name="P516"><text:span text:style-name="T2090">Exporter-Erreichbarkeit</text:span><text:span text:style-name="T2091"/><text:span text:style-name="T2092"/></text:p>
          </table:table-cell>
          <table:table-cell table:style-name="ce173">
            <text:p text:style-name="P517"><text:span text:style-name="T2093">Alle Exporter wurden in der Prometheus-Oberfläche auf Status 'UP' geprüft</text:span><text:span text:style-name="T2094"/><text:span text:style-name="T2095"/></text:p>
          </table:table-cell>
          <table:table-cell table:style-name="ce174">
            <text:p text:style-name="P518"><text:span text:style-name="T2096">Bestanden</text:span><text:span text:style-name="T2097"/><text:span text:style-name="T2098"/></text:p>
          </table:table-cell>
        </table:table-row>
        <table:table-row table:style-name="ro58" table:default-cell-style-name="ce168">
          <table:table-cell table:style-name="ce175">
            <text:p text:style-name="P519"><text:span text:style-name="T2099">Metrik-Korrektheit</text:span><text:span text:style-name="T2100"/><text:span text:style-name="T2101"/></text:p>
          </table:table-cell>
          <table:table-cell table:style-name="ce176">
            <text:p text:style-name="P520"><text:span text:style-name="T2102">Angezeigte CPU/RAM-Werte wurden mit Taskmanager / htop verglichen</text:span><text:span text:style-name="T2103"/><text:span text:style-name="T2104"/></text:p>
          </table:table-cell>
          <table:table-cell table:style-name="ce177">
            <text:p text:style-name="P521"><text:span text:style-name="T2105">Bestanden</text:span><text:span text:style-name="T2106"/><text:span text:style-name="T2107"/></text:p>
          </table:table-cell>
        </table:table-row>
        <table:table-row table:style-name="ro59" table:default-cell-style-name="ce168">
          <table:table-cell table:style-name="ce178">
            <text:p text:style-name="P522"><text:span text:style-name="T2108">Dashboard-Anzeige</text:span><text:span text:style-name="T2109"/><text:span text:style-name="T2110"/></text:p>
          </table:table-cell>
          <table:table-cell table:style-name="ce179">
            <text:p text:style-name="P523"><text:span text:style-name="T2111">Alle Grafana-Dashboards wurden auf vollständige und korrekte Datenanzeige geprüft</text:span><text:span text:style-name="T2112"/><text:span text:style-name="T2113"/></text:p>
          </table:table-cell>
          <table:table-cell table:style-name="ce180">
            <text:p text:style-name="P524"><text:span text:style-name="T2114">Bestanden</text:span><text:span text:style-name="T2115"/><text:span text:style-name="T2116"/></text:p>
          </table:table-cell>
        </table:table-row>
        <table:table-row table:style-name="ro60" table:default-cell-style-name="ce168">
          <table:table-cell table:style-name="ce181">
            <text:p text:style-name="P525"><text:span text:style-name="T2117">Ausfallsimulation</text:span><text:span text:style-name="T2118"/><text:span text:style-name="T2119"/></text:p>
          </table:table-cell>
          <table:table-cell table:style-name="ce182">
            <text:p text:style-name="P526"><text:span text:style-name="T2120">Eine VM wurde manuell heruntergefahren und die Alert-Auslösung überprüft</text:span><text:span text:style-name="T2121"/><text:span text:style-name="T2122"/></text:p>
          </table:table-cell>
          <table:table-cell table:style-name="ce183">
            <text:p text:style-name="P527"><text:span text:style-name="T2123">Bestanden</text:span><text:span text:style-name="T2124"/><text:span text:style-name="T2125"/></text:p>
          </table:table-cell>
        </table:table-row>
        <table:table-row table:style-name="ro61" table:default-cell-style-name="ce168">
          <table:table-cell table:style-name="ce184">
            <text:p text:style-name="P528"><text:span text:style-name="T2126">E-Mail-Alerting</text:span><text:span text:style-name="T2127"/><text:span text:style-name="T2128"/></text:p>
          </table:table-cell>
          <table:table-cell table:style-name="ce185">
            <text:p text:style-name="P529"><text:span text:style-name="T2129">Nach VM-Ausfall wurde eine automatische E-Mail-Benachrichtigung empfangen</text:span><text:span text:style-name="T2130"/><text:span text:style-name="T2131"/></text:p>
          </table:table-cell>
          <table:table-cell table:style-name="ce186">
            <text:p text:style-name="P530"><text:span text:style-name="T2132">Bestanden</text:span><text:span text:style-name="T2133"/><text:span text:style-name="T2134"/></text:p>
          </table:table-cell>
        </table:table-row>
        <table:table-row table:style-name="ro62" table:default-cell-style-name="ce168">
          <table:table-cell table:style-name="ce187">
            <text:p text:style-name="P531"><text:span text:style-name="T2135">HTTP-Monitoring</text:span><text:span text:style-name="T2136"/><text:span text:style-name="T2137"/></text:p>
          </table:table-cell>
          <table:table-cell table:style-name="ce188">
            <text:p text:style-name="P532"><text:span text:style-name="T2138">Webserver wurde gestoppt, Blackbox Exporter meldete Nichterreichbarkeit korrekt</text:span><text:span text:style-name="T2139"/><text:span text:style-name="T2140"/></text:p>
          </table:table-cell>
          <table:table-cell table:style-name="ce189">
            <text:p text:style-name="P533"><text:span text:style-name="T2141">Bestanden</text:span><text:span text:style-name="T2142"/><text:span text:style-name="T2143"/></text:p>
          </table:table-cell>
        </table:table-row>
      </table:table>
      <text:p text:style-name="P534"><text:span text:style-name="T2144"/><text:span text:style-name="T2145"/><text:span text:style-name="T2146"/></text:p>
      <text:p text:style-name="P535"><text:span text:style-name="T2147">Alle definierten Testfälle w</text:span><text:span text:style-name="T2148">urden erfolgreich bestanden. Das Troubleshooting während der Konfiguration von Prometheus und Grafana erforderte zusätzliche Zeit, da es sich um für den Prüfling neue Technologien handelte. Diese Mehrzeit wurde durch die eingeplante Pufferzeit aufgefangen.</text:span><text:span text:style-name="T2149"/><text:span text:style-name="T2150"/></text:p>
      <text:list>
        <text:list-item>
          <text:p text:style-name="P536"><text:span text:style-name="T2151"/><text:bookmark-start text:name="_Toc53"/><text:span text:style-name="T2152">6.2<text:s text:c="2"/>Abnahme</text:span><text:span text:style-name="T2153"/><text:bookmark-end text:name="_Toc53"/><text:span text:style-name="T2154"/><text:span text:style-name="T2155"/></text:p>
        </text:list-item>
      </text:list>
      <text:p text:style-name="P537"><text:span text:style-name="T2156">Das aufgebaute Monitoring-Sys</text:span><text:span text:style-name="T2157">tem wurde dem IT-Team vorgestellt und demonstriert. Im Rahmen der Präsentation wurden die Dashboards, das E-Mail-Alerting sowie die Nutzwertanalyse präsentiert. Die Abnahme erfolgte auf Basis der nachgewiesenen Funktionsfähigkeit des Systems.</text:span><text:span text:style-name="T2158"/><text:span text:style-name="T2159"/></text:p>
      <text:p text:style-name="P538"><text:span text:style-name="T2160"/><text:span text:style-name="T2161"/><text:span text:style-name="T2162"/></text:p>
      <text:list>
        <text:list-item>
          <text:p text:style-name="P539"><text:span text:style-name="T2163"/><text:bookmark-start text:name="_Toc54"/><text:span text:style-name="T2164">7<text:s text:c="2"/>Dokumentation</text:span><text:span text:style-name="T2165"/><text:bookmark-end text:name="_Toc54"/><text:span text:style-name="T2166"/><text:span text:style-name="T2167"/></text:p>
        </text:list-item>
      </text:list>
      <text:p text:style-name="P540"><text:span text:style-name="T2168">Im Rahmen des Projekts wurde folgende Dokumentation erstellt:</text:span><text:span text:style-name="T2169"/><text:span text:style-name="T2170"/></text:p>
      <text:list text:style-name="WWNum1" text:continue-numbering="true">
        <text:list-item>
          <text:p text:style-name="P541"><text:span text:style-name="T2171">Projektdokumentation (dieses Dokument): Beschreibung aller Projektphasen für die <text:tab/>IHK-Prüfung</text:span><text:span text:style-name="T2172"/><text:span text:style-name="T2173"/></text:p>
        </text:list-item>
        <text:list-item>
          <text:p text:style-name="P542"><text:span text:style-name="T2174">Anleitung für zukünftige Administratoren: Beschreibung der Installation und <text:tab/>Konfiguration aller Komponenten, sodass das System reproduziert oder erweitert <text:tab/>werden kann</text:span><text:span text:style-name="T2175"/><text:span text:style-name="T2176"/></text:p>
        </text:list-item>
        <text:list-item>
          <text:p text:style-name="P543"><text:span text:style-name="T2177">Konfigurationsdateien: prometheus.yml, Alertmanager-Konfiguration und Alert-<text:tab/>Regeln sind kommentiert und als Anlagen beigefügt</text:span><text:span text:style-name="T2178"/><text:span text:style-name="T2179"/></text:p>
        </text:list-item>
        <text:list-item>
          <text:p text:style-name="P544"><text:span text:style-name="T2180">Grafana-Dashboard-Definitionen: Im JSON-Format exportiert für spätere <text:tab/>Wiederverwendung</text:span><text:span text:style-name="T2181"/><text:span text:style-name="T2182"/></text:p>
        </text:list-item>
      </text:list>
      <text:p text:style-name="P545"><text:span text:style-name="T2183"/><text:span text:style-name="T2184"/><text:span text:style-name="T2185"/></text:p>
      <text:p text:style-name="P546"><text:span text:style-name="T2186"/><text:span text:style-name="T2187"/><text:span text:style-name="T2188"/></text:p>
      <text:list>
        <text:list-item>
          <text:p text:style-name="P547"><text:span text:style-name="T2189"/><text:bookmark-start text:name="_Toc55"/><text:span text:style-name="T2190">8<text:s text:c="2"/>Fazit</text:span><text:span text:style-name="T2191"/><text:bookmark-end text:name="_Toc55"/><text:span text:style-name="T2192"/><text:span text:style-name="T2193"/></text:p>
        </text:list-item>
        <text:list-item>
          <text:p text:style-name="P548"><text:span text:style-name="T2194"/><text:bookmark-start text:name="_Toc56"/><text:span text:style-name="T2195">8.1<text:s text:c="2"/>Soll-/Ist-Vergleich</text:span><text:span text:style-name="T2196"/><text:bookmark-end text:name="_Toc56"/><text:span text:style-name="T2197"/><text:span text:style-name="T2198"/></text:p>
        </text:list-item>
      </text:list>
      <text:p text:style-name="P549"><text:span text:style-name="T2199">Die folgende Tabelle vergleicht die geplante mit der tatsächlich aufgewendeten Zeit:</text:span><text:span text:style-name="T2200"/><text:span text:style-name="T2201"/></text:p>
      <text:p text:style-name="P550"><text:span text:style-name="T2202"/><text:span text:style-name="T2203"/><text:span text:style-name="T2204"/></text:p>
      <table:table table:style-name="ta9">
        <table:table-columns>
          <table:table-column table:style-name="co25"/>
          <table:table-column table:style-name="co26"/>
          <table:table-column table:style-name="co27"/>
          <table:table-column table:style-name="co28"/>
        </table:table-columns>
        <table:table-row table:style-name="ro63" table:default-cell-style-name="ce190">
          <table:table-cell table:style-name="ce191">
            <text:p text:style-name="P551"><text:span text:style-name="T2205">Phase</text:span><text:span text:style-name="T2206"/><text:span text:style-name="T2207"/></text:p>
          </table:table-cell>
          <table:table-cell table:style-name="ce192">
            <text:p text:style-name="P552"><text:span text:style-name="T2208">Geplant</text:span><text:span text:style-name="T2209"/><text:span text:style-name="T2210"/></text:p>
          </table:table-cell>
          <table:table-cell table:style-name="ce193">
            <text:p text:style-name="P553"><text:span text:style-name="T2211">Tatsächlich</text:span><text:span text:style-name="T2212"/><text:span text:style-name="T2213"/></text:p>
          </table:table-cell>
          <table:table-cell table:style-name="ce194">
            <text:p text:style-name="P554"><text:span text:style-name="T2214">Differenz</text:span><text:span text:style-name="T2215"/><text:span text:style-name="T2216"/></text:p>
          </table:table-cell>
        </table:table-row>
        <table:table-row table:style-name="ro64" table:default-cell-style-name="ce190">
          <table:table-cell table:style-name="ce195">
            <text:p text:style-name="P555"><text:span text:style-name="T2217">Planungsphase</text:span><text:span text:style-name="T2218"/><text:span text:style-name="T2219"/></text:p>
          </table:table-cell>
          <table:table-cell table:style-name="ce196">
            <text:p text:style-name="P556"><text:span text:style-name="T2220">9,0 Std.</text:span><text:span text:style-name="T2221"/><text:span text:style-name="T2222"/></text:p>
          </table:table-cell>
          <table:table-cell table:style-name="ce197">
            <text:p text:style-name="P557"><text:span text:style-name="T2223">9,0 Std.</text:span><text:span text:style-name="T2224"/><text:span text:style-name="T2225"/></text:p>
          </table:table-cell>
          <table:table-cell table:style-name="ce198">
            <text:p text:style-name="P558"><text:span text:style-name="T2226">0 Std.</text:span><text:span text:style-name="T2227"/><text:span text:style-name="T2228"/></text:p>
          </table:table-cell>
        </table:table-row>
        <table:table-row table:style-name="ro65" table:default-cell-style-name="ce190">
          <table:table-cell table:style-name="ce199">
            <text:p text:style-name="P559"><text:span text:style-name="T2229">Realisierungsphase</text:span><text:span text:style-name="T2230"/><text:span text:style-name="T2231"/></text:p>
          </table:table-cell>
          <table:table-cell table:style-name="ce200">
            <text:p text:style-name="P560"><text:span text:style-name="T2232">20,0 Std.</text:span><text:span text:style-name="T2233"/><text:span text:style-name="T2234"/></text:p>
          </table:table-cell>
          <table:table-cell table:style-name="ce201">
            <text:p text:style-name="P561"><text:span text:style-name="T2235">22,0 Std.</text:span><text:span text:style-name="T2236"/><text:span text:style-name="T2237"/></text:p>
          </table:table-cell>
          <table:table-cell table:style-name="ce202">
            <text:p text:style-name="P562"><text:span text:style-name="T2238">+2,0 Std.</text:span><text:span text:style-name="T2239"/><text:span text:style-name="T2240"/></text:p>
          </table:table-cell>
        </table:table-row>
        <table:table-row table:style-name="ro66" table:default-cell-style-name="ce190">
          <table:table-cell table:style-name="ce203">
            <text:p text:style-name="P563"><text:span text:style-name="T2241">Projektabschluss</text:span><text:span text:style-name="T2242"/><text:span text:style-name="T2243"/></text:p>
          </table:table-cell>
          <table:table-cell table:style-name="ce204">
            <text:p text:style-name="P564"><text:span text:style-name="T2244">11,0 Std.</text:span><text:span text:style-name="T2245"/><text:span text:style-name="T2246"/></text:p>
          </table:table-cell>
          <table:table-cell table:style-name="ce205">
            <text:p text:style-name="P565"><text:span text:style-name="T2247">9,0 Std.</text:span><text:span text:style-name="T2248"/><text:span text:style-name="T2249"/></text:p>
          </table:table-cell>
          <table:table-cell table:style-name="ce206">
            <text:p text:style-name="P566"><text:span text:style-name="T2250">-2,0 Std.</text:span><text:span text:style-name="T2251"/><text:span text:style-name="T2252"/></text:p>
          </table:table-cell>
        </table:table-row>
        <table:table-row table:style-name="ro67" table:default-cell-style-name="ce190">
          <table:table-cell table:style-name="ce207">
            <text:p text:style-name="P567"><text:span text:style-name="T2253">Gesamt</text:span><text:span text:style-name="T2254"/><text:span text:style-name="T2255"/></text:p>
          </table:table-cell>
          <table:table-cell table:style-name="ce208">
            <text:p text:style-name="P568"><text:span text:style-name="T2256">40,0 Std.</text:span><text:span text:style-name="T2257"/><text:span text:style-name="T2258"/></text:p>
          </table:table-cell>
          <table:table-cell table:style-name="ce209">
            <text:p text:style-name="P569"><text:span text:style-name="T2259">40,0 Std.</text:span><text:span text:style-name="T2260"/><text:span text:style-name="T2261"/></text:p>
          </table:table-cell>
          <table:table-cell table:style-name="ce210">
            <text:p text:style-name="P570"><text:span text:style-name="T2262">0 Std.</text:span><text:span text:style-name="T2263"/><text:span text:style-name="T2264"/></text:p>
          </table:table-cell>
        </table:table-row>
      </table:table>
      <text:p text:style-name="P571"><text:span text:style-name="T2265"/><text:span text:style-name="T2266"/><text:span text:style-name="T2267"/></text:p>
      <text:p text:style-name="P572"><text:span text:style-name="T2268">Die Realisierungsphase dauerte aufgrund von Troubleshooting bei der Erstkonfiguration von Prometheus und Grafana etwa</text:span><text:span text:style-name="T2269">s länger als geplant. Da es sich um für den Prüfling neue Technologien handelte, war dieser Mehraufwand nicht vollständig vorhersehbar. Die gewonnene Zeit in der Abschlussphase glich dies aus, sodass das Gesamtprojekt planmäßig abgeschlossen werden konnte.</text:span><text:span text:style-name="T2270"/><text:span text:style-name="T2271"/></text:p>
      <text:p text:style-name="P573"><text:span text:style-name="T2272"/><text:span text:style-name="T2273"/><text:span text:style-name="T2274"/></text:p>
      <text:p text:style-name="P574"><text:span text:style-name="T2275">Da</text:span><text:span text:style-name="T2276">s Projektziel wurde vollständig erreicht: Das Monitoring-System ist funktionsfähig, überwacht alle definierten Systeme, zeigt die Metriken in benutzerfreundlichen Dashboards an und löst bei kritischen Ereignissen automatische E-Mail-Benachrichtigungen aus.</text:span><text:span text:style-name="T2277"/><text:span text:style-name="T2278"/></text:p>
      <text:list>
        <text:list-item>
          <text:p text:style-name="P575"><text:span text:style-name="T2279"/><text:bookmark-start text:name="_Toc57"/><text:span text:style-name="T2280">8.2<text:s text:c="2"/>Nutzwertanalyse: Prometheus/Grafana vs. PRTG</text:span><text:span text:style-name="T2281"/><text:bookmark-end text:name="_Toc57"/><text:span text:style-name="T2282"/><text:span text:style-name="T2283"/></text:p>
        </text:list-item>
      </text:list>
      <text:p text:style-name="P576"><text:span text:style-name="T2284">Die folgende Nutzwertanalyse bewertet beide Lösungen anhand praxisrelevanter Kriterien:</text:span><text:span text:style-name="T2285"/><text:span text:style-name="T2286"/></text:p>
      <text:p text:style-name="P577"><text:span text:style-name="T2287"/><text:span text:style-name="T2288"/><text:span text:style-name="T2289"/></text:p>
      <table:table table:style-name="ta10">
        <table:table-columns>
          <table:table-column table:style-name="co29"/>
          <table:table-column table:style-name="co30"/>
          <table:table-column table:style-name="co31"/>
          <table:table-column table:style-name="co32"/>
        </table:table-columns>
        <table:table-row table:style-name="ro68" table:default-cell-style-name="ce211">
          <table:table-cell table:style-name="ce212">
            <text:p text:style-name="P578"><text:span text:style-name="T2290">Kriterium</text:span><text:span text:style-name="T2291"/><text:span text:style-name="T2292"/></text:p>
          </table:table-cell>
          <table:table-cell table:style-name="ce213">
            <text:p text:style-name="P579"><text:span text:style-name="T2293">Gewicht</text:span><text:span text:style-name="T2294"/><text:span text:style-name="T2295"/></text:p>
          </table:table-cell>
          <table:table-cell table:style-name="ce214">
            <text:p text:style-name="P580"><text:span text:style-name="T2296">PRTG (kostenlos)</text:span><text:span text:style-name="T2297"/><text:span text:style-name="T2298"/></text:p>
          </table:table-cell>
          <table:table-cell table:style-name="ce215">
            <text:p text:style-name="P581"><text:span text:style-name="T2299">Prometheus/Grafana</text:span><text:span text:style-name="T2300"/><text:span text:style-name="T2301"/></text:p>
          </table:table-cell>
        </table:table-row>
        <table:table-row table:style-name="ro69" table:default-cell-style-name="ce211">
          <table:table-cell table:style-name="ce216">
            <text:p text:style-name="P582"><text:span text:style-name="T2302">Lizenzkosten (langfristig)</text:span><text:span text:style-name="T2303"/><text:span text:style-name="T2304"/></text:p>
          </table:table-cell>
          <table:table-cell table:style-name="ce217">
            <text:p text:style-name="P583"><text:span text:style-name="T2305">5</text:span><text:span text:style-name="T2306"/><text:span text:style-name="T2307"/></text:p>
          </table:table-cell>
          <table:table-cell table:style-name="ce218">
            <text:p text:style-name="P584"><text:span text:style-name="T2308">2 (Limit 100 Sensoren)</text:span><text:span text:style-name="T2309"/><text:span text:style-name="T2310"/></text:p>
          </table:table-cell>
          <table:table-cell table:style-name="ce219">
            <text:p text:style-name="P585"><text:span text:style-name="T2311">5 (vollständig kostenfrei)</text:span><text:span text:style-name="T2312"/><text:span text:style-name="T2313"/></text:p>
          </table:table-cell>
        </table:table-row>
        <table:table-row table:style-name="ro70" table:default-cell-style-name="ce211">
          <table:table-cell table:style-name="ce220">
            <text:p text:style-name="P586"><text:span text:style-name="T2314">Skalierbarkeit</text:span><text:span text:style-name="T2315"/><text:span text:style-name="T2316"/></text:p>
          </table:table-cell>
          <table:table-cell table:style-name="ce221">
            <text:p text:style-name="P587"><text:span text:style-name="T2317">5</text:span><text:span text:style-name="T2318"/><text:span text:style-name="T2319"/></text:p>
          </table:table-cell>
          <table:table-cell table:style-name="ce222">
            <text:p text:style-name="P588"><text:span text:style-name="T2320">1 (100 Sensor-Limit)</text:span><text:span text:style-name="T2321"/><text:span text:style-name="T2322"/></text:p>
          </table:table-cell>
          <table:table-cell table:style-name="ce223">
            <text:p text:style-name="P589"><text:span text:style-name="T2323">5 (unbegrenzt)</text:span><text:span text:style-name="T2324"/><text:span text:style-name="T2325"/></text:p>
          </table:table-cell>
        </table:table-row>
        <table:table-row table:style-name="ro71" table:default-cell-style-name="ce211">
          <table:table-cell table:style-name="ce224">
            <text:p text:style-name="P590"><text:span text:style-name="T2326">Dashboard-Flexibilität</text:span><text:span text:style-name="T2327"/><text:span text:style-name="T2328"/></text:p>
          </table:table-cell>
          <table:table-cell table:style-name="ce225">
            <text:p text:style-name="P591"><text:span text:style-name="T2329">4</text:span><text:span text:style-name="T2330"/><text:span text:style-name="T2331"/></text:p>
          </table:table-cell>
          <table:table-cell table:style-name="ce226">
            <text:p text:style-name="P592"><text:span text:style-name="T2332">2 (begrenzt)</text:span><text:span text:style-name="T2333"/><text:span text:style-name="T2334"/></text:p>
          </table:table-cell>
          <table:table-cell table:style-name="ce227">
            <text:p text:style-name="P593"><text:span text:style-name="T2335">5 (vollständig anpassbar)</text:span><text:span text:style-name="T2336"/><text:span text:style-name="T2337"/></text:p>
          </table:table-cell>
        </table:table-row>
        <table:table-row table:style-name="ro72" table:default-cell-style-name="ce211">
          <table:table-cell table:style-name="ce228">
            <text:p text:style-name="P594"><text:span text:style-name="T2338">Einrichtungsaufwand</text:span><text:span text:style-name="T2339"/><text:span text:style-name="T2340"/></text:p>
          </table:table-cell>
          <table:table-cell table:style-name="ce229">
            <text:p text:style-name="P595"><text:span text:style-name="T2341">3</text:span><text:span text:style-name="T2342"/><text:span text:style-name="T2343"/></text:p>
          </table:table-cell>
          <table:table-cell table:style-name="ce230">
            <text:p text:style-name="P596"><text:span text:style-name="T2344">5 (einfach, GUI)</text:span><text:span text:style-name="T2345"/><text:span text:style-name="T2346"/></text:p>
          </table:table-cell>
          <table:table-cell table:style-name="ce231">
            <text:p text:style-name="P597"><text:span text:style-name="T2347">2 (komplex, Konfigurationsdateien)</text:span><text:span text:style-name="T2348"/><text:span text:style-name="T2349"/></text:p>
          </table:table-cell>
        </table:table-row>
        <table:table-row table:style-name="ro73" table:default-cell-style-name="ce211">
          <table:table-cell table:style-name="ce232">
            <text:p text:style-name="P598"><text:span text:style-name="T2350">Dokumentation/Community</text:span><text:span text:style-name="T2351"/><text:span text:style-name="T2352"/></text:p>
          </table:table-cell>
          <table:table-cell table:style-name="ce233">
            <text:p text:style-name="P599"><text:span text:style-name="T2353">3</text:span><text:span text:style-name="T2354"/><text:span text:style-name="T2355"/></text:p>
          </table:table-cell>
          <table:table-cell table:style-name="ce234">
            <text:p text:style-name="P600"><text:span text:style-name="T2356">4 (gut)</text:span><text:span text:style-name="T2357"/><text:span text:style-name="T2358"/></text:p>
          </table:table-cell>
          <table:table-cell table:style-name="ce235">
            <text:p text:style-name="P601"><text:span text:style-name="T2359">5 (sehr gut, große Community, KI-Unterstützung)</text:span><text:span text:style-name="T2360"/><text:span text:style-name="T2361"/></text:p>
          </table:table-cell>
        </table:table-row>
        <table:table-row table:style-name="ro74" table:default-cell-style-name="ce211">
          <table:table-cell table:style-name="ce236">
            <text:p text:style-name="P602"><text:span text:style-name="T2362">Alerting</text:span><text:span text:style-name="T2363"/><text:span text:style-name="T2364"/></text:p>
          </table:table-cell>
          <table:table-cell table:style-name="ce237">
            <text:p text:style-name="P603"><text:span text:style-name="T2365">4</text:span><text:span text:style-name="T2366"/><text:span text:style-name="T2367"/></text:p>
          </table:table-cell>
          <table:table-cell table:style-name="ce238">
            <text:p text:style-name="P604"><text:span text:style-name="T2368">3 (eingeschränkt)</text:span><text:span text:style-name="T2369"/><text:span text:style-name="T2370"/></text:p>
          </table:table-cell>
          <table:table-cell table:style-name="ce239">
            <text:p text:style-name="P605"><text:span text:style-name="T2371">5 (flexibel konfigurierbar)</text:span><text:span text:style-name="T2372"/><text:span text:style-name="T2373"/></text:p>
          </table:table-cell>
        </table:table-row>
        <table:table-row table:style-name="ro75" table:default-cell-style-name="ce211">
          <table:table-cell table:style-name="ce240">
            <text:p text:style-name="P606"><text:span text:style-name="T2374">Wartungsaufwand</text:span><text:span text:style-name="T2375"/><text:span text:style-name="T2376"/></text:p>
          </table:table-cell>
          <table:table-cell table:style-name="ce241">
            <text:p text:style-name="P607"><text:span text:style-name="T2377">3</text:span><text:span text:style-name="T2378"/><text:span text:style-name="T2379"/></text:p>
          </table:table-cell>
          <table:table-cell table:style-name="ce242">
            <text:p text:style-name="P608"><text:span text:style-name="T2380">4 (gering)</text:span><text:span text:style-name="T2381"/><text:span text:style-name="T2382"/></text:p>
          </table:table-cell>
          <table:table-cell table:style-name="ce243">
            <text:p text:style-name="P609"><text:span text:style-name="T2383">3 (moderat)</text:span><text:span text:style-name="T2384"/><text:span text:style-name="T2385"/></text:p>
          </table:table-cell>
        </table:table-row>
        <table:table-row table:style-name="ro76" table:default-cell-style-name="ce211">
          <table:table-cell table:style-name="ce244">
            <text:p text:style-name="P610"><text:span text:style-name="T2386">Nutzwert (gewichtet)</text:span><text:span text:style-name="T2387"/><text:span text:style-name="T2388"/></text:p>
          </table:table-cell>
          <table:table-cell table:style-name="ce245">
            <text:p text:style-name="P611"><text:span text:style-name="T2389"/><text:span text:style-name="T2390"/><text:span text:style-name="T2391"/></text:p>
          </table:table-cell>
          <table:table-cell table:style-name="ce246">
            <text:p text:style-name="P612"><text:span text:style-name="T2392">69 Punkte</text:span><text:span text:style-name="T2393"/><text:span text:style-name="T2394"/></text:p>
          </table:table-cell>
          <table:table-cell table:style-name="ce247">
            <text:p text:style-name="P613"><text:span text:style-name="T2395">108 Punkte</text:span><text:span text:style-name="T2396"/><text:span text:style-name="T2397"/></text:p>
          </table:table-cell>
        </table:table-row>
      </table:table>
      <text:list>
        <text:list-item>
          <text:p text:style-name="P614"><text:span text:style-name="T2398"/><text:bookmark-start text:name="_Toc58"/><text:span text:style-name="T2399">8.3<text:s text:c="2"/>Lessons Learned</text:span><text:span text:style-name="T2400"/><text:bookmark-end text:name="_Toc58"/><text:span text:style-name="T2401"/><text:span text:style-name="T2402"/></text:p>
        </text:list-item>
      </text:list>
      <text:p text:style-name="P615"><text:span text:style-name="T2403">Im Verlauf des Projekts wurden folgende Erkenntnisse gewonnen:</text:span><text:span text:style-name="T2404"/><text:span text:style-name="T2405"/></text:p>
      <text:list text:style-name="WWNum1" text:continue-numbering="true">
        <text:list-item>
          <text:p text:style-name="P616"><text:span text:style-name="T2406">Prometheus und Grafana erfordern in der Einrichtung deutlich mehr <text:tab/>Einarbeitungszeit als grafisch orientierte Tools wie PRTG. Die Konfiguration über <text:tab/>YAML-Dateien bietet jedoch eine deutlich höhere Flexibilität.</text:span><text:span text:style-name="T2407"/><text:span text:style-name="T2408"/></text:p>
        </text:list-item>
        <text:list-item>
          <text:p text:style-name="P617"><text:span text:style-name="T2409">Sobald das System korrekt eingerichtet ist, ist die tägliche Nutzung und Erweiterung <text:tab/>sehr intuitiv.</text:span><text:span text:style-name="T2410"/><text:span text:style-name="T2411"/></text:p>
        </text:list-item>
        <text:list-item>
          <text:p text:style-name="P618"><text:span text:style-name="T2412">Die umfangreiche offizielle Dokumentation, eine aktive Community sowie der <text:tab/>Einsatz von KI-Assistenten (z.B. für Konfigurationsfragen) beschleunigen die <text:tab/>Einarbeitung erheblich und reduzieren Fehler.</text:span><text:span text:style-name="T2413"/><text:span text:style-name="T2414"/></text:p>
        </text:list-item>
        <text:list-item>
          <text:p text:style-name="P619"><text:span text:style-name="T2415">Blackbox Exporter ist ein wertvolles Werkzeug zur Überwachung von <text:tab/>Dienstverfügbarkeit, das PRTG in der kostenlosen Version nur begrenzt bietet.</text:span><text:span text:style-name="T2416"/><text:span text:style-name="T2417"/></text:p>
        </text:list-item>
        <text:list-item>
          <text:p text:style-name="P620"><text:span text:style-name="T2418">Die Einplanung von Pufferzeit ist bei der Einführung neuer Technologien unbedingt <text:tab/>empfehlenswert.</text:span><text:span text:style-name="T2419"/><text:span text:style-name="T2420"/></text:p>
        </text:list-item>
      </text:list>
      <text:list>
        <text:list-item>
          <text:p text:style-name="P621"><text:span text:style-name="T2421"/><text:bookmark-start text:name="_Toc59"/><text:span text:style-name="T2422">8.4<text:s text:c="2"/>Ausblick</text:span><text:span text:style-name="T2423"/><text:bookmark-end text:name="_Toc59"/><text:span text:style-name="T2424"/><text:span text:style-name="T2425"/></text:p>
        </text:list-item>
      </text:list>
      <text:p text:style-name="P622"><text:span text:style-name="T2426">Auf Bas</text:span><text:span text:style-name="T2427">is der Evaluierung wird empfohlen, Prometheus und Grafana als zukünftige Monitoring-Lösung bei Bissantz &amp; Company GmbH einzuführen. Die technische Grundlage ist durch dieses Projekt bereits geschaffen. Als nächste Schritte wären folgende Maßnahmen denkbar:</text:span><text:span text:style-name="T2428"/><text:span text:style-name="T2429"/></text:p>
      <text:list text:style-name="WWNum1" text:continue-numbering="true">
        <text:list-item>
          <text:p text:style-name="P623"><text:span text:style-name="T2430">Migration der produktiven PRTG-Überwachung auf Prometheus/Grafana</text:span><text:span text:style-name="T2431"/><text:span text:style-name="T2432"/></text:p>
        </text:list-item>
        <text:list-item>
          <text:p text:style-name="P624"><text:span text:style-name="T2433">Erweiterung um weitere Exporters, z.B. für Datenbankdienste oder <text:tab/>Anwendungsmonitoring</text:span><text:span text:style-name="T2434"/><text:span text:style-name="T2435"/></text:p>
        </text:list-item>
        <text:list-item>
          <text:p text:style-name="P625"><text:span text:style-name="T2436">Einrichtung von Grafana-Benutzerrollen für unterschiedliche Zugriffsrechte</text:span><text:span text:style-name="T2437"/><text:span text:style-name="T2438"/></text:p>
        </text:list-item>
        <text:list-item>
          <text:p text:style-name="P626"><text:span text:style-name="T2439">Anbindung weiterer Alerting-Kanäle (z.B. Slack, Teams)</text:span><text:span text:style-name="T2440"/><text:span text:style-name="T2441"/></text:p>
        </text:list-item>
        <text:list-item>
          <text:p text:style-name="P627"><text:span text:style-name="T2442">Automatisierte Bereitstellung der Monitoring-Umgebung via Ansible oder Docker <text:tab/>Compose</text:span><text:span text:style-name="T2443"/><text:span text:style-name="T2444"/></text:p>
        </text:list-item>
      </text:list>
      <text:p text:style-name="P628"><text:span text:style-name="T2445"/><text:span text:style-name="T2446"/><text:span text:style-name="T2447"/></text:p>
      <text:p text:style-name="P629"><text:span text:style-name="T2448"><text:soft-page-break/></text:span><text:span text:style-name="T2449"/><text:span text:style-name="T2450"/></text:p>
      <text:p text:style-name="P630"><text:span text:style-name="T2451">9 Quellen</text:span><text:span text:style-name="T2452"/><text:span text:style-name="T2453"/></text:p>
      <text:list text:style-name="WWNum9" text:continue-numbering="true">
        <text:list-item>
          <text:p text:style-name="P631"><text:span text:style-name="T2454"/><text:a xlink:href="https://grafana.com/docs/grafana/latest/visualizations/dashboards/build-dashboards/create-template-dashboards/" xlink:type="simple"><text:span text:style-name="T2455">https://grafana.com/docs/grafana/latest/visualizations/dashboards/build-dashboards/create-template-dashboards/</text:span><text:span text:style-name="T2456"/></text:a><text:span text:style-name="T2457"/><text:span text:style-name="T2458"/><text:span text:style-name="T2459"/><text:span text:style-name="T2460"/><text:span text:style-name="T2461"/></text:p>
        </text:list-item>
      </text:list>
      <text:list text:style-name="WWNum8" text:continue-numbering="true">
        <text:list-item>
          <text:p text:style-name="P632"><text:span text:style-name="T2462"/><text:a xlink:href="https://grafana.com/docs/grafana/latest/visualizations/dashboards/build-dashboards/import-dashboards/" xlink:type="simple"><text:span text:style-name="T2463">https://grafana.com/docs/grafana/latest/visualizations/dashboards/build-dashboards/import-dashboards/</text:span><text:span text:style-name="T2464"/></text:a><text:span text:style-name="T2465"/><text:span text:style-name="T2466"/><text:span text:style-name="T2467"/><text:span text:style-name="T2468"/><text:span text:style-name="T2469"/></text:p>
        </text:list-item>
      </text:list>
      <text:list text:style-name="WWNum7" text:continue-numbering="true">
        <text:list-item>
          <text:p text:style-name="P633"><text:span text:style-name="T2470"/><text:a xlink:href="https://www.atlantic.net/dedicated-server-hosting/how-to-install-grafana-and-prometheus-on-ubuntu-24-04/" xlink:type="simple"><text:span text:style-name="T2471">https://www.atlantic.net/dedicated-server-hosting/how-to-install-grafana-and-prometheus-on-ubuntu-24-04/</text:span><text:span text:style-name="T2472"/><text:span text:style-name="T2473"/></text:a><text:span text:style-name="T2474"/><text:span text:style-name="T2475"/><text:span text:style-name="T2476"/><text:span text:style-name="T2477"/><text:span text:style-name="T2478"/></text:p>
        </text:list-item>
      </text:list>
      <text:p text:style-name="P634"><text:span text:style-name="T2479">Alert Manager</text:span><text:span text:style-name="T2480"/></text:p>
      <text:list text:style-name="WWNum6" text:continue-numbering="true">
        <text:list-item>
          <text:p text:style-name="P635"><text:a xlink:href="https://www.youtube.com/watch?v=YVhKNbQNNss" xlink:type="simple"><text:span text:style-name="T2481">https://www.youtube.com/watch?v=YVhKNbQNNss</text:span><text:span text:style-name="T2482"/></text:a><text:span/><text:span text:style-name="T2483"/></text:p>
        </text:list-item>
      </text:list>
      <text:list text:style-name="WWNum5" text:continue-numbering="true">
        <text:list-item>
          <text:p text:style-name="P636"><text:span text:style-name="T2484"/><text:a xlink:href="https://grafana.com/docs/grafana/latest/alerting/" xlink:type="simple"><text:span text:style-name="T2485">https://grafana.com/docs/grafana/latest/alerting/</text:span><text:span text:style-name="T2486"/><text:span text:style-name="T2487"/></text:a><text:span text:style-name="T2488"/><text:span text:style-name="T2489"/><text:span text:style-name="T2490"/><text:span text:style-name="T2491"/><text:span text:style-name="T2492"/></text:p>
        </text:list-item>
      </text:list>
      <text:p text:style-name="P637"><text:span text:style-name="T2493">Netzwerküberwachung</text:span><text:span text:style-name="T2494"/></text:p>
      <text:list text:style-name="WWNum10" text:continue-numbering="true">
        <text:list-item>
          <text:p text:style-name="P638"><text:span text:style-name="T2495"/><text:a xlink:href="https://www.youtube.com/watch?v=dpVW4aAkZdQ" xlink:type="simple"><text:span text:style-name="T2496">https://www.youtube.com/watch?v=dpVW4aAkZdQ</text:span><text:span text:style-name="T2497"/></text:a><text:span text:style-name="T2498"/><text:span text:style-name="T2499"/><text:span text:style-name="T2500"/><text:span text:style-name="T2501"/><text:span text:style-name="T2502"/></text:p>
        </text:list-item>
      </text:list>
      <text:p text:style-name="P639"><text:span text:style-name="T2503">Dashboard (CPU, RAM, Disk) Syntax</text:span><text:span text:style-name="T2504"/></text:p>
      <text:list text:style-name="WWNum11" text:continue-numbering="true">
        <text:list-item>
          <text:p text:style-name="P640"><text:span text:style-name="T2505"/><text:a xlink:href="https://www.youtube.com/watch?v=YUabB_7H710&amp;t=234s" xlink:type="simple"><text:span text:style-name="T2506">https://www.youtube.com/watch?v=YUabB_7H710&amp;t=234s</text:span><text:span text:style-name="T2507"/><text:span text:style-name="T2508"/></text:a><text:span text:style-name="T2509"/><text:span text:style-name="T2510"/><text:span text:style-name="T2511"/><text:span text:style-name="T2512"/><text:span text:style-name="T2513"/></text:p>
        </text:list-item>
        <text:list-item>
          <text:p text:style-name="P641"><text:span text:style-name="T2514"/><text:span text:style-name="T2515">https://prometheus.io/docs/prometheus/latest/getting_started/</text:span><text:span text:style-name="T2516"/><text:span text:style-name="T2517"/><text:span text:style-name="T2518"/><text:span text:style-name="T2519"/></text:p>
        </text:list-item>
      </text:list>
      <text:p text:style-name="P642"><text:span text:style-name="T2520"/><text:span text:style-name="T2521"><text:soft-page-break/></text:span><text:span text:style-name="T2522"/><text:span/><text:span text:style-name="T2523"/></text:p>
      <text:p text:style-name="P643"><text:span text:style-name="T2524"/></text:p>
      <text:list>
        <text:list-item>
          <text:p text:style-name="P644"><text:span text:style-name="T2525"/><text:bookmark-start text:name="_Toc60"/><text:span text:style-name="T2526">Eidesstattliche Erklärung</text:span><text:span text:style-name="T2527"/><text:bookmark-end text:name="_Toc60"/><text:span text:style-name="T2528"/><text:span text:style-name="T2529"/></text:p>
        </text:list-item>
      </text:list>
      <text:p text:style-name="P645"><text:span text:style-name="T2530"/><text:span text:style-name="T2531"/><text:span text:style-name="T2532"/></text:p>
      <text:p text:style-name="P646"><text:span text:style-name="T2533">Ich, Ioannis Kiourtzidis, versichere hiermit, dass ich meine Dokumentation zur betrieblichen Projektarbeit mit dem Thema</text:span><text:span text:style-name="T2534"/><text:span text:style-name="T2535"/></text:p>
      <text:p text:style-name="P647"><text:span text:style-name="T2536"/><text:span text:style-name="T2537"/><text:span text:style-name="T2538"/></text:p>
      <text:p text:style-name="P648"><text:span text:style-name="T2539">Aufbau einer virtuellen IT-Infrastruktur zur Implementierung eines zentralen Monitoring-Systems</text:span><text:span text:style-name="T2540"/><text:span text:style-name="T2541"/></text:p>
      <text:p text:style-name="P649"><text:span text:style-name="T2542"/><text:span text:style-name="T2543"/><text:span text:style-name="T2544"/></text:p>
      <text:p text:style-name="P650"><text:span text:style-name="T2545">selbständig verfasst und keine anderen als die angegebenen Quellen und Hilfsmittel benutzt habe, wobei ich alle </text:span><text:span text:style-name="T2546">wörtlichen und sinngemäßen Zitate als solche gekennzeichnet habe. Passagen, bei denen KI-Tools als Hilfsmittel zum Einsatz kamen, sind entsprechend ausgewiesen. Die Arbeit wurde bisher keiner anderen Prüfungsbehörde vorgelegt und auch nicht veröffentlicht.</text:span><text:span text:style-name="T2547"/><text:span text:style-name="T2548"/></text:p>
      <text:p text:style-name="P651"><text:span text:style-name="T2549"/><text:span text:style-name="T2550"/><text:span text:style-name="T2551"/></text:p>
      <text:p text:style-name="P652"><text:span text:style-name="T2552"/><text:span text:style-name="T2553"/><text:span text:style-name="T2554"/></text:p>
      <text:p text:style-name="P653"><text:span text:style-name="T2555"/><text:span text:style-name="T2556"/><text:span text:style-name="T2557"/></text:p>
      <text:p text:style-name="P654"><text:span text:style-name="T2558">Nürnberg, den 24.04.2026</text:span><text:span text:style-name="T2559"/><text:span text:style-name="T2560"/></text:p>
      <text:p text:style-name="P655"><text:span text:style-name="T2561"/><text:span text:style-name="T2562"/><text:span text:style-name="T2563"/></text:p>
      <text:p text:style-name="P656"><text:span text:style-name="T2564"/><text:span text:style-name="T2565"/><text:span text:style-name="T2566"/></text:p>
      <text:p text:style-name="P657"><text:span text:style-name="T2567">_______________________________</text:span><text:span text:style-name="T2568"/><text:span text:style-name="T2569"/></text:p>
      <text:p text:style-name="P658"><text:span text:style-name="T2570">Ioannis Kiourtzidis</text:span><text:span text:style-name="T2571"/><text:span text:style-name="T2572"/></text:p>
      <text:p text:style-name="P659"><text:span text:style-name="T2573"/><text:span text:style-name="T2574"/><text:span text:style-name="T2575"/></text:p>
      <text:p text:style-name="P660"><text:span text:style-name="T2576"/><text:span text:style-name="T2577"/><text:span text:style-name="T257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paragraph-properties style:tab-stop-distance="35.45pt"/>
      <style:text-properties fo:font-size="10pt"/>
    </style:default-style>
    <style:default-style style:family="text">
      <style:text-properties/>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display-name="DStyle_paragraph" style:family="paragraph" style:name="667">
      <style:paragraph-properties/>
      <style:text-properties fo:font-size="10pt"/>
    </style:style>
    <style:style style:display-name="DStyle_text" style:family="text" style:name="668">
      <style:paragraph-properties/>
    </style:style>
    <style:style style:parent-style-name="667" style:display-name="DStyle_paragraph" style:family="paragraph" style:name="669">
      <style:paragraph-properties/>
      <style:text-properties fo:font-size="10pt"/>
    </style:style>
    <style:style style:parent-style-name="667" style:display-name="DStyle_text" style:family="text" style:name="670">
      <style:paragraph-properties/>
    </style:style>
    <style:style style:parent-style-name="669" style:display-name="DStyle_paragraph" style:family="paragraph" style:name="671">
      <style:paragraph-properties/>
      <style:text-properties fo:font-size="10pt"/>
    </style:style>
    <style:style style:parent-style-name="667" style:display-name="DStyle_text" style:family="text" style:name="672">
      <style:paragraph-properties/>
    </style:style>
    <style:style style:parent-style-name="671" style:display-name="DStyle_paragraph" style:family="paragraph" style:name="673">
      <style:paragraph-properties/>
      <style:text-properties fo:font-size="10pt"/>
    </style:style>
    <style:style style:parent-style-name="667" style:display-name="DStyle_text" style:family="text" style:name="674">
      <style:paragraph-properties/>
    </style:style>
    <style:style style:parent-style-name="673" style:display-name="DStyle_paragraph" style:family="paragraph" style:name="675">
      <style:paragraph-properties/>
      <style:text-properties fo:font-size="10pt"/>
    </style:style>
    <style:style style:parent-style-name="667" style:display-name="DStyle_text" style:family="text" style:name="676">
      <style:paragraph-properties/>
    </style:style>
    <style:style style:class="default" style:display-name="Normal" style:family="paragraph" style:name="677">
      <style:paragraph-properties/>
      <style:text-properties/>
    </style:style>
    <style:style style:parent-style-name="677" style:display-name="Heading 4" style:family="paragraph" style:name="678">
      <style:paragraph-properties fo:margin-top="4pt" fo:margin-bottom="2pt"/>
      <style:text-properties fo:color="#0f4761" fo:font-family="Arial" style:font-family-complex="Arial" fo:font-style="italic"/>
    </style:style>
    <style:style style:parent-style-name="677" style:display-name="Heading 5" style:family="paragraph" style:name="679">
      <style:paragraph-properties fo:margin-top="4pt" fo:margin-bottom="2pt"/>
      <style:text-properties fo:color="#0f4761" fo:font-family="Arial" style:font-family-complex="Arial"/>
    </style:style>
    <style:style style:parent-style-name="677" style:display-name="Heading 6" style:family="paragraph" style:name="680">
      <style:paragraph-properties fo:margin-top="2pt" fo:margin-bottom="0pt"/>
      <style:text-properties fo:color="#595959" fo:font-family="Arial" style:font-family-complex="Arial" fo:font-style="italic"/>
    </style:style>
    <style:style style:parent-style-name="677" style:display-name="Heading 7" style:family="paragraph" style:name="681">
      <style:paragraph-properties fo:margin-top="2pt" fo:margin-bottom="0pt"/>
      <style:text-properties fo:color="#595959" fo:font-family="Arial" style:font-family-complex="Arial"/>
    </style:style>
    <style:style style:parent-style-name="677" style:display-name="Heading 8" style:family="paragraph" style:name="682">
      <style:paragraph-properties fo:margin-bottom="0pt"/>
      <style:text-properties fo:color="#272727" fo:font-family="Arial" style:font-family-complex="Arial" fo:font-style="italic"/>
    </style:style>
    <style:style style:parent-style-name="677" style:display-name="Heading 9" style:family="paragraph" style:name="683">
      <style:paragraph-properties fo:margin-bottom="0pt"/>
      <style:text-properties fo:color="#272727" fo:font-family="Arial" style:font-family-complex="Arial" fo:font-style="italic"/>
    </style:style>
    <style:style style:parent-style-name="751" style:display-name="Heading 1 Char" style:family="text" style:name="684">
      <style:paragraph-properties/>
      <style:text-properties fo:color="#0f4761" fo:font-family="Arial" style:font-family-complex="Arial" fo:font-size="20pt" style:font-size-complex="20pt"/>
    </style:style>
    <style:style style:parent-style-name="751" style:display-name="Heading 2 Char" style:family="text" style:name="685">
      <style:paragraph-properties/>
      <style:text-properties fo:color="#0f4761" fo:font-family="Arial" style:font-family-complex="Arial" fo:font-size="16pt" style:font-size-complex="16pt"/>
    </style:style>
    <style:style style:parent-style-name="751" style:display-name="Heading 3 Char" style:family="text" style:name="686">
      <style:paragraph-properties/>
      <style:text-properties fo:color="#0f4761" fo:font-family="Arial" style:font-family-complex="Arial" fo:font-size="14pt" style:font-size-complex="14pt"/>
    </style:style>
    <style:style style:parent-style-name="751" style:display-name="Heading 4 Char" style:family="text" style:name="687">
      <style:paragraph-properties/>
      <style:text-properties fo:color="#0f4761" fo:font-family="Arial" style:font-family-complex="Arial" fo:font-style="italic"/>
    </style:style>
    <style:style style:parent-style-name="751" style:display-name="Heading 5 Char" style:family="text" style:name="688">
      <style:paragraph-properties/>
      <style:text-properties fo:color="#0f4761" fo:font-family="Arial" style:font-family-complex="Arial"/>
    </style:style>
    <style:style style:parent-style-name="751" style:display-name="Heading 6 Char" style:family="text" style:name="689">
      <style:paragraph-properties/>
      <style:text-properties fo:color="#595959" fo:font-family="Arial" style:font-family-complex="Arial" fo:font-style="italic"/>
    </style:style>
    <style:style style:parent-style-name="751" style:display-name="Heading 7 Char" style:family="text" style:name="690">
      <style:paragraph-properties/>
      <style:text-properties fo:color="#595959" fo:font-family="Arial" style:font-family-complex="Arial"/>
    </style:style>
    <style:style style:parent-style-name="751" style:display-name="Heading 8 Char" style:family="text" style:name="691">
      <style:paragraph-properties/>
      <style:text-properties fo:color="#272727" fo:font-family="Arial" style:font-family-complex="Arial" fo:font-style="italic"/>
    </style:style>
    <style:style style:parent-style-name="751" style:display-name="Heading 9 Char" style:family="text" style:name="692">
      <style:paragraph-properties/>
      <style:text-properties fo:color="#272727" fo:font-family="Arial" style:font-family-complex="Arial" fo:font-style="italic"/>
    </style:style>
    <style:style style:parent-style-name="677" style:display-name="Title" style:family="paragraph" style:name="693">
      <style:paragraph-properties fo:line-height="100%" fo:margin-bottom="4pt"/>
      <style:text-properties fo:font-family="Arial" style:font-family-complex="Arial" fo:font-size="28pt" style:font-size-complex="28pt" fo:letter-spacing="-0.5pt"/>
    </style:style>
    <style:style style:parent-style-name="751" style:display-name="Title Char" style:family="text" style:name="694">
      <style:paragraph-properties/>
      <style:text-properties fo:font-family="Arial" style:font-family-complex="Arial" fo:font-size="28pt" style:font-size-complex="28pt" fo:letter-spacing="-0.5pt"/>
    </style:style>
    <style:style style:parent-style-name="677" style:display-name="Subtitle" style:family="paragraph" style:name="695">
      <style:paragraph-properties/>
      <style:text-properties fo:color="#595959" fo:font-size="14pt" style:font-size-complex="14pt" fo:letter-spacing="0.75pt"/>
    </style:style>
    <style:style style:parent-style-name="751" style:display-name="Subtitle Char" style:family="text" style:name="696">
      <style:paragraph-properties/>
      <style:text-properties fo:color="#595959" fo:font-size="14pt" style:font-size-complex="14pt" fo:letter-spacing="0.75pt"/>
    </style:style>
    <style:style style:parent-style-name="677" style:display-name="Quote" style:family="paragraph" style:name="697">
      <style:paragraph-properties fo:text-align="center" fo:margin-top="8pt"/>
      <style:text-properties fo:color="#404040" fo:font-style="italic"/>
    </style:style>
    <style:style style:parent-style-name="751" style:display-name="Quote Char" style:family="text" style:name="698">
      <style:paragraph-properties/>
      <style:text-properties fo:color="#404040" fo:font-style="italic"/>
    </style:style>
    <style:style style:parent-style-name="751" style:display-name="Intense Emphasis" style:family="text" style:name="699">
      <style:paragraph-properties/>
      <style:text-properties fo:color="#0f4761" fo:font-style="italic"/>
    </style:style>
    <style:style style:parent-style-name="677" style:display-name="Intense Quote" style:family="paragraph" style:name="700">
      <style:paragraph-properties fo:text-align="center" fo:margin-left="1.524cm" fo:margin-right="1.524cm" fo:text-indent="0cm" fo:margin-top="18pt" fo:margin-bottom="18pt" fo:border-top="0.01764cm solid #0F4761" fo:border-bottom="0.01764cm solid #0F4761"/>
      <style:text-properties fo:color="#0f4761" fo:font-style="italic"/>
    </style:style>
    <style:style style:parent-style-name="751" style:display-name="Intense Quote Char" style:family="text" style:name="701">
      <style:paragraph-properties/>
      <style:text-properties fo:color="#0f4761" fo:font-style="italic"/>
    </style:style>
    <style:style style:parent-style-name="751" style:display-name="Intense Reference" style:family="text" style:name="702">
      <style:paragraph-properties/>
      <style:text-properties fo:font-variant="small-caps" fo:color="#0f4761" fo:letter-spacing="0.25pt" fo:font-weight="bold"/>
    </style:style>
    <style:style style:parent-style-name="677" style:display-name="No Spacing" style:family="paragraph" style:name="703">
      <style:paragraph-properties fo:line-height="100%" fo:margin-bottom="0pt"/>
    </style:style>
    <style:style style:parent-style-name="751" style:display-name="Subtle Emphasis" style:family="text" style:name="704">
      <style:paragraph-properties/>
      <style:text-properties fo:color="#404040" fo:font-style="italic"/>
    </style:style>
    <style:style style:parent-style-name="751" style:display-name="Emphasis" style:family="text" style:name="705">
      <style:paragraph-properties/>
      <style:text-properties fo:font-style="italic"/>
    </style:style>
    <style:style style:parent-style-name="751" style:display-name="Strong" style:family="text" style:name="706">
      <style:paragraph-properties/>
      <style:text-properties fo:font-weight="bold"/>
    </style:style>
    <style:style style:parent-style-name="751" style:display-name="Subtle Reference" style:family="text" style:name="707">
      <style:paragraph-properties/>
      <style:text-properties fo:font-variant="small-caps" fo:color="#5a5a5a"/>
    </style:style>
    <style:style style:parent-style-name="751" style:display-name="Book Title" style:family="text" style:name="708">
      <style:paragraph-properties/>
      <style:text-properties fo:letter-spacing="0.25pt" fo:font-style="italic" fo:font-weight="bold"/>
    </style:style>
    <style:style style:parent-style-name="751" style:display-name="Header Char" style:family="text" style:name="709">
      <style:paragraph-properties/>
    </style:style>
    <style:style style:parent-style-name="751" style:display-name="Footer Char" style:family="text" style:name="710">
      <style:paragraph-properties/>
    </style:style>
    <style:style style:parent-style-name="677" style:display-name="footnote text" style:family="paragraph" style:name="711">
      <style:paragraph-properties fo:line-height="100%" fo:margin-bottom="0pt"/>
      <style:text-properties fo:font-size="10pt" style:font-size-complex="10pt"/>
    </style:style>
    <style:style style:parent-style-name="751" style:display-name="Footnote Text Char" style:family="text" style:name="712">
      <style:paragraph-properties/>
      <style:text-properties fo:font-size="10pt" style:font-size-complex="10pt"/>
    </style:style>
    <style:style style:parent-style-name="751" style:display-name="footnote reference" style:family="text" style:name="713">
      <style:paragraph-properties/>
      <style:text-properties style:text-position="super 58%"/>
    </style:style>
    <style:style style:parent-style-name="677" style:display-name="endnote text" style:family="paragraph" style:name="714">
      <style:paragraph-properties fo:line-height="100%" fo:margin-bottom="0pt"/>
      <style:text-properties fo:font-size="10pt" style:font-size-complex="10pt"/>
    </style:style>
    <style:style style:parent-style-name="751" style:display-name="Endnote Text Char" style:family="text" style:name="715">
      <style:paragraph-properties/>
      <style:text-properties fo:font-size="10pt" style:font-size-complex="10pt"/>
    </style:style>
    <style:style style:parent-style-name="751" style:display-name="endnote reference" style:family="text" style:name="716">
      <style:paragraph-properties/>
      <style:text-properties style:text-position="super 58%"/>
    </style:style>
    <style:style style:parent-style-name="751" style:display-name="Hyperlink" style:family="text" style:name="717">
      <style:paragraph-properties/>
      <style:text-properties fo:color="#0563c1" style:text-underline-type="single" style:text-underline-style="solid" style:text-underline-width="auto" style:text-underline-color="font-color"/>
    </style:style>
    <style:style style:display-name="Internet link" style:family="text" style:name="Internet_20_link">
      <style:text-properties fo:color="#0563c1" style:text-underline-type="single" style:text-underline-style="solid" style:text-underline-width="auto" style:text-underline-color="font-color"/>
    </style:style>
    <style:style style:parent-style-name="677" style:display-name="Internet link" style:family="text" style:name="718">
      <style:paragraph-properties/>
      <style:text-properties fo:color="#0563c1" style:text-underline-type="single" style:text-underline-style="solid" style:text-underline-width="auto" style:text-underline-color="font-color"/>
    </style:style>
    <style:style style:parent-style-name="677" style:display-name="Internet link" style:family="text" style:name="719">
      <style:paragraph-properties/>
      <style:text-properties fo:color="#0563c1" style:text-underline-type="single" style:text-underline-style="solid" style:text-underline-width="auto" style:text-underline-color="font-color"/>
    </style:style>
    <style:style style:parent-style-name="677" style:display-name="Internet link" style:family="text" style:name="720">
      <style:paragraph-properties/>
      <style:text-properties fo:color="#0563c1" style:text-underline-type="single" style:text-underline-style="solid" style:text-underline-width="auto" style:text-underline-color="font-color"/>
    </style:style>
    <style:style style:parent-style-name="677" style:display-name="Internet link" style:family="text" style:name="721">
      <style:paragraph-properties/>
      <style:text-properties fo:color="#0563c1" style:text-underline-type="single" style:text-underline-style="solid" style:text-underline-width="auto" style:text-underline-color="font-color"/>
    </style:style>
    <style:style style:parent-style-name="677" style:display-name="Internet link" style:family="text" style:name="722">
      <style:paragraph-properties/>
      <style:text-properties fo:color="#0563c1" style:text-underline-type="single" style:text-underline-style="solid" style:text-underline-width="auto" style:text-underline-color="font-color"/>
    </style:style>
    <style:style style:parent-style-name="751" style:display-name="FollowedHyperlink" style:family="text" style:name="723">
      <style:paragraph-properties/>
      <style:text-properties fo:color="#954f72" style:text-underline-type="single" style:text-underline-style="solid" style:text-underline-width="auto" style:text-underline-color="font-color"/>
    </style:style>
    <style:style style:parent-style-name="677" style:display-name="toc 1" style:family="paragraph" style:name="724">
      <style:paragraph-properties fo:margin-bottom="5pt"/>
      <style:text-properties/>
    </style:style>
    <style:style style:parent-style-name="677" style:display-name="toc 2" style:family="paragraph" style:name="725">
      <style:paragraph-properties fo:margin-left="0.3881cm" fo:margin-right="0cm" fo:text-indent="0cm" fo:margin-bottom="5pt"/>
      <style:text-properties/>
    </style:style>
    <style:style style:parent-style-name="677" style:display-name="toc 3" style:family="paragraph" style:name="726">
      <style:paragraph-properties fo:margin-left="0.7762cm" fo:margin-right="0cm" fo:text-indent="0cm" fo:margin-bottom="5pt"/>
      <style:text-properties/>
    </style:style>
    <style:style style:parent-style-name="677" style:display-name="toc 4" style:family="paragraph" style:name="727">
      <style:paragraph-properties fo:margin-left="1.164cm" fo:margin-right="0cm" fo:text-indent="0cm" fo:margin-bottom="5pt"/>
    </style:style>
    <style:style style:parent-style-name="677" style:display-name="toc 5" style:family="paragraph" style:name="728">
      <style:paragraph-properties fo:margin-left="1.552cm" fo:margin-right="0cm" fo:text-indent="0cm" fo:margin-bottom="5pt"/>
    </style:style>
    <style:style style:parent-style-name="677" style:display-name="toc 6" style:family="paragraph" style:name="729">
      <style:paragraph-properties fo:margin-left="1.94cm" fo:margin-right="0cm" fo:text-indent="0cm" fo:margin-bottom="5pt"/>
    </style:style>
    <style:style style:parent-style-name="677" style:display-name="toc 7" style:family="paragraph" style:name="730">
      <style:paragraph-properties fo:margin-left="2.328cm" fo:margin-right="0cm" fo:text-indent="0cm" fo:margin-bottom="5pt"/>
    </style:style>
    <style:style style:parent-style-name="677" style:display-name="toc 8" style:family="paragraph" style:name="731">
      <style:paragraph-properties fo:margin-left="2.717cm" fo:margin-right="0cm" fo:text-indent="0cm" fo:margin-bottom="5pt"/>
    </style:style>
    <style:style style:parent-style-name="677" style:display-name="toc 9" style:family="paragraph" style:name="732">
      <style:paragraph-properties fo:margin-left="3.105cm" fo:margin-right="0cm" fo:text-indent="0cm" fo:margin-bottom="5pt"/>
    </style:style>
    <style:style style:parent-style-name="751" style:display-name="Placeholder Text" style:family="text" style:name="733">
      <style:paragraph-properties/>
      <style:text-properties fo:color="#666666"/>
    </style:style>
    <style:style style:parent-style-name="677" style:display-name="TOC Heading" style:family="paragraph" style:name="734">
      <style:paragraph-properties/>
    </style:style>
    <style:style style:parent-style-name="677" style:display-name="table of figures" style:family="paragraph" style:name="735">
      <style:paragraph-properties fo:margin-bottom="0pt"/>
    </style:style>
    <style:style style:parent-style-name="677" style:display-name="DStyle_paragraph" style:family="paragraph" style:name="736">
      <style:paragraph-properties/>
      <style:text-properties fo:color="#000000" fo:font-family="Liberation Serif" style:font-family-complex="Liberation Serif" fo:font-size="12pt" style:font-size-complex="12pt" fo:language="de" style:language-complex="hi" fo:country="DE" style:country-complex="IN"/>
    </style:style>
    <style:style style:parent-style-name="736" style:display-name="Standard" style:family="paragraph" style:name="737">
      <style:paragraph-properties/>
      <style:text-properties/>
    </style:style>
    <style:style style:parent-style-name="737" style:display-name="Heading" style:family="paragraph" style:name="738">
      <style:paragraph-properties fo:margin-top="12pt" fo:margin-bottom="6pt"/>
      <style:text-properties fo:font-family="Liberation Sans" style:font-family-complex="Liberation Sans" fo:font-size="14pt" style:font-size-complex="14pt"/>
    </style:style>
    <style:style style:parent-style-name="737" style:display-name="Text body" style:family="paragraph" style:name="739">
      <style:paragraph-properties fo:line-height="115%" fo:margin-top="0pt" fo:margin-bottom="7pt"/>
    </style:style>
    <style:style style:parent-style-name="739" style:display-name="List" style:family="paragraph" style:name="740">
      <style:paragraph-properties/>
    </style:style>
    <style:style style:parent-style-name="737" style:display-name="Caption" style:family="paragraph" style:name="741">
      <style:paragraph-properties fo:margin-top="6pt" fo:margin-bottom="6pt"/>
      <style:text-properties fo:font-size="12pt" style:font-size-complex="12pt" fo:font-style="italic"/>
    </style:style>
    <style:style style:parent-style-name="737" style:display-name="Index" style:family="paragraph" style:name="742">
      <style:paragraph-properties/>
    </style:style>
    <style:style style:parent-style-name="737" style:display-name="Header and Footer" style:family="paragraph" style:name="743">
      <style:paragraph-properties>
        <style:tab-stops>
          <style:tab-stop style:position="8.499cm" style:type="center"/>
          <style:tab-stop style:position="17cm" style:type="right"/>
        </style:tab-stops>
      </style:paragraph-properties>
    </style:style>
    <style:style style:parent-style-name="743" style:display-name="Header" style:family="paragraph" style:name="744">
      <style:paragraph-properties>
        <style:tab-stops>
          <style:tab-stop style:position="8.499cm" style:type="center"/>
          <style:tab-stop style:position="17cm" style:type="right"/>
        </style:tab-stops>
      </style:paragraph-properties>
    </style:style>
    <style:style style:parent-style-name="743" style:display-name="Footer" style:family="paragraph" style:name="745">
      <style:paragraph-properties>
        <style:tab-stops>
          <style:tab-stop style:position="8.499cm" style:type="center"/>
          <style:tab-stop style:position="17cm" style:type="right"/>
        </style:tab-stops>
      </style:paragraph-properties>
    </style:style>
    <style:style style:parent-style-name="736" style:display-name="List Paragraph" style:family="paragraph" style:name="746">
      <style:paragraph-properties fo:text-align="left"/>
      <style:text-properties fo:font-family="Arial" style:font-family-complex="Arial" fo:font-size="11pt" style:font-size-complex="11pt" fo:language="de" style:language-complex="ar" fo:country="DE" style:country-complex="SA"/>
    </style:style>
    <style:style style:parent-style-name="738" style:display-name="Heading 2" style:family="paragraph" style:name="747">
      <style:paragraph-properties fo:margin-top="10pt" fo:margin-bottom="6pt"/>
      <style:text-properties fo:font-size="16pt" style:font-size-complex="16pt" fo:font-weight="bold"/>
    </style:style>
    <style:style style:parent-style-name="738" style:display-name="Heading 3" style:family="paragraph" style:name="748">
      <style:paragraph-properties fo:margin-top="7pt" fo:margin-bottom="6pt"/>
      <style:text-properties fo:font-size="14pt" style:font-size-complex="14pt" fo:font-weight="bold"/>
    </style:style>
    <style:style style:parent-style-name="738" style:display-name="Heading 1" style:family="paragraph" style:name="749">
      <style:paragraph-properties fo:margin-top="12pt" fo:margin-bottom="6pt"/>
      <style:text-properties fo:font-size="18pt" style:font-size-complex="18pt" fo:font-weight="bold"/>
    </style:style>
    <style:style style:parent-style-name="737" style:display-name="Comment" style:family="paragraph" style:name="750">
      <style:paragraph-properties fo:line-height="100%" fo:margin-left="0.1005cm" fo:margin-right="0.1005cm" fo:text-indent="0cm" fo:margin-top="2.8pt" fo:margin-bottom="0pt"/>
      <style:text-properties fo:color="#000000" fo:font-size="10pt" style:font-size-complex="10pt"/>
    </style:style>
    <style:style style:class="default" style:display-name="Default Paragraph Font" style:family="text" style:name="751">
      <style:paragraph-properties/>
      <style:text-properties/>
    </style:style>
    <style:style style:parent-style-name="751" style:display-name="Überschrift 1 Zchn" style:family="text" style:name="752">
      <style:paragraph-properties/>
      <style:text-properties fo:color="#1f4e79" fo:font-size="16pt" style:font-size-complex="16pt" fo:font-weight="bold"/>
    </style:style>
    <style:style style:parent-style-name="751" style:display-name="Überschrift 2 Zchn" style:family="text" style:name="753">
      <style:paragraph-properties/>
      <style:text-properties fo:color="#2e74b5" fo:font-size="13pt" style:font-size-complex="13pt" fo:font-weight="bold"/>
    </style:style>
    <style:style style:parent-style-name="751" style:display-name="Überschrift 3 Zchn" style:family="text" style:name="754">
      <style:paragraph-properties/>
      <style:text-properties fo:color="#404040" fo:font-weight="bold"/>
    </style:style>
    <style:style style:parent-style-name="677" style:display-name="ListLabel 1" style:family="text" style:name="755">
      <style:paragraph-properties/>
    </style:style>
    <style:style style:parent-style-name="677" style:display-name="ListLabel 2" style:family="text" style:name="756">
      <style:paragraph-properties/>
    </style:style>
    <style:style style:parent-style-name="677" style:display-name="ListLabel 3" style:family="text" style:name="757">
      <style:paragraph-properties/>
    </style:style>
    <style:style style:parent-style-name="677" style:display-name="ListLabel 4" style:family="text" style:name="758">
      <style:paragraph-properties/>
    </style:style>
    <style:style style:parent-style-name="677" style:display-name="ListLabel 5" style:family="text" style:name="759">
      <style:paragraph-properties/>
    </style:style>
    <style:style style:parent-style-name="677" style:display-name="ListLabel 6" style:family="text" style:name="760">
      <style:paragraph-properties/>
    </style:style>
    <style:style style:parent-style-name="677" style:display-name="ListLabel 7" style:family="text" style:name="761">
      <style:paragraph-properties/>
    </style:style>
    <style:style style:parent-style-name="677" style:display-name="ListLabel 8" style:family="text" style:name="762">
      <style:paragraph-properties/>
    </style:style>
    <style:style style:parent-style-name="677" style:display-name="ListLabel 9" style:family="text" style:name="763">
      <style:paragraph-properties/>
    </style:style>
    <style:style style:parent-style-name="677" style:display-name="T1" style:family="text" style:name="764">
      <style:paragraph-properties/>
    </style:style>
    <style:style style:parent-style-name="677" style:display-name="T2" style:family="text" style:name="765">
      <style:paragraph-properties/>
    </style:style>
    <style:style style:parent-style-name="677" style:display-name="T3" style:family="text" style:name="766">
      <style:paragraph-properties/>
    </style:style>
    <style:style style:parent-style-name="677" style:display-name="T4" style:family="text" style:name="767">
      <style:paragraph-properties/>
    </style:style>
    <style:style style:parent-style-name="677" style:display-name="T5" style:family="text" style:name="768">
      <style:paragraph-properties/>
    </style:style>
    <style:style style:parent-style-name="677" style:display-name="T6" style:family="text" style:name="769">
      <style:paragraph-properties/>
    </style:style>
    <style:style style:parent-style-name="677" style:display-name="T7" style:family="text" style:name="770">
      <style:paragraph-properties/>
    </style:style>
    <style:style style:parent-style-name="677" style:display-name="T8" style:family="text" style:name="771">
      <style:paragraph-properties/>
    </style:style>
    <style:style style:parent-style-name="677" style:display-name="T9" style:family="text" style:name="772">
      <style:paragraph-properties/>
    </style:style>
    <style:style style:parent-style-name="677" style:display-name="T10" style:family="text" style:name="773">
      <style:paragraph-properties/>
    </style:style>
    <style:style style:parent-style-name="677" style:display-name="T11" style:family="text" style:name="774">
      <style:paragraph-properties/>
    </style:style>
    <style:style style:parent-style-name="677" style:display-name="T12" style:family="text" style:name="775">
      <style:paragraph-properties/>
    </style:style>
    <style:style style:parent-style-name="677" style:display-name="T13" style:family="text" style:name="776">
      <style:paragraph-properties/>
    </style:style>
    <style:style style:parent-style-name="677" style:display-name="T14" style:family="text" style:name="777">
      <style:paragraph-properties/>
    </style:style>
    <style:style style:parent-style-name="677" style:display-name="T15" style:family="text" style:name="778">
      <style:paragraph-properties/>
    </style:style>
    <style:style style:parent-style-name="677" style:display-name="T16" style:family="text" style:name="779">
      <style:paragraph-properties/>
    </style:style>
    <style:style style:parent-style-name="677" style:display-name="T17" style:family="text" style:name="780">
      <style:paragraph-properties/>
    </style:style>
    <style:style style:parent-style-name="677" style:display-name="T18" style:family="text" style:name="781">
      <style:paragraph-properties/>
    </style:style>
    <style:style style:parent-style-name="677" style:display-name="T1" style:family="text" style:name="782">
      <style:paragraph-properties/>
    </style:style>
    <style:style style:parent-style-name="677" style:display-name="T2" style:family="text" style:name="783">
      <style:paragraph-properties/>
    </style:style>
    <style:style style:parent-style-name="677" style:display-name="T3" style:family="text" style:name="784">
      <style:paragraph-properties/>
    </style:style>
    <style:style style:parent-style-name="677" style:display-name="T4" style:family="text" style:name="785">
      <style:paragraph-properties/>
    </style:style>
    <style:style style:parent-style-name="677" style:display-name="T5" style:family="text" style:name="786">
      <style:paragraph-properties/>
    </style:style>
    <style:style style:parent-style-name="677" style:display-name="T6" style:family="text" style:name="787">
      <style:paragraph-properties/>
    </style:style>
    <style:style style:parent-style-name="677" style:display-name="T7" style:family="text" style:name="788">
      <style:paragraph-properties/>
    </style:style>
    <style:style style:parent-style-name="677" style:display-name="T8" style:family="text" style:name="789">
      <style:paragraph-properties/>
    </style:style>
    <style:style style:parent-style-name="677" style:display-name="T9" style:family="text" style:name="790">
      <style:paragraph-properties/>
    </style:style>
    <style:style style:parent-style-name="677" style:display-name="T10" style:family="text" style:name="791">
      <style:paragraph-properties/>
    </style:style>
    <style:style style:parent-style-name="677" style:display-name="T11" style:family="text" style:name="792">
      <style:paragraph-properties/>
    </style:style>
    <style:style style:parent-style-name="677" style:display-name="T12" style:family="text" style:name="793">
      <style:paragraph-properties/>
    </style:style>
    <style:style style:parent-style-name="677" style:display-name="T13" style:family="text" style:name="794">
      <style:paragraph-properties/>
    </style:style>
    <style:style style:parent-style-name="677" style:display-name="T14" style:family="text" style:name="795">
      <style:paragraph-properties/>
    </style:style>
    <style:style style:parent-style-name="677" style:display-name="T15" style:family="text" style:name="796">
      <style:paragraph-properties/>
    </style:style>
    <style:style style:parent-style-name="677" style:display-name="T16" style:family="text" style:name="797">
      <style:paragraph-properties/>
    </style:style>
    <style:style style:parent-style-name="677" style:display-name="T17" style:family="text" style:name="798">
      <style:paragraph-properties/>
    </style:style>
    <style:style style:parent-style-name="677" style:display-name="T18" style:family="text" style:name="799">
      <style:paragraph-properties/>
    </style:style>
    <style:style style:parent-style-name="677" style:display-name="T1" style:family="text" style:name="800">
      <style:paragraph-properties/>
    </style:style>
    <style:style style:parent-style-name="677" style:display-name="T2" style:family="text" style:name="801">
      <style:paragraph-properties/>
    </style:style>
    <style:style style:parent-style-name="677" style:display-name="T3" style:family="text" style:name="802">
      <style:paragraph-properties/>
    </style:style>
    <style:style style:parent-style-name="677" style:display-name="T4" style:family="text" style:name="803">
      <style:paragraph-properties/>
    </style:style>
    <style:style style:parent-style-name="677" style:display-name="T5" style:family="text" style:name="804">
      <style:paragraph-properties/>
    </style:style>
    <style:style style:parent-style-name="677" style:display-name="T6" style:family="text" style:name="805">
      <style:paragraph-properties/>
    </style:style>
    <style:style style:parent-style-name="677" style:display-name="T7" style:family="text" style:name="806">
      <style:paragraph-properties/>
    </style:style>
    <style:style style:parent-style-name="677" style:display-name="T8" style:family="text" style:name="807">
      <style:paragraph-properties/>
    </style:style>
    <style:style style:parent-style-name="677" style:display-name="T9" style:family="text" style:name="808">
      <style:paragraph-properties/>
    </style:style>
    <style:style style:parent-style-name="677" style:display-name="T10" style:family="text" style:name="809">
      <style:paragraph-properties/>
    </style:style>
    <style:style style:parent-style-name="677" style:display-name="T11" style:family="text" style:name="810">
      <style:paragraph-properties/>
    </style:style>
    <style:style style:parent-style-name="677" style:display-name="T12" style:family="text" style:name="811">
      <style:paragraph-properties/>
    </style:style>
    <style:style style:parent-style-name="677" style:display-name="T13" style:family="text" style:name="812">
      <style:paragraph-properties/>
    </style:style>
    <style:style style:parent-style-name="677" style:display-name="T14" style:family="text" style:name="813">
      <style:paragraph-properties/>
    </style:style>
    <style:style style:parent-style-name="677" style:display-name="T15" style:family="text" style:name="814">
      <style:paragraph-properties/>
    </style:style>
    <style:style style:parent-style-name="677" style:display-name="T16" style:family="text" style:name="815">
      <style:paragraph-properties/>
    </style:style>
    <style:style style:parent-style-name="677" style:display-name="T17" style:family="text" style:name="816">
      <style:paragraph-properties/>
    </style:style>
    <style:style style:parent-style-name="677" style:display-name="T18" style:family="text" style:name="817">
      <style:paragraph-properties/>
    </style:style>
    <style:style style:parent-style-name="677" style:display-name="T1" style:family="text" style:name="818">
      <style:paragraph-properties/>
    </style:style>
    <style:style style:parent-style-name="677" style:display-name="T2" style:family="text" style:name="819">
      <style:paragraph-properties/>
    </style:style>
    <style:style style:parent-style-name="677" style:display-name="T3" style:family="text" style:name="820">
      <style:paragraph-properties/>
    </style:style>
    <style:style style:parent-style-name="677" style:display-name="T4" style:family="text" style:name="821">
      <style:paragraph-properties/>
    </style:style>
    <style:style style:parent-style-name="677" style:display-name="T5" style:family="text" style:name="822">
      <style:paragraph-properties/>
    </style:style>
    <style:style style:parent-style-name="677" style:display-name="T6" style:family="text" style:name="823">
      <style:paragraph-properties/>
    </style:style>
    <style:style style:parent-style-name="677" style:display-name="T7" style:family="text" style:name="824">
      <style:paragraph-properties/>
    </style:style>
    <style:style style:parent-style-name="677" style:display-name="T8" style:family="text" style:name="825">
      <style:paragraph-properties/>
    </style:style>
    <style:style style:parent-style-name="677" style:display-name="T9" style:family="text" style:name="826">
      <style:paragraph-properties/>
    </style:style>
    <style:style style:parent-style-name="677" style:display-name="T10" style:family="text" style:name="827">
      <style:paragraph-properties/>
    </style:style>
    <style:style style:parent-style-name="677" style:display-name="T11" style:family="text" style:name="828">
      <style:paragraph-properties/>
    </style:style>
    <style:style style:parent-style-name="677" style:display-name="T12" style:family="text" style:name="829">
      <style:paragraph-properties/>
    </style:style>
    <style:style style:parent-style-name="677" style:display-name="T13" style:family="text" style:name="830">
      <style:paragraph-properties/>
    </style:style>
    <style:style style:parent-style-name="677" style:display-name="T14" style:family="text" style:name="831">
      <style:paragraph-properties/>
    </style:style>
    <style:style style:parent-style-name="677" style:display-name="T15" style:family="text" style:name="832">
      <style:paragraph-properties/>
    </style:style>
    <style:style style:parent-style-name="677" style:display-name="T16" style:family="text" style:name="833">
      <style:paragraph-properties/>
    </style:style>
    <style:style style:parent-style-name="677" style:display-name="T17" style:family="text" style:name="834">
      <style:paragraph-properties/>
    </style:style>
    <style:style style:parent-style-name="677" style:display-name="T18" style:family="text" style:name="835">
      <style:paragraph-properties/>
    </style:style>
    <style:style style:parent-style-name="677" style:display-name="T1" style:family="text" style:name="836">
      <style:paragraph-properties/>
    </style:style>
    <style:style style:parent-style-name="677" style:display-name="T2" style:family="text" style:name="837">
      <style:paragraph-properties/>
    </style:style>
    <style:style style:parent-style-name="677" style:display-name="T3" style:family="text" style:name="838">
      <style:paragraph-properties/>
    </style:style>
    <style:style style:parent-style-name="677" style:display-name="T4" style:family="text" style:name="839">
      <style:paragraph-properties/>
    </style:style>
    <style:style style:parent-style-name="677" style:display-name="T5" style:family="text" style:name="840">
      <style:paragraph-properties/>
    </style:style>
    <style:style style:parent-style-name="677" style:display-name="T6" style:family="text" style:name="841">
      <style:paragraph-properties/>
    </style:style>
    <style:style style:parent-style-name="677" style:display-name="T7" style:family="text" style:name="842">
      <style:paragraph-properties/>
    </style:style>
    <style:style style:parent-style-name="677" style:display-name="T8" style:family="text" style:name="843">
      <style:paragraph-properties/>
    </style:style>
    <style:style style:parent-style-name="677" style:display-name="T9" style:family="text" style:name="844">
      <style:paragraph-properties/>
    </style:style>
    <style:style style:parent-style-name="677" style:display-name="T10" style:family="text" style:name="845">
      <style:paragraph-properties/>
    </style:style>
    <style:style style:parent-style-name="677" style:display-name="T11" style:family="text" style:name="846">
      <style:paragraph-properties/>
    </style:style>
    <style:style style:parent-style-name="677" style:display-name="T12" style:family="text" style:name="847">
      <style:paragraph-properties/>
    </style:style>
    <style:style style:parent-style-name="677" style:display-name="T13" style:family="text" style:name="848">
      <style:paragraph-properties/>
    </style:style>
    <style:style style:parent-style-name="677" style:display-name="T14" style:family="text" style:name="849">
      <style:paragraph-properties/>
    </style:style>
    <style:style style:parent-style-name="677" style:display-name="T15" style:family="text" style:name="850">
      <style:paragraph-properties/>
    </style:style>
    <style:style style:parent-style-name="677" style:display-name="T16" style:family="text" style:name="851">
      <style:paragraph-properties/>
    </style:style>
    <style:style style:parent-style-name="677" style:display-name="T17" style:family="text" style:name="852">
      <style:paragraph-properties/>
    </style:style>
    <style:style style:parent-style-name="677" style:display-name="T18" style:family="text" style:name="853">
      <style:paragraph-properties/>
    </style:style>
    <style:style style:family="text" style:name="T1">
      <style:text-properties/>
    </style:style>
    <style:style style:family="text" style:name="T2">
      <style:text-properties/>
    </style:style>
    <style:style style:family="text" style:name="T3">
      <style:text-properties/>
    </style:style>
    <style:style style:family="text" style:name="T4">
      <style:text-properties/>
    </style:style>
    <style:style style:family="text" style:name="T5">
      <style:text-properties/>
    </style:style>
    <style:style style:family="text" style:name="T6">
      <style:text-properties/>
    </style:style>
    <style:style style:family="text" style:name="T7">
      <style:text-properties/>
    </style:style>
    <style:style style:family="text" style:name="T8">
      <style:text-properties/>
    </style:style>
    <style:style style:family="text" style:name="T9">
      <style:text-properties/>
    </style:style>
    <style:style style:family="text" style:name="T10">
      <style:text-properties/>
    </style:style>
    <style:style style:family="text" style:name="T11">
      <style:text-properties/>
    </style:style>
    <style:style style:family="text" style:name="T12">
      <style:text-properties/>
    </style:style>
    <style:style style:family="text" style:name="T13">
      <style:text-properties/>
    </style:style>
    <style:style style:family="text" style:name="T14">
      <style:text-properties/>
    </style:style>
    <style:style style:family="text" style:name="T15">
      <style:text-properties/>
    </style:style>
    <style:style style:family="text" style:name="T16">
      <style:text-properties/>
    </style:style>
    <style:style style:family="text" style:name="T17">
      <style:text-properties/>
    </style:style>
    <style:style style:family="text" style:name="T18">
      <style:text-properties/>
    </style:style>
    <style:style style:family="text" style:name="T19">
      <style:text-properties fo:font-family="Arial" style:font-family-asian="Arial" style:font-family-complex="Arial"/>
    </style:style>
    <style:style style:family="text" style:name="T20">
      <style:text-properties fo:font-family="Courier New" style:font-family-asian="Courier New" style:font-family-complex="Courier New"/>
    </style:style>
    <style:style style:family="text" style:name="T21">
      <style:text-properties fo:font-family="Wingdings" style:font-family-asian="Wingdings" style:font-family-complex="Wingdings"/>
    </style:style>
    <style:style style:family="text" style:name="T22">
      <style:text-properties fo:font-family="Symbol" style:font-family-asian="Symbol" style:font-family-complex="Symbol"/>
    </style:style>
    <style:style style:family="text" style:name="T23">
      <style:text-properties fo:font-family="Courier New" style:font-family-asian="Courier New" style:font-family-complex="Courier New"/>
    </style:style>
    <style:style style:family="text" style:name="T24">
      <style:text-properties fo:font-family="Wingdings" style:font-family-asian="Wingdings" style:font-family-complex="Wingdings"/>
    </style:style>
    <style:style style:family="text" style:name="T25">
      <style:text-properties fo:font-family="Symbol" style:font-family-asian="Symbol" style:font-family-complex="Symbol"/>
    </style:style>
    <style:style style:family="text" style:name="T26">
      <style:text-properties fo:font-family="Courier New" style:font-family-asian="Courier New" style:font-family-complex="Courier New"/>
    </style:style>
    <style:style style:family="text" style:name="T27">
      <style:text-properties fo:font-family="Wingdings" style:font-family-asian="Wingdings" style:font-family-complex="Wingdings"/>
    </style:style>
    <style:style style:family="text" style:name="T28">
      <style:text-properties fo:font-family="Arial" style:font-family-asian="Arial" style:font-family-complex="Arial"/>
    </style:style>
    <style:style style:family="text" style:name="T29">
      <style:text-properties fo:font-family="Courier New" style:font-family-asian="Courier New" style:font-family-complex="Courier New"/>
    </style:style>
    <style:style style:family="text" style:name="T30">
      <style:text-properties fo:font-family="Wingdings" style:font-family-asian="Wingdings" style:font-family-complex="Wingdings"/>
    </style:style>
    <style:style style:family="text" style:name="T31">
      <style:text-properties fo:font-family="Symbol" style:font-family-asian="Symbol" style:font-family-complex="Symbol"/>
    </style:style>
    <style:style style:family="text" style:name="T32">
      <style:text-properties fo:font-family="Courier New" style:font-family-asian="Courier New" style:font-family-complex="Courier New"/>
    </style:style>
    <style:style style:family="text" style:name="T33">
      <style:text-properties fo:font-family="Wingdings" style:font-family-asian="Wingdings" style:font-family-complex="Wingdings"/>
    </style:style>
    <style:style style:family="text" style:name="T34">
      <style:text-properties fo:font-family="Symbol" style:font-family-asian="Symbol" style:font-family-complex="Symbol"/>
    </style:style>
    <style:style style:family="text" style:name="T35">
      <style:text-properties fo:font-family="Courier New" style:font-family-asian="Courier New" style:font-family-complex="Courier New"/>
    </style:style>
    <style:style style:family="text" style:name="T36">
      <style:text-properties fo:font-family="Wingdings" style:font-family-asian="Wingdings" style:font-family-complex="Wingdings"/>
    </style:style>
    <style:style style:family="text" style:name="T37">
      <style:text-properties fo:font-family="Arial" style:font-family-asian="Arial" style:font-family-complex="Arial"/>
    </style:style>
    <style:style style:family="text" style:name="T38">
      <style:text-properties fo:font-family="Courier New" style:font-family-asian="Courier New" style:font-family-complex="Courier New"/>
    </style:style>
    <style:style style:family="text" style:name="T39">
      <style:text-properties fo:font-family="Wingdings" style:font-family-asian="Wingdings" style:font-family-complex="Wingdings"/>
    </style:style>
    <style:style style:family="text" style:name="T40">
      <style:text-properties fo:font-family="Symbol" style:font-family-asian="Symbol" style:font-family-complex="Symbol"/>
    </style:style>
    <style:style style:family="text" style:name="T41">
      <style:text-properties fo:font-family="Courier New" style:font-family-asian="Courier New" style:font-family-complex="Courier New"/>
    </style:style>
    <style:style style:family="text" style:name="T42">
      <style:text-properties fo:font-family="Wingdings" style:font-family-asian="Wingdings" style:font-family-complex="Wingdings"/>
    </style:style>
    <style:style style:family="text" style:name="T43">
      <style:text-properties fo:font-family="Symbol" style:font-family-asian="Symbol" style:font-family-complex="Symbol"/>
    </style:style>
    <style:style style:family="text" style:name="T44">
      <style:text-properties fo:font-family="Courier New" style:font-family-asian="Courier New" style:font-family-complex="Courier New"/>
    </style:style>
    <style:style style:family="text" style:name="T45">
      <style:text-properties fo:font-family="Wingdings" style:font-family-asian="Wingdings" style:font-family-complex="Wingdings"/>
    </style:style>
    <style:style style:family="text" style:name="T46">
      <style:text-properties fo:font-family="Arial" style:font-family-asian="Arial" style:font-family-complex="Arial"/>
    </style:style>
    <style:style style:family="text" style:name="T47">
      <style:text-properties fo:font-family="Courier New" style:font-family-asian="Courier New" style:font-family-complex="Courier New"/>
    </style:style>
    <style:style style:family="text" style:name="T48">
      <style:text-properties fo:font-family="Wingdings" style:font-family-asian="Wingdings" style:font-family-complex="Wingdings"/>
    </style:style>
    <style:style style:family="text" style:name="T49">
      <style:text-properties fo:font-family="Symbol" style:font-family-asian="Symbol" style:font-family-complex="Symbol"/>
    </style:style>
    <style:style style:family="text" style:name="T50">
      <style:text-properties fo:font-family="Courier New" style:font-family-asian="Courier New" style:font-family-complex="Courier New"/>
    </style:style>
    <style:style style:family="text" style:name="T51">
      <style:text-properties fo:font-family="Wingdings" style:font-family-asian="Wingdings" style:font-family-complex="Wingdings"/>
    </style:style>
    <style:style style:family="text" style:name="T52">
      <style:text-properties fo:font-family="Symbol" style:font-family-asian="Symbol" style:font-family-complex="Symbol"/>
    </style:style>
    <style:style style:family="text" style:name="T53">
      <style:text-properties fo:font-family="Courier New" style:font-family-asian="Courier New" style:font-family-complex="Courier New"/>
    </style:style>
    <style:style style:family="text" style:name="T54">
      <style:text-properties fo:font-family="Wingdings" style:font-family-asian="Wingdings" style:font-family-complex="Wingdings"/>
    </style:style>
    <style:style style:family="text" style:name="T55">
      <style:text-properties fo:font-family="Arial" style:font-family-asian="Arial" style:font-family-complex="Arial"/>
    </style:style>
    <style:style style:family="text" style:name="T56">
      <style:text-properties fo:font-family="Courier New" style:font-family-asian="Courier New" style:font-family-complex="Courier New"/>
    </style:style>
    <style:style style:family="text" style:name="T57">
      <style:text-properties fo:font-family="Wingdings" style:font-family-asian="Wingdings" style:font-family-complex="Wingdings"/>
    </style:style>
    <style:style style:family="text" style:name="T58">
      <style:text-properties fo:font-family="Symbol" style:font-family-asian="Symbol" style:font-family-complex="Symbol"/>
    </style:style>
    <style:style style:family="text" style:name="T59">
      <style:text-properties fo:font-family="Courier New" style:font-family-asian="Courier New" style:font-family-complex="Courier New"/>
    </style:style>
    <style:style style:family="text" style:name="T60">
      <style:text-properties fo:font-family="Wingdings" style:font-family-asian="Wingdings" style:font-family-complex="Wingdings"/>
    </style:style>
    <style:style style:family="text" style:name="T61">
      <style:text-properties fo:font-family="Symbol" style:font-family-asian="Symbol" style:font-family-complex="Symbol"/>
    </style:style>
    <style:style style:family="text" style:name="T62">
      <style:text-properties fo:font-family="Courier New" style:font-family-asian="Courier New" style:font-family-complex="Courier New"/>
    </style:style>
    <style:style style:family="text" style:name="T63">
      <style:text-properties fo:font-family="Wingdings" style:font-family-asian="Wingdings" style:font-family-complex="Wingdings"/>
    </style:style>
    <style:style style:family="text" style:name="T64">
      <style:text-properties fo:font-family="Arial" style:font-family-asian="Arial" style:font-family-complex="Arial"/>
    </style:style>
    <style:style style:family="text" style:name="T65">
      <style:text-properties fo:font-family="Courier New" style:font-family-asian="Courier New" style:font-family-complex="Courier New"/>
    </style:style>
    <style:style style:family="text" style:name="T66">
      <style:text-properties fo:font-family="Wingdings" style:font-family-asian="Wingdings" style:font-family-complex="Wingdings"/>
    </style:style>
    <style:style style:family="text" style:name="T67">
      <style:text-properties fo:font-family="Symbol" style:font-family-asian="Symbol" style:font-family-complex="Symbol"/>
    </style:style>
    <style:style style:family="text" style:name="T68">
      <style:text-properties fo:font-family="Courier New" style:font-family-asian="Courier New" style:font-family-complex="Courier New"/>
    </style:style>
    <style:style style:family="text" style:name="T69">
      <style:text-properties fo:font-family="Wingdings" style:font-family-asian="Wingdings" style:font-family-complex="Wingdings"/>
    </style:style>
    <style:style style:family="text" style:name="T70">
      <style:text-properties fo:font-family="Symbol" style:font-family-asian="Symbol" style:font-family-complex="Symbol"/>
    </style:style>
    <style:style style:family="text" style:name="T71">
      <style:text-properties fo:font-family="Courier New" style:font-family-asian="Courier New" style:font-family-complex="Courier New"/>
    </style:style>
    <style:style style:family="text" style:name="T72">
      <style:text-properties fo:font-family="Wingdings" style:font-family-asian="Wingdings" style:font-family-complex="Wingdings"/>
    </style:style>
    <style:style style:family="text" style:name="T73">
      <style:text-properties fo:font-family="Arial" style:font-family-asian="Arial" style:font-family-complex="Arial"/>
    </style:style>
    <style:style style:family="text" style:name="T74">
      <style:text-properties fo:font-family="Courier New" style:font-family-asian="Courier New" style:font-family-complex="Courier New"/>
    </style:style>
    <style:style style:family="text" style:name="T75">
      <style:text-properties fo:font-family="Wingdings" style:font-family-asian="Wingdings" style:font-family-complex="Wingdings"/>
    </style:style>
    <style:style style:family="text" style:name="T76">
      <style:text-properties fo:font-family="Symbol" style:font-family-asian="Symbol" style:font-family-complex="Symbol"/>
    </style:style>
    <style:style style:family="text" style:name="T77">
      <style:text-properties fo:font-family="Courier New" style:font-family-asian="Courier New" style:font-family-complex="Courier New"/>
    </style:style>
    <style:style style:family="text" style:name="T78">
      <style:text-properties fo:font-family="Wingdings" style:font-family-asian="Wingdings" style:font-family-complex="Wingdings"/>
    </style:style>
    <style:style style:family="text" style:name="T79">
      <style:text-properties fo:font-family="Symbol" style:font-family-asian="Symbol" style:font-family-complex="Symbol"/>
    </style:style>
    <style:style style:family="text" style:name="T80">
      <style:text-properties fo:font-family="Courier New" style:font-family-asian="Courier New" style:font-family-complex="Courier New"/>
    </style:style>
    <style:style style:family="text" style:name="T81">
      <style:text-properties fo:font-family="Wingdings" style:font-family-asian="Wingdings" style:font-family-complex="Wingdings"/>
    </style:style>
    <style:style style:family="text" style:name="T82">
      <style:text-properties fo:font-family="Arial" style:font-family-asian="Arial" style:font-family-complex="Arial"/>
    </style:style>
    <style:style style:family="text" style:name="T83">
      <style:text-properties fo:font-family="Courier New" style:font-family-asian="Courier New" style:font-family-complex="Courier New"/>
    </style:style>
    <style:style style:family="text" style:name="T84">
      <style:text-properties fo:font-family="Wingdings" style:font-family-asian="Wingdings" style:font-family-complex="Wingdings"/>
    </style:style>
    <style:style style:family="text" style:name="T85">
      <style:text-properties fo:font-family="Symbol" style:font-family-asian="Symbol" style:font-family-complex="Symbol"/>
    </style:style>
    <style:style style:family="text" style:name="T86">
      <style:text-properties fo:font-family="Courier New" style:font-family-asian="Courier New" style:font-family-complex="Courier New"/>
    </style:style>
    <style:style style:family="text" style:name="T87">
      <style:text-properties fo:font-family="Wingdings" style:font-family-asian="Wingdings" style:font-family-complex="Wingdings"/>
    </style:style>
    <style:style style:family="text" style:name="T88">
      <style:text-properties fo:font-family="Symbol" style:font-family-asian="Symbol" style:font-family-complex="Symbol"/>
    </style:style>
    <style:style style:family="text" style:name="T89">
      <style:text-properties fo:font-family="Courier New" style:font-family-asian="Courier New" style:font-family-complex="Courier New"/>
    </style:style>
    <style:style style:family="text" style:name="T90">
      <style:text-properties fo:font-family="Wingdings" style:font-family-asian="Wingdings" style:font-family-complex="Wingdings"/>
    </style:style>
    <style:style style:family="text" style:name="T91">
      <style:text-properties fo:font-family="Arial" style:font-family-asian="Arial" style:font-family-complex="Arial"/>
    </style:style>
    <style:style style:family="text" style:name="T92">
      <style:text-properties fo:font-family="Courier New" style:font-family-asian="Courier New" style:font-family-complex="Courier New"/>
    </style:style>
    <style:style style:family="text" style:name="T93">
      <style:text-properties fo:font-family="Wingdings" style:font-family-asian="Wingdings" style:font-family-complex="Wingdings"/>
    </style:style>
    <style:style style:family="text" style:name="T94">
      <style:text-properties fo:font-family="Symbol" style:font-family-asian="Symbol" style:font-family-complex="Symbol"/>
    </style:style>
    <style:style style:family="text" style:name="T95">
      <style:text-properties fo:font-family="Courier New" style:font-family-asian="Courier New" style:font-family-complex="Courier New"/>
    </style:style>
    <style:style style:family="text" style:name="T96">
      <style:text-properties fo:font-family="Wingdings" style:font-family-asian="Wingdings" style:font-family-complex="Wingdings"/>
    </style:style>
    <style:style style:family="text" style:name="T97">
      <style:text-properties fo:font-family="Symbol" style:font-family-asian="Symbol" style:font-family-complex="Symbol"/>
    </style:style>
    <style:style style:family="text" style:name="T98">
      <style:text-properties fo:font-family="Courier New" style:font-family-asian="Courier New" style:font-family-complex="Courier New"/>
    </style:style>
    <style:style style:family="text" style:name="T99">
      <style:text-properties fo:font-family="Wingdings" style:font-family-asian="Wingdings" style:font-family-complex="Wingdings"/>
    </style:style>
    <text:list-style style:name="WWNum1">
      <text:list-level-style-bullet text:level="1" text:style-name="T1" text:bullet-char="•      ">
        <style:list-level-properties text:list-level-position-and-space-mode="label-alignment">
          <style:list-level-label-alignment fo:text-indent="-0.635cm" fo:margin-left="1.27cm"/>
        </style:list-level-properties>
        <style:text-properties/>
      </text:list-level-style-bullet>
      <text:list-level-style-number text:level="2" text:style-name="T2" style:num-format="1">
        <style:list-level-properties text:list-level-position-and-space-mode="label-alignment">
          <style:list-level-label-alignment fo:margin-left="0cm"/>
        </style:list-level-properties>
        <style:text-properties/>
      </text:list-level-style-number>
      <text:list-level-style-number text:level="3" text:style-name="T3" style:num-format="1">
        <style:list-level-properties text:list-level-position-and-space-mode="label-alignment">
          <style:list-level-label-alignment fo:margin-left="0cm"/>
        </style:list-level-properties>
        <style:text-properties/>
      </text:list-level-style-number>
      <text:list-level-style-number text:level="4" text:style-name="T4" style:num-format="1">
        <style:list-level-properties text:list-level-position-and-space-mode="label-alignment">
          <style:list-level-label-alignment fo:margin-left="0cm"/>
        </style:list-level-properties>
        <style:text-properties/>
      </text:list-level-style-number>
      <text:list-level-style-number text:level="5" text:style-name="T5" style:num-format="1">
        <style:list-level-properties text:list-level-position-and-space-mode="label-alignment">
          <style:list-level-label-alignment fo:margin-left="0cm"/>
        </style:list-level-properties>
        <style:text-properties/>
      </text:list-level-style-number>
      <text:list-level-style-number text:level="6" text:style-name="T6" style:num-format="1">
        <style:list-level-properties text:list-level-position-and-space-mode="label-alignment">
          <style:list-level-label-alignment fo:margin-left="0cm"/>
        </style:list-level-properties>
        <style:text-properties/>
      </text:list-level-style-number>
      <text:list-level-style-number text:level="7" text:style-name="T7" style:num-format="1">
        <style:list-level-properties text:list-level-position-and-space-mode="label-alignment">
          <style:list-level-label-alignment fo:margin-left="0cm"/>
        </style:list-level-properties>
        <style:text-properties/>
      </text:list-level-style-number>
      <text:list-level-style-number text:level="8" text:style-name="T8" style:num-format="1">
        <style:list-level-properties text:list-level-position-and-space-mode="label-alignment">
          <style:list-level-label-alignment fo:margin-left="0cm"/>
        </style:list-level-properties>
        <style:text-properties/>
      </text:list-level-style-number>
      <text:list-level-style-number text:level="9" text:style-name="T9" style:num-format="1">
        <style:list-level-properties text:list-level-position-and-space-mode="label-alignment">
          <style:list-level-label-alignment fo:margin-left="0cm"/>
        </style:list-level-properties>
        <style:text-properties/>
      </text:list-level-style-number>
    </text:list-style>
    <text:list-style style:name="WWNum2">
      <text:list-level-style-bullet text:level="1" text:style-name="T10" text:bullet-char="•     ">
        <style:list-level-properties text:list-level-position-and-space-mode="label-alignment">
          <style:list-level-label-alignment fo:margin-left="0cm"/>
        </style:list-level-properties>
        <style:text-properties/>
      </text:list-level-style-bullet>
      <text:list-level-style-bullet text:level="2" text:style-name="T11" text:bullet-char="•     ">
        <style:list-level-properties text:list-level-position-and-space-mode="label-alignment">
          <style:list-level-label-alignment fo:margin-left="0cm"/>
        </style:list-level-properties>
        <style:text-properties/>
      </text:list-level-style-bullet>
      <text:list-level-style-bullet text:level="3" text:style-name="T12" text:bullet-char="•     ">
        <style:list-level-properties text:list-level-position-and-space-mode="label-alignment">
          <style:list-level-label-alignment fo:margin-left="0cm"/>
        </style:list-level-properties>
        <style:text-properties/>
      </text:list-level-style-bullet>
      <text:list-level-style-bullet text:level="4" text:style-name="T13" text:bullet-char="•     ">
        <style:list-level-properties text:list-level-position-and-space-mode="label-alignment">
          <style:list-level-label-alignment fo:margin-left="0cm"/>
        </style:list-level-properties>
        <style:text-properties/>
      </text:list-level-style-bullet>
      <text:list-level-style-bullet text:level="5" text:style-name="T14" text:bullet-char="•     ">
        <style:list-level-properties text:list-level-position-and-space-mode="label-alignment">
          <style:list-level-label-alignment fo:margin-left="0cm"/>
        </style:list-level-properties>
        <style:text-properties/>
      </text:list-level-style-bullet>
      <text:list-level-style-bullet text:level="6" text:style-name="T15" text:bullet-char="•     ">
        <style:list-level-properties text:list-level-position-and-space-mode="label-alignment">
          <style:list-level-label-alignment fo:margin-left="0cm"/>
        </style:list-level-properties>
        <style:text-properties/>
      </text:list-level-style-bullet>
      <text:list-level-style-bullet text:level="7" text:style-name="T16" text:bullet-char="•     ">
        <style:list-level-properties text:list-level-position-and-space-mode="label-alignment">
          <style:list-level-label-alignment fo:margin-left="0cm"/>
        </style:list-level-properties>
        <style:text-properties/>
      </text:list-level-style-bullet>
      <text:list-level-style-bullet text:level="8" text:style-name="T17" text:bullet-char="•     ">
        <style:list-level-properties text:list-level-position-and-space-mode="label-alignment">
          <style:list-level-label-alignment fo:margin-left="0cm"/>
        </style:list-level-properties>
        <style:text-properties/>
      </text:list-level-style-bullet>
      <text:list-level-style-bullet text:level="9" text:style-name="T18" text:bullet-char="•     ">
        <style:list-level-properties text:list-level-position-and-space-mode="label-alignment">
          <style:list-level-label-alignment fo:margin-left="0cm"/>
        </style:list-level-properties>
        <style:text-properties/>
      </text:list-level-style-bullet>
    </text:list-style>
    <text:list-style style:name="WWNum3">
      <text:list-level-style-bullet text:level="1" text:style-name="T19" text:bullet-char="–">
        <style:list-level-properties text:list-level-position-and-space-mode="label-alignment">
          <style:list-level-label-alignment fo:text-indent="-0.635cm" fo:margin-left="1.251cm"/>
        </style:list-level-properties>
        <style:text-properties fo:font-family="Arial" style:font-family-asian="Arial" style:font-family-complex="Arial"/>
      </text:list-level-style-bullet>
      <text:list-level-style-bullet text:level="2" text:style-name="T20"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21"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22"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23"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24"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25"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26"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27"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4">
      <text:list-level-style-bullet text:level="1" text:style-name="T28" text:bullet-char="–">
        <style:list-level-properties text:list-level-position-and-space-mode="label-alignment">
          <style:list-level-label-alignment fo:text-indent="-0.635cm" fo:margin-left="1.251cm"/>
        </style:list-level-properties>
        <style:text-properties fo:font-family="Arial" style:font-family-asian="Arial" style:font-family-complex="Arial"/>
      </text:list-level-style-bullet>
      <text:list-level-style-bullet text:level="2" text:style-name="T29"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30"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31"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32"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33"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34"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35"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36"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5">
      <text:list-level-style-bullet text:level="1" text:style-name="T37" text:bullet-char="–">
        <style:list-level-properties text:list-level-position-and-space-mode="label-alignment">
          <style:list-level-label-alignment fo:text-indent="-0.635cm" fo:margin-left="1.251cm"/>
        </style:list-level-properties>
        <style:text-properties fo:font-family="Arial" style:font-family-asian="Arial" style:font-family-complex="Arial"/>
      </text:list-level-style-bullet>
      <text:list-level-style-bullet text:level="2" text:style-name="T38"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39"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40"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41"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42"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43"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44"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45"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6">
      <text:list-level-style-bullet text:level="1" text:style-name="T46" text:bullet-char="–">
        <style:list-level-properties text:list-level-position-and-space-mode="label-alignment">
          <style:list-level-label-alignment fo:text-indent="-0.635cm" fo:margin-left="1.251cm"/>
        </style:list-level-properties>
        <style:text-properties fo:font-family="Arial" style:font-family-asian="Arial" style:font-family-complex="Arial"/>
      </text:list-level-style-bullet>
      <text:list-level-style-bullet text:level="2" text:style-name="T47"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48"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49"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50"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51"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52"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53"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54"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7">
      <text:list-level-style-bullet text:level="1" text:style-name="T55" text:bullet-char="–">
        <style:list-level-properties text:list-level-position-and-space-mode="label-alignment">
          <style:list-level-label-alignment fo:text-indent="-0.635cm" fo:margin-left="1.251cm"/>
        </style:list-level-properties>
        <style:text-properties fo:font-family="Arial" style:font-family-asian="Arial" style:font-family-complex="Arial"/>
      </text:list-level-style-bullet>
      <text:list-level-style-bullet text:level="2" text:style-name="T56"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57"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58"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59"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60"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61"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62"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63"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8">
      <text:list-level-style-bullet text:level="1" text:style-name="T64" text:bullet-char="–">
        <style:list-level-properties text:list-level-position-and-space-mode="label-alignment">
          <style:list-level-label-alignment fo:text-indent="-0.635cm" fo:margin-left="1.251cm"/>
        </style:list-level-properties>
        <style:text-properties fo:font-family="Arial" style:font-family-asian="Arial" style:font-family-complex="Arial"/>
      </text:list-level-style-bullet>
      <text:list-level-style-bullet text:level="2" text:style-name="T65"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66"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67"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68"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69"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70"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71"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72"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9">
      <text:list-level-style-bullet text:level="1" text:style-name="T73" text:bullet-char="–">
        <style:list-level-properties text:list-level-position-and-space-mode="label-alignment">
          <style:list-level-label-alignment fo:text-indent="-0.635cm" fo:margin-left="1.251cm"/>
        </style:list-level-properties>
        <style:text-properties fo:font-family="Arial" style:font-family-asian="Arial" style:font-family-complex="Arial"/>
      </text:list-level-style-bullet>
      <text:list-level-style-bullet text:level="2" text:style-name="T74"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75"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76"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77"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78"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79"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80"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81"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10">
      <text:list-level-style-bullet text:level="1" text:style-name="T82" text:bullet-char="–">
        <style:list-level-properties text:list-level-position-and-space-mode="label-alignment">
          <style:list-level-label-alignment fo:text-indent="-0.635cm" fo:margin-left="1.251cm"/>
        </style:list-level-properties>
        <style:text-properties fo:font-family="Arial" style:font-family-asian="Arial" style:font-family-complex="Arial"/>
      </text:list-level-style-bullet>
      <text:list-level-style-bullet text:level="2" text:style-name="T83"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84"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85"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86"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87"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88"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89"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90"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11">
      <text:list-level-style-bullet text:level="1" text:style-name="T91" text:bullet-char="–">
        <style:list-level-properties text:list-level-position-and-space-mode="label-alignment">
          <style:list-level-label-alignment fo:text-indent="-0.635cm" fo:margin-left="1.251cm"/>
        </style:list-level-properties>
        <style:text-properties fo:font-family="Arial" style:font-family-asian="Arial" style:font-family-complex="Arial"/>
      </text:list-level-style-bullet>
      <text:list-level-style-bullet text:level="2" text:style-name="T92"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93"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94"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95"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96"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97"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98"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99"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office:styles>
  <office:automatic-styles>
    <style:page-layout style:name="Mpm1">
      <style:page-layout-properties fo:page-width="21cm" fo:page-height="29.7cm" style:print-orientation="portrait" fo:margin-top="2cm" fo:margin-bottom="2.004cm" fo:margin-left="2cm" fo:margin-right="2cm"/>
    </style:page-layout>
    <style:page-layout style:name="Mpm2">
      <style:page-layout-properties fo:page-width="21cm" fo:page-height="29.7cm" style:print-orientation="portrait" fo:margin-top="2cm" fo:margin-bottom="2.004cm" fo:margin-left="2cm" fo:margin-right="2cm"/>
    </style:page-layout>
    <style:page-layout style:name="Mpm3">
      <style:page-layout-properties fo:page-width="21cm" fo:page-height="29.7cm" style:print-orientation="portrait" fo:margin-top="2cm" fo:margin-bottom="2.004cm" fo:margin-left="2cm" fo:margin-right="2cm"/>
    </style:page-layout>
    <style:page-layout style:name="Mpm4">
      <style:page-layout-properties fo:page-width="21cm" fo:page-height="29.7cm" style:print-orientation="portrait" fo:margin-top="2cm" fo:margin-bottom="2.004cm" fo:margin-left="2cm" fo:margin-right="2cm"/>
    </style:page-layout>
    <style:page-layout style:name="Mpm5">
      <style:page-layout-properties fo:page-width="21cm" fo:page-height="29.7cm" style:print-orientation="portrait" fo:margin-top="2cm" fo:margin-bottom="2.004cm" fo:margin-left="2cm" fo:margin-right="2cm"/>
    </style:page-layout>
    <style:page-layout style:name="Mpm6">
      <style:page-layout-properties fo:page-width="21cm" fo:page-height="29.7cm" style:print-orientation="portrait" fo:margin-top="2cm" fo:margin-bottom="2.004cm" fo:margin-left="2cm" fo:margin-right="2cm"/>
    </style:page-layout>
    <style:page-layout style:name="Mpm7">
      <style:page-layout-properties fo:page-width="21cm" fo:page-height="29.7cm" style:print-orientation="portrait" fo:margin-top="2cm" fo:margin-bottom="2.004cm" fo:margin-left="2cm" fo:margin-right="2cm"/>
    </style:page-layout>
    <style:page-layout style:name="Mpm8">
      <style:page-layout-properties fo:page-width="21cm" fo:page-height="29.7cm" style:print-orientation="portrait" fo:margin-top="2cm" fo:margin-bottom="2.004cm" fo:margin-left="2cm" fo:margin-right="2cm"/>
    </style:page-layout>
    <style:page-layout style:name="Mpm9">
      <style:page-layout-properties fo:page-width="21cm" fo:page-height="29.7cm" style:print-orientation="portrait" fo:margin-top="2cm" fo:margin-bottom="2.004cm" fo:margin-left="2cm" fo:margin-right="2cm"/>
    </style:page-layout>
    <style:page-layout style:name="Mpm10">
      <style:page-layout-properties fo:page-width="21cm" fo:page-height="29.7cm" style:print-orientation="portrait" fo:margin-top="2cm" fo:margin-bottom="2.004cm" fo:margin-left="2cm" fo:margin-right="2cm"/>
    </style:page-layout>
    <style:page-layout style:name="Mpm11">
      <style:page-layout-properties fo:page-width="21cm" fo:page-height="29.7cm" style:print-orientation="portrait" fo:margin-top="2cm" fo:margin-bottom="2.004cm" fo:margin-left="2cm" fo:margin-right="2cm"/>
    </style:page-layout>
    <style:page-layout style:name="Mpm12">
      <style:page-layout-properties fo:page-width="21cm" fo:page-height="29.7cm" style:print-orientation="portrait" fo:margin-top="2cm" fo:margin-bottom="2.004cm" fo:margin-left="2cm" fo:margin-right="2cm"/>
    </style:page-layout>
    <style:page-layout style:name="Mpm13">
      <style:page-layout-properties fo:page-width="21cm" fo:page-height="29.7cm" style:print-orientation="portrait" fo:margin-top="2cm" fo:margin-bottom="2.004cm" fo:margin-left="2cm" fo:margin-right="2cm"/>
    </style:page-layout>
    <style:page-layout style:name="Mpm14">
      <style:page-layout-properties fo:page-width="21cm" fo:page-height="29.7cm" style:print-orientation="portrait" fo:margin-top="2cm" fo:margin-bottom="2.004cm" fo:margin-left="2cm" fo:margin-right="2cm"/>
    </style:page-layout>
  </office:automatic-styles>
  <office:master-styles>
    <style:master-page style:name="Standard" style:page-layout-name="Mpm1"/>
    <style:master-page style:name="MasterPage2" style:page-layout-name="Mpm2"/>
    <style:master-page style:name="MasterPage3" style:page-layout-name="Mpm3"/>
    <style:master-page style:name="MasterPage4" style:page-layout-name="Mpm4"/>
    <style:master-page style:name="MasterPage5" style:page-layout-name="Mpm5"/>
    <style:master-page style:name="MasterPage6" style:page-layout-name="Mpm6"/>
    <style:master-page style:name="MasterPage7" style:page-layout-name="Mpm7"/>
    <style:master-page style:name="MasterPage8" style:page-layout-name="Mpm8"/>
    <style:master-page style:name="MasterPage9" style:page-layout-name="Mpm9"/>
    <style:master-page style:name="MasterPage10" style:page-layout-name="Mpm10"/>
    <style:master-page style:name="MasterPage11" style:page-layout-name="Mpm11"/>
    <style:master-page style:name="MasterPage12" style:page-layout-name="Mpm12"/>
    <style:master-page style:name="MasterPage13" style:page-layout-name="Mpm13"/>
    <style:master-page style:name="MasterPage14" style:page-layout-name="Mpm1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9.3.1.8</meta:generator>
    <meta:creation-date>2026-04-09T11:49:53Z</meta:creation-date>
  </office:meta>
</office:document-meta>
</file>